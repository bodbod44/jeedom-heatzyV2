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57.566cm"/>
    </style:style>
    <style:style style:name="co35" style:family="table-column">
      <style:table-column-properties fo:break-before="auto" style:column-width="3.849cm"/>
    </style:style>
    <style:style style:name="co36" style:family="table-column">
      <style:table-column-properties fo:break-before="auto" style:column-width="23.172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8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2.916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1.73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5.156cm"/>
    </style:style>
    <style:style style:name="co22" style:family="table-column">
      <style:table-column-properties fo:break-before="auto" style:column-width="7.445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833cm"/>
    </style:style>
    <style:style style:name="co25" style:family="table-column">
      <style:table-column-properties fo:break-before="auto" style:column-width="5.447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4.212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4.175cm"/>
    </style:style>
    <style:style style:name="co32" style:family="table-column">
      <style:table-column-properties fo:break-before="auto" style:column-width="3.921cm"/>
    </style:style>
    <style:style style:name="co33" style:family="table-column">
      <style:table-column-properties fo:break-before="auto" style:column-width="2.034cm"/>
    </style:style>
    <style:style style:name="co37" style:family="table-column">
      <style:table-column-properties fo:break-before="auto" style:column-width="0.799cm"/>
    </style:style>
    <style:style style:name="co38" style:family="table-column">
      <style:table-column-properties fo:break-before="auto" style:column-width="12.21cm"/>
    </style:style>
    <style:style style:name="co39" style:family="table-column">
      <style:table-column-properties fo:break-before="auto" style:column-width="10.7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able-cell-properties fo:background-color="#e8f2a1"/>
      <style:text-properties style:font-name="Courier New" fo:font-size="12pt"/>
    </style:style>
    <style:style style:name="ce69" style:family="table-cell" style:parent-style-name="Default">
      <style:text-properties fo:font-size="12pt"/>
    </style:style>
    <style:style style:name="ce70" style:family="table-cell" style:parent-style-name="Default">
      <style:table-cell-properties fo:background-color="#ffff00"/>
      <style:text-properties fo:font-size="12pt"/>
    </style:style>
    <style:style style:name="ce71" style:family="table-cell" style:parent-style-name="Default">
      <style:text-properties style:font-name="Courier New" fo:font-size="12pt"/>
    </style:style>
    <style:style style:name="ce72" style:family="table-cell" style:parent-style-name="Default">
      <style:table-cell-properties fo:background-color="#ffff00"/>
      <style:text-properties style:font-name="Courier New" fo:font-size="1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transparent"/>
      <style:text-properties style:font-name="Courier New" fo:font-size="8pt"/>
    </style:style>
    <style:style style:name="ce36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74" style:family="table-cell" style:parent-style-name="Default">
      <style:table-cell-properties fo:background-color="#e8f2a1"/>
      <style:text-properties style:font-name="Courier New" fo:font-size="12pt"/>
    </style:style>
    <style:style style:name="ce75" style:family="table-cell" style:parent-style-name="Default">
      <style:text-properties fo:font-size="12pt"/>
    </style:style>
    <style:style style:name="ce76" style:family="table-cell" style:parent-style-name="Default">
      <style:table-cell-properties fo:background-color="#ffff00"/>
      <style:text-properties fo:font-size="12pt"/>
    </style:style>
    <style:style style:name="ce77" style:family="table-cell" style:parent-style-name="Default">
      <style:text-properties style:font-name="Courier New" fo:font-size="12pt"/>
    </style:style>
    <style:style style:name="ce78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6"/>
        <table:table-column table:style-name="co24" table:default-cell-style-name="ce28"/>
        <table:table-column table:style-name="co25" table:default-cell-style-name="ce28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0" office:value-type="string" calcext:value-type="string">
            <text:p>cmd_id</text:p>
          </table:table-cell>
          <table:table-cell table:style-name="ce10" office:value-type="string" calcext:value-type="string">
            <text:p>Logical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ubType</text:p>
          </table:table-cell>
          <table:table-cell table:style-name="ce10" office:value-type="string" calcext:value-type="string">
            <text:p>Unite</text:p>
          </table:table-cell>
          <table:table-cell table:style-name="ce11" office:value-type="string" calcext:value-type="string">
            <text:p>Config_infoName</text:p>
          </table:table-cell>
          <table:table-cell table:style-name="ce11" office:value-type="string" calcext:value-type="string">
            <text:p>Config_value</text:p>
          </table:table-cell>
          <table:table-cell table:style-name="ce11" office:value-type="string" calcext:value-type="string">
            <text:p>Config_minValue</text:p>
          </table:table-cell>
          <table:table-cell table:style-name="ce11" office:value-type="string" calcext:value-type="string">
            <text:p>Config_maxValue</text:p>
          </table:table-cell>
          <table:table-cell table:style-name="ce11" office:value-type="string" calcext:value-type="string">
            <text:p>Config_tempHL</text:p>
          </table:table-cell>
          <table:table-cell table:style-name="ce11" office:value-type="string" calcext:value-type="string">
            <text:p>setValue</text:p>
          </table:table-cell>
          <table:table-cell table:style-name="ce10" office:value-type="string" calcext:value-type="string">
            <text:p>Display_param_step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IsHistorized</text:p>
          </table:table-cell>
          <table:table-cell table:style-name="ce10" office:value-type="string" calcext:value-type="string">
            <text:p>IsVisible</text:p>
          </table:table-cell>
          <table:table-cell table:style-name="ce12"/>
          <table:table-cell table:style-name="ce27" office:value-type="string" calcext:value-type="string">
            <text:p>{</text:p>
          </table:table-cell>
          <table:table-cell table:style-name="ce27"/>
          <table:table-cell table:style-name="ce30"/>
          <table:table-cell table:style-name="ce36" office:value-type="string" calcext:value-type="string">
            <text:p>.</text:p>
          </table:table-cell>
          <table:table-cell table:style-name="ce27" office:value-type="string" calcext:value-type="string">
            <text:p>"cmds":[</text:p>
          </table:table-cell>
          <table:table-cell table:style-name="ce27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IF([.B2]=&quot;&quot;;&quot;&quot;;&#10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amp;[.N2]&amp;&quot;&quot;&amp;REPT(&quot; &quot;;5-LEN([.N2]));&quot;null&quot;&amp;REPT(&quot; &quot;;5-4))&#10;&amp;&quot;,&quot;&quot;&quot;&amp;[.O$1]&amp;&quot;&quot;&quot;:&quot;&amp;IF([.O2]&lt;&gt;&quot;&quot;;&quot;&quot;&quot;&quot;&amp;[.O2]&amp;&quot;&quot;&quot;&quot;&amp;REPT(&quot; &quot;;10-LEN([.O2]));&quot;null&quot;&amp;REPT(&quot; &quot;;10-4+2))&#10;&amp;&quot;,&quot;&quot;&quot;&amp;[.P$1]&amp;&quot;&quot;&quot;:&quot;&amp;[.P2]&#10;&amp;&quot;,&quot;&quot;&quot;&amp;[.Q$1]&amp;&quot;&quot;&quot;:&quot;&amp;[.Q2]&#10;&amp;&quot;}&quot;&#10;)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&quot;&quot;&amp;IF([.Y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P$1]&amp;&quot;&quot;&quot;:&quot;&amp;[.P2]&#10;&amp;&quot;,&quot;&quot;&quot;&amp;[.Q$1]&amp;&quot;&quot;&quot;:&quot;&amp;[.Q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IF([.B3]=&quot;&quot;;&quot;&quot;;&#10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amp;[.N3]&amp;&quot;&quot;&amp;REPT(&quot; &quot;;5-LEN([.N3]));&quot;null&quot;&amp;REPT(&quot; &quot;;5-4))&#10;&amp;&quot;,&quot;&quot;&quot;&amp;[.O$1]&amp;&quot;&quot;&quot;:&quot;&amp;IF([.O3]&lt;&gt;&quot;&quot;;&quot;&quot;&quot;&quot;&amp;[.O3]&amp;&quot;&quot;&quot;&quot;&amp;REPT(&quot; &quot;;10-LEN([.O3]));&quot;null&quot;&amp;REPT(&quot; &quot;;10-4+2))&#10;&amp;&quot;,&quot;&quot;&quot;&amp;[.P$1]&amp;&quot;&quot;&quot;:&quot;&amp;[.P3]&#10;&amp;&quot;,&quot;&quot;&quot;&amp;[.Q$1]&amp;&quot;&quot;&quot;:&quot;&amp;[.Q3]&#10;&amp;&quot;}&quot;&#10;)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P$1]&amp;&quot;&quot;&quot;:&quot;&amp;[.P3]&#10;&amp;&quot;,&quot;&quot;&quot;&amp;[.Q$1]&amp;&quot;&quot;&quot;:&quot;&amp;[.Q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 table:style-name="ce30"/>
          <table:table-cell table:style-name="ce17" table:formula="of:=&quot;&quot;&amp;IF([.U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IF([.B4]=&quot;&quot;;&quot;&quot;;&#10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amp;[.N4]&amp;&quot;&quot;&amp;REPT(&quot; &quot;;5-LEN([.N4]));&quot;null&quot;&amp;REPT(&quot; &quot;;5-4))&#10;&amp;&quot;,&quot;&quot;&quot;&amp;[.O$1]&amp;&quot;&quot;&quot;:&quot;&amp;IF([.O4]&lt;&gt;&quot;&quot;;&quot;&quot;&quot;&quot;&amp;[.O4]&amp;&quot;&quot;&quot;&quot;&amp;REPT(&quot; &quot;;10-LEN([.O4]));&quot;null&quot;&amp;REPT(&quot; &quot;;10-4+2))&#10;&amp;&quot;,&quot;&quot;&quot;&amp;[.P$1]&amp;&quot;&quot;&quot;:&quot;&amp;[.P4]&#10;&amp;&quot;,&quot;&quot;&quot;&amp;[.Q$1]&amp;&quot;&quot;&quot;:&quot;&amp;[.Q4]&#10;&amp;&quot;}&quot;&#10;)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P$1]&amp;&quot;&quot;&quot;:&quot;&amp;[.P4]&#10;&amp;&quot;,&quot;&quot;&quot;&amp;[.Q$1]&amp;&quot;&quot;&quot;:&quot;&amp;[.Q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 table:style-name="ce30"/>
          <table:table-cell table:style-name="ce17" table:formula="of:=&quot;&quot;&amp;IF([.U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IF([.B5]=&quot;&quot;;&quot;&quot;;&#10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amp;[.N5]&amp;&quot;&quot;&amp;REPT(&quot; &quot;;5-LEN([.N5]));&quot;null&quot;&amp;REPT(&quot; &quot;;5-4))&#10;&amp;&quot;,&quot;&quot;&quot;&amp;[.O$1]&amp;&quot;&quot;&quot;:&quot;&amp;IF([.O5]&lt;&gt;&quot;&quot;;&quot;&quot;&quot;&quot;&amp;[.O5]&amp;&quot;&quot;&quot;&quot;&amp;REPT(&quot; &quot;;10-LEN([.O5]));&quot;null&quot;&amp;REPT(&quot; &quot;;10-4+2))&#10;&amp;&quot;,&quot;&quot;&quot;&amp;[.P$1]&amp;&quot;&quot;&quot;:&quot;&amp;[.P5]&#10;&amp;&quot;,&quot;&quot;&quot;&amp;[.Q$1]&amp;&quot;&quot;&quot;:&quot;&amp;[.Q5]&#10;&amp;&quot;}&quot;&#10;)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IF([.B6]=&quot;&quot;;&quot;&quot;;&#10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amp;[.N6]&amp;&quot;&quot;&amp;REPT(&quot; &quot;;5-LEN([.N6]));&quot;null&quot;&amp;REPT(&quot; &quot;;5-4))&#10;&amp;&quot;,&quot;&quot;&quot;&amp;[.O$1]&amp;&quot;&quot;&quot;:&quot;&amp;IF([.O6]&lt;&gt;&quot;&quot;;&quot;&quot;&quot;&quot;&amp;[.O6]&amp;&quot;&quot;&quot;&quot;&amp;REPT(&quot; &quot;;10-LEN([.O6]));&quot;null&quot;&amp;REPT(&quot; &quot;;10-4+2))&#10;&amp;&quot;,&quot;&quot;&quot;&amp;[.P$1]&amp;&quot;&quot;&quot;:&quot;&amp;[.P6]&#10;&amp;&quot;,&quot;&quot;&quot;&amp;[.Q$1]&amp;&quot;&quot;&quot;:&quot;&amp;[.Q6]&#10;&amp;&quot;}&quot;&#10;)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IF([.B7]=&quot;&quot;;&quot;&quot;;&#10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amp;[.N7]&amp;&quot;&quot;&amp;REPT(&quot; &quot;;5-LEN([.N7]));&quot;null&quot;&amp;REPT(&quot; &quot;;5-4))&#10;&amp;&quot;,&quot;&quot;&quot;&amp;[.O$1]&amp;&quot;&quot;&quot;:&quot;&amp;IF([.O7]&lt;&gt;&quot;&quot;;&quot;&quot;&quot;&quot;&amp;[.O7]&amp;&quot;&quot;&quot;&quot;&amp;REPT(&quot; &quot;;10-LEN([.O7]));&quot;null&quot;&amp;REPT(&quot; &quot;;10-4+2))&#10;&amp;&quot;,&quot;&quot;&quot;&amp;[.P$1]&amp;&quot;&quot;&quot;:&quot;&amp;[.P7]&#10;&amp;&quot;,&quot;&quot;&quot;&amp;[.Q$1]&amp;&quot;&quot;&quot;:&quot;&amp;[.Q7]&#10;&amp;&quot;}&quot;&#10;)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P$1]&amp;&quot;&quot;&quot;:&quot;&amp;[.P7]&#10;&amp;&quot;,&quot;&quot;&quot;&amp;[.Q$1]&amp;&quot;&quot;&quot;:&quot;&amp;[.Q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IF([.B8]=&quot;&quot;;&quot;&quot;;&#10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amp;[.N8]&amp;&quot;&quot;&amp;REPT(&quot; &quot;;5-LEN([.N8]));&quot;null&quot;&amp;REPT(&quot; &quot;;5-4))&#10;&amp;&quot;,&quot;&quot;&quot;&amp;[.O$1]&amp;&quot;&quot;&quot;:&quot;&amp;IF([.O8]&lt;&gt;&quot;&quot;;&quot;&quot;&quot;&quot;&amp;[.O8]&amp;&quot;&quot;&quot;&quot;&amp;REPT(&quot; &quot;;10-LEN([.O8]));&quot;null&quot;&amp;REPT(&quot; &quot;;10-4+2))&#10;&amp;&quot;,&quot;&quot;&quot;&amp;[.P$1]&amp;&quot;&quot;&quot;:&quot;&amp;[.P8]&#10;&amp;&quot;,&quot;&quot;&quot;&amp;[.Q$1]&amp;&quot;&quot;&quot;:&quot;&amp;[.Q8]&#10;&amp;&quot;}&quot;&#10;)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P$1]&amp;&quot;&quot;&quot;:&quot;&amp;[.P8]&#10;&amp;&quot;,&quot;&quot;&quot;&amp;[.Q$1]&amp;&quot;&quot;&quot;:&quot;&amp;[.Q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IF([.B9]=&quot;&quot;;&quot;&quot;;&#10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amp;[.N9]&amp;&quot;&quot;&amp;REPT(&quot; &quot;;5-LEN([.N9]));&quot;null&quot;&amp;REPT(&quot; &quot;;5-4))&#10;&amp;&quot;,&quot;&quot;&quot;&amp;[.O$1]&amp;&quot;&quot;&quot;:&quot;&amp;IF([.O9]&lt;&gt;&quot;&quot;;&quot;&quot;&quot;&quot;&amp;[.O9]&amp;&quot;&quot;&quot;&quot;&amp;REPT(&quot; &quot;;10-LEN([.O9]));&quot;null&quot;&amp;REPT(&quot; &quot;;10-4+2))&#10;&amp;&quot;,&quot;&quot;&quot;&amp;[.P$1]&amp;&quot;&quot;&quot;:&quot;&amp;[.P9]&#10;&amp;&quot;,&quot;&quot;&quot;&amp;[.Q$1]&amp;&quot;&quot;&quot;:&quot;&amp;[.Q9]&#10;&amp;&quot;}&quot;&#10;)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value":"17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IF([.B10]=&quot;&quot;;&quot;&quot;;&#10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amp;[.N10]&amp;&quot;&quot;&amp;REPT(&quot; &quot;;5-LEN([.N10]));&quot;null&quot;&amp;REPT(&quot; &quot;;5-4))&#10;&amp;&quot;,&quot;&quot;&quot;&amp;[.O$1]&amp;&quot;&quot;&quot;:&quot;&amp;IF([.O10]&lt;&gt;&quot;&quot;;&quot;&quot;&quot;&quot;&amp;[.O10]&amp;&quot;&quot;&quot;&quot;&amp;REPT(&quot; &quot;;10-LEN([.O10]));&quot;null&quot;&amp;REPT(&quot; &quot;;10-4+2))&#10;&amp;&quot;,&quot;&quot;&quot;&amp;[.P$1]&amp;&quot;&quot;&quot;:&quot;&amp;[.P10]&#10;&amp;&quot;,&quot;&quot;&quot;&amp;[.Q$1]&amp;&quot;&quot;&quot;:&quot;&amp;[.Q10]&#10;&amp;&quot;}&quot;&#10;)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value":"17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P$1]&amp;&quot;&quot;&quot;:&quot;&amp;[.P10]&#10;&amp;&quot;,&quot;&quot;&quot;&amp;[.Q$1]&amp;&quot;&quot;&quot;:&quot;&amp;[.Q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IF([.B11]=&quot;&quot;;&quot;&quot;;&#10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amp;[.N11]&amp;&quot;&quot;&amp;REPT(&quot; &quot;;5-LEN([.N11]));&quot;null&quot;&amp;REPT(&quot; &quot;;5-4))&#10;&amp;&quot;,&quot;&quot;&quot;&amp;[.O$1]&amp;&quot;&quot;&quot;:&quot;&amp;IF([.O11]&lt;&gt;&quot;&quot;;&quot;&quot;&quot;&quot;&amp;[.O11]&amp;&quot;&quot;&quot;&quot;&amp;REPT(&quot; &quot;;10-LEN([.O11]));&quot;null&quot;&amp;REPT(&quot; &quot;;10-4+2))&#10;&amp;&quot;,&quot;&quot;&quot;&amp;[.P$1]&amp;&quot;&quot;&quot;:&quot;&amp;[.P11]&#10;&amp;&quot;,&quot;&quot;&quot;&amp;[.Q$1]&amp;&quot;&quot;&quot;:&quot;&amp;[.Q11]&#10;&amp;&quot;}&quot;&#10;)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P$1]&amp;&quot;&quot;&quot;:&quot;&amp;[.P11]&#10;&amp;&quot;,&quot;&quot;&quot;&amp;[.Q$1]&amp;&quot;&quot;&quot;:&quot;&amp;[.Q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IF([.B12]=&quot;&quot;;&quot;&quot;;&#10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amp;[.N12]&amp;&quot;&quot;&amp;REPT(&quot; &quot;;5-LEN([.N12]));&quot;null&quot;&amp;REPT(&quot; &quot;;5-4))&#10;&amp;&quot;,&quot;&quot;&quot;&amp;[.O$1]&amp;&quot;&quot;&quot;:&quot;&amp;IF([.O12]&lt;&gt;&quot;&quot;;&quot;&quot;&quot;&quot;&amp;[.O12]&amp;&quot;&quot;&quot;&quot;&amp;REPT(&quot; &quot;;10-LEN([.O12]));&quot;null&quot;&amp;REPT(&quot; &quot;;10-4+2))&#10;&amp;&quot;,&quot;&quot;&quot;&amp;[.P$1]&amp;&quot;&quot;&quot;:&quot;&amp;[.P12]&#10;&amp;&quot;,&quot;&quot;&quot;&amp;[.Q$1]&amp;&quot;&quot;&quot;:&quot;&amp;[.Q12]&#10;&amp;&quot;}&quot;&#10;)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value":"19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IF([.B13]=&quot;&quot;;&quot;&quot;;&#10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amp;[.N13]&amp;&quot;&quot;&amp;REPT(&quot; &quot;;5-LEN([.N13]));&quot;null&quot;&amp;REPT(&quot; &quot;;5-4))&#10;&amp;&quot;,&quot;&quot;&quot;&amp;[.O$1]&amp;&quot;&quot;&quot;:&quot;&amp;IF([.O13]&lt;&gt;&quot;&quot;;&quot;&quot;&quot;&quot;&amp;[.O13]&amp;&quot;&quot;&quot;&quot;&amp;REPT(&quot; &quot;;10-LEN([.O13]));&quot;null&quot;&amp;REPT(&quot; &quot;;10-4+2))&#10;&amp;&quot;,&quot;&quot;&quot;&amp;[.P$1]&amp;&quot;&quot;&quot;:&quot;&amp;[.P13]&#10;&amp;&quot;,&quot;&quot;&quot;&amp;[.Q$1]&amp;&quot;&quot;&quot;:&quot;&amp;[.Q13]&#10;&amp;&quot;}&quot;&#10;)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value":"19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P$1]&amp;&quot;&quot;&quot;:&quot;&amp;[.P13]&#10;&amp;&quot;,&quot;&quot;&quot;&amp;[.Q$1]&amp;&quot;&quot;&quot;:&quot;&amp;[.Q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IF([.B14]=&quot;&quot;;&quot;&quot;;&#10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amp;[.N14]&amp;&quot;&quot;&amp;REPT(&quot; &quot;;5-LEN([.N14]));&quot;null&quot;&amp;REPT(&quot; &quot;;5-4))&#10;&amp;&quot;,&quot;&quot;&quot;&amp;[.O$1]&amp;&quot;&quot;&quot;:&quot;&amp;IF([.O14]&lt;&gt;&quot;&quot;;&quot;&quot;&quot;&quot;&amp;[.O14]&amp;&quot;&quot;&quot;&quot;&amp;REPT(&quot; &quot;;10-LEN([.O14]));&quot;null&quot;&amp;REPT(&quot; &quot;;10-4+2))&#10;&amp;&quot;,&quot;&quot;&quot;&amp;[.P$1]&amp;&quot;&quot;&quot;:&quot;&amp;[.P14]&#10;&amp;&quot;,&quot;&quot;&quot;&amp;[.Q$1]&amp;&quot;&quot;&quot;:&quot;&amp;[.Q14]&#10;&amp;&quot;}&quot;&#10;)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P$1]&amp;&quot;&quot;&quot;:&quot;&amp;[.P14]&#10;&amp;&quot;,&quot;&quot;&quot;&amp;[.Q$1]&amp;&quot;&quot;&quot;:&quot;&amp;[.Q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IF([.B15]=&quot;&quot;;&quot;&quot;;&#10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amp;[.N15]&amp;&quot;&quot;&amp;REPT(&quot; &quot;;5-LEN([.N15]));&quot;null&quot;&amp;REPT(&quot; &quot;;5-4))&#10;&amp;&quot;,&quot;&quot;&quot;&amp;[.O$1]&amp;&quot;&quot;&quot;:&quot;&amp;IF([.O15]&lt;&gt;&quot;&quot;;&quot;&quot;&quot;&quot;&amp;[.O15]&amp;&quot;&quot;&quot;&quot;&amp;REPT(&quot; &quot;;10-LEN([.O15]));&quot;null&quot;&amp;REPT(&quot; &quot;;10-4+2))&#10;&amp;&quot;,&quot;&quot;&quot;&amp;[.P$1]&amp;&quot;&quot;&quot;:&quot;&amp;[.P15]&#10;&amp;&quot;,&quot;&quot;&quot;&amp;[.Q$1]&amp;&quot;&quot;&quot;:&quot;&amp;[.Q15]&#10;&amp;&quot;}&quot;&#10;)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P$1]&amp;&quot;&quot;&quot;:&quot;&amp;[.P15]&#10;&amp;&quot;,&quot;&quot;&quot;&amp;[.Q$1]&amp;&quot;&quot;&quot;:&quot;&amp;[.Q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IF([.B16]=&quot;&quot;;&quot;&quot;;&#10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amp;[.N16]&amp;&quot;&quot;&amp;REPT(&quot; &quot;;5-LEN([.N16]));&quot;null&quot;&amp;REPT(&quot; &quot;;5-4))&#10;&amp;&quot;,&quot;&quot;&quot;&amp;[.O$1]&amp;&quot;&quot;&quot;:&quot;&amp;IF([.O16]&lt;&gt;&quot;&quot;;&quot;&quot;&quot;&quot;&amp;[.O16]&amp;&quot;&quot;&quot;&quot;&amp;REPT(&quot; &quot;;10-LEN([.O16]));&quot;null&quot;&amp;REPT(&quot; &quot;;10-4+2))&#10;&amp;&quot;,&quot;&quot;&quot;&amp;[.P$1]&amp;&quot;&quot;&quot;:&quot;&amp;[.P16]&#10;&amp;&quot;,&quot;&quot;&quot;&amp;[.Q$1]&amp;&quot;&quot;&quot;:&quot;&amp;[.Q16]&#10;&amp;&quot;}&quot;&#10;)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P$1]&amp;&quot;&quot;&quot;:&quot;&amp;[.P16]&#10;&amp;&quot;,&quot;&quot;&quot;&amp;[.Q$1]&amp;&quot;&quot;&quot;:&quot;&amp;[.Q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 table:style-name="ce30"/>
          <table:table-cell table:style-name="ce17" table:formula="of:=&quot;&quot;&amp;IF([.U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IF([.B17]=&quot;&quot;;&quot;&quot;;&#10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amp;[.N17]&amp;&quot;&quot;&amp;REPT(&quot; &quot;;5-LEN([.N17]));&quot;null&quot;&amp;REPT(&quot; &quot;;5-4))&#10;&amp;&quot;,&quot;&quot;&quot;&amp;[.O$1]&amp;&quot;&quot;&quot;:&quot;&amp;IF([.O17]&lt;&gt;&quot;&quot;;&quot;&quot;&quot;&quot;&amp;[.O17]&amp;&quot;&quot;&quot;&quot;&amp;REPT(&quot; &quot;;10-LEN([.O17]));&quot;null&quot;&amp;REPT(&quot; &quot;;10-4+2))&#10;&amp;&quot;,&quot;&quot;&quot;&amp;[.P$1]&amp;&quot;&quot;&quot;:&quot;&amp;[.P17]&#10;&amp;&quot;,&quot;&quot;&quot;&amp;[.Q$1]&amp;&quot;&quot;&quot;:&quot;&amp;[.Q17]&#10;&amp;&quot;}&quot;&#10;)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P$1]&amp;&quot;&quot;&quot;:&quot;&amp;[.P17]&#10;&amp;&quot;,&quot;&quot;&quot;&amp;[.Q$1]&amp;&quot;&quot;&quot;:&quot;&amp;[.Q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IF([.B18]=&quot;&quot;;&quot;&quot;;&#10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amp;[.N18]&amp;&quot;&quot;&amp;REPT(&quot; &quot;;5-LEN([.N18]));&quot;null&quot;&amp;REPT(&quot; &quot;;5-4))&#10;&amp;&quot;,&quot;&quot;&quot;&amp;[.O$1]&amp;&quot;&quot;&quot;:&quot;&amp;IF([.O18]&lt;&gt;&quot;&quot;;&quot;&quot;&quot;&quot;&amp;[.O18]&amp;&quot;&quot;&quot;&quot;&amp;REPT(&quot; &quot;;10-LEN([.O18]));&quot;null&quot;&amp;REPT(&quot; &quot;;10-4+2))&#10;&amp;&quot;,&quot;&quot;&quot;&amp;[.P$1]&amp;&quot;&quot;&quot;:&quot;&amp;[.P18]&#10;&amp;&quot;,&quot;&quot;&quot;&amp;[.Q$1]&amp;&quot;&quot;&quot;:&quot;&amp;[.Q18]&#10;&amp;&quot;}&quot;&#10;)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P$1]&amp;&quot;&quot;&quot;:&quot;&amp;[.P18]&#10;&amp;&quot;,&quot;&quot;&quot;&amp;[.Q$1]&amp;&quot;&quot;&quot;:&quot;&amp;[.Q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IF([.B19]=&quot;&quot;;&quot;&quot;;&#10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amp;[.N19]&amp;&quot;&quot;&amp;REPT(&quot; &quot;;5-LEN([.N19]));&quot;null&quot;&amp;REPT(&quot; &quot;;5-4))&#10;&amp;&quot;,&quot;&quot;&quot;&amp;[.O$1]&amp;&quot;&quot;&quot;:&quot;&amp;IF([.O19]&lt;&gt;&quot;&quot;;&quot;&quot;&quot;&quot;&amp;[.O19]&amp;&quot;&quot;&quot;&quot;&amp;REPT(&quot; &quot;;10-LEN([.O19]));&quot;null&quot;&amp;REPT(&quot; &quot;;10-4+2))&#10;&amp;&quot;,&quot;&quot;&quot;&amp;[.P$1]&amp;&quot;&quot;&quot;:&quot;&amp;[.P19]&#10;&amp;&quot;,&quot;&quot;&quot;&amp;[.Q$1]&amp;&quot;&quot;&quot;:&quot;&amp;[.Q19]&#10;&amp;&quot;}&quot;&#10;)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P$1]&amp;&quot;&quot;&quot;:&quot;&amp;[.P19]&#10;&amp;&quot;,&quot;&quot;&quot;&amp;[.Q$1]&amp;&quot;&quot;&quot;:&quot;&amp;[.Q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IF([.B20]=&quot;&quot;;&quot;&quot;;&#10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amp;[.N20]&amp;&quot;&quot;&amp;REPT(&quot; &quot;;5-LEN([.N20]));&quot;null&quot;&amp;REPT(&quot; &quot;;5-4))&#10;&amp;&quot;,&quot;&quot;&quot;&amp;[.O$1]&amp;&quot;&quot;&quot;:&quot;&amp;IF([.O20]&lt;&gt;&quot;&quot;;&quot;&quot;&quot;&quot;&amp;[.O20]&amp;&quot;&quot;&quot;&quot;&amp;REPT(&quot; &quot;;10-LEN([.O20]));&quot;null&quot;&amp;REPT(&quot; &quot;;10-4+2))&#10;&amp;&quot;,&quot;&quot;&quot;&amp;[.P$1]&amp;&quot;&quot;&quot;:&quot;&amp;[.P20]&#10;&amp;&quot;,&quot;&quot;&quot;&amp;[.Q$1]&amp;&quot;&quot;&quot;:&quot;&amp;[.Q20]&#10;&amp;&quot;}&quot;&#10;)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P$1]&amp;&quot;&quot;&quot;:&quot;&amp;[.P20]&#10;&amp;&quot;,&quot;&quot;&quot;&amp;[.Q$1]&amp;&quot;&quot;&quot;:&quot;&amp;[.Q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IF([.B21]=&quot;&quot;;&quot;&quot;;&#10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amp;[.N21]&amp;&quot;&quot;&amp;REPT(&quot; &quot;;5-LEN([.N21]));&quot;null&quot;&amp;REPT(&quot; &quot;;5-4))&#10;&amp;&quot;,&quot;&quot;&quot;&amp;[.O$1]&amp;&quot;&quot;&quot;:&quot;&amp;IF([.O21]&lt;&gt;&quot;&quot;;&quot;&quot;&quot;&quot;&amp;[.O21]&amp;&quot;&quot;&quot;&quot;&amp;REPT(&quot; &quot;;10-LEN([.O21]));&quot;null&quot;&amp;REPT(&quot; &quot;;10-4+2))&#10;&amp;&quot;,&quot;&quot;&quot;&amp;[.P$1]&amp;&quot;&quot;&quot;:&quot;&amp;[.P21]&#10;&amp;&quot;,&quot;&quot;&quot;&amp;[.Q$1]&amp;&quot;&quot;&quot;:&quot;&amp;[.Q21]&#10;&amp;&quot;}&quot;&#10;)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P$1]&amp;&quot;&quot;&quot;:&quot;&amp;[.P21]&#10;&amp;&quot;,&quot;&quot;&quot;&amp;[.Q$1]&amp;&quot;&quot;&quot;:&quot;&amp;[.Q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IF([.B22]=&quot;&quot;;&quot;&quot;;&#10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amp;[.N22]&amp;&quot;&quot;&amp;REPT(&quot; &quot;;5-LEN([.N22]));&quot;null&quot;&amp;REPT(&quot; &quot;;5-4))&#10;&amp;&quot;,&quot;&quot;&quot;&amp;[.O$1]&amp;&quot;&quot;&quot;:&quot;&amp;IF([.O22]&lt;&gt;&quot;&quot;;&quot;&quot;&quot;&quot;&amp;[.O22]&amp;&quot;&quot;&quot;&quot;&amp;REPT(&quot; &quot;;10-LEN([.O22]));&quot;null&quot;&amp;REPT(&quot; &quot;;10-4+2))&#10;&amp;&quot;,&quot;&quot;&quot;&amp;[.P$1]&amp;&quot;&quot;&quot;:&quot;&amp;[.P22]&#10;&amp;&quot;,&quot;&quot;&quot;&amp;[.Q$1]&amp;&quot;&quot;&quot;:&quot;&amp;[.Q22]&#10;&amp;&quot;}&quot;&#10;)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P$1]&amp;&quot;&quot;&quot;:&quot;&amp;[.P22]&#10;&amp;&quot;,&quot;&quot;&quot;&amp;[.Q$1]&amp;&quot;&quot;&quot;:&quot;&amp;[.Q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IF([.B23]=&quot;&quot;;&quot;&quot;;&#10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amp;[.N23]&amp;&quot;&quot;&amp;REPT(&quot; &quot;;5-LEN([.N23]));&quot;null&quot;&amp;REPT(&quot; &quot;;5-4))&#10;&amp;&quot;,&quot;&quot;&quot;&amp;[.O$1]&amp;&quot;&quot;&quot;:&quot;&amp;IF([.O23]&lt;&gt;&quot;&quot;;&quot;&quot;&quot;&quot;&amp;[.O23]&amp;&quot;&quot;&quot;&quot;&amp;REPT(&quot; &quot;;10-LEN([.O23]));&quot;null&quot;&amp;REPT(&quot; &quot;;10-4+2))&#10;&amp;&quot;,&quot;&quot;&quot;&amp;[.P$1]&amp;&quot;&quot;&quot;:&quot;&amp;[.P23]&#10;&amp;&quot;,&quot;&quot;&quot;&amp;[.Q$1]&amp;&quot;&quot;&quot;:&quot;&amp;[.Q23]&#10;&amp;&quot;}&quot;&#10;)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P$1]&amp;&quot;&quot;&quot;:&quot;&amp;[.P23]&#10;&amp;&quot;,&quot;&quot;&quot;&amp;[.Q$1]&amp;&quot;&quot;&quot;:&quot;&amp;[.Q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IF([.B24]=&quot;&quot;;&quot;&quot;;&#10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amp;[.N24]&amp;&quot;&quot;&amp;REPT(&quot; &quot;;5-LEN([.N24]));&quot;null&quot;&amp;REPT(&quot; &quot;;5-4))&#10;&amp;&quot;,&quot;&quot;&quot;&amp;[.O$1]&amp;&quot;&quot;&quot;:&quot;&amp;IF([.O24]&lt;&gt;&quot;&quot;;&quot;&quot;&quot;&quot;&amp;[.O24]&amp;&quot;&quot;&quot;&quot;&amp;REPT(&quot; &quot;;10-LEN([.O24]));&quot;null&quot;&amp;REPT(&quot; &quot;;10-4+2))&#10;&amp;&quot;,&quot;&quot;&quot;&amp;[.P$1]&amp;&quot;&quot;&quot;:&quot;&amp;[.P24]&#10;&amp;&quot;,&quot;&quot;&quot;&amp;[.Q$1]&amp;&quot;&quot;&quot;:&quot;&amp;[.Q24]&#10;&amp;&quot;}&quot;&#10;)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P$1]&amp;&quot;&quot;&quot;:&quot;&amp;[.P24]&#10;&amp;&quot;,&quot;&quot;&quot;&amp;[.Q$1]&amp;&quot;&quot;&quot;:&quot;&amp;[.Q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IF([.B25]=&quot;&quot;;&quot;&quot;;&#10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amp;[.N25]&amp;&quot;&quot;&amp;REPT(&quot; &quot;;5-LEN([.N25]));&quot;null&quot;&amp;REPT(&quot; &quot;;5-4))&#10;&amp;&quot;,&quot;&quot;&quot;&amp;[.O$1]&amp;&quot;&quot;&quot;:&quot;&amp;IF([.O25]&lt;&gt;&quot;&quot;;&quot;&quot;&quot;&quot;&amp;[.O25]&amp;&quot;&quot;&quot;&quot;&amp;REPT(&quot; &quot;;10-LEN([.O25]));&quot;null&quot;&amp;REPT(&quot; &quot;;10-4+2))&#10;&amp;&quot;,&quot;&quot;&quot;&amp;[.P$1]&amp;&quot;&quot;&quot;:&quot;&amp;[.P25]&#10;&amp;&quot;,&quot;&quot;&quot;&amp;[.Q$1]&amp;&quot;&quot;&quot;:&quot;&amp;[.Q25]&#10;&amp;&quot;}&quot;&#10;)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P$1]&amp;&quot;&quot;&quot;:&quot;&amp;[.P25]&#10;&amp;&quot;,&quot;&quot;&quot;&amp;[.Q$1]&amp;&quot;&quot;&quot;:&quot;&amp;[.Q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 table:style-name="ce30"/>
          <table:table-cell table:style-name="ce17" table:formula="of:=&quot;&quot;&amp;IF([.U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IF([.B26]=&quot;&quot;;&quot;&quot;;&#10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amp;[.N26]&amp;&quot;&quot;&amp;REPT(&quot; &quot;;5-LEN([.N26]));&quot;null&quot;&amp;REPT(&quot; &quot;;5-4))&#10;&amp;&quot;,&quot;&quot;&quot;&amp;[.O$1]&amp;&quot;&quot;&quot;:&quot;&amp;IF([.O26]&lt;&gt;&quot;&quot;;&quot;&quot;&quot;&quot;&amp;[.O26]&amp;&quot;&quot;&quot;&quot;&amp;REPT(&quot; &quot;;10-LEN([.O26]));&quot;null&quot;&amp;REPT(&quot; &quot;;10-4+2))&#10;&amp;&quot;,&quot;&quot;&quot;&amp;[.P$1]&amp;&quot;&quot;&quot;:&quot;&amp;[.P26]&#10;&amp;&quot;,&quot;&quot;&quot;&amp;[.Q$1]&amp;&quot;&quot;&quot;:&quot;&amp;[.Q26]&#10;&amp;&quot;}&quot;&#10;)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P$1]&amp;&quot;&quot;&quot;:&quot;&amp;[.P26]&#10;&amp;&quot;,&quot;&quot;&quot;&amp;[.Q$1]&amp;&quot;&quot;&quot;:&quot;&amp;[.Q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IF([.B27]=&quot;&quot;;&quot;&quot;;&#10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amp;[.N27]&amp;&quot;&quot;&amp;REPT(&quot; &quot;;5-LEN([.N27]));&quot;null&quot;&amp;REPT(&quot; &quot;;5-4))&#10;&amp;&quot;,&quot;&quot;&quot;&amp;[.O$1]&amp;&quot;&quot;&quot;:&quot;&amp;IF([.O27]&lt;&gt;&quot;&quot;;&quot;&quot;&quot;&quot;&amp;[.O27]&amp;&quot;&quot;&quot;&quot;&amp;REPT(&quot; &quot;;10-LEN([.O27]));&quot;null&quot;&amp;REPT(&quot; &quot;;10-4+2))&#10;&amp;&quot;,&quot;&quot;&quot;&amp;[.P$1]&amp;&quot;&quot;&quot;:&quot;&amp;[.P27]&#10;&amp;&quot;,&quot;&quot;&quot;&amp;[.Q$1]&amp;&quot;&quot;&quot;:&quot;&amp;[.Q27]&#10;&amp;&quot;}&quot;&#10;)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P$1]&amp;&quot;&quot;&quot;:&quot;&amp;[.P27]&#10;&amp;&quot;,&quot;&quot;&quot;&amp;[.Q$1]&amp;&quot;&quot;&quot;:&quot;&amp;[.Q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IF([.B28]=&quot;&quot;;&quot;&quot;;&#10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amp;[.N28]&amp;&quot;&quot;&amp;REPT(&quot; &quot;;5-LEN([.N28]));&quot;null&quot;&amp;REPT(&quot; &quot;;5-4))&#10;&amp;&quot;,&quot;&quot;&quot;&amp;[.O$1]&amp;&quot;&quot;&quot;:&quot;&amp;IF([.O28]&lt;&gt;&quot;&quot;;&quot;&quot;&quot;&quot;&amp;[.O28]&amp;&quot;&quot;&quot;&quot;&amp;REPT(&quot; &quot;;10-LEN([.O28]));&quot;null&quot;&amp;REPT(&quot; &quot;;10-4+2))&#10;&amp;&quot;,&quot;&quot;&quot;&amp;[.P$1]&amp;&quot;&quot;&quot;:&quot;&amp;[.P28]&#10;&amp;&quot;,&quot;&quot;&quot;&amp;[.Q$1]&amp;&quot;&quot;&quot;:&quot;&amp;[.Q28]&#10;&amp;&quot;}&quot;&#10;)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P$1]&amp;&quot;&quot;&quot;:&quot;&amp;[.P28]&#10;&amp;&quot;,&quot;&quot;&quot;&amp;[.Q$1]&amp;&quot;&quot;&quot;:&quot;&amp;[.Q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IF([.B29]=&quot;&quot;;&quot;&quot;;&#10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amp;[.N29]&amp;&quot;&quot;&amp;REPT(&quot; &quot;;5-LEN([.N29]));&quot;null&quot;&amp;REPT(&quot; &quot;;5-4))&#10;&amp;&quot;,&quot;&quot;&quot;&amp;[.O$1]&amp;&quot;&quot;&quot;:&quot;&amp;IF([.O29]&lt;&gt;&quot;&quot;;&quot;&quot;&quot;&quot;&amp;[.O29]&amp;&quot;&quot;&quot;&quot;&amp;REPT(&quot; &quot;;10-LEN([.O29]));&quot;null&quot;&amp;REPT(&quot; &quot;;10-4+2))&#10;&amp;&quot;,&quot;&quot;&quot;&amp;[.P$1]&amp;&quot;&quot;&quot;:&quot;&amp;[.P29]&#10;&amp;&quot;,&quot;&quot;&quot;&amp;[.Q$1]&amp;&quot;&quot;&quot;:&quot;&amp;[.Q29]&#10;&amp;&quot;}&quot;&#10;)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P$1]&amp;&quot;&quot;&quot;:&quot;&amp;[.P29]&#10;&amp;&quot;,&quot;&quot;&quot;&amp;[.Q$1]&amp;&quot;&quot;&quot;:&quot;&amp;[.Q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IF([.B30]=&quot;&quot;;&quot;&quot;;&#10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amp;[.N30]&amp;&quot;&quot;&amp;REPT(&quot; &quot;;5-LEN([.N30]));&quot;null&quot;&amp;REPT(&quot; &quot;;5-4))&#10;&amp;&quot;,&quot;&quot;&quot;&amp;[.O$1]&amp;&quot;&quot;&quot;:&quot;&amp;IF([.O30]&lt;&gt;&quot;&quot;;&quot;&quot;&quot;&quot;&amp;[.O30]&amp;&quot;&quot;&quot;&quot;&amp;REPT(&quot; &quot;;10-LEN([.O30]));&quot;null&quot;&amp;REPT(&quot; &quot;;10-4+2))&#10;&amp;&quot;,&quot;&quot;&quot;&amp;[.P$1]&amp;&quot;&quot;&quot;:&quot;&amp;[.P30]&#10;&amp;&quot;,&quot;&quot;&quot;&amp;[.Q$1]&amp;&quot;&quot;&quot;:&quot;&amp;[.Q30]&#10;&amp;&quot;}&quot;&#10;)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P$1]&amp;&quot;&quot;&quot;:&quot;&amp;[.P30]&#10;&amp;&quot;,&quot;&quot;&quot;&amp;[.Q$1]&amp;&quot;&quot;&quot;:&quot;&amp;[.Q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IF([.B31]=&quot;&quot;;&quot;&quot;;&#10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amp;[.N31]&amp;&quot;&quot;&amp;REPT(&quot; &quot;;5-LEN([.N31]));&quot;null&quot;&amp;REPT(&quot; &quot;;5-4))&#10;&amp;&quot;,&quot;&quot;&quot;&amp;[.O$1]&amp;&quot;&quot;&quot;:&quot;&amp;IF([.O31]&lt;&gt;&quot;&quot;;&quot;&quot;&quot;&quot;&amp;[.O31]&amp;&quot;&quot;&quot;&quot;&amp;REPT(&quot; &quot;;10-LEN([.O31]));&quot;null&quot;&amp;REPT(&quot; &quot;;10-4+2))&#10;&amp;&quot;,&quot;&quot;&quot;&amp;[.P$1]&amp;&quot;&quot;&quot;:&quot;&amp;[.P31]&#10;&amp;&quot;,&quot;&quot;&quot;&amp;[.Q$1]&amp;&quot;&quot;&quot;:&quot;&amp;[.Q31]&#10;&amp;&quot;}&quot;&#10;)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P$1]&amp;&quot;&quot;&quot;:&quot;&amp;[.P31]&#10;&amp;&quot;,&quot;&quot;&quot;&amp;[.Q$1]&amp;&quot;&quot;&quot;:&quot;&amp;[.Q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IF([.B32]=&quot;&quot;;&quot;&quot;;&#10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amp;[.N32]&amp;&quot;&quot;&amp;REPT(&quot; &quot;;5-LEN([.N32]));&quot;null&quot;&amp;REPT(&quot; &quot;;5-4))&#10;&amp;&quot;,&quot;&quot;&quot;&amp;[.O$1]&amp;&quot;&quot;&quot;:&quot;&amp;IF([.O32]&lt;&gt;&quot;&quot;;&quot;&quot;&quot;&quot;&amp;[.O32]&amp;&quot;&quot;&quot;&quot;&amp;REPT(&quot; &quot;;10-LEN([.O32]));&quot;null&quot;&amp;REPT(&quot; &quot;;10-4+2))&#10;&amp;&quot;,&quot;&quot;&quot;&amp;[.P$1]&amp;&quot;&quot;&quot;:&quot;&amp;[.P32]&#10;&amp;&quot;,&quot;&quot;&quot;&amp;[.Q$1]&amp;&quot;&quot;&quot;:&quot;&amp;[.Q32]&#10;&amp;&quot;}&quot;&#10;)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P$1]&amp;&quot;&quot;&quot;:&quot;&amp;[.P32]&#10;&amp;&quot;,&quot;&quot;&quot;&amp;[.Q$1]&amp;&quot;&quot;&quot;:&quot;&amp;[.Q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 table:style-name="ce30"/>
          <table:table-cell table:style-name="ce17" table:formula="of:=&quot;&quot;&amp;IF([.U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IF([.B33]=&quot;&quot;;&quot;&quot;;&#10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amp;[.N33]&amp;&quot;&quot;&amp;REPT(&quot; &quot;;5-LEN([.N33]));&quot;null&quot;&amp;REPT(&quot; &quot;;5-4))&#10;&amp;&quot;,&quot;&quot;&quot;&amp;[.O$1]&amp;&quot;&quot;&quot;:&quot;&amp;IF([.O33]&lt;&gt;&quot;&quot;;&quot;&quot;&quot;&quot;&amp;[.O33]&amp;&quot;&quot;&quot;&quot;&amp;REPT(&quot; &quot;;10-LEN([.O33]));&quot;null&quot;&amp;REPT(&quot; &quot;;10-4+2))&#10;&amp;&quot;,&quot;&quot;&quot;&amp;[.P$1]&amp;&quot;&quot;&quot;:&quot;&amp;[.P33]&#10;&amp;&quot;,&quot;&quot;&quot;&amp;[.Q$1]&amp;&quot;&quot;&quot;:&quot;&amp;[.Q33]&#10;&amp;&quot;}&quot;&#10;)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P$1]&amp;&quot;&quot;&quot;:&quot;&amp;[.P33]&#10;&amp;&quot;,&quot;&quot;&quot;&amp;[.Q$1]&amp;&quot;&quot;&quot;:&quot;&amp;[.Q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IF([.B34]=&quot;&quot;;&quot;&quot;;&#10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amp;[.N34]&amp;&quot;&quot;&amp;REPT(&quot; &quot;;5-LEN([.N34]));&quot;null&quot;&amp;REPT(&quot; &quot;;5-4))&#10;&amp;&quot;,&quot;&quot;&quot;&amp;[.O$1]&amp;&quot;&quot;&quot;:&quot;&amp;IF([.O34]&lt;&gt;&quot;&quot;;&quot;&quot;&quot;&quot;&amp;[.O34]&amp;&quot;&quot;&quot;&quot;&amp;REPT(&quot; &quot;;10-LEN([.O34]));&quot;null&quot;&amp;REPT(&quot; &quot;;10-4+2))&#10;&amp;&quot;,&quot;&quot;&quot;&amp;[.P$1]&amp;&quot;&quot;&quot;:&quot;&amp;[.P34]&#10;&amp;&quot;,&quot;&quot;&quot;&amp;[.Q$1]&amp;&quot;&quot;&quot;:&quot;&amp;[.Q34]&#10;&amp;&quot;}&quot;&#10;)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P$1]&amp;&quot;&quot;&quot;:&quot;&amp;[.P34]&#10;&amp;&quot;,&quot;&quot;&quot;&amp;[.Q$1]&amp;&quot;&quot;&quot;:&quot;&amp;[.Q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 table:style-name="ce30"/>
          <table:table-cell table:style-name="ce17" table:formula="of:=&quot;&quot;&amp;IF([.U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IF([.B35]=&quot;&quot;;&quot;&quot;;&#10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amp;[.N35]&amp;&quot;&quot;&amp;REPT(&quot; &quot;;5-LEN([.N35]));&quot;null&quot;&amp;REPT(&quot; &quot;;5-4))&#10;&amp;&quot;,&quot;&quot;&quot;&amp;[.O$1]&amp;&quot;&quot;&quot;:&quot;&amp;IF([.O35]&lt;&gt;&quot;&quot;;&quot;&quot;&quot;&quot;&amp;[.O35]&amp;&quot;&quot;&quot;&quot;&amp;REPT(&quot; &quot;;10-LEN([.O35]));&quot;null&quot;&amp;REPT(&quot; &quot;;10-4+2))&#10;&amp;&quot;,&quot;&quot;&quot;&amp;[.P$1]&amp;&quot;&quot;&quot;:&quot;&amp;[.P35]&#10;&amp;&quot;,&quot;&quot;&quot;&amp;[.Q$1]&amp;&quot;&quot;&quot;:&quot;&amp;[.Q35]&#10;&amp;&quot;}&quot;&#10;)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P$1]&amp;&quot;&quot;&quot;:&quot;&amp;[.P35]&#10;&amp;&quot;,&quot;&quot;&quot;&amp;[.Q$1]&amp;&quot;&quot;&quot;:&quot;&amp;[.Q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IF([.B36]=&quot;&quot;;&quot;&quot;;&#10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amp;[.N36]&amp;&quot;&quot;&amp;REPT(&quot; &quot;;5-LEN([.N36]));&quot;null&quot;&amp;REPT(&quot; &quot;;5-4))&#10;&amp;&quot;,&quot;&quot;&quot;&amp;[.O$1]&amp;&quot;&quot;&quot;:&quot;&amp;IF([.O36]&lt;&gt;&quot;&quot;;&quot;&quot;&quot;&quot;&amp;[.O36]&amp;&quot;&quot;&quot;&quot;&amp;REPT(&quot; &quot;;10-LEN([.O36]));&quot;null&quot;&amp;REPT(&quot; &quot;;10-4+2))&#10;&amp;&quot;,&quot;&quot;&quot;&amp;[.P$1]&amp;&quot;&quot;&quot;:&quot;&amp;[.P36]&#10;&amp;&quot;,&quot;&quot;&quot;&amp;[.Q$1]&amp;&quot;&quot;&quot;:&quot;&amp;[.Q36]&#10;&amp;&quot;}&quot;&#10;)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P$1]&amp;&quot;&quot;&quot;:&quot;&amp;[.P36]&#10;&amp;&quot;,&quot;&quot;&quot;&amp;[.Q$1]&amp;&quot;&quot;&quot;:&quot;&amp;[.Q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IF([.B37]=&quot;&quot;;&quot;&quot;;&#10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amp;[.N37]&amp;&quot;&quot;&amp;REPT(&quot; &quot;;5-LEN([.N37]));&quot;null&quot;&amp;REPT(&quot; &quot;;5-4))&#10;&amp;&quot;,&quot;&quot;&quot;&amp;[.O$1]&amp;&quot;&quot;&quot;:&quot;&amp;IF([.O37]&lt;&gt;&quot;&quot;;&quot;&quot;&quot;&quot;&amp;[.O37]&amp;&quot;&quot;&quot;&quot;&amp;REPT(&quot; &quot;;10-LEN([.O37]));&quot;null&quot;&amp;REPT(&quot; &quot;;10-4+2))&#10;&amp;&quot;,&quot;&quot;&quot;&amp;[.P$1]&amp;&quot;&quot;&quot;:&quot;&amp;[.P37]&#10;&amp;&quot;,&quot;&quot;&quot;&amp;[.Q$1]&amp;&quot;&quot;&quot;:&quot;&amp;[.Q37]&#10;&amp;&quot;}&quot;&#10;)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P$1]&amp;&quot;&quot;&quot;:&quot;&amp;[.P37]&#10;&amp;&quot;,&quot;&quot;&quot;&amp;[.Q$1]&amp;&quot;&quot;&quot;:&quot;&amp;[.Q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IF([.B38]=&quot;&quot;;&quot;&quot;;&#10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amp;[.N38]&amp;&quot;&quot;&amp;REPT(&quot; &quot;;5-LEN([.N38]));&quot;null&quot;&amp;REPT(&quot; &quot;;5-4))&#10;&amp;&quot;,&quot;&quot;&quot;&amp;[.O$1]&amp;&quot;&quot;&quot;:&quot;&amp;IF([.O38]&lt;&gt;&quot;&quot;;&quot;&quot;&quot;&quot;&amp;[.O38]&amp;&quot;&quot;&quot;&quot;&amp;REPT(&quot; &quot;;10-LEN([.O38]));&quot;null&quot;&amp;REPT(&quot; &quot;;10-4+2))&#10;&amp;&quot;,&quot;&quot;&quot;&amp;[.P$1]&amp;&quot;&quot;&quot;:&quot;&amp;[.P38]&#10;&amp;&quot;,&quot;&quot;&quot;&amp;[.Q$1]&amp;&quot;&quot;&quot;:&quot;&amp;[.Q38]&#10;&amp;&quot;}&quot;&#10;)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P$1]&amp;&quot;&quot;&quot;:&quot;&amp;[.P38]&#10;&amp;&quot;,&quot;&quot;&quot;&amp;[.Q$1]&amp;&quot;&quot;&quot;:&quot;&amp;[.Q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IF([.B39]=&quot;&quot;;&quot;&quot;;&#10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amp;[.N39]&amp;&quot;&quot;&amp;REPT(&quot; &quot;;5-LEN([.N39]));&quot;null&quot;&amp;REPT(&quot; &quot;;5-4))&#10;&amp;&quot;,&quot;&quot;&quot;&amp;[.O$1]&amp;&quot;&quot;&quot;:&quot;&amp;IF([.O39]&lt;&gt;&quot;&quot;;&quot;&quot;&quot;&quot;&amp;[.O39]&amp;&quot;&quot;&quot;&quot;&amp;REPT(&quot; &quot;;10-LEN([.O39]));&quot;null&quot;&amp;REPT(&quot; &quot;;10-4+2))&#10;&amp;&quot;,&quot;&quot;&quot;&amp;[.P$1]&amp;&quot;&quot;&quot;:&quot;&amp;[.P39]&#10;&amp;&quot;,&quot;&quot;&quot;&amp;[.Q$1]&amp;&quot;&quot;&quot;:&quot;&amp;[.Q39]&#10;&amp;&quot;}&quot;&#10;)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P$1]&amp;&quot;&quot;&quot;:&quot;&amp;[.P39]&#10;&amp;&quot;,&quot;&quot;&quot;&amp;[.Q$1]&amp;&quot;&quot;&quot;:&quot;&amp;[.Q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IF([.B40]=&quot;&quot;;&quot;&quot;;&#10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amp;[.N40]&amp;&quot;&quot;&amp;REPT(&quot; &quot;;5-LEN([.N40]));&quot;null&quot;&amp;REPT(&quot; &quot;;5-4))&#10;&amp;&quot;,&quot;&quot;&quot;&amp;[.O$1]&amp;&quot;&quot;&quot;:&quot;&amp;IF([.O40]&lt;&gt;&quot;&quot;;&quot;&quot;&quot;&quot;&amp;[.O40]&amp;&quot;&quot;&quot;&quot;&amp;REPT(&quot; &quot;;10-LEN([.O40]));&quot;null&quot;&amp;REPT(&quot; &quot;;10-4+2))&#10;&amp;&quot;,&quot;&quot;&quot;&amp;[.P$1]&amp;&quot;&quot;&quot;:&quot;&amp;[.P40]&#10;&amp;&quot;,&quot;&quot;&quot;&amp;[.Q$1]&amp;&quot;&quot;&quot;:&quot;&amp;[.Q40]&#10;&amp;&quot;}&quot;&#10;)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P$1]&amp;&quot;&quot;&quot;:&quot;&amp;[.P40]&#10;&amp;&quot;,&quot;&quot;&quot;&amp;[.Q$1]&amp;&quot;&quot;&quot;:&quot;&amp;[.Q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IF([.B41]=&quot;&quot;;&quot;&quot;;&#10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amp;[.N41]&amp;&quot;&quot;&amp;REPT(&quot; &quot;;5-LEN([.N41]));&quot;null&quot;&amp;REPT(&quot; &quot;;5-4))&#10;&amp;&quot;,&quot;&quot;&quot;&amp;[.O$1]&amp;&quot;&quot;&quot;:&quot;&amp;IF([.O41]&lt;&gt;&quot;&quot;;&quot;&quot;&quot;&quot;&amp;[.O41]&amp;&quot;&quot;&quot;&quot;&amp;REPT(&quot; &quot;;10-LEN([.O41]));&quot;null&quot;&amp;REPT(&quot; &quot;;10-4+2))&#10;&amp;&quot;,&quot;&quot;&quot;&amp;[.P$1]&amp;&quot;&quot;&quot;:&quot;&amp;[.P41]&#10;&amp;&quot;,&quot;&quot;&quot;&amp;[.Q$1]&amp;&quot;&quot;&quot;:&quot;&amp;[.Q41]&#10;&amp;&quot;}&quot;&#10;)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P$1]&amp;&quot;&quot;&quot;:&quot;&amp;[.P41]&#10;&amp;&quot;,&quot;&quot;&quot;&amp;[.Q$1]&amp;&quot;&quot;&quot;:&quot;&amp;[.Q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 table:style-name="ce30"/>
          <table:table-cell table:style-name="ce17" table:formula="of:=&quot;&quot;&amp;IF([.U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IF([.B42]=&quot;&quot;;&quot;&quot;;&#10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amp;[.N42]&amp;&quot;&quot;&amp;REPT(&quot; &quot;;5-LEN([.N42]));&quot;null&quot;&amp;REPT(&quot; &quot;;5-4))&#10;&amp;&quot;,&quot;&quot;&quot;&amp;[.O$1]&amp;&quot;&quot;&quot;:&quot;&amp;IF([.O42]&lt;&gt;&quot;&quot;;&quot;&quot;&quot;&quot;&amp;[.O42]&amp;&quot;&quot;&quot;&quot;&amp;REPT(&quot; &quot;;10-LEN([.O42]));&quot;null&quot;&amp;REPT(&quot; &quot;;10-4+2))&#10;&amp;&quot;,&quot;&quot;&quot;&amp;[.P$1]&amp;&quot;&quot;&quot;:&quot;&amp;[.P42]&#10;&amp;&quot;,&quot;&quot;&quot;&amp;[.Q$1]&amp;&quot;&quot;&quot;:&quot;&amp;[.Q42]&#10;&amp;&quot;}&quot;&#10;)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P$1]&amp;&quot;&quot;&quot;:&quot;&amp;[.P42]&#10;&amp;&quot;,&quot;&quot;&quot;&amp;[.Q$1]&amp;&quot;&quot;&quot;:&quot;&amp;[.Q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IF([.B43]=&quot;&quot;;&quot;&quot;;&#10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amp;[.N43]&amp;&quot;&quot;&amp;REPT(&quot; &quot;;5-LEN([.N43]));&quot;null&quot;&amp;REPT(&quot; &quot;;5-4))&#10;&amp;&quot;,&quot;&quot;&quot;&amp;[.O$1]&amp;&quot;&quot;&quot;:&quot;&amp;IF([.O43]&lt;&gt;&quot;&quot;;&quot;&quot;&quot;&quot;&amp;[.O43]&amp;&quot;&quot;&quot;&quot;&amp;REPT(&quot; &quot;;10-LEN([.O43]));&quot;null&quot;&amp;REPT(&quot; &quot;;10-4+2))&#10;&amp;&quot;,&quot;&quot;&quot;&amp;[.P$1]&amp;&quot;&quot;&quot;:&quot;&amp;[.P43]&#10;&amp;&quot;,&quot;&quot;&quot;&amp;[.Q$1]&amp;&quot;&quot;&quot;:&quot;&amp;[.Q43]&#10;&amp;&quot;}&quot;&#10;)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value&quot;:null    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P$1]&amp;&quot;&quot;&quot;:&quot;&amp;[.P43]&#10;&amp;&quot;,&quot;&quot;&quot;&amp;[.Q$1]&amp;&quot;&quot;&quot;:&quot;&amp;[.Q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IF([.B44]=&quot;&quot;;&quot;&quot;;&#10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amp;[.N44]&amp;&quot;&quot;&amp;REPT(&quot; &quot;;5-LEN([.N44]));&quot;null&quot;&amp;REPT(&quot; &quot;;5-4))&#10;&amp;&quot;,&quot;&quot;&quot;&amp;[.O$1]&amp;&quot;&quot;&quot;:&quot;&amp;IF([.O44]&lt;&gt;&quot;&quot;;&quot;&quot;&quot;&quot;&amp;[.O44]&amp;&quot;&quot;&quot;&quot;&amp;REPT(&quot; &quot;;10-LEN([.O44]));&quot;null&quot;&amp;REPT(&quot; &quot;;10-4+2))&#10;&amp;&quot;,&quot;&quot;&quot;&amp;[.P$1]&amp;&quot;&quot;&quot;:&quot;&amp;[.P44]&#10;&amp;&quot;,&quot;&quot;&quot;&amp;[.Q$1]&amp;&quot;&quot;&quot;:&quot;&amp;[.Q44]&#10;&amp;&quot;}&quot;&#10;)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P$1]&amp;&quot;&quot;&quot;:&quot;&amp;[.P44]&#10;&amp;&quot;,&quot;&quot;&quot;&amp;[.Q$1]&amp;&quot;&quot;&quot;:&quot;&amp;[.Q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IF([.B45]=&quot;&quot;;&quot;&quot;;&#10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amp;[.N45]&amp;&quot;&quot;&amp;REPT(&quot; &quot;;5-LEN([.N45]));&quot;null&quot;&amp;REPT(&quot; &quot;;5-4))&#10;&amp;&quot;,&quot;&quot;&quot;&amp;[.O$1]&amp;&quot;&quot;&quot;:&quot;&amp;IF([.O45]&lt;&gt;&quot;&quot;;&quot;&quot;&quot;&quot;&amp;[.O45]&amp;&quot;&quot;&quot;&quot;&amp;REPT(&quot; &quot;;10-LEN([.O45]));&quot;null&quot;&amp;REPT(&quot; &quot;;10-4+2))&#10;&amp;&quot;,&quot;&quot;&quot;&amp;[.P$1]&amp;&quot;&quot;&quot;:&quot;&amp;[.P45]&#10;&amp;&quot;,&quot;&quot;&quot;&amp;[.Q$1]&amp;&quot;&quot;&quot;:&quot;&amp;[.Q45]&#10;&amp;&quot;}&quot;&#10;)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value&quot;:null     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P$1]&amp;&quot;&quot;&quot;:&quot;&amp;[.P45]&#10;&amp;&quot;,&quot;&quot;&quot;&amp;[.Q$1]&amp;&quot;&quot;&quot;:&quot;&amp;[.Q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IF([.B46]=&quot;&quot;;&quot;&quot;;&#10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amp;[.N46]&amp;&quot;&quot;&amp;REPT(&quot; &quot;;5-LEN([.N46]));&quot;null&quot;&amp;REPT(&quot; &quot;;5-4))&#10;&amp;&quot;,&quot;&quot;&quot;&amp;[.O$1]&amp;&quot;&quot;&quot;:&quot;&amp;IF([.O46]&lt;&gt;&quot;&quot;;&quot;&quot;&quot;&quot;&amp;[.O46]&amp;&quot;&quot;&quot;&quot;&amp;REPT(&quot; &quot;;10-LEN([.O46]));&quot;null&quot;&amp;REPT(&quot; &quot;;10-4+2))&#10;&amp;&quot;,&quot;&quot;&quot;&amp;[.P$1]&amp;&quot;&quot;&quot;:&quot;&amp;[.P46]&#10;&amp;&quot;,&quot;&quot;&quot;&amp;[.Q$1]&amp;&quot;&quot;&quot;:&quot;&amp;[.Q46]&#10;&amp;&quot;}&quot;&#10;)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P$1]&amp;&quot;&quot;&quot;:&quot;&amp;[.P46]&#10;&amp;&quot;,&quot;&quot;&quot;&amp;[.Q$1]&amp;&quot;&quot;&quot;:&quot;&amp;[.Q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IF([.B47]=&quot;&quot;;&quot;&quot;;&#10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amp;[.N47]&amp;&quot;&quot;&amp;REPT(&quot; &quot;;5-LEN([.N47]));&quot;null&quot;&amp;REPT(&quot; &quot;;5-4))&#10;&amp;&quot;,&quot;&quot;&quot;&amp;[.O$1]&amp;&quot;&quot;&quot;:&quot;&amp;IF([.O47]&lt;&gt;&quot;&quot;;&quot;&quot;&quot;&quot;&amp;[.O47]&amp;&quot;&quot;&quot;&quot;&amp;REPT(&quot; &quot;;10-LEN([.O47]));&quot;null&quot;&amp;REPT(&quot; &quot;;10-4+2))&#10;&amp;&quot;,&quot;&quot;&quot;&amp;[.P$1]&amp;&quot;&quot;&quot;:&quot;&amp;[.P47]&#10;&amp;&quot;,&quot;&quot;&quot;&amp;[.Q$1]&amp;&quot;&quot;&quot;:&quot;&amp;[.Q47]&#10;&amp;&quot;}&quot;&#10;)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P$1]&amp;&quot;&quot;&quot;:&quot;&amp;[.P47]&#10;&amp;&quot;,&quot;&quot;&quot;&amp;[.Q$1]&amp;&quot;&quot;&quot;:&quot;&amp;[.Q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IF([.B48]=&quot;&quot;;&quot;&quot;;&#10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amp;[.N48]&amp;&quot;&quot;&amp;REPT(&quot; &quot;;5-LEN([.N48]));&quot;null&quot;&amp;REPT(&quot; &quot;;5-4))&#10;&amp;&quot;,&quot;&quot;&quot;&amp;[.O$1]&amp;&quot;&quot;&quot;:&quot;&amp;IF([.O48]&lt;&gt;&quot;&quot;;&quot;&quot;&quot;&quot;&amp;[.O48]&amp;&quot;&quot;&quot;&quot;&amp;REPT(&quot; &quot;;10-LEN([.O48]));&quot;null&quot;&amp;REPT(&quot; &quot;;10-4+2))&#10;&amp;&quot;,&quot;&quot;&quot;&amp;[.P$1]&amp;&quot;&quot;&quot;:&quot;&amp;[.P48]&#10;&amp;&quot;,&quot;&quot;&quot;&amp;[.Q$1]&amp;&quot;&quot;&quot;:&quot;&amp;[.Q48]&#10;&amp;&quot;}&quot;&#10;)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P$1]&amp;&quot;&quot;&quot;:&quot;&amp;[.P48]&#10;&amp;&quot;,&quot;&quot;&quot;&amp;[.Q$1]&amp;&quot;&quot;&quot;:&quot;&amp;[.Q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IF([.B49]=&quot;&quot;;&quot;&quot;;&#10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amp;[.N49]&amp;&quot;&quot;&amp;REPT(&quot; &quot;;5-LEN([.N49]));&quot;null&quot;&amp;REPT(&quot; &quot;;5-4))&#10;&amp;&quot;,&quot;&quot;&quot;&amp;[.O$1]&amp;&quot;&quot;&quot;:&quot;&amp;IF([.O49]&lt;&gt;&quot;&quot;;&quot;&quot;&quot;&quot;&amp;[.O49]&amp;&quot;&quot;&quot;&quot;&amp;REPT(&quot; &quot;;10-LEN([.O49]));&quot;null&quot;&amp;REPT(&quot; &quot;;10-4+2))&#10;&amp;&quot;,&quot;&quot;&quot;&amp;[.P$1]&amp;&quot;&quot;&quot;:&quot;&amp;[.P49]&#10;&amp;&quot;,&quot;&quot;&quot;&amp;[.Q$1]&amp;&quot;&quot;&quot;:&quot;&amp;[.Q49]&#10;&amp;&quot;}&quot;&#10;)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P$1]&amp;&quot;&quot;&quot;:&quot;&amp;[.P49]&#10;&amp;&quot;,&quot;&quot;&quot;&amp;[.Q$1]&amp;&quot;&quot;&quot;:&quot;&amp;[.Q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IF([.B50]=&quot;&quot;;&quot;&quot;;&#10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amp;[.N50]&amp;&quot;&quot;&amp;REPT(&quot; &quot;;5-LEN([.N50]));&quot;null&quot;&amp;REPT(&quot; &quot;;5-4))&#10;&amp;&quot;,&quot;&quot;&quot;&amp;[.O$1]&amp;&quot;&quot;&quot;:&quot;&amp;IF([.O50]&lt;&gt;&quot;&quot;;&quot;&quot;&quot;&quot;&amp;[.O50]&amp;&quot;&quot;&quot;&quot;&amp;REPT(&quot; &quot;;10-LEN([.O50]));&quot;null&quot;&amp;REPT(&quot; &quot;;10-4+2))&#10;&amp;&quot;,&quot;&quot;&quot;&amp;[.P$1]&amp;&quot;&quot;&quot;:&quot;&amp;[.P50]&#10;&amp;&quot;,&quot;&quot;&quot;&amp;[.Q$1]&amp;&quot;&quot;&quot;:&quot;&amp;[.Q50]&#10;&amp;&quot;}&quot;&#10;)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P$1]&amp;&quot;&quot;&quot;:&quot;&amp;[.P50]&#10;&amp;&quot;,&quot;&quot;&quot;&amp;[.Q$1]&amp;&quot;&quot;&quot;:&quot;&amp;[.Q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IF([.B51]=&quot;&quot;;&quot;&quot;;&#10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amp;[.N51]&amp;&quot;&quot;&amp;REPT(&quot; &quot;;5-LEN([.N51]));&quot;null&quot;&amp;REPT(&quot; &quot;;5-4))&#10;&amp;&quot;,&quot;&quot;&quot;&amp;[.O$1]&amp;&quot;&quot;&quot;:&quot;&amp;IF([.O51]&lt;&gt;&quot;&quot;;&quot;&quot;&quot;&quot;&amp;[.O51]&amp;&quot;&quot;&quot;&quot;&amp;REPT(&quot; &quot;;10-LEN([.O51]));&quot;null&quot;&amp;REPT(&quot; &quot;;10-4+2))&#10;&amp;&quot;,&quot;&quot;&quot;&amp;[.P$1]&amp;&quot;&quot;&quot;:&quot;&amp;[.P51]&#10;&amp;&quot;,&quot;&quot;&quot;&amp;[.Q$1]&amp;&quot;&quot;&quot;:&quot;&amp;[.Q51]&#10;&amp;&quot;}&quot;&#10;)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P$1]&amp;&quot;&quot;&quot;:&quot;&amp;[.P51]&#10;&amp;&quot;,&quot;&quot;&quot;&amp;[.Q$1]&amp;&quot;&quot;&quot;:&quot;&amp;[.Q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IF([.B52]=&quot;&quot;;&quot;&quot;;&#10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amp;[.N52]&amp;&quot;&quot;&amp;REPT(&quot; &quot;;5-LEN([.N52]));&quot;null&quot;&amp;REPT(&quot; &quot;;5-4))&#10;&amp;&quot;,&quot;&quot;&quot;&amp;[.O$1]&amp;&quot;&quot;&quot;:&quot;&amp;IF([.O52]&lt;&gt;&quot;&quot;;&quot;&quot;&quot;&quot;&amp;[.O52]&amp;&quot;&quot;&quot;&quot;&amp;REPT(&quot; &quot;;10-LEN([.O52]));&quot;null&quot;&amp;REPT(&quot; &quot;;10-4+2))&#10;&amp;&quot;,&quot;&quot;&quot;&amp;[.P$1]&amp;&quot;&quot;&quot;:&quot;&amp;[.P52]&#10;&amp;&quot;,&quot;&quot;&quot;&amp;[.Q$1]&amp;&quot;&quot;&quot;:&quot;&amp;[.Q52]&#10;&amp;&quot;}&quot;&#10;)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P$1]&amp;&quot;&quot;&quot;:&quot;&amp;[.P52]&#10;&amp;&quot;,&quot;&quot;&quot;&amp;[.Q$1]&amp;&quot;&quot;&quot;:&quot;&amp;[.Q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IF([.B53]=&quot;&quot;;&quot;&quot;;&#10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amp;[.N53]&amp;&quot;&quot;&amp;REPT(&quot; &quot;;5-LEN([.N53]));&quot;null&quot;&amp;REPT(&quot; &quot;;5-4))&#10;&amp;&quot;,&quot;&quot;&quot;&amp;[.O$1]&amp;&quot;&quot;&quot;:&quot;&amp;IF([.O53]&lt;&gt;&quot;&quot;;&quot;&quot;&quot;&quot;&amp;[.O53]&amp;&quot;&quot;&quot;&quot;&amp;REPT(&quot; &quot;;10-LEN([.O53]));&quot;null&quot;&amp;REPT(&quot; &quot;;10-4+2))&#10;&amp;&quot;,&quot;&quot;&quot;&amp;[.P$1]&amp;&quot;&quot;&quot;:&quot;&amp;[.P53]&#10;&amp;&quot;,&quot;&quot;&quot;&amp;[.Q$1]&amp;&quot;&quot;&quot;:&quot;&amp;[.Q53]&#10;&amp;&quot;}&quot;&#10;)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P$1]&amp;&quot;&quot;&quot;:&quot;&amp;[.P53]&#10;&amp;&quot;,&quot;&quot;&quot;&amp;[.Q$1]&amp;&quot;&quot;&quot;:&quot;&amp;[.Q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IF([.B54]=&quot;&quot;;&quot;&quot;;&#10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amp;[.N54]&amp;&quot;&quot;&amp;REPT(&quot; &quot;;5-LEN([.N54]));&quot;null&quot;&amp;REPT(&quot; &quot;;5-4))&#10;&amp;&quot;,&quot;&quot;&quot;&amp;[.O$1]&amp;&quot;&quot;&quot;:&quot;&amp;IF([.O54]&lt;&gt;&quot;&quot;;&quot;&quot;&quot;&quot;&amp;[.O54]&amp;&quot;&quot;&quot;&quot;&amp;REPT(&quot; &quot;;10-LEN([.O54]));&quot;null&quot;&amp;REPT(&quot; &quot;;10-4+2))&#10;&amp;&quot;,&quot;&quot;&quot;&amp;[.P$1]&amp;&quot;&quot;&quot;:&quot;&amp;[.P54]&#10;&amp;&quot;,&quot;&quot;&quot;&amp;[.Q$1]&amp;&quot;&quot;&quot;:&quot;&amp;[.Q54]&#10;&amp;&quot;}&quot;&#10;)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P$1]&amp;&quot;&quot;&quot;:&quot;&amp;[.P54]&#10;&amp;&quot;,&quot;&quot;&quot;&amp;[.Q$1]&amp;&quot;&quot;&quot;:&quot;&amp;[.Q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IF([.B55]=&quot;&quot;;&quot;&quot;;&#10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amp;[.N55]&amp;&quot;&quot;&amp;REPT(&quot; &quot;;5-LEN([.N55]));&quot;null&quot;&amp;REPT(&quot; &quot;;5-4))&#10;&amp;&quot;,&quot;&quot;&quot;&amp;[.O$1]&amp;&quot;&quot;&quot;:&quot;&amp;IF([.O55]&lt;&gt;&quot;&quot;;&quot;&quot;&quot;&quot;&amp;[.O55]&amp;&quot;&quot;&quot;&quot;&amp;REPT(&quot; &quot;;10-LEN([.O55]));&quot;null&quot;&amp;REPT(&quot; &quot;;10-4+2))&#10;&amp;&quot;,&quot;&quot;&quot;&amp;[.P$1]&amp;&quot;&quot;&quot;:&quot;&amp;[.P55]&#10;&amp;&quot;,&quot;&quot;&quot;&amp;[.Q$1]&amp;&quot;&quot;&quot;:&quot;&amp;[.Q55]&#10;&amp;&quot;}&quot;&#10;)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P$1]&amp;&quot;&quot;&quot;:&quot;&amp;[.P55]&#10;&amp;&quot;,&quot;&quot;&quot;&amp;[.Q$1]&amp;&quot;&quot;&quot;:&quot;&amp;[.Q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7"/>
          <table:table-cell table:formula="of:=LEN([.C56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 table:formula="of:=IF([.B56]=&quot;&quot;;&quot;&quot;;&#10;&quot;:&quot;&#10;&amp;&quot;{&quot;&quot;&quot;&amp;[.B$1]&amp;&quot;&quot;&quot;:&quot;&quot;&quot;&amp;[.B56]&amp;&quot;&quot;&quot;&quot;&amp;REPT(&quot; &quot;;20-LEN([.B56]))&#10;&amp;&quot;,&quot;&quot;&quot;&amp;[.C$1]&amp;&quot;&quot;&quot;:&quot;&quot;&quot;&amp;[.C56]&amp;&quot;&quot;&quot;&quot;&amp;REPT(&quot; &quot;;35-LEN([.C56]))&#10;&amp;&quot;,&quot;&quot;&quot;&amp;[.D$1]&amp;&quot;&quot;&quot;:&quot;&amp;[.D56]&amp;REPT(&quot; &quot;;3-LEN([.D56]))&#10;&amp;&quot;,&quot;&quot;&quot;&amp;[.E$1]&amp;&quot;&quot;&quot;:&quot;&quot;&quot;&amp;[.E56]&amp;&quot;&quot;&quot;&quot;&amp;REPT(&quot; &quot;;6-LEN([.E56]))&#10;&amp;&quot;,&quot;&quot;&quot;&amp;[.F$1]&amp;&quot;&quot;&quot;:&quot;&quot;&quot;&amp;[.F56]&amp;&quot;&quot;&quot;&quot;&amp;REPT(&quot; &quot;;7-LEN([.F56]))&#10;&amp;&quot;,&quot;&quot;&quot;&amp;[.G$1]&amp;&quot;&quot;&quot;:&quot;&amp;IF([.G56]&lt;&gt;&quot;&quot;;&quot;&quot;&quot;&quot;&amp;[.G56]&amp;&quot;&quot;&quot;&quot;&amp;REPT(&quot; &quot;;5-LEN([.G56]));&quot;null&quot;&amp;REPT(&quot; &quot;;5-4+2))&#10;&amp;&quot;,&quot;&quot;&quot;&amp;[.H$1]&amp;&quot;&quot;&quot;:&quot;&amp;IF([.H56]&lt;&gt;&quot;&quot;;&quot;&quot;&quot;&quot;&amp;[.H56]&amp;&quot;&quot;&quot;&quot;&amp;REPT(&quot; &quot;;19-LEN([.H56]));&quot;null&quot;&amp;REPT(&quot; &quot;;19-4+2))&#10;&amp;&quot;,&quot;&quot;&quot;&amp;[.I$1]&amp;&quot;&quot;&quot;:&quot;&amp;IF([.I56]&lt;&gt;&quot;&quot;;&quot;&quot;&quot;&quot;&amp;[.I56]&amp;&quot;&quot;&quot;&quot;&amp;REPT(&quot; &quot;;8-LEN([.I56]));&quot;null&quot;&amp;REPT(&quot; &quot;;8-4+2))&#10;&amp;&quot;,&quot;&quot;&quot;&amp;[.J$1]&amp;&quot;&quot;&quot;:&quot;&amp;IF([.J56]&lt;&gt;&quot;&quot;;[.J56]&amp;REPT(&quot; &quot;;4-LEN([.J56]));&quot;null&quot;)&#10;&amp;&quot;,&quot;&quot;&quot;&amp;[.K$1]&amp;&quot;&quot;&quot;:&quot;&amp;IF([.K56]&lt;&gt;&quot;&quot;;[.K56]&amp;REPT(&quot; &quot;;4-LEN([.K56]));&quot;null&quot;)&#10;&amp;&quot;,&quot;&quot;&quot;&amp;[.L$1]&amp;&quot;&quot;&quot;:&quot;&amp;IF([.L56]&lt;&gt;&quot;&quot;;[.L56]&amp;REPT(&quot; &quot;;5-LEN([.L56]));&quot;null &quot;)&#10;&amp;&quot;,&quot;&quot;&quot;&amp;[.M$1]&amp;&quot;&quot;&quot;:&quot;&amp;IF([.M56]&lt;&gt;&quot;&quot;;&quot;&quot;&quot;&quot;&amp;[.M56]&amp;&quot;&quot;&quot;&quot;&amp;REPT(&quot; &quot;;20-LEN([.M56]));&quot;null&quot;&amp;REPT(&quot; &quot;;20-4+2))&#10;&amp;&quot;,&quot;&quot;&quot;&amp;[.N$1]&amp;&quot;&quot;&quot;:&quot;&amp;IF([.N56]&lt;&gt;&quot;&quot;;&quot;&quot;&amp;[.N56]&amp;&quot;&quot;&amp;REPT(&quot; &quot;;5-LEN([.N56]));&quot;null&quot;&amp;REPT(&quot; &quot;;5-4))&#10;&amp;&quot;,&quot;&quot;&quot;&amp;[.O$1]&amp;&quot;&quot;&quot;:&quot;&amp;IF([.O56]&lt;&gt;&quot;&quot;;&quot;&quot;&quot;&quot;&amp;[.O56]&amp;&quot;&quot;&quot;&quot;&amp;REPT(&quot; &quot;;10-LEN([.O56]));&quot;null&quot;&amp;REPT(&quot; &quot;;10-4+2))&#10;&amp;&quot;,&quot;&quot;&quot;&amp;[.P$1]&amp;&quot;&quot;&quot;:&quot;&amp;[.P56]&#10;&amp;&quot;,&quot;&quot;&quot;&amp;[.Q$1]&amp;&quot;&quot;&quot;:&quot;&amp;[.Q5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formula="of:=LEN([.C57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 table:formula="of:=IF([.B57]=&quot;&quot;;&quot;&quot;;&#10;&quot;:&quot;&#10;&amp;&quot;{&quot;&quot;&quot;&amp;[.B$1]&amp;&quot;&quot;&quot;:&quot;&quot;&quot;&amp;[.B57]&amp;&quot;&quot;&quot;&quot;&amp;REPT(&quot; &quot;;20-LEN([.B57]))&#10;&amp;&quot;,&quot;&quot;&quot;&amp;[.C$1]&amp;&quot;&quot;&quot;:&quot;&quot;&quot;&amp;[.C57]&amp;&quot;&quot;&quot;&quot;&amp;REPT(&quot; &quot;;35-LEN([.C57]))&#10;&amp;&quot;,&quot;&quot;&quot;&amp;[.D$1]&amp;&quot;&quot;&quot;:&quot;&amp;[.D57]&amp;REPT(&quot; &quot;;3-LEN([.D57]))&#10;&amp;&quot;,&quot;&quot;&quot;&amp;[.E$1]&amp;&quot;&quot;&quot;:&quot;&quot;&quot;&amp;[.E57]&amp;&quot;&quot;&quot;&quot;&amp;REPT(&quot; &quot;;6-LEN([.E57]))&#10;&amp;&quot;,&quot;&quot;&quot;&amp;[.F$1]&amp;&quot;&quot;&quot;:&quot;&quot;&quot;&amp;[.F57]&amp;&quot;&quot;&quot;&quot;&amp;REPT(&quot; &quot;;7-LEN([.F57]))&#10;&amp;&quot;,&quot;&quot;&quot;&amp;[.G$1]&amp;&quot;&quot;&quot;:&quot;&amp;IF([.G57]&lt;&gt;&quot;&quot;;&quot;&quot;&quot;&quot;&amp;[.G57]&amp;&quot;&quot;&quot;&quot;&amp;REPT(&quot; &quot;;5-LEN([.G57]));&quot;null&quot;&amp;REPT(&quot; &quot;;5-4+2))&#10;&amp;&quot;,&quot;&quot;&quot;&amp;[.H$1]&amp;&quot;&quot;&quot;:&quot;&amp;IF([.H57]&lt;&gt;&quot;&quot;;&quot;&quot;&quot;&quot;&amp;[.H57]&amp;&quot;&quot;&quot;&quot;&amp;REPT(&quot; &quot;;19-LEN([.H57]));&quot;null&quot;&amp;REPT(&quot; &quot;;19-4+2))&#10;&amp;&quot;,&quot;&quot;&quot;&amp;[.I$1]&amp;&quot;&quot;&quot;:&quot;&amp;IF([.I57]&lt;&gt;&quot;&quot;;&quot;&quot;&quot;&quot;&amp;[.I57]&amp;&quot;&quot;&quot;&quot;&amp;REPT(&quot; &quot;;8-LEN([.I57]));&quot;null&quot;&amp;REPT(&quot; &quot;;8-4+2))&#10;&amp;&quot;,&quot;&quot;&quot;&amp;[.J$1]&amp;&quot;&quot;&quot;:&quot;&amp;IF([.J57]&lt;&gt;&quot;&quot;;[.J57]&amp;REPT(&quot; &quot;;4-LEN([.J57]));&quot;null&quot;)&#10;&amp;&quot;,&quot;&quot;&quot;&amp;[.K$1]&amp;&quot;&quot;&quot;:&quot;&amp;IF([.K57]&lt;&gt;&quot;&quot;;[.K57]&amp;REPT(&quot; &quot;;4-LEN([.K57]));&quot;null&quot;)&#10;&amp;&quot;,&quot;&quot;&quot;&amp;[.L$1]&amp;&quot;&quot;&quot;:&quot;&amp;IF([.L57]&lt;&gt;&quot;&quot;;[.L57]&amp;REPT(&quot; &quot;;5-LEN([.L57]));&quot;null &quot;)&#10;&amp;&quot;,&quot;&quot;&quot;&amp;[.M$1]&amp;&quot;&quot;&quot;:&quot;&amp;IF([.M57]&lt;&gt;&quot;&quot;;&quot;&quot;&quot;&quot;&amp;[.M57]&amp;&quot;&quot;&quot;&quot;&amp;REPT(&quot; &quot;;20-LEN([.M57]));&quot;null&quot;&amp;REPT(&quot; &quot;;20-4+2))&#10;&amp;&quot;,&quot;&quot;&quot;&amp;[.N$1]&amp;&quot;&quot;&quot;:&quot;&amp;IF([.N57]&lt;&gt;&quot;&quot;;&quot;&quot;&amp;[.N57]&amp;&quot;&quot;&amp;REPT(&quot; &quot;;5-LEN([.N57]));&quot;null&quot;&amp;REPT(&quot; &quot;;5-4))&#10;&amp;&quot;,&quot;&quot;&quot;&amp;[.O$1]&amp;&quot;&quot;&quot;:&quot;&amp;IF([.O57]&lt;&gt;&quot;&quot;;&quot;&quot;&quot;&quot;&amp;[.O57]&amp;&quot;&quot;&quot;&quot;&amp;REPT(&quot; &quot;;10-LEN([.O57]));&quot;null&quot;&amp;REPT(&quot; &quot;;10-4+2))&#10;&amp;&quot;,&quot;&quot;&quot;&amp;[.P$1]&amp;&quot;&quot;&quot;:&quot;&amp;[.P57]&#10;&amp;&quot;,&quot;&quot;&quot;&amp;[.Q$1]&amp;&quot;&quot;&quot;:&quot;&amp;[.Q5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7"/>
          <table:table-cell table:formula="of:=LEN([.C58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7]=&quot;&quot;;&quot; &quot;;IF([.A58]&lt;&gt;&quot;&quot;;&quot;,&quot;;&quot;}&quot;)) &amp;IF([.A58]&lt;&gt;&quot;&quot;;&quot;&quot;&quot;&quot;&amp;[.A58]&amp;&quot;&quot;&quot;&quot;&amp;REPT(&quot; &quot;;20-LEN([.A58]));&quot;&quot;)" office:value-type="string" office:string-value=" " calcext:value-type="string">
            <text:p><text:s/></text:p>
          </table:table-cell>
          <table:table-cell table:style-name="ce17" table:formula="of:=IF([.B58]=&quot;&quot;;&quot;&quot;;&#10;&quot;:&quot;&#10;&amp;&quot;{&quot;&quot;&quot;&amp;[.B$1]&amp;&quot;&quot;&quot;:&quot;&quot;&quot;&amp;[.B58]&amp;&quot;&quot;&quot;&quot;&amp;REPT(&quot; &quot;;20-LEN([.B58]))&#10;&amp;&quot;,&quot;&quot;&quot;&amp;[.C$1]&amp;&quot;&quot;&quot;:&quot;&quot;&quot;&amp;[.C58]&amp;&quot;&quot;&quot;&quot;&amp;REPT(&quot; &quot;;35-LEN([.C58]))&#10;&amp;&quot;,&quot;&quot;&quot;&amp;[.D$1]&amp;&quot;&quot;&quot;:&quot;&amp;[.D58]&amp;REPT(&quot; &quot;;3-LEN([.D58]))&#10;&amp;&quot;,&quot;&quot;&quot;&amp;[.E$1]&amp;&quot;&quot;&quot;:&quot;&quot;&quot;&amp;[.E58]&amp;&quot;&quot;&quot;&quot;&amp;REPT(&quot; &quot;;6-LEN([.E58]))&#10;&amp;&quot;,&quot;&quot;&quot;&amp;[.F$1]&amp;&quot;&quot;&quot;:&quot;&quot;&quot;&amp;[.F58]&amp;&quot;&quot;&quot;&quot;&amp;REPT(&quot; &quot;;7-LEN([.F58]))&#10;&amp;&quot;,&quot;&quot;&quot;&amp;[.G$1]&amp;&quot;&quot;&quot;:&quot;&amp;IF([.G58]&lt;&gt;&quot;&quot;;&quot;&quot;&quot;&quot;&amp;[.G58]&amp;&quot;&quot;&quot;&quot;&amp;REPT(&quot; &quot;;5-LEN([.G58]));&quot;null&quot;&amp;REPT(&quot; &quot;;5-4+2))&#10;&amp;&quot;,&quot;&quot;&quot;&amp;[.H$1]&amp;&quot;&quot;&quot;:&quot;&amp;IF([.H58]&lt;&gt;&quot;&quot;;&quot;&quot;&quot;&quot;&amp;[.H58]&amp;&quot;&quot;&quot;&quot;&amp;REPT(&quot; &quot;;19-LEN([.H58]));&quot;null&quot;&amp;REPT(&quot; &quot;;19-4+2))&#10;&amp;&quot;,&quot;&quot;&quot;&amp;[.I$1]&amp;&quot;&quot;&quot;:&quot;&amp;IF([.I58]&lt;&gt;&quot;&quot;;&quot;&quot;&quot;&quot;&amp;[.I58]&amp;&quot;&quot;&quot;&quot;&amp;REPT(&quot; &quot;;8-LEN([.I58]));&quot;null&quot;&amp;REPT(&quot; &quot;;8-4+2))&#10;&amp;&quot;,&quot;&quot;&quot;&amp;[.J$1]&amp;&quot;&quot;&quot;:&quot;&amp;IF([.J58]&lt;&gt;&quot;&quot;;[.J58]&amp;REPT(&quot; &quot;;4-LEN([.J58]));&quot;null&quot;)&#10;&amp;&quot;,&quot;&quot;&quot;&amp;[.K$1]&amp;&quot;&quot;&quot;:&quot;&amp;IF([.K58]&lt;&gt;&quot;&quot;;[.K58]&amp;REPT(&quot; &quot;;4-LEN([.K58]));&quot;null&quot;)&#10;&amp;&quot;,&quot;&quot;&quot;&amp;[.L$1]&amp;&quot;&quot;&quot;:&quot;&amp;IF([.L58]&lt;&gt;&quot;&quot;;[.L58]&amp;REPT(&quot; &quot;;5-LEN([.L58]));&quot;null &quot;)&#10;&amp;&quot;,&quot;&quot;&quot;&amp;[.M$1]&amp;&quot;&quot;&quot;:&quot;&amp;IF([.M58]&lt;&gt;&quot;&quot;;&quot;&quot;&quot;&quot;&amp;[.M58]&amp;&quot;&quot;&quot;&quot;&amp;REPT(&quot; &quot;;20-LEN([.M58]));&quot;null&quot;&amp;REPT(&quot; &quot;;20-4+2))&#10;&amp;&quot;,&quot;&quot;&quot;&amp;[.N$1]&amp;&quot;&quot;&quot;:&quot;&amp;IF([.N58]&lt;&gt;&quot;&quot;;&quot;&quot;&amp;[.N58]&amp;&quot;&quot;&amp;REPT(&quot; &quot;;5-LEN([.N58]));&quot;null&quot;&amp;REPT(&quot; &quot;;5-4))&#10;&amp;&quot;,&quot;&quot;&quot;&amp;[.O$1]&amp;&quot;&quot;&quot;:&quot;&amp;IF([.O58]&lt;&gt;&quot;&quot;;&quot;&quot;&quot;&quot;&amp;[.O58]&amp;&quot;&quot;&quot;&quot;&amp;REPT(&quot; &quot;;10-LEN([.O58]));&quot;null&quot;&amp;REPT(&quot; &quot;;10-4+2))&#10;&amp;&quot;,&quot;&quot;&quot;&amp;[.P$1]&amp;&quot;&quot;&quot;:&quot;&amp;[.P58]&#10;&amp;&quot;,&quot;&quot;&quot;&amp;[.Q$1]&amp;&quot;&quot;&quot;:&quot;&amp;[.Q5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59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8]=&quot;&quot;;&quot; &quot;;IF([.A59]&lt;&gt;&quot;&quot;;&quot;,&quot;;&quot;}&quot;)) &amp;IF([.A59]&lt;&gt;&quot;&quot;;&quot;&quot;&quot;&quot;&amp;[.A59]&amp;&quot;&quot;&quot;&quot;&amp;REPT(&quot; &quot;;20-LEN([.A59]));&quot;&quot;)" office:value-type="string" office:string-value=" " calcext:value-type="string">
            <text:p><text:s/></text:p>
          </table:table-cell>
          <table:table-cell table:style-name="ce17" table:formula="of:=IF([.B59]=&quot;&quot;;&quot;&quot;;&#10;&quot;:&quot;&#10;&amp;&quot;{&quot;&quot;&quot;&amp;[.B$1]&amp;&quot;&quot;&quot;:&quot;&quot;&quot;&amp;[.B59]&amp;&quot;&quot;&quot;&quot;&amp;REPT(&quot; &quot;;20-LEN([.B59]))&#10;&amp;&quot;,&quot;&quot;&quot;&amp;[.C$1]&amp;&quot;&quot;&quot;:&quot;&quot;&quot;&amp;[.C59]&amp;&quot;&quot;&quot;&quot;&amp;REPT(&quot; &quot;;35-LEN([.C59]))&#10;&amp;&quot;,&quot;&quot;&quot;&amp;[.D$1]&amp;&quot;&quot;&quot;:&quot;&amp;[.D59]&amp;REPT(&quot; &quot;;3-LEN([.D59]))&#10;&amp;&quot;,&quot;&quot;&quot;&amp;[.E$1]&amp;&quot;&quot;&quot;:&quot;&quot;&quot;&amp;[.E59]&amp;&quot;&quot;&quot;&quot;&amp;REPT(&quot; &quot;;6-LEN([.E59]))&#10;&amp;&quot;,&quot;&quot;&quot;&amp;[.F$1]&amp;&quot;&quot;&quot;:&quot;&quot;&quot;&amp;[.F59]&amp;&quot;&quot;&quot;&quot;&amp;REPT(&quot; &quot;;7-LEN([.F59]))&#10;&amp;&quot;,&quot;&quot;&quot;&amp;[.G$1]&amp;&quot;&quot;&quot;:&quot;&amp;IF([.G59]&lt;&gt;&quot;&quot;;&quot;&quot;&quot;&quot;&amp;[.G59]&amp;&quot;&quot;&quot;&quot;&amp;REPT(&quot; &quot;;5-LEN([.G59]));&quot;null&quot;&amp;REPT(&quot; &quot;;5-4+2))&#10;&amp;&quot;,&quot;&quot;&quot;&amp;[.H$1]&amp;&quot;&quot;&quot;:&quot;&amp;IF([.H59]&lt;&gt;&quot;&quot;;&quot;&quot;&quot;&quot;&amp;[.H59]&amp;&quot;&quot;&quot;&quot;&amp;REPT(&quot; &quot;;19-LEN([.H59]));&quot;null&quot;&amp;REPT(&quot; &quot;;19-4+2))&#10;&amp;&quot;,&quot;&quot;&quot;&amp;[.I$1]&amp;&quot;&quot;&quot;:&quot;&amp;IF([.I59]&lt;&gt;&quot;&quot;;&quot;&quot;&quot;&quot;&amp;[.I59]&amp;&quot;&quot;&quot;&quot;&amp;REPT(&quot; &quot;;8-LEN([.I59]));&quot;null&quot;&amp;REPT(&quot; &quot;;8-4+2))&#10;&amp;&quot;,&quot;&quot;&quot;&amp;[.J$1]&amp;&quot;&quot;&quot;:&quot;&amp;IF([.J59]&lt;&gt;&quot;&quot;;[.J59]&amp;REPT(&quot; &quot;;4-LEN([.J59]));&quot;null&quot;)&#10;&amp;&quot;,&quot;&quot;&quot;&amp;[.K$1]&amp;&quot;&quot;&quot;:&quot;&amp;IF([.K59]&lt;&gt;&quot;&quot;;[.K59]&amp;REPT(&quot; &quot;;4-LEN([.K59]));&quot;null&quot;)&#10;&amp;&quot;,&quot;&quot;&quot;&amp;[.L$1]&amp;&quot;&quot;&quot;:&quot;&amp;IF([.L59]&lt;&gt;&quot;&quot;;[.L59]&amp;REPT(&quot; &quot;;5-LEN([.L59]));&quot;null &quot;)&#10;&amp;&quot;,&quot;&quot;&quot;&amp;[.M$1]&amp;&quot;&quot;&quot;:&quot;&amp;IF([.M59]&lt;&gt;&quot;&quot;;&quot;&quot;&quot;&quot;&amp;[.M59]&amp;&quot;&quot;&quot;&quot;&amp;REPT(&quot; &quot;;20-LEN([.M59]));&quot;null&quot;&amp;REPT(&quot; &quot;;20-4+2))&#10;&amp;&quot;,&quot;&quot;&quot;&amp;[.N$1]&amp;&quot;&quot;&quot;:&quot;&amp;IF([.N59]&lt;&gt;&quot;&quot;;&quot;&quot;&amp;[.N59]&amp;&quot;&quot;&amp;REPT(&quot; &quot;;5-LEN([.N59]));&quot;null&quot;&amp;REPT(&quot; &quot;;5-4))&#10;&amp;&quot;,&quot;&quot;&quot;&amp;[.O$1]&amp;&quot;&quot;&quot;:&quot;&amp;IF([.O59]&lt;&gt;&quot;&quot;;&quot;&quot;&quot;&quot;&amp;[.O59]&amp;&quot;&quot;&quot;&quot;&amp;REPT(&quot; &quot;;10-LEN([.O59]));&quot;null&quot;&amp;REPT(&quot; &quot;;10-4+2))&#10;&amp;&quot;,&quot;&quot;&quot;&amp;[.P$1]&amp;&quot;&quot;&quot;:&quot;&amp;[.P59]&#10;&amp;&quot;,&quot;&quot;&quot;&amp;[.Q$1]&amp;&quot;&quot;&quot;:&quot;&amp;[.Q5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60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9]=&quot;&quot;;&quot; &quot;;IF([.A60]&lt;&gt;&quot;&quot;;&quot;,&quot;;&quot;}&quot;)) &amp;IF([.A60]&lt;&gt;&quot;&quot;;&quot;&quot;&quot;&quot;&amp;[.A60]&amp;&quot;&quot;&quot;&quot;&amp;REPT(&quot; &quot;;20-LEN([.A60]));&quot;&quot;)" office:value-type="string" office:string-value=" " calcext:value-type="string">
            <text:p><text:s/></text:p>
          </table:table-cell>
          <table:table-cell table:style-name="ce17" table:formula="of:=IF([.B60]=&quot;&quot;;&quot;&quot;;&#10;&quot;:&quot;&#10;&amp;&quot;{&quot;&quot;&quot;&amp;[.B$1]&amp;&quot;&quot;&quot;:&quot;&quot;&quot;&amp;[.B60]&amp;&quot;&quot;&quot;&quot;&amp;REPT(&quot; &quot;;20-LEN([.B60]))&#10;&amp;&quot;,&quot;&quot;&quot;&amp;[.C$1]&amp;&quot;&quot;&quot;:&quot;&quot;&quot;&amp;[.C60]&amp;&quot;&quot;&quot;&quot;&amp;REPT(&quot; &quot;;35-LEN([.C60]))&#10;&amp;&quot;,&quot;&quot;&quot;&amp;[.D$1]&amp;&quot;&quot;&quot;:&quot;&amp;[.D60]&amp;REPT(&quot; &quot;;3-LEN([.D60]))&#10;&amp;&quot;,&quot;&quot;&quot;&amp;[.E$1]&amp;&quot;&quot;&quot;:&quot;&quot;&quot;&amp;[.E60]&amp;&quot;&quot;&quot;&quot;&amp;REPT(&quot; &quot;;6-LEN([.E60]))&#10;&amp;&quot;,&quot;&quot;&quot;&amp;[.F$1]&amp;&quot;&quot;&quot;:&quot;&quot;&quot;&amp;[.F60]&amp;&quot;&quot;&quot;&quot;&amp;REPT(&quot; &quot;;7-LEN([.F60]))&#10;&amp;&quot;,&quot;&quot;&quot;&amp;[.G$1]&amp;&quot;&quot;&quot;:&quot;&amp;IF([.G60]&lt;&gt;&quot;&quot;;&quot;&quot;&quot;&quot;&amp;[.G60]&amp;&quot;&quot;&quot;&quot;&amp;REPT(&quot; &quot;;5-LEN([.G60]));&quot;null&quot;&amp;REPT(&quot; &quot;;5-4+2))&#10;&amp;&quot;,&quot;&quot;&quot;&amp;[.H$1]&amp;&quot;&quot;&quot;:&quot;&amp;IF([.H60]&lt;&gt;&quot;&quot;;&quot;&quot;&quot;&quot;&amp;[.H60]&amp;&quot;&quot;&quot;&quot;&amp;REPT(&quot; &quot;;19-LEN([.H60]));&quot;null&quot;&amp;REPT(&quot; &quot;;19-4+2))&#10;&amp;&quot;,&quot;&quot;&quot;&amp;[.I$1]&amp;&quot;&quot;&quot;:&quot;&amp;IF([.I60]&lt;&gt;&quot;&quot;;&quot;&quot;&quot;&quot;&amp;[.I60]&amp;&quot;&quot;&quot;&quot;&amp;REPT(&quot; &quot;;8-LEN([.I60]));&quot;null&quot;&amp;REPT(&quot; &quot;;8-4+2))&#10;&amp;&quot;,&quot;&quot;&quot;&amp;[.J$1]&amp;&quot;&quot;&quot;:&quot;&amp;IF([.J60]&lt;&gt;&quot;&quot;;[.J60]&amp;REPT(&quot; &quot;;4-LEN([.J60]));&quot;null&quot;)&#10;&amp;&quot;,&quot;&quot;&quot;&amp;[.K$1]&amp;&quot;&quot;&quot;:&quot;&amp;IF([.K60]&lt;&gt;&quot;&quot;;[.K60]&amp;REPT(&quot; &quot;;4-LEN([.K60]));&quot;null&quot;)&#10;&amp;&quot;,&quot;&quot;&quot;&amp;[.L$1]&amp;&quot;&quot;&quot;:&quot;&amp;IF([.L60]&lt;&gt;&quot;&quot;;[.L60]&amp;REPT(&quot; &quot;;5-LEN([.L60]));&quot;null &quot;)&#10;&amp;&quot;,&quot;&quot;&quot;&amp;[.M$1]&amp;&quot;&quot;&quot;:&quot;&amp;IF([.M60]&lt;&gt;&quot;&quot;;&quot;&quot;&quot;&quot;&amp;[.M60]&amp;&quot;&quot;&quot;&quot;&amp;REPT(&quot; &quot;;20-LEN([.M60]));&quot;null&quot;&amp;REPT(&quot; &quot;;20-4+2))&#10;&amp;&quot;,&quot;&quot;&quot;&amp;[.N$1]&amp;&quot;&quot;&quot;:&quot;&amp;IF([.N60]&lt;&gt;&quot;&quot;;&quot;&quot;&amp;[.N60]&amp;&quot;&quot;&amp;REPT(&quot; &quot;;5-LEN([.N60]));&quot;null&quot;&amp;REPT(&quot; &quot;;5-4))&#10;&amp;&quot;,&quot;&quot;&quot;&amp;[.O$1]&amp;&quot;&quot;&quot;:&quot;&amp;IF([.O60]&lt;&gt;&quot;&quot;;&quot;&quot;&quot;&quot;&amp;[.O60]&amp;&quot;&quot;&quot;&quot;&amp;REPT(&quot; &quot;;10-LEN([.O60]));&quot;null&quot;&amp;REPT(&quot; &quot;;10-4+2))&#10;&amp;&quot;,&quot;&quot;&quot;&amp;[.P$1]&amp;&quot;&quot;&quot;:&quot;&amp;[.P60]&#10;&amp;&quot;,&quot;&quot;&quot;&amp;[.Q$1]&amp;&quot;&quot;&quot;:&quot;&amp;[.Q60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0]=&quot;&quot;;&quot; &quot;;IF([.A61]&lt;&gt;&quot;&quot;;&quot;,&quot;;&quot;}&quot;)) &amp;IF([.A61]&lt;&gt;&quot;&quot;;&quot;&quot;&quot;&quot;&amp;[.A61]&amp;&quot;&quot;&quot;&quot;&amp;REPT(&quot; &quot;;20-LEN([.A61]));&quot;&quot;)" office:value-type="string" office:string-value=" " calcext:value-type="string">
            <text:p><text:s/></text:p>
          </table:table-cell>
          <table:table-cell table:style-name="ce17" table:formula="of:=IF([.B61]=&quot;&quot;;&quot;&quot;;&#10;&quot;:&quot;&#10;&amp;&quot;{&quot;&quot;&quot;&amp;[.B$1]&amp;&quot;&quot;&quot;:&quot;&quot;&quot;&amp;[.B61]&amp;&quot;&quot;&quot;&quot;&amp;REPT(&quot; &quot;;20-LEN([.B61]))&#10;&amp;&quot;,&quot;&quot;&quot;&amp;[.C$1]&amp;&quot;&quot;&quot;:&quot;&quot;&quot;&amp;[.C61]&amp;&quot;&quot;&quot;&quot;&amp;REPT(&quot; &quot;;35-LEN([.C61]))&#10;&amp;&quot;,&quot;&quot;&quot;&amp;[.D$1]&amp;&quot;&quot;&quot;:&quot;&amp;[.D61]&amp;REPT(&quot; &quot;;3-LEN([.D61]))&#10;&amp;&quot;,&quot;&quot;&quot;&amp;[.E$1]&amp;&quot;&quot;&quot;:&quot;&quot;&quot;&amp;[.E61]&amp;&quot;&quot;&quot;&quot;&amp;REPT(&quot; &quot;;6-LEN([.E61]))&#10;&amp;&quot;,&quot;&quot;&quot;&amp;[.F$1]&amp;&quot;&quot;&quot;:&quot;&quot;&quot;&amp;[.F61]&amp;&quot;&quot;&quot;&quot;&amp;REPT(&quot; &quot;;7-LEN([.F61]))&#10;&amp;&quot;,&quot;&quot;&quot;&amp;[.G$1]&amp;&quot;&quot;&quot;:&quot;&amp;IF([.G61]&lt;&gt;&quot;&quot;;&quot;&quot;&quot;&quot;&amp;[.G61]&amp;&quot;&quot;&quot;&quot;&amp;REPT(&quot; &quot;;5-LEN([.G61]));&quot;null&quot;&amp;REPT(&quot; &quot;;5-4+2))&#10;&amp;&quot;,&quot;&quot;&quot;&amp;[.H$1]&amp;&quot;&quot;&quot;:&quot;&amp;IF([.H61]&lt;&gt;&quot;&quot;;&quot;&quot;&quot;&quot;&amp;[.H61]&amp;&quot;&quot;&quot;&quot;&amp;REPT(&quot; &quot;;19-LEN([.H61]));&quot;null&quot;&amp;REPT(&quot; &quot;;19-4+2))&#10;&amp;&quot;,&quot;&quot;&quot;&amp;[.I$1]&amp;&quot;&quot;&quot;:&quot;&amp;IF([.I61]&lt;&gt;&quot;&quot;;&quot;&quot;&quot;&quot;&amp;[.I61]&amp;&quot;&quot;&quot;&quot;&amp;REPT(&quot; &quot;;8-LEN([.I61]));&quot;null&quot;&amp;REPT(&quot; &quot;;8-4+2))&#10;&amp;&quot;,&quot;&quot;&quot;&amp;[.J$1]&amp;&quot;&quot;&quot;:&quot;&amp;IF([.J61]&lt;&gt;&quot;&quot;;[.J61]&amp;REPT(&quot; &quot;;4-LEN([.J61]));&quot;null&quot;)&#10;&amp;&quot;,&quot;&quot;&quot;&amp;[.K$1]&amp;&quot;&quot;&quot;:&quot;&amp;IF([.K61]&lt;&gt;&quot;&quot;;[.K61]&amp;REPT(&quot; &quot;;4-LEN([.K61]));&quot;null&quot;)&#10;&amp;&quot;,&quot;&quot;&quot;&amp;[.L$1]&amp;&quot;&quot;&quot;:&quot;&amp;IF([.L61]&lt;&gt;&quot;&quot;;[.L61]&amp;REPT(&quot; &quot;;5-LEN([.L61]));&quot;null &quot;)&#10;&amp;&quot;,&quot;&quot;&quot;&amp;[.M$1]&amp;&quot;&quot;&quot;:&quot;&amp;IF([.M61]&lt;&gt;&quot;&quot;;&quot;&quot;&quot;&quot;&amp;[.M61]&amp;&quot;&quot;&quot;&quot;&amp;REPT(&quot; &quot;;20-LEN([.M61]));&quot;null&quot;&amp;REPT(&quot; &quot;;20-4+2))&#10;&amp;&quot;,&quot;&quot;&quot;&amp;[.N$1]&amp;&quot;&quot;&quot;:&quot;&amp;IF([.N61]&lt;&gt;&quot;&quot;;&quot;&quot;&amp;[.N61]&amp;&quot;&quot;&amp;REPT(&quot; &quot;;5-LEN([.N61]));&quot;null&quot;&amp;REPT(&quot; &quot;;5-4))&#10;&amp;&quot;,&quot;&quot;&quot;&amp;[.O$1]&amp;&quot;&quot;&quot;:&quot;&amp;IF([.O61]&lt;&gt;&quot;&quot;;&quot;&quot;&quot;&quot;&amp;[.O61]&amp;&quot;&quot;&quot;&quot;&amp;REPT(&quot; &quot;;10-LEN([.O61]));&quot;null&quot;&amp;REPT(&quot; &quot;;10-4+2))&#10;&amp;&quot;,&quot;&quot;&quot;&amp;[.P$1]&amp;&quot;&quot;&quot;:&quot;&amp;[.P61]&#10;&amp;&quot;,&quot;&quot;&quot;&amp;[.Q$1]&amp;&quot;&quot;&quot;:&quot;&amp;[.Q61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1]=&quot;&quot;;&quot; &quot;;IF([.A62]&lt;&gt;&quot;&quot;;&quot;,&quot;;&quot;}&quot;)) &amp;IF([.A62]&lt;&gt;&quot;&quot;;&quot;&quot;&quot;&quot;&amp;[.A62]&amp;&quot;&quot;&quot;&quot;&amp;REPT(&quot; &quot;;20-LEN([.A62]));&quot;&quot;)" office:value-type="string" office:string-value=" " calcext:value-type="string">
            <text:p><text:s/></text:p>
          </table:table-cell>
          <table:table-cell table:style-name="ce17" table:formula="of:=IF([.B62]=&quot;&quot;;&quot;&quot;;&#10;&quot;:&quot;&#10;&amp;&quot;{&quot;&quot;&quot;&amp;[.B$1]&amp;&quot;&quot;&quot;:&quot;&quot;&quot;&amp;[.B62]&amp;&quot;&quot;&quot;&quot;&amp;REPT(&quot; &quot;;20-LEN([.B62]))&#10;&amp;&quot;,&quot;&quot;&quot;&amp;[.C$1]&amp;&quot;&quot;&quot;:&quot;&quot;&quot;&amp;[.C62]&amp;&quot;&quot;&quot;&quot;&amp;REPT(&quot; &quot;;35-LEN([.C62]))&#10;&amp;&quot;,&quot;&quot;&quot;&amp;[.D$1]&amp;&quot;&quot;&quot;:&quot;&amp;[.D62]&amp;REPT(&quot; &quot;;3-LEN([.D62]))&#10;&amp;&quot;,&quot;&quot;&quot;&amp;[.E$1]&amp;&quot;&quot;&quot;:&quot;&quot;&quot;&amp;[.E62]&amp;&quot;&quot;&quot;&quot;&amp;REPT(&quot; &quot;;6-LEN([.E62]))&#10;&amp;&quot;,&quot;&quot;&quot;&amp;[.F$1]&amp;&quot;&quot;&quot;:&quot;&quot;&quot;&amp;[.F62]&amp;&quot;&quot;&quot;&quot;&amp;REPT(&quot; &quot;;7-LEN([.F62]))&#10;&amp;&quot;,&quot;&quot;&quot;&amp;[.G$1]&amp;&quot;&quot;&quot;:&quot;&amp;IF([.G62]&lt;&gt;&quot;&quot;;&quot;&quot;&quot;&quot;&amp;[.G62]&amp;&quot;&quot;&quot;&quot;&amp;REPT(&quot; &quot;;5-LEN([.G62]));&quot;null&quot;&amp;REPT(&quot; &quot;;5-4+2))&#10;&amp;&quot;,&quot;&quot;&quot;&amp;[.H$1]&amp;&quot;&quot;&quot;:&quot;&amp;IF([.H62]&lt;&gt;&quot;&quot;;&quot;&quot;&quot;&quot;&amp;[.H62]&amp;&quot;&quot;&quot;&quot;&amp;REPT(&quot; &quot;;19-LEN([.H62]));&quot;null&quot;&amp;REPT(&quot; &quot;;19-4+2))&#10;&amp;&quot;,&quot;&quot;&quot;&amp;[.I$1]&amp;&quot;&quot;&quot;:&quot;&amp;IF([.I62]&lt;&gt;&quot;&quot;;&quot;&quot;&quot;&quot;&amp;[.I62]&amp;&quot;&quot;&quot;&quot;&amp;REPT(&quot; &quot;;8-LEN([.I62]));&quot;null&quot;&amp;REPT(&quot; &quot;;8-4+2))&#10;&amp;&quot;,&quot;&quot;&quot;&amp;[.J$1]&amp;&quot;&quot;&quot;:&quot;&amp;IF([.J62]&lt;&gt;&quot;&quot;;[.J62]&amp;REPT(&quot; &quot;;4-LEN([.J62]));&quot;null&quot;)&#10;&amp;&quot;,&quot;&quot;&quot;&amp;[.K$1]&amp;&quot;&quot;&quot;:&quot;&amp;IF([.K62]&lt;&gt;&quot;&quot;;[.K62]&amp;REPT(&quot; &quot;;4-LEN([.K62]));&quot;null&quot;)&#10;&amp;&quot;,&quot;&quot;&quot;&amp;[.L$1]&amp;&quot;&quot;&quot;:&quot;&amp;IF([.L62]&lt;&gt;&quot;&quot;;[.L62]&amp;REPT(&quot; &quot;;5-LEN([.L62]));&quot;null &quot;)&#10;&amp;&quot;,&quot;&quot;&quot;&amp;[.M$1]&amp;&quot;&quot;&quot;:&quot;&amp;IF([.M62]&lt;&gt;&quot;&quot;;&quot;&quot;&quot;&quot;&amp;[.M62]&amp;&quot;&quot;&quot;&quot;&amp;REPT(&quot; &quot;;20-LEN([.M62]));&quot;null&quot;&amp;REPT(&quot; &quot;;20-4+2))&#10;&amp;&quot;,&quot;&quot;&quot;&amp;[.N$1]&amp;&quot;&quot;&quot;:&quot;&amp;IF([.N62]&lt;&gt;&quot;&quot;;&quot;&quot;&amp;[.N62]&amp;&quot;&quot;&amp;REPT(&quot; &quot;;5-LEN([.N62]));&quot;null&quot;&amp;REPT(&quot; &quot;;5-4))&#10;&amp;&quot;,&quot;&quot;&quot;&amp;[.O$1]&amp;&quot;&quot;&quot;:&quot;&amp;IF([.O62]&lt;&gt;&quot;&quot;;&quot;&quot;&quot;&quot;&amp;[.O62]&amp;&quot;&quot;&quot;&quot;&amp;REPT(&quot; &quot;;10-LEN([.O62]));&quot;null&quot;&amp;REPT(&quot; &quot;;10-4+2))&#10;&amp;&quot;,&quot;&quot;&quot;&amp;[.P$1]&amp;&quot;&quot;&quot;:&quot;&amp;[.P62]&#10;&amp;&quot;,&quot;&quot;&quot;&amp;[.Q$1]&amp;&quot;&quot;&quot;:&quot;&amp;[.Q62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2]=&quot;&quot;;&quot; &quot;;IF([.A63]&lt;&gt;&quot;&quot;;&quot;,&quot;;&quot;}&quot;)) &amp;IF([.A63]&lt;&gt;&quot;&quot;;&quot;&quot;&quot;&quot;&amp;[.A63]&amp;&quot;&quot;&quot;&quot;&amp;REPT(&quot; &quot;;20-LEN([.A63]));&quot;&quot;)" office:value-type="string" office:string-value=" " calcext:value-type="string">
            <text:p><text:s/></text:p>
          </table:table-cell>
          <table:table-cell table:style-name="ce17" table:formula="of:=IF([.B63]=&quot;&quot;;&quot;&quot;;&#10;&quot;:&quot;&#10;&amp;&quot;{&quot;&quot;&quot;&amp;[.B$1]&amp;&quot;&quot;&quot;:&quot;&quot;&quot;&amp;[.B63]&amp;&quot;&quot;&quot;&quot;&amp;REPT(&quot; &quot;;20-LEN([.B63]))&#10;&amp;&quot;,&quot;&quot;&quot;&amp;[.C$1]&amp;&quot;&quot;&quot;:&quot;&quot;&quot;&amp;[.C63]&amp;&quot;&quot;&quot;&quot;&amp;REPT(&quot; &quot;;35-LEN([.C63]))&#10;&amp;&quot;,&quot;&quot;&quot;&amp;[.D$1]&amp;&quot;&quot;&quot;:&quot;&amp;[.D63]&amp;REPT(&quot; &quot;;3-LEN([.D63]))&#10;&amp;&quot;,&quot;&quot;&quot;&amp;[.E$1]&amp;&quot;&quot;&quot;:&quot;&quot;&quot;&amp;[.E63]&amp;&quot;&quot;&quot;&quot;&amp;REPT(&quot; &quot;;6-LEN([.E63]))&#10;&amp;&quot;,&quot;&quot;&quot;&amp;[.F$1]&amp;&quot;&quot;&quot;:&quot;&quot;&quot;&amp;[.F63]&amp;&quot;&quot;&quot;&quot;&amp;REPT(&quot; &quot;;7-LEN([.F63]))&#10;&amp;&quot;,&quot;&quot;&quot;&amp;[.G$1]&amp;&quot;&quot;&quot;:&quot;&amp;IF([.G63]&lt;&gt;&quot;&quot;;&quot;&quot;&quot;&quot;&amp;[.G63]&amp;&quot;&quot;&quot;&quot;&amp;REPT(&quot; &quot;;5-LEN([.G63]));&quot;null&quot;&amp;REPT(&quot; &quot;;5-4+2))&#10;&amp;&quot;,&quot;&quot;&quot;&amp;[.H$1]&amp;&quot;&quot;&quot;:&quot;&amp;IF([.H63]&lt;&gt;&quot;&quot;;&quot;&quot;&quot;&quot;&amp;[.H63]&amp;&quot;&quot;&quot;&quot;&amp;REPT(&quot; &quot;;19-LEN([.H63]));&quot;null&quot;&amp;REPT(&quot; &quot;;19-4+2))&#10;&amp;&quot;,&quot;&quot;&quot;&amp;[.I$1]&amp;&quot;&quot;&quot;:&quot;&amp;IF([.I63]&lt;&gt;&quot;&quot;;&quot;&quot;&quot;&quot;&amp;[.I63]&amp;&quot;&quot;&quot;&quot;&amp;REPT(&quot; &quot;;8-LEN([.I63]));&quot;null&quot;&amp;REPT(&quot; &quot;;8-4+2))&#10;&amp;&quot;,&quot;&quot;&quot;&amp;[.J$1]&amp;&quot;&quot;&quot;:&quot;&amp;IF([.J63]&lt;&gt;&quot;&quot;;[.J63]&amp;REPT(&quot; &quot;;4-LEN([.J63]));&quot;null&quot;)&#10;&amp;&quot;,&quot;&quot;&quot;&amp;[.K$1]&amp;&quot;&quot;&quot;:&quot;&amp;IF([.K63]&lt;&gt;&quot;&quot;;[.K63]&amp;REPT(&quot; &quot;;4-LEN([.K63]));&quot;null&quot;)&#10;&amp;&quot;,&quot;&quot;&quot;&amp;[.L$1]&amp;&quot;&quot;&quot;:&quot;&amp;IF([.L63]&lt;&gt;&quot;&quot;;[.L63]&amp;REPT(&quot; &quot;;5-LEN([.L63]));&quot;null &quot;)&#10;&amp;&quot;,&quot;&quot;&quot;&amp;[.M$1]&amp;&quot;&quot;&quot;:&quot;&amp;IF([.M63]&lt;&gt;&quot;&quot;;&quot;&quot;&quot;&quot;&amp;[.M63]&amp;&quot;&quot;&quot;&quot;&amp;REPT(&quot; &quot;;20-LEN([.M63]));&quot;null&quot;&amp;REPT(&quot; &quot;;20-4+2))&#10;&amp;&quot;,&quot;&quot;&quot;&amp;[.N$1]&amp;&quot;&quot;&quot;:&quot;&amp;IF([.N63]&lt;&gt;&quot;&quot;;&quot;&quot;&amp;[.N63]&amp;&quot;&quot;&amp;REPT(&quot; &quot;;5-LEN([.N63]));&quot;null&quot;&amp;REPT(&quot; &quot;;5-4))&#10;&amp;&quot;,&quot;&quot;&quot;&amp;[.O$1]&amp;&quot;&quot;&quot;:&quot;&amp;IF([.O63]&lt;&gt;&quot;&quot;;&quot;&quot;&quot;&quot;&amp;[.O63]&amp;&quot;&quot;&quot;&quot;&amp;REPT(&quot; &quot;;10-LEN([.O63]));&quot;null&quot;&amp;REPT(&quot; &quot;;10-4+2))&#10;&amp;&quot;,&quot;&quot;&quot;&amp;[.P$1]&amp;&quot;&quot;&quot;:&quot;&amp;[.P63]&#10;&amp;&quot;,&quot;&quot;&quot;&amp;[.Q$1]&amp;&quot;&quot;&quot;:&quot;&amp;[.Q63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3]=&quot;&quot;;&quot; &quot;;IF([.A64]&lt;&gt;&quot;&quot;;&quot;,&quot;;&quot;}&quot;)) &amp;IF([.A64]&lt;&gt;&quot;&quot;;&quot;&quot;&quot;&quot;&amp;[.A64]&amp;&quot;&quot;&quot;&quot;&amp;REPT(&quot; &quot;;20-LEN([.A64]));&quot;&quot;)" office:value-type="string" office:string-value=" " calcext:value-type="string">
            <text:p><text:s/></text:p>
          </table:table-cell>
          <table:table-cell table:style-name="ce17" table:formula="of:=IF([.B64]=&quot;&quot;;&quot;&quot;;&#10;&quot;:&quot;&#10;&amp;&quot;{&quot;&quot;&quot;&amp;[.B$1]&amp;&quot;&quot;&quot;:&quot;&quot;&quot;&amp;[.B64]&amp;&quot;&quot;&quot;&quot;&amp;REPT(&quot; &quot;;20-LEN([.B64]))&#10;&amp;&quot;,&quot;&quot;&quot;&amp;[.C$1]&amp;&quot;&quot;&quot;:&quot;&quot;&quot;&amp;[.C64]&amp;&quot;&quot;&quot;&quot;&amp;REPT(&quot; &quot;;35-LEN([.C64]))&#10;&amp;&quot;,&quot;&quot;&quot;&amp;[.D$1]&amp;&quot;&quot;&quot;:&quot;&amp;[.D64]&amp;REPT(&quot; &quot;;3-LEN([.D64]))&#10;&amp;&quot;,&quot;&quot;&quot;&amp;[.E$1]&amp;&quot;&quot;&quot;:&quot;&quot;&quot;&amp;[.E64]&amp;&quot;&quot;&quot;&quot;&amp;REPT(&quot; &quot;;6-LEN([.E64]))&#10;&amp;&quot;,&quot;&quot;&quot;&amp;[.F$1]&amp;&quot;&quot;&quot;:&quot;&quot;&quot;&amp;[.F64]&amp;&quot;&quot;&quot;&quot;&amp;REPT(&quot; &quot;;7-LEN([.F64]))&#10;&amp;&quot;,&quot;&quot;&quot;&amp;[.G$1]&amp;&quot;&quot;&quot;:&quot;&amp;IF([.G64]&lt;&gt;&quot;&quot;;&quot;&quot;&quot;&quot;&amp;[.G64]&amp;&quot;&quot;&quot;&quot;&amp;REPT(&quot; &quot;;5-LEN([.G64]));&quot;null&quot;&amp;REPT(&quot; &quot;;5-4+2))&#10;&amp;&quot;,&quot;&quot;&quot;&amp;[.H$1]&amp;&quot;&quot;&quot;:&quot;&amp;IF([.H64]&lt;&gt;&quot;&quot;;&quot;&quot;&quot;&quot;&amp;[.H64]&amp;&quot;&quot;&quot;&quot;&amp;REPT(&quot; &quot;;19-LEN([.H64]));&quot;null&quot;&amp;REPT(&quot; &quot;;19-4+2))&#10;&amp;&quot;,&quot;&quot;&quot;&amp;[.I$1]&amp;&quot;&quot;&quot;:&quot;&amp;IF([.I64]&lt;&gt;&quot;&quot;;&quot;&quot;&quot;&quot;&amp;[.I64]&amp;&quot;&quot;&quot;&quot;&amp;REPT(&quot; &quot;;8-LEN([.I64]));&quot;null&quot;&amp;REPT(&quot; &quot;;8-4+2))&#10;&amp;&quot;,&quot;&quot;&quot;&amp;[.J$1]&amp;&quot;&quot;&quot;:&quot;&amp;IF([.J64]&lt;&gt;&quot;&quot;;[.J64]&amp;REPT(&quot; &quot;;4-LEN([.J64]));&quot;null&quot;)&#10;&amp;&quot;,&quot;&quot;&quot;&amp;[.K$1]&amp;&quot;&quot;&quot;:&quot;&amp;IF([.K64]&lt;&gt;&quot;&quot;;[.K64]&amp;REPT(&quot; &quot;;4-LEN([.K64]));&quot;null&quot;)&#10;&amp;&quot;,&quot;&quot;&quot;&amp;[.L$1]&amp;&quot;&quot;&quot;:&quot;&amp;IF([.L64]&lt;&gt;&quot;&quot;;[.L64]&amp;REPT(&quot; &quot;;5-LEN([.L64]));&quot;null &quot;)&#10;&amp;&quot;,&quot;&quot;&quot;&amp;[.M$1]&amp;&quot;&quot;&quot;:&quot;&amp;IF([.M64]&lt;&gt;&quot;&quot;;&quot;&quot;&quot;&quot;&amp;[.M64]&amp;&quot;&quot;&quot;&quot;&amp;REPT(&quot; &quot;;20-LEN([.M64]));&quot;null&quot;&amp;REPT(&quot; &quot;;20-4+2))&#10;&amp;&quot;,&quot;&quot;&quot;&amp;[.N$1]&amp;&quot;&quot;&quot;:&quot;&amp;IF([.N64]&lt;&gt;&quot;&quot;;&quot;&quot;&amp;[.N64]&amp;&quot;&quot;&amp;REPT(&quot; &quot;;5-LEN([.N64]));&quot;null&quot;&amp;REPT(&quot; &quot;;5-4))&#10;&amp;&quot;,&quot;&quot;&quot;&amp;[.O$1]&amp;&quot;&quot;&quot;:&quot;&amp;IF([.O64]&lt;&gt;&quot;&quot;;&quot;&quot;&quot;&quot;&amp;[.O64]&amp;&quot;&quot;&quot;&quot;&amp;REPT(&quot; &quot;;10-LEN([.O64]));&quot;null&quot;&amp;REPT(&quot; &quot;;10-4+2))&#10;&amp;&quot;,&quot;&quot;&quot;&amp;[.P$1]&amp;&quot;&quot;&quot;:&quot;&amp;[.P64]&#10;&amp;&quot;,&quot;&quot;&quot;&amp;[.Q$1]&amp;&quot;&quot;&quot;:&quot;&amp;[.Q64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4]=&quot;&quot;;&quot; &quot;;IF([.A65]&lt;&gt;&quot;&quot;;&quot;,&quot;;&quot;}&quot;)) &amp;IF([.A65]&lt;&gt;&quot;&quot;;&quot;&quot;&quot;&quot;&amp;[.A65]&amp;&quot;&quot;&quot;&quot;&amp;REPT(&quot; &quot;;20-LEN([.A65]));&quot;&quot;)" office:value-type="string" office:string-value=" " calcext:value-type="string">
            <text:p><text:s/></text:p>
          </table:table-cell>
          <table:table-cell table:style-name="ce17" table:formula="of:=IF([.B65]=&quot;&quot;;&quot;&quot;;&#10;&quot;:&quot;&#10;&amp;&quot;{&quot;&quot;&quot;&amp;[.B$1]&amp;&quot;&quot;&quot;:&quot;&quot;&quot;&amp;[.B65]&amp;&quot;&quot;&quot;&quot;&amp;REPT(&quot; &quot;;20-LEN([.B65]))&#10;&amp;&quot;,&quot;&quot;&quot;&amp;[.C$1]&amp;&quot;&quot;&quot;:&quot;&quot;&quot;&amp;[.C65]&amp;&quot;&quot;&quot;&quot;&amp;REPT(&quot; &quot;;35-LEN([.C65]))&#10;&amp;&quot;,&quot;&quot;&quot;&amp;[.D$1]&amp;&quot;&quot;&quot;:&quot;&amp;[.D65]&amp;REPT(&quot; &quot;;3-LEN([.D65]))&#10;&amp;&quot;,&quot;&quot;&quot;&amp;[.E$1]&amp;&quot;&quot;&quot;:&quot;&quot;&quot;&amp;[.E65]&amp;&quot;&quot;&quot;&quot;&amp;REPT(&quot; &quot;;6-LEN([.E65]))&#10;&amp;&quot;,&quot;&quot;&quot;&amp;[.F$1]&amp;&quot;&quot;&quot;:&quot;&quot;&quot;&amp;[.F65]&amp;&quot;&quot;&quot;&quot;&amp;REPT(&quot; &quot;;7-LEN([.F65]))&#10;&amp;&quot;,&quot;&quot;&quot;&amp;[.G$1]&amp;&quot;&quot;&quot;:&quot;&amp;IF([.G65]&lt;&gt;&quot;&quot;;&quot;&quot;&quot;&quot;&amp;[.G65]&amp;&quot;&quot;&quot;&quot;&amp;REPT(&quot; &quot;;5-LEN([.G65]));&quot;null&quot;&amp;REPT(&quot; &quot;;5-4+2))&#10;&amp;&quot;,&quot;&quot;&quot;&amp;[.H$1]&amp;&quot;&quot;&quot;:&quot;&amp;IF([.H65]&lt;&gt;&quot;&quot;;&quot;&quot;&quot;&quot;&amp;[.H65]&amp;&quot;&quot;&quot;&quot;&amp;REPT(&quot; &quot;;19-LEN([.H65]));&quot;null&quot;&amp;REPT(&quot; &quot;;19-4+2))&#10;&amp;&quot;,&quot;&quot;&quot;&amp;[.I$1]&amp;&quot;&quot;&quot;:&quot;&amp;IF([.I65]&lt;&gt;&quot;&quot;;&quot;&quot;&quot;&quot;&amp;[.I65]&amp;&quot;&quot;&quot;&quot;&amp;REPT(&quot; &quot;;8-LEN([.I65]));&quot;null&quot;&amp;REPT(&quot; &quot;;8-4+2))&#10;&amp;&quot;,&quot;&quot;&quot;&amp;[.J$1]&amp;&quot;&quot;&quot;:&quot;&amp;IF([.J65]&lt;&gt;&quot;&quot;;[.J65]&amp;REPT(&quot; &quot;;4-LEN([.J65]));&quot;null&quot;)&#10;&amp;&quot;,&quot;&quot;&quot;&amp;[.K$1]&amp;&quot;&quot;&quot;:&quot;&amp;IF([.K65]&lt;&gt;&quot;&quot;;[.K65]&amp;REPT(&quot; &quot;;4-LEN([.K65]));&quot;null&quot;)&#10;&amp;&quot;,&quot;&quot;&quot;&amp;[.L$1]&amp;&quot;&quot;&quot;:&quot;&amp;IF([.L65]&lt;&gt;&quot;&quot;;[.L65]&amp;REPT(&quot; &quot;;5-LEN([.L65]));&quot;null &quot;)&#10;&amp;&quot;,&quot;&quot;&quot;&amp;[.M$1]&amp;&quot;&quot;&quot;:&quot;&amp;IF([.M65]&lt;&gt;&quot;&quot;;&quot;&quot;&quot;&quot;&amp;[.M65]&amp;&quot;&quot;&quot;&quot;&amp;REPT(&quot; &quot;;20-LEN([.M65]));&quot;null&quot;&amp;REPT(&quot; &quot;;20-4+2))&#10;&amp;&quot;,&quot;&quot;&quot;&amp;[.N$1]&amp;&quot;&quot;&quot;:&quot;&amp;IF([.N65]&lt;&gt;&quot;&quot;;&quot;&quot;&amp;[.N65]&amp;&quot;&quot;&amp;REPT(&quot; &quot;;5-LEN([.N65]));&quot;null&quot;&amp;REPT(&quot; &quot;;5-4))&#10;&amp;&quot;,&quot;&quot;&quot;&amp;[.O$1]&amp;&quot;&quot;&quot;:&quot;&amp;IF([.O65]&lt;&gt;&quot;&quot;;&quot;&quot;&quot;&quot;&amp;[.O65]&amp;&quot;&quot;&quot;&quot;&amp;REPT(&quot; &quot;;10-LEN([.O65]));&quot;null&quot;&amp;REPT(&quot; &quot;;10-4+2))&#10;&amp;&quot;,&quot;&quot;&quot;&amp;[.P$1]&amp;&quot;&quot;&quot;:&quot;&amp;[.P65]&#10;&amp;&quot;,&quot;&quot;&quot;&amp;[.Q$1]&amp;&quot;&quot;&quot;:&quot;&amp;[.Q65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5]=&quot;&quot;;&quot; &quot;;IF([.A66]&lt;&gt;&quot;&quot;;&quot;,&quot;;&quot;}&quot;)) &amp;IF([.A66]&lt;&gt;&quot;&quot;;&quot;&quot;&quot;&quot;&amp;[.A66]&amp;&quot;&quot;&quot;&quot;&amp;REPT(&quot; &quot;;20-LEN([.A66]));&quot;&quot;)" office:value-type="string" office:string-value=" " calcext:value-type="string">
            <text:p><text:s/></text:p>
          </table:table-cell>
          <table:table-cell table:style-name="ce17" table:formula="of:=IF([.B66]=&quot;&quot;;&quot;&quot;;&#10;&quot;:&quot;&#10;&amp;&quot;{&quot;&quot;&quot;&amp;[.B$1]&amp;&quot;&quot;&quot;:&quot;&quot;&quot;&amp;[.B66]&amp;&quot;&quot;&quot;&quot;&amp;REPT(&quot; &quot;;20-LEN([.B66]))&#10;&amp;&quot;,&quot;&quot;&quot;&amp;[.C$1]&amp;&quot;&quot;&quot;:&quot;&quot;&quot;&amp;[.C66]&amp;&quot;&quot;&quot;&quot;&amp;REPT(&quot; &quot;;35-LEN([.C66]))&#10;&amp;&quot;,&quot;&quot;&quot;&amp;[.D$1]&amp;&quot;&quot;&quot;:&quot;&amp;[.D66]&amp;REPT(&quot; &quot;;3-LEN([.D66]))&#10;&amp;&quot;,&quot;&quot;&quot;&amp;[.E$1]&amp;&quot;&quot;&quot;:&quot;&quot;&quot;&amp;[.E66]&amp;&quot;&quot;&quot;&quot;&amp;REPT(&quot; &quot;;6-LEN([.E66]))&#10;&amp;&quot;,&quot;&quot;&quot;&amp;[.F$1]&amp;&quot;&quot;&quot;:&quot;&quot;&quot;&amp;[.F66]&amp;&quot;&quot;&quot;&quot;&amp;REPT(&quot; &quot;;7-LEN([.F66]))&#10;&amp;&quot;,&quot;&quot;&quot;&amp;[.G$1]&amp;&quot;&quot;&quot;:&quot;&amp;IF([.G66]&lt;&gt;&quot;&quot;;&quot;&quot;&quot;&quot;&amp;[.G66]&amp;&quot;&quot;&quot;&quot;&amp;REPT(&quot; &quot;;5-LEN([.G66]));&quot;null&quot;&amp;REPT(&quot; &quot;;5-4+2))&#10;&amp;&quot;,&quot;&quot;&quot;&amp;[.H$1]&amp;&quot;&quot;&quot;:&quot;&amp;IF([.H66]&lt;&gt;&quot;&quot;;&quot;&quot;&quot;&quot;&amp;[.H66]&amp;&quot;&quot;&quot;&quot;&amp;REPT(&quot; &quot;;19-LEN([.H66]));&quot;null&quot;&amp;REPT(&quot; &quot;;19-4+2))&#10;&amp;&quot;,&quot;&quot;&quot;&amp;[.I$1]&amp;&quot;&quot;&quot;:&quot;&amp;IF([.I66]&lt;&gt;&quot;&quot;;&quot;&quot;&quot;&quot;&amp;[.I66]&amp;&quot;&quot;&quot;&quot;&amp;REPT(&quot; &quot;;8-LEN([.I66]));&quot;null&quot;&amp;REPT(&quot; &quot;;8-4+2))&#10;&amp;&quot;,&quot;&quot;&quot;&amp;[.J$1]&amp;&quot;&quot;&quot;:&quot;&amp;IF([.J66]&lt;&gt;&quot;&quot;;[.J66]&amp;REPT(&quot; &quot;;4-LEN([.J66]));&quot;null&quot;)&#10;&amp;&quot;,&quot;&quot;&quot;&amp;[.K$1]&amp;&quot;&quot;&quot;:&quot;&amp;IF([.K66]&lt;&gt;&quot;&quot;;[.K66]&amp;REPT(&quot; &quot;;4-LEN([.K66]));&quot;null&quot;)&#10;&amp;&quot;,&quot;&quot;&quot;&amp;[.L$1]&amp;&quot;&quot;&quot;:&quot;&amp;IF([.L66]&lt;&gt;&quot;&quot;;[.L66]&amp;REPT(&quot; &quot;;5-LEN([.L66]));&quot;null &quot;)&#10;&amp;&quot;,&quot;&quot;&quot;&amp;[.M$1]&amp;&quot;&quot;&quot;:&quot;&amp;IF([.M66]&lt;&gt;&quot;&quot;;&quot;&quot;&quot;&quot;&amp;[.M66]&amp;&quot;&quot;&quot;&quot;&amp;REPT(&quot; &quot;;20-LEN([.M66]));&quot;null&quot;&amp;REPT(&quot; &quot;;20-4+2))&#10;&amp;&quot;,&quot;&quot;&quot;&amp;[.N$1]&amp;&quot;&quot;&quot;:&quot;&amp;IF([.N66]&lt;&gt;&quot;&quot;;&quot;&quot;&amp;[.N66]&amp;&quot;&quot;&amp;REPT(&quot; &quot;;5-LEN([.N66]));&quot;null&quot;&amp;REPT(&quot; &quot;;5-4))&#10;&amp;&quot;,&quot;&quot;&quot;&amp;[.O$1]&amp;&quot;&quot;&quot;:&quot;&amp;IF([.O66]&lt;&gt;&quot;&quot;;&quot;&quot;&quot;&quot;&amp;[.O66]&amp;&quot;&quot;&quot;&quot;&amp;REPT(&quot; &quot;;10-LEN([.O66]));&quot;null&quot;&amp;REPT(&quot; &quot;;10-4+2))&#10;&amp;&quot;,&quot;&quot;&quot;&amp;[.P$1]&amp;&quot;&quot;&quot;:&quot;&amp;[.P66]&#10;&amp;&quot;,&quot;&quot;&quot;&amp;[.Q$1]&amp;&quot;&quot;&quot;:&quot;&amp;[.Q6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6]=&quot;&quot;;&quot; &quot;;IF([.A67]&lt;&gt;&quot;&quot;;&quot;,&quot;;&quot;}&quot;)) &amp;IF([.A67]&lt;&gt;&quot;&quot;;&quot;&quot;&quot;&quot;&amp;[.A67]&amp;&quot;&quot;&quot;&quot;&amp;REPT(&quot; &quot;;20-LEN([.A67]));&quot;&quot;)" office:value-type="string" office:string-value=" " calcext:value-type="string">
            <text:p><text:s/></text:p>
          </table:table-cell>
          <table:table-cell table:style-name="ce17" table:formula="of:=IF([.B67]=&quot;&quot;;&quot;&quot;;&#10;&quot;:&quot;&#10;&amp;&quot;{&quot;&quot;&quot;&amp;[.B$1]&amp;&quot;&quot;&quot;:&quot;&quot;&quot;&amp;[.B67]&amp;&quot;&quot;&quot;&quot;&amp;REPT(&quot; &quot;;20-LEN([.B67]))&#10;&amp;&quot;,&quot;&quot;&quot;&amp;[.C$1]&amp;&quot;&quot;&quot;:&quot;&quot;&quot;&amp;[.C67]&amp;&quot;&quot;&quot;&quot;&amp;REPT(&quot; &quot;;35-LEN([.C67]))&#10;&amp;&quot;,&quot;&quot;&quot;&amp;[.D$1]&amp;&quot;&quot;&quot;:&quot;&amp;[.D67]&amp;REPT(&quot; &quot;;3-LEN([.D67]))&#10;&amp;&quot;,&quot;&quot;&quot;&amp;[.E$1]&amp;&quot;&quot;&quot;:&quot;&quot;&quot;&amp;[.E67]&amp;&quot;&quot;&quot;&quot;&amp;REPT(&quot; &quot;;6-LEN([.E67]))&#10;&amp;&quot;,&quot;&quot;&quot;&amp;[.F$1]&amp;&quot;&quot;&quot;:&quot;&quot;&quot;&amp;[.F67]&amp;&quot;&quot;&quot;&quot;&amp;REPT(&quot; &quot;;7-LEN([.F67]))&#10;&amp;&quot;,&quot;&quot;&quot;&amp;[.G$1]&amp;&quot;&quot;&quot;:&quot;&amp;IF([.G67]&lt;&gt;&quot;&quot;;&quot;&quot;&quot;&quot;&amp;[.G67]&amp;&quot;&quot;&quot;&quot;&amp;REPT(&quot; &quot;;5-LEN([.G67]));&quot;null&quot;&amp;REPT(&quot; &quot;;5-4+2))&#10;&amp;&quot;,&quot;&quot;&quot;&amp;[.H$1]&amp;&quot;&quot;&quot;:&quot;&amp;IF([.H67]&lt;&gt;&quot;&quot;;&quot;&quot;&quot;&quot;&amp;[.H67]&amp;&quot;&quot;&quot;&quot;&amp;REPT(&quot; &quot;;19-LEN([.H67]));&quot;null&quot;&amp;REPT(&quot; &quot;;19-4+2))&#10;&amp;&quot;,&quot;&quot;&quot;&amp;[.I$1]&amp;&quot;&quot;&quot;:&quot;&amp;IF([.I67]&lt;&gt;&quot;&quot;;&quot;&quot;&quot;&quot;&amp;[.I67]&amp;&quot;&quot;&quot;&quot;&amp;REPT(&quot; &quot;;8-LEN([.I67]));&quot;null&quot;&amp;REPT(&quot; &quot;;8-4+2))&#10;&amp;&quot;,&quot;&quot;&quot;&amp;[.J$1]&amp;&quot;&quot;&quot;:&quot;&amp;IF([.J67]&lt;&gt;&quot;&quot;;[.J67]&amp;REPT(&quot; &quot;;4-LEN([.J67]));&quot;null&quot;)&#10;&amp;&quot;,&quot;&quot;&quot;&amp;[.K$1]&amp;&quot;&quot;&quot;:&quot;&amp;IF([.K67]&lt;&gt;&quot;&quot;;[.K67]&amp;REPT(&quot; &quot;;4-LEN([.K67]));&quot;null&quot;)&#10;&amp;&quot;,&quot;&quot;&quot;&amp;[.L$1]&amp;&quot;&quot;&quot;:&quot;&amp;IF([.L67]&lt;&gt;&quot;&quot;;[.L67]&amp;REPT(&quot; &quot;;5-LEN([.L67]));&quot;null &quot;)&#10;&amp;&quot;,&quot;&quot;&quot;&amp;[.M$1]&amp;&quot;&quot;&quot;:&quot;&amp;IF([.M67]&lt;&gt;&quot;&quot;;&quot;&quot;&quot;&quot;&amp;[.M67]&amp;&quot;&quot;&quot;&quot;&amp;REPT(&quot; &quot;;20-LEN([.M67]));&quot;null&quot;&amp;REPT(&quot; &quot;;20-4+2))&#10;&amp;&quot;,&quot;&quot;&quot;&amp;[.N$1]&amp;&quot;&quot;&quot;:&quot;&amp;IF([.N67]&lt;&gt;&quot;&quot;;&quot;&quot;&amp;[.N67]&amp;&quot;&quot;&amp;REPT(&quot; &quot;;5-LEN([.N67]));&quot;null&quot;&amp;REPT(&quot; &quot;;5-4))&#10;&amp;&quot;,&quot;&quot;&quot;&amp;[.O$1]&amp;&quot;&quot;&quot;:&quot;&amp;IF([.O67]&lt;&gt;&quot;&quot;;&quot;&quot;&quot;&quot;&amp;[.O67]&amp;&quot;&quot;&quot;&quot;&amp;REPT(&quot; &quot;;10-LEN([.O67]));&quot;null&quot;&amp;REPT(&quot; &quot;;10-4+2))&#10;&amp;&quot;,&quot;&quot;&quot;&amp;[.P$1]&amp;&quot;&quot;&quot;:&quot;&amp;[.P67]&#10;&amp;&quot;,&quot;&quot;&quot;&amp;[.Q$1]&amp;&quot;&quot;&quot;:&quot;&amp;[.Q6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7]=&quot;&quot;;&quot; &quot;;IF([.A68]&lt;&gt;&quot;&quot;;&quot;,&quot;;&quot;}&quot;)) &amp;IF([.A68]&lt;&gt;&quot;&quot;;&quot;&quot;&quot;&quot;&amp;[.A68]&amp;&quot;&quot;&quot;&quot;&amp;REPT(&quot; &quot;;20-LEN([.A68]));&quot;&quot;)" office:value-type="string" office:string-value=" " calcext:value-type="string">
            <text:p><text:s/></text:p>
          </table:table-cell>
          <table:table-cell table:style-name="ce17" table:formula="of:=IF([.B68]=&quot;&quot;;&quot;&quot;;&#10;&quot;:&quot;&#10;&amp;&quot;{&quot;&quot;&quot;&amp;[.B$1]&amp;&quot;&quot;&quot;:&quot;&quot;&quot;&amp;[.B68]&amp;&quot;&quot;&quot;&quot;&amp;REPT(&quot; &quot;;20-LEN([.B68]))&#10;&amp;&quot;,&quot;&quot;&quot;&amp;[.C$1]&amp;&quot;&quot;&quot;:&quot;&quot;&quot;&amp;[.C68]&amp;&quot;&quot;&quot;&quot;&amp;REPT(&quot; &quot;;35-LEN([.C68]))&#10;&amp;&quot;,&quot;&quot;&quot;&amp;[.D$1]&amp;&quot;&quot;&quot;:&quot;&amp;[.D68]&amp;REPT(&quot; &quot;;3-LEN([.D68]))&#10;&amp;&quot;,&quot;&quot;&quot;&amp;[.E$1]&amp;&quot;&quot;&quot;:&quot;&quot;&quot;&amp;[.E68]&amp;&quot;&quot;&quot;&quot;&amp;REPT(&quot; &quot;;6-LEN([.E68]))&#10;&amp;&quot;,&quot;&quot;&quot;&amp;[.F$1]&amp;&quot;&quot;&quot;:&quot;&quot;&quot;&amp;[.F68]&amp;&quot;&quot;&quot;&quot;&amp;REPT(&quot; &quot;;7-LEN([.F68]))&#10;&amp;&quot;,&quot;&quot;&quot;&amp;[.G$1]&amp;&quot;&quot;&quot;:&quot;&amp;IF([.G68]&lt;&gt;&quot;&quot;;&quot;&quot;&quot;&quot;&amp;[.G68]&amp;&quot;&quot;&quot;&quot;&amp;REPT(&quot; &quot;;5-LEN([.G68]));&quot;null&quot;&amp;REPT(&quot; &quot;;5-4+2))&#10;&amp;&quot;,&quot;&quot;&quot;&amp;[.H$1]&amp;&quot;&quot;&quot;:&quot;&amp;IF([.H68]&lt;&gt;&quot;&quot;;&quot;&quot;&quot;&quot;&amp;[.H68]&amp;&quot;&quot;&quot;&quot;&amp;REPT(&quot; &quot;;19-LEN([.H68]));&quot;null&quot;&amp;REPT(&quot; &quot;;19-4+2))&#10;&amp;&quot;,&quot;&quot;&quot;&amp;[.I$1]&amp;&quot;&quot;&quot;:&quot;&amp;IF([.I68]&lt;&gt;&quot;&quot;;&quot;&quot;&quot;&quot;&amp;[.I68]&amp;&quot;&quot;&quot;&quot;&amp;REPT(&quot; &quot;;8-LEN([.I68]));&quot;null&quot;&amp;REPT(&quot; &quot;;8-4+2))&#10;&amp;&quot;,&quot;&quot;&quot;&amp;[.J$1]&amp;&quot;&quot;&quot;:&quot;&amp;IF([.J68]&lt;&gt;&quot;&quot;;[.J68]&amp;REPT(&quot; &quot;;4-LEN([.J68]));&quot;null&quot;)&#10;&amp;&quot;,&quot;&quot;&quot;&amp;[.K$1]&amp;&quot;&quot;&quot;:&quot;&amp;IF([.K68]&lt;&gt;&quot;&quot;;[.K68]&amp;REPT(&quot; &quot;;4-LEN([.K68]));&quot;null&quot;)&#10;&amp;&quot;,&quot;&quot;&quot;&amp;[.L$1]&amp;&quot;&quot;&quot;:&quot;&amp;IF([.L68]&lt;&gt;&quot;&quot;;[.L68]&amp;REPT(&quot; &quot;;5-LEN([.L68]));&quot;null &quot;)&#10;&amp;&quot;,&quot;&quot;&quot;&amp;[.M$1]&amp;&quot;&quot;&quot;:&quot;&amp;IF([.M68]&lt;&gt;&quot;&quot;;&quot;&quot;&quot;&quot;&amp;[.M68]&amp;&quot;&quot;&quot;&quot;&amp;REPT(&quot; &quot;;20-LEN([.M68]));&quot;null&quot;&amp;REPT(&quot; &quot;;20-4+2))&#10;&amp;&quot;,&quot;&quot;&quot;&amp;[.N$1]&amp;&quot;&quot;&quot;:&quot;&amp;IF([.N68]&lt;&gt;&quot;&quot;;&quot;&quot;&amp;[.N68]&amp;&quot;&quot;&amp;REPT(&quot; &quot;;5-LEN([.N68]));&quot;null&quot;&amp;REPT(&quot; &quot;;5-4))&#10;&amp;&quot;,&quot;&quot;&quot;&amp;[.O$1]&amp;&quot;&quot;&quot;:&quot;&amp;IF([.O68]&lt;&gt;&quot;&quot;;&quot;&quot;&quot;&quot;&amp;[.O68]&amp;&quot;&quot;&quot;&quot;&amp;REPT(&quot; &quot;;10-LEN([.O68]));&quot;null&quot;&amp;REPT(&quot; &quot;;10-4+2))&#10;&amp;&quot;,&quot;&quot;&quot;&amp;[.P$1]&amp;&quot;&quot;&quot;:&quot;&amp;[.P68]&#10;&amp;&quot;,&quot;&quot;&quot;&amp;[.Q$1]&amp;&quot;&quot;&quot;:&quot;&amp;[.Q6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8]=&quot;&quot;;&quot; &quot;;IF([.A69]&lt;&gt;&quot;&quot;;&quot;,&quot;;&quot;}&quot;)) &amp;IF([.A69]&lt;&gt;&quot;&quot;;&quot;&quot;&quot;&quot;&amp;[.A69]&amp;&quot;&quot;&quot;&quot;&amp;REPT(&quot; &quot;;20-LEN([.A69]));&quot;&quot;)" office:value-type="string" office:string-value=" " calcext:value-type="string">
            <text:p><text:s/></text:p>
          </table:table-cell>
          <table:table-cell table:style-name="ce17" table:formula="of:=IF([.B69]=&quot;&quot;;&quot;&quot;;&#10;&quot;:&quot;&#10;&amp;&quot;{&quot;&quot;&quot;&amp;[.B$1]&amp;&quot;&quot;&quot;:&quot;&quot;&quot;&amp;[.B69]&amp;&quot;&quot;&quot;&quot;&amp;REPT(&quot; &quot;;20-LEN([.B69]))&#10;&amp;&quot;,&quot;&quot;&quot;&amp;[.C$1]&amp;&quot;&quot;&quot;:&quot;&quot;&quot;&amp;[.C69]&amp;&quot;&quot;&quot;&quot;&amp;REPT(&quot; &quot;;35-LEN([.C69]))&#10;&amp;&quot;,&quot;&quot;&quot;&amp;[.D$1]&amp;&quot;&quot;&quot;:&quot;&amp;[.D69]&amp;REPT(&quot; &quot;;3-LEN([.D69]))&#10;&amp;&quot;,&quot;&quot;&quot;&amp;[.E$1]&amp;&quot;&quot;&quot;:&quot;&quot;&quot;&amp;[.E69]&amp;&quot;&quot;&quot;&quot;&amp;REPT(&quot; &quot;;6-LEN([.E69]))&#10;&amp;&quot;,&quot;&quot;&quot;&amp;[.F$1]&amp;&quot;&quot;&quot;:&quot;&quot;&quot;&amp;[.F69]&amp;&quot;&quot;&quot;&quot;&amp;REPT(&quot; &quot;;7-LEN([.F69]))&#10;&amp;&quot;,&quot;&quot;&quot;&amp;[.G$1]&amp;&quot;&quot;&quot;:&quot;&amp;IF([.G69]&lt;&gt;&quot;&quot;;&quot;&quot;&quot;&quot;&amp;[.G69]&amp;&quot;&quot;&quot;&quot;&amp;REPT(&quot; &quot;;5-LEN([.G69]));&quot;null&quot;&amp;REPT(&quot; &quot;;5-4+2))&#10;&amp;&quot;,&quot;&quot;&quot;&amp;[.H$1]&amp;&quot;&quot;&quot;:&quot;&amp;IF([.H69]&lt;&gt;&quot;&quot;;&quot;&quot;&quot;&quot;&amp;[.H69]&amp;&quot;&quot;&quot;&quot;&amp;REPT(&quot; &quot;;19-LEN([.H69]));&quot;null&quot;&amp;REPT(&quot; &quot;;19-4+2))&#10;&amp;&quot;,&quot;&quot;&quot;&amp;[.I$1]&amp;&quot;&quot;&quot;:&quot;&amp;IF([.I69]&lt;&gt;&quot;&quot;;&quot;&quot;&quot;&quot;&amp;[.I69]&amp;&quot;&quot;&quot;&quot;&amp;REPT(&quot; &quot;;8-LEN([.I69]));&quot;null&quot;&amp;REPT(&quot; &quot;;8-4+2))&#10;&amp;&quot;,&quot;&quot;&quot;&amp;[.J$1]&amp;&quot;&quot;&quot;:&quot;&amp;IF([.J69]&lt;&gt;&quot;&quot;;[.J69]&amp;REPT(&quot; &quot;;4-LEN([.J69]));&quot;null&quot;)&#10;&amp;&quot;,&quot;&quot;&quot;&amp;[.K$1]&amp;&quot;&quot;&quot;:&quot;&amp;IF([.K69]&lt;&gt;&quot;&quot;;[.K69]&amp;REPT(&quot; &quot;;4-LEN([.K69]));&quot;null&quot;)&#10;&amp;&quot;,&quot;&quot;&quot;&amp;[.L$1]&amp;&quot;&quot;&quot;:&quot;&amp;IF([.L69]&lt;&gt;&quot;&quot;;[.L69]&amp;REPT(&quot; &quot;;5-LEN([.L69]));&quot;null &quot;)&#10;&amp;&quot;,&quot;&quot;&quot;&amp;[.M$1]&amp;&quot;&quot;&quot;:&quot;&amp;IF([.M69]&lt;&gt;&quot;&quot;;&quot;&quot;&quot;&quot;&amp;[.M69]&amp;&quot;&quot;&quot;&quot;&amp;REPT(&quot; &quot;;20-LEN([.M69]));&quot;null&quot;&amp;REPT(&quot; &quot;;20-4+2))&#10;&amp;&quot;,&quot;&quot;&quot;&amp;[.N$1]&amp;&quot;&quot;&quot;:&quot;&amp;IF([.N69]&lt;&gt;&quot;&quot;;&quot;&quot;&amp;[.N69]&amp;&quot;&quot;&amp;REPT(&quot; &quot;;5-LEN([.N69]));&quot;null&quot;&amp;REPT(&quot; &quot;;5-4))&#10;&amp;&quot;,&quot;&quot;&quot;&amp;[.O$1]&amp;&quot;&quot;&quot;:&quot;&amp;IF([.O69]&lt;&gt;&quot;&quot;;&quot;&quot;&quot;&quot;&amp;[.O69]&amp;&quot;&quot;&quot;&quot;&amp;REPT(&quot; &quot;;10-LEN([.O69]));&quot;null&quot;&amp;REPT(&quot; &quot;;10-4+2))&#10;&amp;&quot;,&quot;&quot;&quot;&amp;[.P$1]&amp;&quot;&quot;&quot;:&quot;&amp;[.P69]&#10;&amp;&quot;,&quot;&quot;&quot;&amp;[.Q$1]&amp;&quot;&quot;&quot;:&quot;&amp;[.Q6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9"/>
          <table:table-cell table:style-name="ce15"/>
          <table:table-cell table:number-columns-repeated="6"/>
        </table:table-row>
        <table:table-row table:style-name="ro1" table:number-rows-repeated="10483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dules" table:style-name="ta1">
        <office:forms form:automatic-focus="false" form:apply-design-mode="false"/>
        <table:table-column table:style-name="co28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9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5">
          <table:table-cell table:style-name="ce8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8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13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Tendance","WindowOpened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4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5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9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3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table:formula="of:=COM.MICROSOFT.CONCAT([.B65:.Y65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Tendance","WindowOpened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Tendance","WindowOpened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2];[.Y4:.Y62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499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Acknow" table:style-name="ta1"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7" table:default-cell-style-name="ce7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75"/>
        <table:table-column table:style-name="co34" table:default-cell-style-name="ce75"/>
        <table:table-column table:style-name="co1" table:number-columns-repeated="16382"/>
        <table:table-row table:style-name="ro4">
          <table:table-cell table:style-name="ce74" office:value-type="string" calcext:value-type="string">
            <text:p>{</text:p>
          </table:table-cell>
          <table:table-cell table:style-name="ce74"/>
          <table:table-cell table:style-name="ce75" table:number-columns-repeated="16382"/>
        </table:table-row>
        <table:table-row table:style-name="ro4">
          <table:table-cell table:style-name="ce74"/>
          <table:table-cell table:style-name="ce74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75" table:number-columns-repeated="16382"/>
        </table:table-row>
        <table:table-row table:style-name="ro4">
          <table:table-cell table:style-name="ce74"/>
          <table:table-cell table:style-name="ce74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75" table:number-columns-repeated="16382"/>
        </table:table-row>
        <table:table-row table:style-name="ro4">
          <table:table-cell table:style-name="ce74"/>
          <table:table-cell table:style-name="ce74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75" table:number-columns-repeated="16382"/>
        </table:table-row>
        <table:table-row table:style-name="ro4">
          <table:table-cell table:style-name="ce74"/>
          <table:table-cell table:style-name="ce74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75" table:number-columns-repeated="16382"/>
        </table:table-row>
        <table:table-row table:style-name="ro4">
          <table:table-cell table:style-name="ce74" office:value-type="string" calcext:value-type="string">
            <text:p>}</text:p>
          </table:table-cell>
          <table:table-cell table:style-name="ce74"/>
          <table:table-cell table:style-name="ce75" table:number-columns-repeated="16382"/>
        </table:table-row>
        <table:table-row table:style-name="ro4" table:number-rows-repeated="1048569">
          <table:table-cell table:number-columns-repeated="2"/>
          <table:table-cell table:style-name="ce75" table:number-columns-repeated="16382"/>
        </table:table-row>
        <table:table-row table:style-name="ro4">
          <table:table-cell table:number-columns-repeated="2"/>
          <table:table-cell table:style-name="ce75" table:number-columns-repeated="16382"/>
        </table:table-row>
      </table:table>
      <table:table table:name="RetourAPI" table:style-name="ta1">
        <office:forms form:automatic-focus="false" form:apply-design-mode="false"/>
        <table:table-column table:style-name="co35" table:default-cell-style-name="ce75"/>
        <table:table-column table:style-name="co36" table:default-cell-style-name="ce75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77" office:value-type="string" calcext:value-type="string">
            <text:p>array ( 'did' =&gt; 'XXXXXXXXXXXXXXXXXXXXXXXXXXXXXXXX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75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77" office:value-type="string" calcext:value-type="string">
            <text:p>array ( 'did' =&gt; 'XXXXXXXXXXXXXXXXXXXXXXXXXXXXXXXX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75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77" office:value-type="string" calcext:value-type="string">
            <text:p>array ( 'did' =&gt; 'XXXXXXXXXXXXXXXXXXXXXXXXXXXXXXXX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75" table:number-columns-repeated="16382"/>
        </table:table-row>
        <table:table-row table:style-name="ro4">
          <table:table-cell table:style-name="ce76" office:value-type="string" calcext:value-type="string">
            <text:p>Heatzy_Boiler</text:p>
          </table:table-cell>
          <table:table-cell table:style-name="ce78" office:value-type="string" calcext:value-type="string">
            <text:p>array ( 'did' =&gt; 'XXXXXXXXXXXXXXXXXXXXXXXXXXXXXXXX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75" table:number-columns-repeated="16382"/>
        </table:table-row>
        <table:table-row table:style-name="ro4">
          <table:table-cell/>
          <table:table-cell table:style-name="ce77"/>
          <table:table-cell table:style-name="ce75" table:number-columns-repeated="16382"/>
        </table:table-row>
        <table:table-row table:style-name="ro4" table:number-rows-repeated="1048570">
          <table:table-cell table:number-columns-repeated="2"/>
          <table:table-cell table:style-name="ce75" table:number-columns-repeated="16382"/>
        </table:table-row>
        <table:table-row table:style-name="ro4">
          <table:table-cell table:number-columns-repeated="2"/>
          <table:table-cell table:style-name="ce75" table:number-columns-repeated="16382"/>
        </table:table-row>
      </table:table>
      <table:named-expressions/>
      <table:database-ranges>
        <table:database-range table:name="__Anonymous_Sheet_DB__1" table:target-range-address="cmds.A1:cmds.Y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20:35:22.44667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4-21T20:52:39.716733100</dc:date>
    <meta:editing-duration>P1DT18M45S</meta:editing-duration>
    <meta:editing-cycles>39</meta:editing-cycles>
    <meta:generator>LibreOffice/26.2.1.2$Windows_X86_64 LibreOffice_project/620$Build-2</meta:generator>
    <meta:document-statistic meta:table-count="6" meta:cell-count="1774" meta:object-count="0"/>
  </office:meta>
</office:document-meta>
</file>