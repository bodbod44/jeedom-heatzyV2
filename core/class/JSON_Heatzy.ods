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2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5.946cm"/>
    </style:style>
    <style:style style:name="co6" style:family="table-column">
      <style:table-column-properties fo:break-before="auto" style:column-width="7.51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3.787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3.249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3.916cm"/>
    </style:style>
    <style:style style:name="co17" style:family="table-column">
      <style:table-column-properties fo:break-before="auto" style:column-width="2.378cm"/>
    </style:style>
    <style:style style:name="co18" style:family="table-column">
      <style:table-column-properties fo:break-before="auto" style:column-width="1.416cm"/>
    </style:style>
    <style:style style:name="co19" style:family="table-column">
      <style:table-column-properties fo:break-before="auto" style:column-width="2.833cm"/>
    </style:style>
    <style:style style:name="co20" style:family="table-column">
      <style:table-column-properties fo:break-before="auto" style:column-width="5.156cm"/>
    </style:style>
    <style:style style:name="co21" style:family="table-column">
      <style:table-column-properties fo:break-before="auto" style:column-width="7.445cm"/>
    </style:style>
    <style:style style:name="co22" style:family="table-column">
      <style:table-column-properties fo:break-before="auto" style:column-width="0.907cm"/>
    </style:style>
    <style:style style:name="co23" style:family="table-column">
      <style:table-column-properties fo:break-before="auto" style:column-width="5.447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2.868cm"/>
    </style:style>
    <style:style style:name="co26" style:family="table-column">
      <style:table-column-properties fo:break-before="auto" style:column-width="4.175cm"/>
    </style:style>
    <style:style style:name="co27" style:family="table-column">
      <style:table-column-properties fo:break-before="auto" style:column-width="3.921cm"/>
    </style:style>
    <style:style style:name="co28" style:family="table-column">
      <style:table-column-properties fo:break-before="auto" style:column-width="2.034cm"/>
    </style:style>
    <style:style style:name="co29" style:family="table-column">
      <style:table-column-properties fo:break-before="auto" style:column-width="0.799cm"/>
    </style:style>
    <style:style style:name="co30" style:family="table-column">
      <style:table-column-properties fo:break-before="auto" style:column-width="10.7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3" style:family="table-row">
      <style:table-row-properties style:row-height="0.8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5" style:family="table-cell" style:parent-style-name="Default">
      <style:text-properties style:font-name="Courier New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module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3" table:default-cell-style-name="ce13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/>
          <table:table-cell table:style-name="ce9" office:value-type="string" calcext:value-type="string">
            <text:p>PILOTE_V1</text:p>
          </table:table-cell>
          <table:table-cell table:number-columns-repeated="2" table:style-name="ce9" office:value-type="string" calcext:value-type="string">
            <text:p>PILOTE_V2</text:p>
          </table:table-cell>
          <table:table-cell table:number-columns-repeated="2" table:style-name="ce9" office:value-type="string" calcext:value-type="string">
            <text:p>PILOTE_V3</text:p>
          </table:table-cell>
          <table:table-cell table:number-columns-repeated="2" table:style-name="ce9" office:value-type="string" calcext:value-type="string">
            <text:p>PILOTE_V4</text:p>
          </table:table-cell>
          <table:table-cell table:style-name="Default" office:value-type="string" calcext:value-type="string">
            <text:p>PILOTE_PRO_V1</text:p>
          </table:table-cell>
          <table:table-cell table:number-columns-repeated="5" table:style-name="Default" office:value-type="string" calcext:value-type="string">
            <text:p>GLOW</text:p>
          </table:table-cell>
          <table:table-cell office:value-type="string" calcext:value-type="string">
            <text:p>BLOOM</text:p>
          </table:table-cell>
          <table:table-cell table:number-columns-repeated="19"/>
          <table:table-cell table:style-name="ce23" table:number-columns-repeated="2"/>
          <table:table-cell table:number-columns-repeated="27"/>
          <table:table-cell table:style-name="Default" table:number-columns-repeated="16321"/>
        </table:table-row>
        <table:table-row table:style-name="ro3">
          <table:table-cell table:style-name="ce6"/>
          <table:table-cell table:style-name="ce10" office:value-type="string" calcext:value-type="string">
            <text:p>Pilote_V1</text:p>
          </table:table-cell>
          <table:table-cell table:style-name="ce10" office:value-type="string" calcext:value-type="string">
            <text:p>Pilote2</text:p>
          </table:table-cell>
          <table:table-cell table:style-name="ce10" office:value-type="string" calcext:value-type="string">
            <text:p>Pilote2_Elec_Pro</text:p>
          </table:table-cell>
          <table:table-cell table:style-name="ce10" office:value-type="string" calcext:value-type="string">
            <text:p>Pilote_Soc</text:p>
          </table:table-cell>
          <table:table-cell table:style-name="ce10" office:value-type="string" calcext:value-type="string">
            <text:p>Elec_Pro_Soc</text:p>
          </table:table-cell>
          <table:table-cell table:style-name="ce10" office:value-type="string" calcext:value-type="string">
            <text:p>Elec_Pro_Ble</text:p>
          </table:table-cell>
          <table:table-cell table:style-name="ce10" office:value-type="string" calcext:value-type="string">
            <text:p>Pilote_Soc_C3</text:p>
          </table:table-cell>
          <table:table-cell table:style-name="ce10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22" office:value-type="string" calcext:value-type="string">
            <text:p>Glow_Blu</text:p>
          </table:table-cell>
          <table:table-cell table:style-name="ce10" office:value-type="string" calcext:value-type="string">
            <text:p>ONYX</text:p>
          </table:table-cell>
          <table:table-cell table:style-name="ce10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3"/>
          <table:table-cell table:style-name="ce6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office:value-type="string" calcext:value-type="string">
            <text:p>fc89066ee74c4149a9beb37d4ea93604</text:p>
          </table:table-cell>
          <table:table-cell table:style-name="ce13" office:value-type="string" calcext:value-type="string">
            <text:p>480253852d574f11b2d7fbf4460d7a41</text:p>
          </table:table-cell>
          <table:table-cell table:style-name="ce13" office:value-type="string" calcext:value-type="string">
            <text:p>XXXXXXX</text:p>
          </table:table-cell>
          <table:table-cell table:style-name="ce13" office:value-type="string" calcext:value-type="string">
            <text:p>f71ee820660f4f358db8b8a474689726</text:p>
          </table:table-cell>
          <table:table-cell table:style-name="ce13" office:value-type="string" calcext:value-type="string">
            <text:p>d60c58d724b845068bf4652a10883c92</text:p>
          </table:table-cell>
          <table:table-cell table:style-name="ce13" office:value-type="string" calcext:value-type="string">
            <text:p>2884feb88e0b4f30b75ea5572276a102</text:p>
          </table:table-cell>
          <table:table-cell table:style-name="ce13" office:value-type="string" calcext:value-type="string">
            <text:p>0a000341206048a0be23e2cbf9d8f29a</text:p>
          </table:table-cell>
          <table:table-cell table:style-name="ce13" office:value-type="string" calcext:value-type="string">
            <text:p>e5d5766484db4b4d9b9fa7c08cd65481</text:p>
          </table:table-cell>
          <table:table-cell table:style-name="ce13" office:value-type="string" calcext:value-type="string">
            <text:p>18e548a0df9444669a480a7ab31bc314</text:p>
          </table:table-cell>
          <table:table-cell table:style-name="ce13" office:value-type="string" calcext:value-type="string">
            <text:p>aa85e43fc4464e4d0000000000000000</text:p>
          </table:table-cell>
          <table:table-cell table:style-name="ce13" office:value-type="string" calcext:value-type="string">
            <text:p>528f35158d854e220000000000000000</text:p>
          </table:table-cell>
          <table:table-cell table:style-name="ce13" table:number-columns-repeated="3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cur_tempH" calcext:value-type="string">
            <text:p>cur_tempH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7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cur_humi" calcext:value-type="string">
            <text:p>cur_hum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8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eco_temp" calcext:value-type="string">
            <text:p>eco_temp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_consigne" calcext:value-type="string">
            <text:p>eco_temp_consig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tempH&quot;,&quot;cur_humi&quot;,&quot;eco_temp&quot;,&quot;eco_temp_consigne&quot;,&quot;eco_temp_consigneHL&quot;,&quot;cft_temp&quot;,&quot;cft_temp_consigne&quot;,&quot;cft_temp_consigneHL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tempH","cur_humi","eco_temp","eco_temp_consigne","eco_temp_consigneHL","cft_temp","cft_temp_consigne","cft_temp_consigneHL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eco_temp_consigneHL" calcext:value-type="string">
            <text:p>eco_temp_consigneHL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cft_temp" calcext:value-type="string">
            <text:p>cft_temp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cur_tempH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cur_tempH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_consigne" calcext:value-type="string">
            <text:p>cft_temp_consig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9;&quot;Glow_Blu&quot;:            {&quot;product_key&quot;:&quot;cffa0df68a52449085c5d1e72c2f6bb0&quot;,&quot;cmds&quot;:[&quot;refresh&quot;,&quot;IsOnLine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Glow_Blu": <text:s text:c="11"/>{"product_key":"cffa0df68a52449085c5d1e72c2f6bb0","cmds":["refresh","IsOnLine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cft_temp_consigneHL" calcext:value-type="string">
            <text:p>cft_temp_consigneHL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Tendance" calcext:value-type="string">
            <text:p>Tenda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WindowOpened" calcext:value-type="string">
            <text:p>WindowOpene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EtatConsigne" calcext:value-type="string">
            <text:p>EtatConsigne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17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9;&quot;Shine&quot;:               {&quot;product_key&quot;:&quot;XXXXXXX&quot;,&quot;cmds&quot;:[&quot;refresh&quot;,&quot;IsOnLine&quot;,&quot;cur_tempH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","cmds":["refresh","IsOnLine","cur_tempH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mode" calcext:value-type="string">
            <text:p>mode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Confort" calcext:value-type="string">
            <text:p>Confort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Eco" calcext:value-type="string">
            <text:p>Eco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9]" office:value-type="string" office:string-value="HorsGel" calcext:value-type="string">
            <text:p>HorsGel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20]" office:value-type="string" office:string-value="Off" calcext:value-type="string">
            <text:p>Off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Confort-1" calcext:value-type="string">
            <text:p>Confort-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23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Confort-2" calcext:value-type="string">
            <text:p>Confort-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24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etatprog" calcext:value-type="string">
            <text:p>etatprog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2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9;&quot;Heatzy_Boiler&quot;:       {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peak_hours&quot;,&quot;peak_signal&quot;]}" calcext:value-type="string">
            <text:p><text:tab/>"Heatzy_Boiler": <text:s text:c="6"/>{"product_key":"528f35158d854e220000000000000000","cmds":["refresh","IsOnLine","EtatConsigne","mode","Confort","Eco","HorsGel","Off","etatprog","ProgOn","ProgOff","cur_power","cur_current","cur_voltage","signal_power","energy_saving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ProgOn" calcext:value-type="string">
            <text:p>ProgOn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ProgOff" calcext:value-type="string">
            <text:p>ProgOff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etatlock" calcext:value-type="string">
            <text:p>etatloc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LockOn" calcext:value-type="string">
            <text:p>Lock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Off" calcext:value-type="string">
            <text:p>LockOf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_C_State" calcext:value-type="string">
            <text:p>Lock_C_State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3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On" calcext:value-type="string">
            <text:p>Lock_C_On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Lock_C_Off" calcext:value-type="string">
            <text:p>Lock_C_Off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WindowSwitch" calcext:value-type="string">
            <text:p>WindowSwitch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On" calcext:value-type="string">
            <text:p>WindowSwitchO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WindowSwitchOff" calcext:value-type="string">
            <text:p>WindowSwitchOff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plugzy" calcext:value-type="string">
            <text:p>plugz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on" calcext:value-type="string">
            <text:p>plugzy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plugzyoff" calcext:value-type="string">
            <text:p>plugzyoff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derog_mode" calcext:value-type="string">
            <text:p>derog_mo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4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time" calcext:value-type="string">
            <text:p>derog_time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4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off" calcext:value-type="string">
            <text:p>derog_of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42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time_vacances" calcext:value-type="string">
            <text:p>derog_time_vacan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vacances" calcext:value-type="string">
            <text:p>derog_vacan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time_boost" calcext:value-type="string">
            <text:p>derog_time_boos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boost" calcext:value-type="string">
            <text:p>derog_boos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rog_presence" calcext:value-type="string">
            <text:p>derog_prese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4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detect_presence" calcext:value-type="string">
            <text:p>detect_prese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13" table:number-columns-repeated="13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cur_power" calcext:value-type="string">
            <text:p>cur_power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current" calcext:value-type="string">
            <text:p>cur_current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cur_voltage" calcext:value-type="string">
            <text:p>cur_voltage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signal_power" calcext:value-type="string">
            <text:p>signal_power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energy_saving" calcext:value-type="string">
            <text:p>energy_saving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kill_switch" calcext:value-type="string">
            <text:p>kill_switch</text:p>
          </table:table-cell>
          <table:table-cell table:number-columns-repeated="13"/>
          <table:table-cell table:style-name="ce13" table:number-columns-repeated="8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peak_hours" calcext:value-type="string">
            <text:p>peak_hours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string" office:string-value="peak_signal" calcext:value-type="string">
            <text:p>peak_signal</text:p>
          </table:table-cell>
          <table:table-cell table:number-columns-repeated="13"/>
          <table:table-cell table:style-name="ce13" table:number-columns-repeated="8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3"/>
          <table:table-cell/>
          <table:table-cell table:formula="of:=IF(ISERROR(VLOOKUP([.A56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57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number-columns-repeated="13"/>
          <table:table-cell table:style-name="ce13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number-columns-repeated="14"/>
          <table:table-cell table:style-name="ce13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1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13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table:formula="of:=COM.MICROSOFT.CONCAT([.B63:.X63])" office:value-type="string" office:string-value="&#13;     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tempH&quot;,&quot;cur_humi&quot;,&quot;eco_temp&quot;,&quot;eco_temp_consigne&quot;,&quot;eco_temp_consigneHL&quot;,&quot;cft_temp&quot;,&quot;cft_temp_consigne&quot;,&quot;cft_temp_consigneHL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cur_tempH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Blu&quot;            ,&quot;product_key&quot;:&quot;cffa0df68a52449085c5d1e72c2f6bb0&quot;,&quot;cmds&quot;:[&quot;refresh&quot;,&quot;IsOnLine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&quot;:                         {&quot;product_name&quot;:&quot;Shine&quot;               ,&quot;product_key&quot;:&quot;XXXXXXX&quot;                         ,&quot;cmds&quot;:[&quot;refresh&quot;,&quot;IsOnLine&quot;,&quot;cur_tempH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peak_hours&quot;,&quot;peak_signal&quot;]}" calcext:value-type="string">
            <text:p> <text:s text:c="4"/>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tempH","cur_humi","eco_temp","eco_temp_consigne","eco_temp_consigneHL","cft_temp","cft_temp_consigne","cft_temp_consigneHL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cur_tempH","eco_temp","eco_temp_consigneHL","cft_temp","cft_temp_consigneHL","EtatConsigne","mode","Confort","Eco","HorsGel","Off","etatprog","ProgOn","ProgOff"]} <text:s text:c="3"/>,<text:tab/>"cffa0df68a52449085c5d1e72c2f6bb0":{"product_name":"Glow_Blu" <text:s text:c="11"/>,"product_key":"cffa0df68a52449085c5d1e72c2f6bb0","cmds":["refresh","IsOnLine","EtatConsigne","mode","Confort","Eco","HorsGel","Off","etatprog","ProgOn","ProgOff","plugzy","plugzyon","plugzyoff","derog_mode","derog_off","derog_time_vacances","derog_vacances","derog_time_boost","derog_boost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": <text:s text:c="24"/>{"product_name":"Shine" <text:s text:c="14"/>,"product_key":"XXXXXXX" <text:s text:c="24"/>,"cmds":["refresh","IsOnLine","cur_tempH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EtatConsigne","mode","Confort","Eco","HorsGel","Off","etatprog","ProgOn","ProgOff","cur_power","cur_current","cur_voltage","signal_power","energy_saving","peak_hours","peak_signal"]}</text:p>
          </table:table-cell>
          <table:table-cell table:style-name="ce12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13;     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4"/>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12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12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12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12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12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12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12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tempH&quot;,&quot;cur_humi&quot;,&quot;eco_temp&quot;,&quot;eco_temp_consigne&quot;,&quot;eco_temp_consigneHL&quot;,&quot;cft_temp&quot;,&quot;cft_temp_consigne&quot;,&quot;cft_temp_consigneHL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tempH","cur_humi","eco_temp","eco_temp_consigne","eco_temp_consigneHL","cft_temp","cft_temp_consigne","cft_temp_consigneHL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12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12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cur_tempH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cur_tempH","eco_temp","eco_temp_consigneHL","cft_temp","cft_temp_consigneHL","EtatConsigne","mode","Confort","Eco","HorsGel","Off","etatprog","ProgOn","ProgOff"]}</text:p>
          </table:table-cell>
          <table:table-cell table:style-name="ce12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13;    ,&#9;&quot;cffa0df68a52449085c5d1e72c2f6bb0&quot;:{&quot;product_name&quot;:&quot;Glow_Blu&quot;            ,&quot;product_key&quot;:&quot;cffa0df68a52449085c5d1e72c2f6bb0&quot;,&quot;cmds&quot;:[&quot;refresh&quot;,&quot;IsOnLine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cffa0df68a52449085c5d1e72c2f6bb0":{"product_name":"Glow_Blu" <text:s text:c="11"/>,"product_key":"cffa0df68a52449085c5d1e72c2f6bb0","cmds":["refresh","IsOnLine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12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12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12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12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13;    ,&#9;&quot;XXXXXXX&quot;:                         {&quot;product_name&quot;:&quot;Shine&quot;               ,&quot;product_key&quot;:&quot;XXXXXXX&quot;                         ,&quot;cmds&quot;:[&quot;refresh&quot;,&quot;IsOnLine&quot;,&quot;cur_tempH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": <text:s text:c="24"/>{"product_name":"Shine" <text:s text:c="14"/>,"product_key":"XXXXXXX" <text:s text:c="24"/>,"cmds":["refresh","IsOnLine","cur_tempH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12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12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12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12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12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12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12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12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EtatConsigne","mode","Confort","Eco","HorsGel","Off","etatprog","ProgOn","ProgOff","cur_power","cur_current","cur_voltage","signal_power","energy_saving","peak_hours","peak_signal"]}</text:p>
          </table:table-cell>
          <table:table-cell table:style-name="ce13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}</text:p>
          </table:table-cell>
          <table:table-cell table:number-columns-repeated="13"/>
          <table:table-cell table:style-name="ce13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13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501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cmd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ce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6"/>
        <table:table-column table:style-name="co19" table:default-cell-style-name="ce12"/>
        <table:table-column table:style-name="co23" table:default-cell-style-name="ce12"/>
        <table:table-column table:style-name="co15" table:default-cell-style-name="Default"/>
        <table:table-column table:style-name="co24" table:default-cell-style-name="Default"/>
        <table:table-row table:style-name="ro1">
          <table:table-cell table:style-name="ce6" office:value-type="string" calcext:value-type="string">
            <text:p>cmd_id</text:p>
          </table:table-cell>
          <table:table-cell table:style-name="ce6" office:value-type="string" calcext:value-type="string">
            <text:p>Logical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6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6" office:value-type="string" calcext:value-type="string">
            <text:p>Display_param_step</text:p>
          </table:table-cell>
          <table:table-cell table:style-name="ce6" office:value-type="string" calcext:value-type="string">
            <text:p>IsHistorized</text:p>
          </table:table-cell>
          <table:table-cell table:style-name="ce6" office:value-type="string" calcext:value-type="string">
            <text:p>IsVisible</text:p>
          </table:table-cell>
          <table:table-cell table:style-name="ce3"/>
          <table:table-cell table:style-name="ce11" office:value-type="string" calcext:value-type="string">
            <text:p>{</text:p>
          </table:table-cell>
          <table:table-cell table:style-name="ce11"/>
          <table:table-cell/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"cmds":[</text:p>
          </table:table-cell>
          <table:table-cell table:style-name="ce11"/>
          <table:table-cell table:style-name="ce14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])" office:value-type="float" office:value="0" calcext:value-type="float">
            <text:p>0</text:p>
          </table:table-cell>
          <table:table-cell/>
          <table:table-cell table:style-name="ce17" table:formula="of:=&quot;&quot;&amp;IF([.T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&quot;:&quot; &amp;&quot;{&quot;&quot;&quot;&amp;[.B$1]&amp;&quot;&quot;&quot;:&quot;&quot;&quot;&amp;[.B2]&amp;&quot;&quot;&quot;&quot;&amp;REPT(&quot; &quot;;20-LEN([.B2])) &amp;&quot;,&quot;&quot;&quot;&amp;[.C$1]&amp;&quot;&quot;&quot;:&quot;&quot;&quot;&amp;[.C2]&amp;&quot;&quot;&quot;&quot;&amp;REPT(&quot; &quot;;35-LEN([.C2])) &amp;&quot;,&quot;&quot;&quot;&amp;[.D$1]&amp;&quot;&quot;&quot;:&quot;&amp;[.D2]&amp;REPT(&quot; &quot;;3-LEN([.D2])) &amp;&quot;,&quot;&quot;&quot;&amp;[.E$1]&amp;&quot;&quot;&quot;:&quot;&quot;&quot;&amp;[.E2]&amp;&quot;&quot;&quot;&quot;&amp;REPT(&quot; &quot;;6-LEN([.E2])) &amp;&quot;,&quot;&quot;&quot;&amp;[.F$1]&amp;&quot;&quot;&quot;:&quot;&quot;&quot;&amp;[.F2]&amp;&quot;&quot;&quot;&quot;&amp;REPT(&quot; &quot;;7-LEN([.F2])) &amp;&quot;,&quot;&quot;&quot;&amp;[.G$1]&amp;&quot;&quot;&quot;:&quot;&amp;IF([.G2]&lt;&gt;&quot;&quot;;&quot;&quot;&quot;&quot;&amp;[.G2]&amp;&quot;&quot;&quot;&quot;&amp;REPT(&quot; &quot;;5-LEN([.G2]));&quot;null&quot;&amp;REPT(&quot; &quot;;5-4+2)) &amp;&quot;,&quot;&quot;&quot;&amp;[.H$1]&amp;&quot;&quot;&quot;:&quot;&amp;IF([.H2]&lt;&gt;&quot;&quot;;&quot;&quot;&quot;&quot;&amp;[.H2]&amp;&quot;&quot;&quot;&quot;&amp;REPT(&quot; &quot;;19-LEN([.H2]));&quot;null&quot;&amp;REPT(&quot; &quot;;19-4+2)) &amp;&quot;,&quot;&quot;&quot;&amp;[.I$1]&amp;&quot;&quot;&quot;:&quot;&amp;IF([.I2]&lt;&gt;&quot;&quot;;&quot;&quot;&quot;&quot;&amp;[.I2]&amp;&quot;&quot;&quot;&quot;&amp;REPT(&quot; &quot;;8-LEN([.I2]));&quot;null&quot;&amp;REPT(&quot; &quot;;8-4+2)) &amp;&quot;,&quot;&quot;&quot;&amp;[.J$1]&amp;&quot;&quot;&quot;:&quot;&amp;IF([.J2]&lt;&gt;&quot;&quot;;[.J2]&amp;REPT(&quot; &quot;;4-LEN([.J2]));&quot;null&quot;) &amp;&quot;,&quot;&quot;&quot;&amp;[.K$1]&amp;&quot;&quot;&quot;:&quot;&amp;IF([.K2]&lt;&gt;&quot;&quot;;[.K2]&amp;REPT(&quot; &quot;;4-LEN([.K2]));&quot;null&quot;) &amp;&quot;,&quot;&quot;&quot;&amp;[.L$1]&amp;&quot;&quot;&quot;:&quot;&amp;IF([.L2]&lt;&gt;&quot;&quot;;[.L2]&amp;REPT(&quot; &quot;;5-LEN([.L2]));&quot;null &quot;) &amp;&quot;,&quot;&quot;&quot;&amp;[.M$1]&amp;&quot;&quot;&quot;:&quot;&amp;IF([.M2]&lt;&gt;&quot;&quot;;&quot;&quot;&quot;&quot;&amp;[.M2]&amp;&quot;&quot;&quot;&quot;&amp;REPT(&quot; &quot;;20-LEN([.M2]));&quot;null&quot;&amp;REPT(&quot; &quot;;20-4+2)) &amp;&quot;,&quot;&quot;&quot;&amp;[.N$1]&amp;&quot;&quot;&quot;:&quot;&amp;IF([.N2]&lt;&gt;&quot;&quot;;&quot;&quot;&amp;[.N2]&amp;&quot;&quot;&amp;REPT(&quot; &quot;;5-LEN([.N2]));&quot;null&quot;&amp;REPT(&quot; &quot;;5-4+2)) &amp;&quot;,&quot;&quot;&quot;&amp;[.O$1]&amp;&quot;&quot;&quot;:&quot;&amp;[.O2] &amp;&quot;,&quot;&quot;&quot;&amp;[.P$1]&amp;&quot;&quot;&quot;:&quot;&amp;[.P2] &amp;&quot;}&quot;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&quot;&quot;&amp;IF([.X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3])" office:value-type="float" office:value="0" calcext:value-type="float">
            <text:p>0</text:p>
          </table:table-cell>
          <table:table-cell/>
          <table:table-cell table:style-name="ce17" table:formula="of:=&quot;&quot;&amp;IF([.T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&quot;:&quot; &amp;&quot;{&quot;&quot;&quot;&amp;[.B$1]&amp;&quot;&quot;&quot;:&quot;&quot;&quot;&amp;[.B3]&amp;&quot;&quot;&quot;&quot;&amp;REPT(&quot; &quot;;20-LEN([.B3])) &amp;&quot;,&quot;&quot;&quot;&amp;[.C$1]&amp;&quot;&quot;&quot;:&quot;&quot;&quot;&amp;[.C3]&amp;&quot;&quot;&quot;&quot;&amp;REPT(&quot; &quot;;35-LEN([.C3])) &amp;&quot;,&quot;&quot;&quot;&amp;[.D$1]&amp;&quot;&quot;&quot;:&quot;&amp;[.D3]&amp;REPT(&quot; &quot;;3-LEN([.D3])) &amp;&quot;,&quot;&quot;&quot;&amp;[.E$1]&amp;&quot;&quot;&quot;:&quot;&quot;&quot;&amp;[.E3]&amp;&quot;&quot;&quot;&quot;&amp;REPT(&quot; &quot;;6-LEN([.E3])) &amp;&quot;,&quot;&quot;&quot;&amp;[.F$1]&amp;&quot;&quot;&quot;:&quot;&quot;&quot;&amp;[.F3]&amp;&quot;&quot;&quot;&quot;&amp;REPT(&quot; &quot;;7-LEN([.F3])) &amp;&quot;,&quot;&quot;&quot;&amp;[.G$1]&amp;&quot;&quot;&quot;:&quot;&amp;IF([.G3]&lt;&gt;&quot;&quot;;&quot;&quot;&quot;&quot;&amp;[.G3]&amp;&quot;&quot;&quot;&quot;&amp;REPT(&quot; &quot;;5-LEN([.G3]));&quot;null&quot;&amp;REPT(&quot; &quot;;5-4+2)) &amp;&quot;,&quot;&quot;&quot;&amp;[.H$1]&amp;&quot;&quot;&quot;:&quot;&amp;IF([.H3]&lt;&gt;&quot;&quot;;&quot;&quot;&quot;&quot;&amp;[.H3]&amp;&quot;&quot;&quot;&quot;&amp;REPT(&quot; &quot;;19-LEN([.H3]));&quot;null&quot;&amp;REPT(&quot; &quot;;19-4+2)) &amp;&quot;,&quot;&quot;&quot;&amp;[.I$1]&amp;&quot;&quot;&quot;:&quot;&amp;IF([.I3]&lt;&gt;&quot;&quot;;&quot;&quot;&quot;&quot;&amp;[.I3]&amp;&quot;&quot;&quot;&quot;&amp;REPT(&quot; &quot;;8-LEN([.I3]));&quot;null&quot;&amp;REPT(&quot; &quot;;8-4+2)) &amp;&quot;,&quot;&quot;&quot;&amp;[.J$1]&amp;&quot;&quot;&quot;:&quot;&amp;IF([.J3]&lt;&gt;&quot;&quot;;[.J3]&amp;REPT(&quot; &quot;;4-LEN([.J3]));&quot;null&quot;) &amp;&quot;,&quot;&quot;&quot;&amp;[.K$1]&amp;&quot;&quot;&quot;:&quot;&amp;IF([.K3]&lt;&gt;&quot;&quot;;[.K3]&amp;REPT(&quot; &quot;;4-LEN([.K3]));&quot;null&quot;) &amp;&quot;,&quot;&quot;&quot;&amp;[.L$1]&amp;&quot;&quot;&quot;:&quot;&amp;IF([.L3]&lt;&gt;&quot;&quot;;[.L3]&amp;REPT(&quot; &quot;;5-LEN([.L3]));&quot;null &quot;) &amp;&quot;,&quot;&quot;&quot;&amp;[.M$1]&amp;&quot;&quot;&quot;:&quot;&amp;IF([.M3]&lt;&gt;&quot;&quot;;&quot;&quot;&quot;&quot;&amp;[.M3]&amp;&quot;&quot;&quot;&quot;&amp;REPT(&quot; &quot;;20-LEN([.M3]));&quot;null&quot;&amp;REPT(&quot; &quot;;20-4+2)) &amp;&quot;,&quot;&quot;&quot;&amp;[.N$1]&amp;&quot;&quot;&quot;:&quot;&amp;IF([.N3]&lt;&gt;&quot;&quot;;&quot;&quot;&amp;[.N3]&amp;&quot;&quot;&amp;REPT(&quot; &quot;;5-LEN([.N3]));&quot;null&quot;&amp;REPT(&quot; &quot;;5-4+2)) &amp;&quot;,&quot;&quot;&quot;&amp;[.O$1]&amp;&quot;&quot;&quot;:&quot;&amp;[.O3] &amp;&quot;,&quot;&quot;&quot;&amp;[.P$1]&amp;&quot;&quot;&quot;:&quot;&amp;[.P3] &amp;&quot;}&quot;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])" office:value-type="float" office:value="0" calcext:value-type="float">
            <text:p>0</text:p>
          </table:table-cell>
          <table:table-cell/>
          <table:table-cell table:style-name="ce17" table:formula="of:=&quot;&quot;&amp;IF([.T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&quot;:&quot; &amp;&quot;{&quot;&quot;&quot;&amp;[.B$1]&amp;&quot;&quot;&quot;:&quot;&quot;&quot;&amp;[.B4]&amp;&quot;&quot;&quot;&quot;&amp;REPT(&quot; &quot;;20-LEN([.B4])) &amp;&quot;,&quot;&quot;&quot;&amp;[.C$1]&amp;&quot;&quot;&quot;:&quot;&quot;&quot;&amp;[.C4]&amp;&quot;&quot;&quot;&quot;&amp;REPT(&quot; &quot;;35-LEN([.C4])) &amp;&quot;,&quot;&quot;&quot;&amp;[.D$1]&amp;&quot;&quot;&quot;:&quot;&amp;[.D4]&amp;REPT(&quot; &quot;;3-LEN([.D4])) &amp;&quot;,&quot;&quot;&quot;&amp;[.E$1]&amp;&quot;&quot;&quot;:&quot;&quot;&quot;&amp;[.E4]&amp;&quot;&quot;&quot;&quot;&amp;REPT(&quot; &quot;;6-LEN([.E4])) &amp;&quot;,&quot;&quot;&quot;&amp;[.F$1]&amp;&quot;&quot;&quot;:&quot;&quot;&quot;&amp;[.F4]&amp;&quot;&quot;&quot;&quot;&amp;REPT(&quot; &quot;;7-LEN([.F4])) &amp;&quot;,&quot;&quot;&quot;&amp;[.G$1]&amp;&quot;&quot;&quot;:&quot;&amp;IF([.G4]&lt;&gt;&quot;&quot;;&quot;&quot;&quot;&quot;&amp;[.G4]&amp;&quot;&quot;&quot;&quot;&amp;REPT(&quot; &quot;;5-LEN([.G4]));&quot;null&quot;&amp;REPT(&quot; &quot;;5-4+2)) &amp;&quot;,&quot;&quot;&quot;&amp;[.H$1]&amp;&quot;&quot;&quot;:&quot;&amp;IF([.H4]&lt;&gt;&quot;&quot;;&quot;&quot;&quot;&quot;&amp;[.H4]&amp;&quot;&quot;&quot;&quot;&amp;REPT(&quot; &quot;;19-LEN([.H4]));&quot;null&quot;&amp;REPT(&quot; &quot;;19-4+2)) &amp;&quot;,&quot;&quot;&quot;&amp;[.I$1]&amp;&quot;&quot;&quot;:&quot;&amp;IF([.I4]&lt;&gt;&quot;&quot;;&quot;&quot;&quot;&quot;&amp;[.I4]&amp;&quot;&quot;&quot;&quot;&amp;REPT(&quot; &quot;;8-LEN([.I4]));&quot;null&quot;&amp;REPT(&quot; &quot;;8-4+2)) &amp;&quot;,&quot;&quot;&quot;&amp;[.J$1]&amp;&quot;&quot;&quot;:&quot;&amp;IF([.J4]&lt;&gt;&quot;&quot;;[.J4]&amp;REPT(&quot; &quot;;4-LEN([.J4]));&quot;null&quot;) &amp;&quot;,&quot;&quot;&quot;&amp;[.K$1]&amp;&quot;&quot;&quot;:&quot;&amp;IF([.K4]&lt;&gt;&quot;&quot;;[.K4]&amp;REPT(&quot; &quot;;4-LEN([.K4]));&quot;null&quot;) &amp;&quot;,&quot;&quot;&quot;&amp;[.L$1]&amp;&quot;&quot;&quot;:&quot;&amp;IF([.L4]&lt;&gt;&quot;&quot;;[.L4]&amp;REPT(&quot; &quot;;5-LEN([.L4]));&quot;null &quot;) &amp;&quot;,&quot;&quot;&quot;&amp;[.M$1]&amp;&quot;&quot;&quot;:&quot;&amp;IF([.M4]&lt;&gt;&quot;&quot;;&quot;&quot;&quot;&quot;&amp;[.M4]&amp;&quot;&quot;&quot;&quot;&amp;REPT(&quot; &quot;;20-LEN([.M4]));&quot;null&quot;&amp;REPT(&quot; &quot;;20-4+2)) &amp;&quot;,&quot;&quot;&quot;&amp;[.N$1]&amp;&quot;&quot;&quot;:&quot;&amp;IF([.N4]&lt;&gt;&quot;&quot;;&quot;&quot;&amp;[.N4]&amp;&quot;&quot;&amp;REPT(&quot; &quot;;5-LEN([.N4]));&quot;null&quot;&amp;REPT(&quot; &quot;;5-4+2)) &amp;&quot;,&quot;&quot;&quot;&amp;[.O$1]&amp;&quot;&quot;&quot;:&quot;&amp;[.O4] &amp;&quot;,&quot;&quot;&quot;&amp;[.P$1]&amp;&quot;&quot;&quot;:&quot;&amp;[.P4] &amp;&quot;}&quot;" office:value-type="string" office:string-value="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table:formula="of:=&quot;&quot;&amp;IF([.T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cur_tempH&quot;           " calcext:value-type="string">
            <text:p>,"cur_tempH" <text:s text:c="10"/></text:p>
          </table:table-cell>
          <table:table-cell table:style-name="ce17" table:formula="of:=&quot;:&quot; &amp;&quot;{&quot;&quot;&quot;&amp;[.B$1]&amp;&quot;&quot;&quot;:&quot;&quot;&quot;&amp;[.B5]&amp;&quot;&quot;&quot;&quot;&amp;REPT(&quot; &quot;;20-LEN([.B5])) &amp;&quot;,&quot;&quot;&quot;&amp;[.C$1]&amp;&quot;&quot;&quot;:&quot;&quot;&quot;&amp;[.C5]&amp;&quot;&quot;&quot;&quot;&amp;REPT(&quot; &quot;;35-LEN([.C5])) &amp;&quot;,&quot;&quot;&quot;&amp;[.D$1]&amp;&quot;&quot;&quot;:&quot;&amp;[.D5]&amp;REPT(&quot; &quot;;3-LEN([.D5])) &amp;&quot;,&quot;&quot;&quot;&amp;[.E$1]&amp;&quot;&quot;&quot;:&quot;&quot;&quot;&amp;[.E5]&amp;&quot;&quot;&quot;&quot;&amp;REPT(&quot; &quot;;6-LEN([.E5])) &amp;&quot;,&quot;&quot;&quot;&amp;[.F$1]&amp;&quot;&quot;&quot;:&quot;&quot;&quot;&amp;[.F5]&amp;&quot;&quot;&quot;&quot;&amp;REPT(&quot; &quot;;7-LEN([.F5])) &amp;&quot;,&quot;&quot;&quot;&amp;[.G$1]&amp;&quot;&quot;&quot;:&quot;&amp;IF([.G5]&lt;&gt;&quot;&quot;;&quot;&quot;&quot;&quot;&amp;[.G5]&amp;&quot;&quot;&quot;&quot;&amp;REPT(&quot; &quot;;5-LEN([.G5]));&quot;null&quot;&amp;REPT(&quot; &quot;;5-4+2)) &amp;&quot;,&quot;&quot;&quot;&amp;[.H$1]&amp;&quot;&quot;&quot;:&quot;&amp;IF([.H5]&lt;&gt;&quot;&quot;;&quot;&quot;&quot;&quot;&amp;[.H5]&amp;&quot;&quot;&quot;&quot;&amp;REPT(&quot; &quot;;19-LEN([.H5]));&quot;null&quot;&amp;REPT(&quot; &quot;;19-4+2)) &amp;&quot;,&quot;&quot;&quot;&amp;[.I$1]&amp;&quot;&quot;&quot;:&quot;&amp;IF([.I5]&lt;&gt;&quot;&quot;;&quot;&quot;&quot;&quot;&amp;[.I5]&amp;&quot;&quot;&quot;&quot;&amp;REPT(&quot; &quot;;8-LEN([.I5]));&quot;null&quot;&amp;REPT(&quot; &quot;;8-4+2)) &amp;&quot;,&quot;&quot;&quot;&amp;[.J$1]&amp;&quot;&quot;&quot;:&quot;&amp;IF([.J5]&lt;&gt;&quot;&quot;;[.J5]&amp;REPT(&quot; &quot;;4-LEN([.J5]));&quot;null&quot;) &amp;&quot;,&quot;&quot;&quot;&amp;[.K$1]&amp;&quot;&quot;&quot;:&quot;&amp;IF([.K5]&lt;&gt;&quot;&quot;;[.K5]&amp;REPT(&quot; &quot;;4-LEN([.K5]));&quot;null&quot;) &amp;&quot;,&quot;&quot;&quot;&amp;[.L$1]&amp;&quot;&quot;&quot;:&quot;&amp;IF([.L5]&lt;&gt;&quot;&quot;;[.L5]&amp;REPT(&quot; &quot;;5-LEN([.L5]));&quot;null &quot;) &amp;&quot;,&quot;&quot;&quot;&amp;[.M$1]&amp;&quot;&quot;&quot;:&quot;&amp;IF([.M5]&lt;&gt;&quot;&quot;;&quot;&quot;&quot;&quot;&amp;[.M5]&amp;&quot;&quot;&quot;&quot;&amp;REPT(&quot; &quot;;20-LEN([.M5]));&quot;null&quot;&amp;REPT(&quot; &quot;;20-4+2)) &amp;&quot;,&quot;&quot;&quot;&amp;[.N$1]&amp;&quot;&quot;&quot;:&quot;&amp;IF([.N5]&lt;&gt;&quot;&quot;;&quot;&quot;&amp;[.N5]&amp;&quot;&quot;&amp;REPT(&quot; &quot;;5-LEN([.N5]));&quot;null&quot;&amp;REPT(&quot; &quot;;5-4+2)) &amp;&quot;,&quot;&quot;&quot;&amp;[.O$1]&amp;&quot;&quot;&quot;:&quot;&amp;[.O5] &amp;&quot;,&quot;&quot;&quot;&amp;[.P$1]&amp;&quot;&quot;&quot;:&quot;&amp;[.P5] &amp;&quot;}&quot;" office:value-type="string" office:string-value="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true ,&quot;setValue&quot;:null                  ,&quot;Display_param_step&quot;:null   ,&quot;IsHistorized&quot;:0,&quot;IsVisible&quot;:1}" calcext:value-type="string">
            <text:p>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true ,"setValue":null <text:s text:c="17"/>,"Display_param_step":null <text:s text:c="2"/>,"IsHistorized":0,"IsVisible":1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6])" office:value-type="float" office:value="0" calcext:value-type="float">
            <text:p>0</text:p>
          </table:table-cell>
          <table:table-cell/>
          <table:table-cell table:style-name="ce17" table:formula="of:=&quot;&quot;&amp;IF([.T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&quot;:&quot; &amp;&quot;{&quot;&quot;&quot;&amp;[.B$1]&amp;&quot;&quot;&quot;:&quot;&quot;&quot;&amp;[.B6]&amp;&quot;&quot;&quot;&quot;&amp;REPT(&quot; &quot;;20-LEN([.B6])) &amp;&quot;,&quot;&quot;&quot;&amp;[.C$1]&amp;&quot;&quot;&quot;:&quot;&quot;&quot;&amp;[.C6]&amp;&quot;&quot;&quot;&quot;&amp;REPT(&quot; &quot;;35-LEN([.C6])) &amp;&quot;,&quot;&quot;&quot;&amp;[.D$1]&amp;&quot;&quot;&quot;:&quot;&amp;[.D6]&amp;REPT(&quot; &quot;;3-LEN([.D6])) &amp;&quot;,&quot;&quot;&quot;&amp;[.E$1]&amp;&quot;&quot;&quot;:&quot;&quot;&quot;&amp;[.E6]&amp;&quot;&quot;&quot;&quot;&amp;REPT(&quot; &quot;;6-LEN([.E6])) &amp;&quot;,&quot;&quot;&quot;&amp;[.F$1]&amp;&quot;&quot;&quot;:&quot;&quot;&quot;&amp;[.F6]&amp;&quot;&quot;&quot;&quot;&amp;REPT(&quot; &quot;;7-LEN([.F6])) &amp;&quot;,&quot;&quot;&quot;&amp;[.G$1]&amp;&quot;&quot;&quot;:&quot;&amp;IF([.G6]&lt;&gt;&quot;&quot;;&quot;&quot;&quot;&quot;&amp;[.G6]&amp;&quot;&quot;&quot;&quot;&amp;REPT(&quot; &quot;;5-LEN([.G6]));&quot;null&quot;&amp;REPT(&quot; &quot;;5-4+2)) &amp;&quot;,&quot;&quot;&quot;&amp;[.H$1]&amp;&quot;&quot;&quot;:&quot;&amp;IF([.H6]&lt;&gt;&quot;&quot;;&quot;&quot;&quot;&quot;&amp;[.H6]&amp;&quot;&quot;&quot;&quot;&amp;REPT(&quot; &quot;;19-LEN([.H6]));&quot;null&quot;&amp;REPT(&quot; &quot;;19-4+2)) &amp;&quot;,&quot;&quot;&quot;&amp;[.I$1]&amp;&quot;&quot;&quot;:&quot;&amp;IF([.I6]&lt;&gt;&quot;&quot;;&quot;&quot;&quot;&quot;&amp;[.I6]&amp;&quot;&quot;&quot;&quot;&amp;REPT(&quot; &quot;;8-LEN([.I6]));&quot;null&quot;&amp;REPT(&quot; &quot;;8-4+2)) &amp;&quot;,&quot;&quot;&quot;&amp;[.J$1]&amp;&quot;&quot;&quot;:&quot;&amp;IF([.J6]&lt;&gt;&quot;&quot;;[.J6]&amp;REPT(&quot; &quot;;4-LEN([.J6]));&quot;null&quot;) &amp;&quot;,&quot;&quot;&quot;&amp;[.K$1]&amp;&quot;&quot;&quot;:&quot;&amp;IF([.K6]&lt;&gt;&quot;&quot;;[.K6]&amp;REPT(&quot; &quot;;4-LEN([.K6]));&quot;null&quot;) &amp;&quot;,&quot;&quot;&quot;&amp;[.L$1]&amp;&quot;&quot;&quot;:&quot;&amp;IF([.L6]&lt;&gt;&quot;&quot;;[.L6]&amp;REPT(&quot; &quot;;5-LEN([.L6]));&quot;null &quot;) &amp;&quot;,&quot;&quot;&quot;&amp;[.M$1]&amp;&quot;&quot;&quot;:&quot;&amp;IF([.M6]&lt;&gt;&quot;&quot;;&quot;&quot;&quot;&quot;&amp;[.M6]&amp;&quot;&quot;&quot;&quot;&amp;REPT(&quot; &quot;;20-LEN([.M6]));&quot;null&quot;&amp;REPT(&quot; &quot;;20-4+2)) &amp;&quot;,&quot;&quot;&quot;&amp;[.N$1]&amp;&quot;&quot;&quot;:&quot;&amp;IF([.N6]&lt;&gt;&quot;&quot;;&quot;&quot;&amp;[.N6]&amp;&quot;&quot;&amp;REPT(&quot; &quot;;5-LEN([.N6]));&quot;null&quot;&amp;REPT(&quot; &quot;;5-4+2)) &amp;&quot;,&quot;&quot;&quot;&amp;[.O$1]&amp;&quot;&quot;&quot;:&quot;&amp;[.O6] &amp;&quot;,&quot;&quot;&quot;&amp;[.P$1]&amp;&quot;&quot;&quot;:&quot;&amp;[.P6] &amp;&quot;}&quot;" office:value-type="string" office:string-value="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]=&quot;&quot;;&quot; &quot;;IF([.B6]&lt;&gt;&quot;&quot;;&quot;,&quot;;&quot;]&quot;))&#10;&amp;IF([.B6]&lt;&gt;&quot;&quot;;&quot;{&quot;&quot;cmd&quot;&quot;:&quot;&quot;&quot;&amp;[.B6]&amp;&quot;&quot;&quot;&quot;&amp;REPT(&quot; &quot;;20-LEN([.B6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quot;&quot;&amp;[.N6]&amp;&quot;&quot;&quot;&quot;&amp;REPT(&quot; &quot;;30-LEN([.N6]));&quot;null&quot;&amp;REPT(&quot; &quot;;30-4+2))&#10;&amp;&quot;,&quot;&quot;&quot;&amp;[.O$1]&amp;&quot;&quot;&quot;:&quot;&amp;[.O6]&#10;&amp;&quot;,&quot;&quot;&quot;&amp;[.P$1]&amp;&quot;&quot;&quot;:&quot;&amp;[.P6]&#10;&amp;&quot;}}&quot;" office:value-type="string" office:string-value=",&quot;attrs&quot;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7])" office:value-type="float" office:value="0" calcext:value-type="float">
            <text:p>0</text:p>
          </table:table-cell>
          <table:table-cell/>
          <table:table-cell table:style-name="ce17" table:formula="of:=&quot;&quot;&amp;IF([.T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&quot;:&quot; &amp;&quot;{&quot;&quot;&quot;&amp;[.B$1]&amp;&quot;&quot;&quot;:&quot;&quot;&quot;&amp;[.B7]&amp;&quot;&quot;&quot;&quot;&amp;REPT(&quot; &quot;;20-LEN([.B7])) &amp;&quot;,&quot;&quot;&quot;&amp;[.C$1]&amp;&quot;&quot;&quot;:&quot;&quot;&quot;&amp;[.C7]&amp;&quot;&quot;&quot;&quot;&amp;REPT(&quot; &quot;;35-LEN([.C7])) &amp;&quot;,&quot;&quot;&quot;&amp;[.D$1]&amp;&quot;&quot;&quot;:&quot;&amp;[.D7]&amp;REPT(&quot; &quot;;3-LEN([.D7])) &amp;&quot;,&quot;&quot;&quot;&amp;[.E$1]&amp;&quot;&quot;&quot;:&quot;&quot;&quot;&amp;[.E7]&amp;&quot;&quot;&quot;&quot;&amp;REPT(&quot; &quot;;6-LEN([.E7])) &amp;&quot;,&quot;&quot;&quot;&amp;[.F$1]&amp;&quot;&quot;&quot;:&quot;&quot;&quot;&amp;[.F7]&amp;&quot;&quot;&quot;&quot;&amp;REPT(&quot; &quot;;7-LEN([.F7])) &amp;&quot;,&quot;&quot;&quot;&amp;[.G$1]&amp;&quot;&quot;&quot;:&quot;&amp;IF([.G7]&lt;&gt;&quot;&quot;;&quot;&quot;&quot;&quot;&amp;[.G7]&amp;&quot;&quot;&quot;&quot;&amp;REPT(&quot; &quot;;5-LEN([.G7]));&quot;null&quot;&amp;REPT(&quot; &quot;;5-4+2)) &amp;&quot;,&quot;&quot;&quot;&amp;[.H$1]&amp;&quot;&quot;&quot;:&quot;&amp;IF([.H7]&lt;&gt;&quot;&quot;;&quot;&quot;&quot;&quot;&amp;[.H7]&amp;&quot;&quot;&quot;&quot;&amp;REPT(&quot; &quot;;19-LEN([.H7]));&quot;null&quot;&amp;REPT(&quot; &quot;;19-4+2)) &amp;&quot;,&quot;&quot;&quot;&amp;[.I$1]&amp;&quot;&quot;&quot;:&quot;&amp;IF([.I7]&lt;&gt;&quot;&quot;;&quot;&quot;&quot;&quot;&amp;[.I7]&amp;&quot;&quot;&quot;&quot;&amp;REPT(&quot; &quot;;8-LEN([.I7]));&quot;null&quot;&amp;REPT(&quot; &quot;;8-4+2)) &amp;&quot;,&quot;&quot;&quot;&amp;[.J$1]&amp;&quot;&quot;&quot;:&quot;&amp;IF([.J7]&lt;&gt;&quot;&quot;;[.J7]&amp;REPT(&quot; &quot;;4-LEN([.J7]));&quot;null&quot;) &amp;&quot;,&quot;&quot;&quot;&amp;[.K$1]&amp;&quot;&quot;&quot;:&quot;&amp;IF([.K7]&lt;&gt;&quot;&quot;;[.K7]&amp;REPT(&quot; &quot;;4-LEN([.K7]));&quot;null&quot;) &amp;&quot;,&quot;&quot;&quot;&amp;[.L$1]&amp;&quot;&quot;&quot;:&quot;&amp;IF([.L7]&lt;&gt;&quot;&quot;;[.L7]&amp;REPT(&quot; &quot;;5-LEN([.L7]));&quot;null &quot;) &amp;&quot;,&quot;&quot;&quot;&amp;[.M$1]&amp;&quot;&quot;&quot;:&quot;&amp;IF([.M7]&lt;&gt;&quot;&quot;;&quot;&quot;&quot;&quot;&amp;[.M7]&amp;&quot;&quot;&quot;&quot;&amp;REPT(&quot; &quot;;20-LEN([.M7]));&quot;null&quot;&amp;REPT(&quot; &quot;;20-4+2)) &amp;&quot;,&quot;&quot;&quot;&amp;[.N$1]&amp;&quot;&quot;&quot;:&quot;&amp;IF([.N7]&lt;&gt;&quot;&quot;;&quot;&quot;&amp;[.N7]&amp;&quot;&quot;&amp;REPT(&quot; &quot;;5-LEN([.N7]));&quot;null&quot;&amp;REPT(&quot; &quot;;5-4+2)) &amp;&quot;,&quot;&quot;&quot;&amp;[.O$1]&amp;&quot;&quot;&quot;:&quot;&amp;[.O7] &amp;&quot;,&quot;&quot;&quot;&amp;[.P$1]&amp;&quot;&quot;&quot;:&quot;&amp;[.P7] &amp;&quot;}&quot;" office:value-type="string" office:string-value="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6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O$1]&amp;&quot;&quot;&quot;:&quot;&amp;[.O7]&#10;&amp;&quot;,&quot;&quot;&quot;&amp;[.P$1]&amp;&quot;&quot;&quot;:&quot;&amp;[.P7]&#10;&amp;&quot;}}&quot;" office:value-type="string" office:string-value=",&quot;attrs&quot;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&quot;:&quot; &amp;&quot;{&quot;&quot;&quot;&amp;[.B$1]&amp;&quot;&quot;&quot;:&quot;&quot;&quot;&amp;[.B8]&amp;&quot;&quot;&quot;&quot;&amp;REPT(&quot; &quot;;20-LEN([.B8])) &amp;&quot;,&quot;&quot;&quot;&amp;[.C$1]&amp;&quot;&quot;&quot;:&quot;&quot;&quot;&amp;[.C8]&amp;&quot;&quot;&quot;&quot;&amp;REPT(&quot; &quot;;35-LEN([.C8])) &amp;&quot;,&quot;&quot;&quot;&amp;[.D$1]&amp;&quot;&quot;&quot;:&quot;&amp;[.D8]&amp;REPT(&quot; &quot;;3-LEN([.D8])) &amp;&quot;,&quot;&quot;&quot;&amp;[.E$1]&amp;&quot;&quot;&quot;:&quot;&quot;&quot;&amp;[.E8]&amp;&quot;&quot;&quot;&quot;&amp;REPT(&quot; &quot;;6-LEN([.E8])) &amp;&quot;,&quot;&quot;&quot;&amp;[.F$1]&amp;&quot;&quot;&quot;:&quot;&quot;&quot;&amp;[.F8]&amp;&quot;&quot;&quot;&quot;&amp;REPT(&quot; &quot;;7-LEN([.F8])) &amp;&quot;,&quot;&quot;&quot;&amp;[.G$1]&amp;&quot;&quot;&quot;:&quot;&amp;IF([.G8]&lt;&gt;&quot;&quot;;&quot;&quot;&quot;&quot;&amp;[.G8]&amp;&quot;&quot;&quot;&quot;&amp;REPT(&quot; &quot;;5-LEN([.G8]));&quot;null&quot;&amp;REPT(&quot; &quot;;5-4+2)) &amp;&quot;,&quot;&quot;&quot;&amp;[.H$1]&amp;&quot;&quot;&quot;:&quot;&amp;IF([.H8]&lt;&gt;&quot;&quot;;&quot;&quot;&quot;&quot;&amp;[.H8]&amp;&quot;&quot;&quot;&quot;&amp;REPT(&quot; &quot;;19-LEN([.H8]));&quot;null&quot;&amp;REPT(&quot; &quot;;19-4+2)) &amp;&quot;,&quot;&quot;&quot;&amp;[.I$1]&amp;&quot;&quot;&quot;:&quot;&amp;IF([.I8]&lt;&gt;&quot;&quot;;&quot;&quot;&quot;&quot;&amp;[.I8]&amp;&quot;&quot;&quot;&quot;&amp;REPT(&quot; &quot;;8-LEN([.I8]));&quot;null&quot;&amp;REPT(&quot; &quot;;8-4+2)) &amp;&quot;,&quot;&quot;&quot;&amp;[.J$1]&amp;&quot;&quot;&quot;:&quot;&amp;IF([.J8]&lt;&gt;&quot;&quot;;[.J8]&amp;REPT(&quot; &quot;;4-LEN([.J8]));&quot;null&quot;) &amp;&quot;,&quot;&quot;&quot;&amp;[.K$1]&amp;&quot;&quot;&quot;:&quot;&amp;IF([.K8]&lt;&gt;&quot;&quot;;[.K8]&amp;REPT(&quot; &quot;;4-LEN([.K8]));&quot;null&quot;) &amp;&quot;,&quot;&quot;&quot;&amp;[.L$1]&amp;&quot;&quot;&quot;:&quot;&amp;IF([.L8]&lt;&gt;&quot;&quot;;[.L8]&amp;REPT(&quot; &quot;;5-LEN([.L8]));&quot;null &quot;) &amp;&quot;,&quot;&quot;&quot;&amp;[.M$1]&amp;&quot;&quot;&quot;:&quot;&amp;IF([.M8]&lt;&gt;&quot;&quot;;&quot;&quot;&quot;&quot;&amp;[.M8]&amp;&quot;&quot;&quot;&quot;&amp;REPT(&quot; &quot;;20-LEN([.M8]));&quot;null&quot;&amp;REPT(&quot; &quot;;20-4+2)) &amp;&quot;,&quot;&quot;&quot;&amp;[.N$1]&amp;&quot;&quot;&quot;:&quot;&amp;IF([.N8]&lt;&gt;&quot;&quot;;&quot;&quot;&amp;[.N8]&amp;&quot;&quot;&amp;REPT(&quot; &quot;;5-LEN([.N8]));&quot;null&quot;&amp;REPT(&quot; &quot;;5-4+2)) &amp;&quot;,&quot;&quot;&quot;&amp;[.O$1]&amp;&quot;&quot;&quot;:&quot;&amp;[.O8] &amp;&quot;,&quot;&quot;&quot;&amp;[.P$1]&amp;&quot;&quot;&quot;:&quot;&amp;[.P8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9])" office:value-type="float" office:value="3" calcext:value-type="float">
            <text:p>3</text:p>
          </table:table-cell>
          <table:table-cell/>
          <table:table-cell table:style-name="ce17" table:formula="of:=&quot;&quot;&amp;IF([.T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&quot;:&quot; &amp;&quot;{&quot;&quot;&quot;&amp;[.B$1]&amp;&quot;&quot;&quot;:&quot;&quot;&quot;&amp;[.B9]&amp;&quot;&quot;&quot;&quot;&amp;REPT(&quot; &quot;;20-LEN([.B9])) &amp;&quot;,&quot;&quot;&quot;&amp;[.C$1]&amp;&quot;&quot;&quot;:&quot;&quot;&quot;&amp;[.C9]&amp;&quot;&quot;&quot;&quot;&amp;REPT(&quot; &quot;;35-LEN([.C9])) &amp;&quot;,&quot;&quot;&quot;&amp;[.D$1]&amp;&quot;&quot;&quot;:&quot;&amp;[.D9]&amp;REPT(&quot; &quot;;3-LEN([.D9])) &amp;&quot;,&quot;&quot;&quot;&amp;[.E$1]&amp;&quot;&quot;&quot;:&quot;&quot;&quot;&amp;[.E9]&amp;&quot;&quot;&quot;&quot;&amp;REPT(&quot; &quot;;6-LEN([.E9])) &amp;&quot;,&quot;&quot;&quot;&amp;[.F$1]&amp;&quot;&quot;&quot;:&quot;&quot;&quot;&amp;[.F9]&amp;&quot;&quot;&quot;&quot;&amp;REPT(&quot; &quot;;7-LEN([.F9])) &amp;&quot;,&quot;&quot;&quot;&amp;[.G$1]&amp;&quot;&quot;&quot;:&quot;&amp;IF([.G9]&lt;&gt;&quot;&quot;;&quot;&quot;&quot;&quot;&amp;[.G9]&amp;&quot;&quot;&quot;&quot;&amp;REPT(&quot; &quot;;5-LEN([.G9]));&quot;null&quot;&amp;REPT(&quot; &quot;;5-4+2)) &amp;&quot;,&quot;&quot;&quot;&amp;[.H$1]&amp;&quot;&quot;&quot;:&quot;&amp;IF([.H9]&lt;&gt;&quot;&quot;;&quot;&quot;&quot;&quot;&amp;[.H9]&amp;&quot;&quot;&quot;&quot;&amp;REPT(&quot; &quot;;19-LEN([.H9]));&quot;null&quot;&amp;REPT(&quot; &quot;;19-4+2)) &amp;&quot;,&quot;&quot;&quot;&amp;[.I$1]&amp;&quot;&quot;&quot;:&quot;&amp;IF([.I9]&lt;&gt;&quot;&quot;;&quot;&quot;&quot;&quot;&amp;[.I9]&amp;&quot;&quot;&quot;&quot;&amp;REPT(&quot; &quot;;8-LEN([.I9]));&quot;null&quot;&amp;REPT(&quot; &quot;;8-4+2)) &amp;&quot;,&quot;&quot;&quot;&amp;[.J$1]&amp;&quot;&quot;&quot;:&quot;&amp;IF([.J9]&lt;&gt;&quot;&quot;;[.J9]&amp;REPT(&quot; &quot;;4-LEN([.J9]));&quot;null&quot;) &amp;&quot;,&quot;&quot;&quot;&amp;[.K$1]&amp;&quot;&quot;&quot;:&quot;&amp;IF([.K9]&lt;&gt;&quot;&quot;;[.K9]&amp;REPT(&quot; &quot;;4-LEN([.K9]));&quot;null&quot;) &amp;&quot;,&quot;&quot;&quot;&amp;[.L$1]&amp;&quot;&quot;&quot;:&quot;&amp;IF([.L9]&lt;&gt;&quot;&quot;;[.L9]&amp;REPT(&quot; &quot;;5-LEN([.L9]));&quot;null &quot;) &amp;&quot;,&quot;&quot;&quot;&amp;[.M$1]&amp;&quot;&quot;&quot;:&quot;&amp;IF([.M9]&lt;&gt;&quot;&quot;;&quot;&quot;&quot;&quot;&amp;[.M9]&amp;&quot;&quot;&quot;&quot;&amp;REPT(&quot; &quot;;20-LEN([.M9]));&quot;null&quot;&amp;REPT(&quot; &quot;;20-4+2)) &amp;&quot;,&quot;&quot;&quot;&amp;[.N$1]&amp;&quot;&quot;&quot;:&quot;&amp;IF([.N9]&lt;&gt;&quot;&quot;;&quot;&quot;&amp;[.N9]&amp;&quot;&quot;&amp;REPT(&quot; &quot;;5-LEN([.N9]));&quot;null&quot;&amp;REPT(&quot; &quot;;5-4+2)) &amp;&quot;,&quot;&quot;&quot;&amp;[.O$1]&amp;&quot;&quot;&quot;:&quot;&amp;[.O9] &amp;&quot;,&quot;&quot;&quot;&amp;[.P$1]&amp;&quot;&quot;&quot;:&quot;&amp;[.P9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7]=&quot;&quot;;&quot; &quot;;IF([.B9]&lt;&gt;&quot;&quot;;&quot;,&quot;;&quot;]&quot;))&#10;&amp;IF([.B9]&lt;&gt;&quot;&quot;;&quot;{&quot;&quot;cmd&quot;&quot;:&quot;&quot;&quot;&amp;[.B9]&amp;&quot;&quot;&quot;&quot;&amp;REPT(&quot; &quot;;20-LEN([.B9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quot;&quot;&amp;[.N9]&amp;&quot;&quot;&quot;&quot;&amp;REPT(&quot; &quot;;30-LEN([.N9]));&quot;null&quot;&amp;REPT(&quot; &quot;;30-4+2))&#10;&amp;&quot;,&quot;&quot;&quot;&amp;[.O$1]&amp;&quot;&quot;&quot;:&quot;&amp;[.O9]&#10;&amp;&quot;,&quot;&quot;&quot;&amp;[.P$1]&amp;&quot;&quot;&quot;:&quot;&amp;[.P9]&#10;&amp;&quot;}}&quot;" office:value-type="string" office:string-value=",&quot;attrs&quot;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0])" office:value-type="float" office:value="0" calcext:value-type="float">
            <text:p>0</text:p>
          </table:table-cell>
          <table:table-cell/>
          <table:table-cell table:style-name="ce17" table:formula="of:=&quot;&quot;&amp;IF([.T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&quot;:&quot; &amp;&quot;{&quot;&quot;&quot;&amp;[.B$1]&amp;&quot;&quot;&quot;:&quot;&quot;&quot;&amp;[.B10]&amp;&quot;&quot;&quot;&quot;&amp;REPT(&quot; &quot;;20-LEN([.B10])) &amp;&quot;,&quot;&quot;&quot;&amp;[.C$1]&amp;&quot;&quot;&quot;:&quot;&quot;&quot;&amp;[.C10]&amp;&quot;&quot;&quot;&quot;&amp;REPT(&quot; &quot;;35-LEN([.C10])) &amp;&quot;,&quot;&quot;&quot;&amp;[.D$1]&amp;&quot;&quot;&quot;:&quot;&amp;[.D10]&amp;REPT(&quot; &quot;;3-LEN([.D10])) &amp;&quot;,&quot;&quot;&quot;&amp;[.E$1]&amp;&quot;&quot;&quot;:&quot;&quot;&quot;&amp;[.E10]&amp;&quot;&quot;&quot;&quot;&amp;REPT(&quot; &quot;;6-LEN([.E10])) &amp;&quot;,&quot;&quot;&quot;&amp;[.F$1]&amp;&quot;&quot;&quot;:&quot;&quot;&quot;&amp;[.F10]&amp;&quot;&quot;&quot;&quot;&amp;REPT(&quot; &quot;;7-LEN([.F10])) &amp;&quot;,&quot;&quot;&quot;&amp;[.G$1]&amp;&quot;&quot;&quot;:&quot;&amp;IF([.G10]&lt;&gt;&quot;&quot;;&quot;&quot;&quot;&quot;&amp;[.G10]&amp;&quot;&quot;&quot;&quot;&amp;REPT(&quot; &quot;;5-LEN([.G10]));&quot;null&quot;&amp;REPT(&quot; &quot;;5-4+2)) &amp;&quot;,&quot;&quot;&quot;&amp;[.H$1]&amp;&quot;&quot;&quot;:&quot;&amp;IF([.H10]&lt;&gt;&quot;&quot;;&quot;&quot;&quot;&quot;&amp;[.H10]&amp;&quot;&quot;&quot;&quot;&amp;REPT(&quot; &quot;;19-LEN([.H10]));&quot;null&quot;&amp;REPT(&quot; &quot;;19-4+2)) &amp;&quot;,&quot;&quot;&quot;&amp;[.I$1]&amp;&quot;&quot;&quot;:&quot;&amp;IF([.I10]&lt;&gt;&quot;&quot;;&quot;&quot;&quot;&quot;&amp;[.I10]&amp;&quot;&quot;&quot;&quot;&amp;REPT(&quot; &quot;;8-LEN([.I10]));&quot;null&quot;&amp;REPT(&quot; &quot;;8-4+2)) &amp;&quot;,&quot;&quot;&quot;&amp;[.J$1]&amp;&quot;&quot;&quot;:&quot;&amp;IF([.J10]&lt;&gt;&quot;&quot;;[.J10]&amp;REPT(&quot; &quot;;4-LEN([.J10]));&quot;null&quot;) &amp;&quot;,&quot;&quot;&quot;&amp;[.K$1]&amp;&quot;&quot;&quot;:&quot;&amp;IF([.K10]&lt;&gt;&quot;&quot;;[.K10]&amp;REPT(&quot; &quot;;4-LEN([.K10]));&quot;null&quot;) &amp;&quot;,&quot;&quot;&quot;&amp;[.L$1]&amp;&quot;&quot;&quot;:&quot;&amp;IF([.L10]&lt;&gt;&quot;&quot;;[.L10]&amp;REPT(&quot; &quot;;5-LEN([.L10]));&quot;null &quot;) &amp;&quot;,&quot;&quot;&quot;&amp;[.M$1]&amp;&quot;&quot;&quot;:&quot;&amp;IF([.M10]&lt;&gt;&quot;&quot;;&quot;&quot;&quot;&quot;&amp;[.M10]&amp;&quot;&quot;&quot;&quot;&amp;REPT(&quot; &quot;;20-LEN([.M10]));&quot;null&quot;&amp;REPT(&quot; &quot;;20-4+2)) &amp;&quot;,&quot;&quot;&quot;&amp;[.N$1]&amp;&quot;&quot;&quot;:&quot;&amp;IF([.N10]&lt;&gt;&quot;&quot;;&quot;&quot;&amp;[.N10]&amp;&quot;&quot;&amp;REPT(&quot; &quot;;5-LEN([.N10]));&quot;null&quot;&amp;REPT(&quot; &quot;;5-4+2)) &amp;&quot;,&quot;&quot;&quot;&amp;[.O$1]&amp;&quot;&quot;&quot;:&quot;&amp;[.O10] &amp;&quot;,&quot;&quot;&quot;&amp;[.P$1]&amp;&quot;&quot;&quot;:&quot;&amp;[.P10] &amp;&quot;}&quot;" office:value-type="string" office:string-value="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9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O$1]&amp;&quot;&quot;&quot;:&quot;&amp;[.O10]&#10;&amp;&quot;,&quot;&quot;&quot;&amp;[.P$1]&amp;&quot;&quot;&quot;:&quot;&amp;[.P10]&#10;&amp;&quot;}}&quot;" office:value-type="string" office:string-value=",&quot;attrs&quot;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&quot;:&quot; &amp;&quot;{&quot;&quot;&quot;&amp;[.B$1]&amp;&quot;&quot;&quot;:&quot;&quot;&quot;&amp;[.B11]&amp;&quot;&quot;&quot;&quot;&amp;REPT(&quot; &quot;;20-LEN([.B11])) &amp;&quot;,&quot;&quot;&quot;&amp;[.C$1]&amp;&quot;&quot;&quot;:&quot;&quot;&quot;&amp;[.C11]&amp;&quot;&quot;&quot;&quot;&amp;REPT(&quot; &quot;;35-LEN([.C11])) &amp;&quot;,&quot;&quot;&quot;&amp;[.D$1]&amp;&quot;&quot;&quot;:&quot;&amp;[.D11]&amp;REPT(&quot; &quot;;3-LEN([.D11])) &amp;&quot;,&quot;&quot;&quot;&amp;[.E$1]&amp;&quot;&quot;&quot;:&quot;&quot;&quot;&amp;[.E11]&amp;&quot;&quot;&quot;&quot;&amp;REPT(&quot; &quot;;6-LEN([.E11])) &amp;&quot;,&quot;&quot;&quot;&amp;[.F$1]&amp;&quot;&quot;&quot;:&quot;&quot;&quot;&amp;[.F11]&amp;&quot;&quot;&quot;&quot;&amp;REPT(&quot; &quot;;7-LEN([.F11])) &amp;&quot;,&quot;&quot;&quot;&amp;[.G$1]&amp;&quot;&quot;&quot;:&quot;&amp;IF([.G11]&lt;&gt;&quot;&quot;;&quot;&quot;&quot;&quot;&amp;[.G11]&amp;&quot;&quot;&quot;&quot;&amp;REPT(&quot; &quot;;5-LEN([.G11]));&quot;null&quot;&amp;REPT(&quot; &quot;;5-4+2)) &amp;&quot;,&quot;&quot;&quot;&amp;[.H$1]&amp;&quot;&quot;&quot;:&quot;&amp;IF([.H11]&lt;&gt;&quot;&quot;;&quot;&quot;&quot;&quot;&amp;[.H11]&amp;&quot;&quot;&quot;&quot;&amp;REPT(&quot; &quot;;19-LEN([.H11]));&quot;null&quot;&amp;REPT(&quot; &quot;;19-4+2)) &amp;&quot;,&quot;&quot;&quot;&amp;[.I$1]&amp;&quot;&quot;&quot;:&quot;&amp;IF([.I11]&lt;&gt;&quot;&quot;;&quot;&quot;&quot;&quot;&amp;[.I11]&amp;&quot;&quot;&quot;&quot;&amp;REPT(&quot; &quot;;8-LEN([.I11]));&quot;null&quot;&amp;REPT(&quot; &quot;;8-4+2)) &amp;&quot;,&quot;&quot;&quot;&amp;[.J$1]&amp;&quot;&quot;&quot;:&quot;&amp;IF([.J11]&lt;&gt;&quot;&quot;;[.J11]&amp;REPT(&quot; &quot;;4-LEN([.J11]));&quot;null&quot;) &amp;&quot;,&quot;&quot;&quot;&amp;[.K$1]&amp;&quot;&quot;&quot;:&quot;&amp;IF([.K11]&lt;&gt;&quot;&quot;;[.K11]&amp;REPT(&quot; &quot;;4-LEN([.K11]));&quot;null&quot;) &amp;&quot;,&quot;&quot;&quot;&amp;[.L$1]&amp;&quot;&quot;&quot;:&quot;&amp;IF([.L11]&lt;&gt;&quot;&quot;;[.L11]&amp;REPT(&quot; &quot;;5-LEN([.L11]));&quot;null &quot;) &amp;&quot;,&quot;&quot;&quot;&amp;[.M$1]&amp;&quot;&quot;&quot;:&quot;&amp;IF([.M11]&lt;&gt;&quot;&quot;;&quot;&quot;&quot;&quot;&amp;[.M11]&amp;&quot;&quot;&quot;&quot;&amp;REPT(&quot; &quot;;20-LEN([.M11]));&quot;null&quot;&amp;REPT(&quot; &quot;;20-4+2)) &amp;&quot;,&quot;&quot;&quot;&amp;[.N$1]&amp;&quot;&quot;&quot;:&quot;&amp;IF([.N11]&lt;&gt;&quot;&quot;;&quot;&quot;&amp;[.N11]&amp;&quot;&quot;&amp;REPT(&quot; &quot;;5-LEN([.N11]));&quot;null&quot;&amp;REPT(&quot; &quot;;5-4+2)) &amp;&quot;,&quot;&quot;&quot;&amp;[.O$1]&amp;&quot;&quot;&quot;:&quot;&amp;[.O11] &amp;&quot;,&quot;&quot;&quot;&amp;[.P$1]&amp;&quot;&quot;&quot;:&quot;&amp;[.P11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12])" office:value-type="float" office:value="3" calcext:value-type="float">
            <text:p>3</text:p>
          </table:table-cell>
          <table:table-cell/>
          <table:table-cell table:style-name="ce17" table:formula="of:=&quot;&quot;&amp;IF([.T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&quot;:&quot; &amp;&quot;{&quot;&quot;&quot;&amp;[.B$1]&amp;&quot;&quot;&quot;:&quot;&quot;&quot;&amp;[.B12]&amp;&quot;&quot;&quot;&quot;&amp;REPT(&quot; &quot;;20-LEN([.B12])) &amp;&quot;,&quot;&quot;&quot;&amp;[.C$1]&amp;&quot;&quot;&quot;:&quot;&quot;&quot;&amp;[.C12]&amp;&quot;&quot;&quot;&quot;&amp;REPT(&quot; &quot;;35-LEN([.C12])) &amp;&quot;,&quot;&quot;&quot;&amp;[.D$1]&amp;&quot;&quot;&quot;:&quot;&amp;[.D12]&amp;REPT(&quot; &quot;;3-LEN([.D12])) &amp;&quot;,&quot;&quot;&quot;&amp;[.E$1]&amp;&quot;&quot;&quot;:&quot;&quot;&quot;&amp;[.E12]&amp;&quot;&quot;&quot;&quot;&amp;REPT(&quot; &quot;;6-LEN([.E12])) &amp;&quot;,&quot;&quot;&quot;&amp;[.F$1]&amp;&quot;&quot;&quot;:&quot;&quot;&quot;&amp;[.F12]&amp;&quot;&quot;&quot;&quot;&amp;REPT(&quot; &quot;;7-LEN([.F12])) &amp;&quot;,&quot;&quot;&quot;&amp;[.G$1]&amp;&quot;&quot;&quot;:&quot;&amp;IF([.G12]&lt;&gt;&quot;&quot;;&quot;&quot;&quot;&quot;&amp;[.G12]&amp;&quot;&quot;&quot;&quot;&amp;REPT(&quot; &quot;;5-LEN([.G12]));&quot;null&quot;&amp;REPT(&quot; &quot;;5-4+2)) &amp;&quot;,&quot;&quot;&quot;&amp;[.H$1]&amp;&quot;&quot;&quot;:&quot;&amp;IF([.H12]&lt;&gt;&quot;&quot;;&quot;&quot;&quot;&quot;&amp;[.H12]&amp;&quot;&quot;&quot;&quot;&amp;REPT(&quot; &quot;;19-LEN([.H12]));&quot;null&quot;&amp;REPT(&quot; &quot;;19-4+2)) &amp;&quot;,&quot;&quot;&quot;&amp;[.I$1]&amp;&quot;&quot;&quot;:&quot;&amp;IF([.I12]&lt;&gt;&quot;&quot;;&quot;&quot;&quot;&quot;&amp;[.I12]&amp;&quot;&quot;&quot;&quot;&amp;REPT(&quot; &quot;;8-LEN([.I12]));&quot;null&quot;&amp;REPT(&quot; &quot;;8-4+2)) &amp;&quot;,&quot;&quot;&quot;&amp;[.J$1]&amp;&quot;&quot;&quot;:&quot;&amp;IF([.J12]&lt;&gt;&quot;&quot;;[.J12]&amp;REPT(&quot; &quot;;4-LEN([.J12]));&quot;null&quot;) &amp;&quot;,&quot;&quot;&quot;&amp;[.K$1]&amp;&quot;&quot;&quot;:&quot;&amp;IF([.K12]&lt;&gt;&quot;&quot;;[.K12]&amp;REPT(&quot; &quot;;4-LEN([.K12]));&quot;null&quot;) &amp;&quot;,&quot;&quot;&quot;&amp;[.L$1]&amp;&quot;&quot;&quot;:&quot;&amp;IF([.L12]&lt;&gt;&quot;&quot;;[.L12]&amp;REPT(&quot; &quot;;5-LEN([.L12]));&quot;null &quot;) &amp;&quot;,&quot;&quot;&quot;&amp;[.M$1]&amp;&quot;&quot;&quot;:&quot;&amp;IF([.M12]&lt;&gt;&quot;&quot;;&quot;&quot;&quot;&quot;&amp;[.M12]&amp;&quot;&quot;&quot;&quot;&amp;REPT(&quot; &quot;;20-LEN([.M12]));&quot;null&quot;&amp;REPT(&quot; &quot;;20-4+2)) &amp;&quot;,&quot;&quot;&quot;&amp;[.N$1]&amp;&quot;&quot;&quot;:&quot;&amp;IF([.N12]&lt;&gt;&quot;&quot;;&quot;&quot;&amp;[.N12]&amp;&quot;&quot;&amp;REPT(&quot; &quot;;5-LEN([.N12]));&quot;null&quot;&amp;REPT(&quot; &quot;;5-4+2)) &amp;&quot;,&quot;&quot;&quot;&amp;[.O$1]&amp;&quot;&quot;&quot;:&quot;&amp;[.O12] &amp;&quot;,&quot;&quot;&quot;&amp;[.P$1]&amp;&quot;&quot;&quot;:&quot;&amp;[.P12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0]=&quot;&quot;;&quot; &quot;;IF([.B12]&lt;&gt;&quot;&quot;;&quot;,&quot;;&quot;]&quot;))&#10;&amp;IF([.B12]&lt;&gt;&quot;&quot;;&quot;{&quot;&quot;cmd&quot;&quot;:&quot;&quot;&quot;&amp;[.B12]&amp;&quot;&quot;&quot;&quot;&amp;REPT(&quot; &quot;;20-LEN([.B12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quot;&quot;&amp;[.N12]&amp;&quot;&quot;&quot;&quot;&amp;REPT(&quot; &quot;;30-LEN([.N12]));&quot;null&quot;&amp;REPT(&quot; &quot;;30-4+2))&#10;&amp;&quot;,&quot;&quot;&quot;&amp;[.O$1]&amp;&quot;&quot;&quot;:&quot;&amp;[.O12]&#10;&amp;&quot;,&quot;&quot;&quot;&amp;[.P$1]&amp;&quot;&quot;&quot;:&quot;&amp;[.P12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13])" office:value-type="float" office:value="0" calcext:value-type="float">
            <text:p>0</text:p>
          </table:table-cell>
          <table:table-cell/>
          <table:table-cell table:style-name="ce17" table:formula="of:=&quot;&quot;&amp;IF([.T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&quot;:&quot; &amp;&quot;{&quot;&quot;&quot;&amp;[.B$1]&amp;&quot;&quot;&quot;:&quot;&quot;&quot;&amp;[.B13]&amp;&quot;&quot;&quot;&quot;&amp;REPT(&quot; &quot;;20-LEN([.B13])) &amp;&quot;,&quot;&quot;&quot;&amp;[.C$1]&amp;&quot;&quot;&quot;:&quot;&quot;&quot;&amp;[.C13]&amp;&quot;&quot;&quot;&quot;&amp;REPT(&quot; &quot;;35-LEN([.C13])) &amp;&quot;,&quot;&quot;&quot;&amp;[.D$1]&amp;&quot;&quot;&quot;:&quot;&amp;[.D13]&amp;REPT(&quot; &quot;;3-LEN([.D13])) &amp;&quot;,&quot;&quot;&quot;&amp;[.E$1]&amp;&quot;&quot;&quot;:&quot;&quot;&quot;&amp;[.E13]&amp;&quot;&quot;&quot;&quot;&amp;REPT(&quot; &quot;;6-LEN([.E13])) &amp;&quot;,&quot;&quot;&quot;&amp;[.F$1]&amp;&quot;&quot;&quot;:&quot;&quot;&quot;&amp;[.F13]&amp;&quot;&quot;&quot;&quot;&amp;REPT(&quot; &quot;;7-LEN([.F13])) &amp;&quot;,&quot;&quot;&quot;&amp;[.G$1]&amp;&quot;&quot;&quot;:&quot;&amp;IF([.G13]&lt;&gt;&quot;&quot;;&quot;&quot;&quot;&quot;&amp;[.G13]&amp;&quot;&quot;&quot;&quot;&amp;REPT(&quot; &quot;;5-LEN([.G13]));&quot;null&quot;&amp;REPT(&quot; &quot;;5-4+2)) &amp;&quot;,&quot;&quot;&quot;&amp;[.H$1]&amp;&quot;&quot;&quot;:&quot;&amp;IF([.H13]&lt;&gt;&quot;&quot;;&quot;&quot;&quot;&quot;&amp;[.H13]&amp;&quot;&quot;&quot;&quot;&amp;REPT(&quot; &quot;;19-LEN([.H13]));&quot;null&quot;&amp;REPT(&quot; &quot;;19-4+2)) &amp;&quot;,&quot;&quot;&quot;&amp;[.I$1]&amp;&quot;&quot;&quot;:&quot;&amp;IF([.I13]&lt;&gt;&quot;&quot;;&quot;&quot;&quot;&quot;&amp;[.I13]&amp;&quot;&quot;&quot;&quot;&amp;REPT(&quot; &quot;;8-LEN([.I13]));&quot;null&quot;&amp;REPT(&quot; &quot;;8-4+2)) &amp;&quot;,&quot;&quot;&quot;&amp;[.J$1]&amp;&quot;&quot;&quot;:&quot;&amp;IF([.J13]&lt;&gt;&quot;&quot;;[.J13]&amp;REPT(&quot; &quot;;4-LEN([.J13]));&quot;null&quot;) &amp;&quot;,&quot;&quot;&quot;&amp;[.K$1]&amp;&quot;&quot;&quot;:&quot;&amp;IF([.K13]&lt;&gt;&quot;&quot;;[.K13]&amp;REPT(&quot; &quot;;4-LEN([.K13]));&quot;null&quot;) &amp;&quot;,&quot;&quot;&quot;&amp;[.L$1]&amp;&quot;&quot;&quot;:&quot;&amp;IF([.L13]&lt;&gt;&quot;&quot;;[.L13]&amp;REPT(&quot; &quot;;5-LEN([.L13]));&quot;null &quot;) &amp;&quot;,&quot;&quot;&quot;&amp;[.M$1]&amp;&quot;&quot;&quot;:&quot;&amp;IF([.M13]&lt;&gt;&quot;&quot;;&quot;&quot;&quot;&quot;&amp;[.M13]&amp;&quot;&quot;&quot;&quot;&amp;REPT(&quot; &quot;;20-LEN([.M13]));&quot;null&quot;&amp;REPT(&quot; &quot;;20-4+2)) &amp;&quot;,&quot;&quot;&quot;&amp;[.N$1]&amp;&quot;&quot;&quot;:&quot;&amp;IF([.N13]&lt;&gt;&quot;&quot;;&quot;&quot;&amp;[.N13]&amp;&quot;&quot;&amp;REPT(&quot; &quot;;5-LEN([.N13]));&quot;null&quot;&amp;REPT(&quot; &quot;;5-4+2)) &amp;&quot;,&quot;&quot;&quot;&amp;[.O$1]&amp;&quot;&quot;&quot;:&quot;&amp;[.O13] &amp;&quot;,&quot;&quot;&quot;&amp;[.P$1]&amp;&quot;&quot;&quot;:&quot;&amp;[.P13] &amp;&quot;}&quot;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2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4])" office:value-type="float" office:value="0" calcext:value-type="float">
            <text:p>0</text:p>
          </table:table-cell>
          <table:table-cell/>
          <table:table-cell table:style-name="ce17" table:formula="of:=&quot;&quot;&amp;IF([.T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&quot;:&quot; &amp;&quot;{&quot;&quot;&quot;&amp;[.B$1]&amp;&quot;&quot;&quot;:&quot;&quot;&quot;&amp;[.B14]&amp;&quot;&quot;&quot;&quot;&amp;REPT(&quot; &quot;;20-LEN([.B14])) &amp;&quot;,&quot;&quot;&quot;&amp;[.C$1]&amp;&quot;&quot;&quot;:&quot;&quot;&quot;&amp;[.C14]&amp;&quot;&quot;&quot;&quot;&amp;REPT(&quot; &quot;;35-LEN([.C14])) &amp;&quot;,&quot;&quot;&quot;&amp;[.D$1]&amp;&quot;&quot;&quot;:&quot;&amp;[.D14]&amp;REPT(&quot; &quot;;3-LEN([.D14])) &amp;&quot;,&quot;&quot;&quot;&amp;[.E$1]&amp;&quot;&quot;&quot;:&quot;&quot;&quot;&amp;[.E14]&amp;&quot;&quot;&quot;&quot;&amp;REPT(&quot; &quot;;6-LEN([.E14])) &amp;&quot;,&quot;&quot;&quot;&amp;[.F$1]&amp;&quot;&quot;&quot;:&quot;&quot;&quot;&amp;[.F14]&amp;&quot;&quot;&quot;&quot;&amp;REPT(&quot; &quot;;7-LEN([.F14])) &amp;&quot;,&quot;&quot;&quot;&amp;[.G$1]&amp;&quot;&quot;&quot;:&quot;&amp;IF([.G14]&lt;&gt;&quot;&quot;;&quot;&quot;&quot;&quot;&amp;[.G14]&amp;&quot;&quot;&quot;&quot;&amp;REPT(&quot; &quot;;5-LEN([.G14]));&quot;null&quot;&amp;REPT(&quot; &quot;;5-4+2)) &amp;&quot;,&quot;&quot;&quot;&amp;[.H$1]&amp;&quot;&quot;&quot;:&quot;&amp;IF([.H14]&lt;&gt;&quot;&quot;;&quot;&quot;&quot;&quot;&amp;[.H14]&amp;&quot;&quot;&quot;&quot;&amp;REPT(&quot; &quot;;19-LEN([.H14]));&quot;null&quot;&amp;REPT(&quot; &quot;;19-4+2)) &amp;&quot;,&quot;&quot;&quot;&amp;[.I$1]&amp;&quot;&quot;&quot;:&quot;&amp;IF([.I14]&lt;&gt;&quot;&quot;;&quot;&quot;&quot;&quot;&amp;[.I14]&amp;&quot;&quot;&quot;&quot;&amp;REPT(&quot; &quot;;8-LEN([.I14]));&quot;null&quot;&amp;REPT(&quot; &quot;;8-4+2)) &amp;&quot;,&quot;&quot;&quot;&amp;[.J$1]&amp;&quot;&quot;&quot;:&quot;&amp;IF([.J14]&lt;&gt;&quot;&quot;;[.J14]&amp;REPT(&quot; &quot;;4-LEN([.J14]));&quot;null&quot;) &amp;&quot;,&quot;&quot;&quot;&amp;[.K$1]&amp;&quot;&quot;&quot;:&quot;&amp;IF([.K14]&lt;&gt;&quot;&quot;;[.K14]&amp;REPT(&quot; &quot;;4-LEN([.K14]));&quot;null&quot;) &amp;&quot;,&quot;&quot;&quot;&amp;[.L$1]&amp;&quot;&quot;&quot;:&quot;&amp;IF([.L14]&lt;&gt;&quot;&quot;;[.L14]&amp;REPT(&quot; &quot;;5-LEN([.L14]));&quot;null &quot;) &amp;&quot;,&quot;&quot;&quot;&amp;[.M$1]&amp;&quot;&quot;&quot;:&quot;&amp;IF([.M14]&lt;&gt;&quot;&quot;;&quot;&quot;&quot;&quot;&amp;[.M14]&amp;&quot;&quot;&quot;&quot;&amp;REPT(&quot; &quot;;20-LEN([.M14]));&quot;null&quot;&amp;REPT(&quot; &quot;;20-4+2)) &amp;&quot;,&quot;&quot;&quot;&amp;[.N$1]&amp;&quot;&quot;&quot;:&quot;&amp;IF([.N14]&lt;&gt;&quot;&quot;;&quot;&quot;&amp;[.N14]&amp;&quot;&quot;&amp;REPT(&quot; &quot;;5-LEN([.N14]));&quot;null&quot;&amp;REPT(&quot; &quot;;5-4+2)) &amp;&quot;,&quot;&quot;&quot;&amp;[.O$1]&amp;&quot;&quot;&quot;:&quot;&amp;[.O14] &amp;&quot;,&quot;&quot;&quot;&amp;[.P$1]&amp;&quot;&quot;&quot;:&quot;&amp;[.P14] &amp;&quot;}&quot;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5])" office:value-type="float" office:value="0" calcext:value-type="float">
            <text:p>0</text:p>
          </table:table-cell>
          <table:table-cell/>
          <table:table-cell table:style-name="ce17" table:formula="of:=&quot;&quot;&amp;IF([.T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&quot;:&quot; &amp;&quot;{&quot;&quot;&quot;&amp;[.B$1]&amp;&quot;&quot;&quot;:&quot;&quot;&quot;&amp;[.B15]&amp;&quot;&quot;&quot;&quot;&amp;REPT(&quot; &quot;;20-LEN([.B15])) &amp;&quot;,&quot;&quot;&quot;&amp;[.C$1]&amp;&quot;&quot;&quot;:&quot;&quot;&quot;&amp;[.C15]&amp;&quot;&quot;&quot;&quot;&amp;REPT(&quot; &quot;;35-LEN([.C15])) &amp;&quot;,&quot;&quot;&quot;&amp;[.D$1]&amp;&quot;&quot;&quot;:&quot;&amp;[.D15]&amp;REPT(&quot; &quot;;3-LEN([.D15])) &amp;&quot;,&quot;&quot;&quot;&amp;[.E$1]&amp;&quot;&quot;&quot;:&quot;&quot;&quot;&amp;[.E15]&amp;&quot;&quot;&quot;&quot;&amp;REPT(&quot; &quot;;6-LEN([.E15])) &amp;&quot;,&quot;&quot;&quot;&amp;[.F$1]&amp;&quot;&quot;&quot;:&quot;&quot;&quot;&amp;[.F15]&amp;&quot;&quot;&quot;&quot;&amp;REPT(&quot; &quot;;7-LEN([.F15])) &amp;&quot;,&quot;&quot;&quot;&amp;[.G$1]&amp;&quot;&quot;&quot;:&quot;&amp;IF([.G15]&lt;&gt;&quot;&quot;;&quot;&quot;&quot;&quot;&amp;[.G15]&amp;&quot;&quot;&quot;&quot;&amp;REPT(&quot; &quot;;5-LEN([.G15]));&quot;null&quot;&amp;REPT(&quot; &quot;;5-4+2)) &amp;&quot;,&quot;&quot;&quot;&amp;[.H$1]&amp;&quot;&quot;&quot;:&quot;&amp;IF([.H15]&lt;&gt;&quot;&quot;;&quot;&quot;&quot;&quot;&amp;[.H15]&amp;&quot;&quot;&quot;&quot;&amp;REPT(&quot; &quot;;19-LEN([.H15]));&quot;null&quot;&amp;REPT(&quot; &quot;;19-4+2)) &amp;&quot;,&quot;&quot;&quot;&amp;[.I$1]&amp;&quot;&quot;&quot;:&quot;&amp;IF([.I15]&lt;&gt;&quot;&quot;;&quot;&quot;&quot;&quot;&amp;[.I15]&amp;&quot;&quot;&quot;&quot;&amp;REPT(&quot; &quot;;8-LEN([.I15]));&quot;null&quot;&amp;REPT(&quot; &quot;;8-4+2)) &amp;&quot;,&quot;&quot;&quot;&amp;[.J$1]&amp;&quot;&quot;&quot;:&quot;&amp;IF([.J15]&lt;&gt;&quot;&quot;;[.J15]&amp;REPT(&quot; &quot;;4-LEN([.J15]));&quot;null&quot;) &amp;&quot;,&quot;&quot;&quot;&amp;[.K$1]&amp;&quot;&quot;&quot;:&quot;&amp;IF([.K15]&lt;&gt;&quot;&quot;;[.K15]&amp;REPT(&quot; &quot;;4-LEN([.K15]));&quot;null&quot;) &amp;&quot;,&quot;&quot;&quot;&amp;[.L$1]&amp;&quot;&quot;&quot;:&quot;&amp;IF([.L15]&lt;&gt;&quot;&quot;;[.L15]&amp;REPT(&quot; &quot;;5-LEN([.L15]));&quot;null &quot;) &amp;&quot;,&quot;&quot;&quot;&amp;[.M$1]&amp;&quot;&quot;&quot;:&quot;&amp;IF([.M15]&lt;&gt;&quot;&quot;;&quot;&quot;&quot;&quot;&amp;[.M15]&amp;&quot;&quot;&quot;&quot;&amp;REPT(&quot; &quot;;20-LEN([.M15]));&quot;null&quot;&amp;REPT(&quot; &quot;;20-4+2)) &amp;&quot;,&quot;&quot;&quot;&amp;[.N$1]&amp;&quot;&quot;&quot;:&quot;&amp;IF([.N15]&lt;&gt;&quot;&quot;;&quot;&quot;&amp;[.N15]&amp;&quot;&quot;&amp;REPT(&quot; &quot;;5-LEN([.N15]));&quot;null&quot;&amp;REPT(&quot; &quot;;5-4+2)) &amp;&quot;,&quot;&quot;&quot;&amp;[.O$1]&amp;&quot;&quot;&quot;:&quot;&amp;[.O15] &amp;&quot;,&quot;&quot;&quot;&amp;[.P$1]&amp;&quot;&quot;&quot;:&quot;&amp;[.P15] &amp;&quot;}&quot;" office:value-type="string" office:string-value="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6])" office:value-type="float" office:value="0" calcext:value-type="float">
            <text:p>0</text:p>
          </table:table-cell>
          <table:table-cell/>
          <table:table-cell table:style-name="ce17" table:formula="of:=&quot;&quot;&amp;IF([.T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&quot;:&quot; &amp;&quot;{&quot;&quot;&quot;&amp;[.B$1]&amp;&quot;&quot;&quot;:&quot;&quot;&quot;&amp;[.B16]&amp;&quot;&quot;&quot;&quot;&amp;REPT(&quot; &quot;;20-LEN([.B16])) &amp;&quot;,&quot;&quot;&quot;&amp;[.C$1]&amp;&quot;&quot;&quot;:&quot;&quot;&quot;&amp;[.C16]&amp;&quot;&quot;&quot;&quot;&amp;REPT(&quot; &quot;;35-LEN([.C16])) &amp;&quot;,&quot;&quot;&quot;&amp;[.D$1]&amp;&quot;&quot;&quot;:&quot;&amp;[.D16]&amp;REPT(&quot; &quot;;3-LEN([.D16])) &amp;&quot;,&quot;&quot;&quot;&amp;[.E$1]&amp;&quot;&quot;&quot;:&quot;&quot;&quot;&amp;[.E16]&amp;&quot;&quot;&quot;&quot;&amp;REPT(&quot; &quot;;6-LEN([.E16])) &amp;&quot;,&quot;&quot;&quot;&amp;[.F$1]&amp;&quot;&quot;&quot;:&quot;&quot;&quot;&amp;[.F16]&amp;&quot;&quot;&quot;&quot;&amp;REPT(&quot; &quot;;7-LEN([.F16])) &amp;&quot;,&quot;&quot;&quot;&amp;[.G$1]&amp;&quot;&quot;&quot;:&quot;&amp;IF([.G16]&lt;&gt;&quot;&quot;;&quot;&quot;&quot;&quot;&amp;[.G16]&amp;&quot;&quot;&quot;&quot;&amp;REPT(&quot; &quot;;5-LEN([.G16]));&quot;null&quot;&amp;REPT(&quot; &quot;;5-4+2)) &amp;&quot;,&quot;&quot;&quot;&amp;[.H$1]&amp;&quot;&quot;&quot;:&quot;&amp;IF([.H16]&lt;&gt;&quot;&quot;;&quot;&quot;&quot;&quot;&amp;[.H16]&amp;&quot;&quot;&quot;&quot;&amp;REPT(&quot; &quot;;19-LEN([.H16]));&quot;null&quot;&amp;REPT(&quot; &quot;;19-4+2)) &amp;&quot;,&quot;&quot;&quot;&amp;[.I$1]&amp;&quot;&quot;&quot;:&quot;&amp;IF([.I16]&lt;&gt;&quot;&quot;;&quot;&quot;&quot;&quot;&amp;[.I16]&amp;&quot;&quot;&quot;&quot;&amp;REPT(&quot; &quot;;8-LEN([.I16]));&quot;null&quot;&amp;REPT(&quot; &quot;;8-4+2)) &amp;&quot;,&quot;&quot;&quot;&amp;[.J$1]&amp;&quot;&quot;&quot;:&quot;&amp;IF([.J16]&lt;&gt;&quot;&quot;;[.J16]&amp;REPT(&quot; &quot;;4-LEN([.J16]));&quot;null&quot;) &amp;&quot;,&quot;&quot;&quot;&amp;[.K$1]&amp;&quot;&quot;&quot;:&quot;&amp;IF([.K16]&lt;&gt;&quot;&quot;;[.K16]&amp;REPT(&quot; &quot;;4-LEN([.K16]));&quot;null&quot;) &amp;&quot;,&quot;&quot;&quot;&amp;[.L$1]&amp;&quot;&quot;&quot;:&quot;&amp;IF([.L16]&lt;&gt;&quot;&quot;;[.L16]&amp;REPT(&quot; &quot;;5-LEN([.L16]));&quot;null &quot;) &amp;&quot;,&quot;&quot;&quot;&amp;[.M$1]&amp;&quot;&quot;&quot;:&quot;&amp;IF([.M16]&lt;&gt;&quot;&quot;;&quot;&quot;&quot;&quot;&amp;[.M16]&amp;&quot;&quot;&quot;&quot;&amp;REPT(&quot; &quot;;20-LEN([.M16]));&quot;null&quot;&amp;REPT(&quot; &quot;;20-4+2)) &amp;&quot;,&quot;&quot;&quot;&amp;[.N$1]&amp;&quot;&quot;&quot;:&quot;&amp;IF([.N16]&lt;&gt;&quot;&quot;;&quot;&quot;&amp;[.N16]&amp;&quot;&quot;&amp;REPT(&quot; &quot;;5-LEN([.N16]));&quot;null&quot;&amp;REPT(&quot; &quot;;5-4+2)) &amp;&quot;,&quot;&quot;&quot;&amp;[.O$1]&amp;&quot;&quot;&quot;:&quot;&amp;[.O16] &amp;&quot;,&quot;&quot;&quot;&amp;[.P$1]&amp;&quot;&quot;&quot;:&quot;&amp;[.P16] &amp;&quot;}&quot;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7])" office:value-type="float" office:value="0" calcext:value-type="float">
            <text:p>0</text:p>
          </table:table-cell>
          <table:table-cell/>
          <table:table-cell table:style-name="ce17" table:formula="of:=&quot;&quot;&amp;IF([.T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&quot;:&quot; &amp;&quot;{&quot;&quot;&quot;&amp;[.B$1]&amp;&quot;&quot;&quot;:&quot;&quot;&quot;&amp;[.B17]&amp;&quot;&quot;&quot;&quot;&amp;REPT(&quot; &quot;;20-LEN([.B17])) &amp;&quot;,&quot;&quot;&quot;&amp;[.C$1]&amp;&quot;&quot;&quot;:&quot;&quot;&quot;&amp;[.C17]&amp;&quot;&quot;&quot;&quot;&amp;REPT(&quot; &quot;;35-LEN([.C17])) &amp;&quot;,&quot;&quot;&quot;&amp;[.D$1]&amp;&quot;&quot;&quot;:&quot;&amp;[.D17]&amp;REPT(&quot; &quot;;3-LEN([.D17])) &amp;&quot;,&quot;&quot;&quot;&amp;[.E$1]&amp;&quot;&quot;&quot;:&quot;&quot;&quot;&amp;[.E17]&amp;&quot;&quot;&quot;&quot;&amp;REPT(&quot; &quot;;6-LEN([.E17])) &amp;&quot;,&quot;&quot;&quot;&amp;[.F$1]&amp;&quot;&quot;&quot;:&quot;&quot;&quot;&amp;[.F17]&amp;&quot;&quot;&quot;&quot;&amp;REPT(&quot; &quot;;7-LEN([.F17])) &amp;&quot;,&quot;&quot;&quot;&amp;[.G$1]&amp;&quot;&quot;&quot;:&quot;&amp;IF([.G17]&lt;&gt;&quot;&quot;;&quot;&quot;&quot;&quot;&amp;[.G17]&amp;&quot;&quot;&quot;&quot;&amp;REPT(&quot; &quot;;5-LEN([.G17]));&quot;null&quot;&amp;REPT(&quot; &quot;;5-4+2)) &amp;&quot;,&quot;&quot;&quot;&amp;[.H$1]&amp;&quot;&quot;&quot;:&quot;&amp;IF([.H17]&lt;&gt;&quot;&quot;;&quot;&quot;&quot;&quot;&amp;[.H17]&amp;&quot;&quot;&quot;&quot;&amp;REPT(&quot; &quot;;19-LEN([.H17]));&quot;null&quot;&amp;REPT(&quot; &quot;;19-4+2)) &amp;&quot;,&quot;&quot;&quot;&amp;[.I$1]&amp;&quot;&quot;&quot;:&quot;&amp;IF([.I17]&lt;&gt;&quot;&quot;;&quot;&quot;&quot;&quot;&amp;[.I17]&amp;&quot;&quot;&quot;&quot;&amp;REPT(&quot; &quot;;8-LEN([.I17]));&quot;null&quot;&amp;REPT(&quot; &quot;;8-4+2)) &amp;&quot;,&quot;&quot;&quot;&amp;[.J$1]&amp;&quot;&quot;&quot;:&quot;&amp;IF([.J17]&lt;&gt;&quot;&quot;;[.J17]&amp;REPT(&quot; &quot;;4-LEN([.J17]));&quot;null&quot;) &amp;&quot;,&quot;&quot;&quot;&amp;[.K$1]&amp;&quot;&quot;&quot;:&quot;&amp;IF([.K17]&lt;&gt;&quot;&quot;;[.K17]&amp;REPT(&quot; &quot;;4-LEN([.K17]));&quot;null&quot;) &amp;&quot;,&quot;&quot;&quot;&amp;[.L$1]&amp;&quot;&quot;&quot;:&quot;&amp;IF([.L17]&lt;&gt;&quot;&quot;;[.L17]&amp;REPT(&quot; &quot;;5-LEN([.L17]));&quot;null &quot;) &amp;&quot;,&quot;&quot;&quot;&amp;[.M$1]&amp;&quot;&quot;&quot;:&quot;&amp;IF([.M17]&lt;&gt;&quot;&quot;;&quot;&quot;&quot;&quot;&amp;[.M17]&amp;&quot;&quot;&quot;&quot;&amp;REPT(&quot; &quot;;20-LEN([.M17]));&quot;null&quot;&amp;REPT(&quot; &quot;;20-4+2)) &amp;&quot;,&quot;&quot;&quot;&amp;[.N$1]&amp;&quot;&quot;&quot;:&quot;&amp;IF([.N17]&lt;&gt;&quot;&quot;;&quot;&quot;&amp;[.N17]&amp;&quot;&quot;&amp;REPT(&quot; &quot;;5-LEN([.N17]));&quot;null&quot;&amp;REPT(&quot; &quot;;5-4+2)) &amp;&quot;,&quot;&quot;&quot;&amp;[.O$1]&amp;&quot;&quot;&quot;:&quot;&amp;[.O17] &amp;&quot;,&quot;&quot;&quot;&amp;[.P$1]&amp;&quot;&quot;&quot;:&quot;&amp;[.P17] &amp;&quot;}&quot;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8])" office:value-type="float" office:value="0" calcext:value-type="float">
            <text:p>0</text:p>
          </table:table-cell>
          <table:table-cell/>
          <table:table-cell table:style-name="ce17" table:formula="of:=&quot;&quot;&amp;IF([.T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&quot;:&quot; &amp;&quot;{&quot;&quot;&quot;&amp;[.B$1]&amp;&quot;&quot;&quot;:&quot;&quot;&quot;&amp;[.B18]&amp;&quot;&quot;&quot;&quot;&amp;REPT(&quot; &quot;;20-LEN([.B18])) &amp;&quot;,&quot;&quot;&quot;&amp;[.C$1]&amp;&quot;&quot;&quot;:&quot;&quot;&quot;&amp;[.C18]&amp;&quot;&quot;&quot;&quot;&amp;REPT(&quot; &quot;;35-LEN([.C18])) &amp;&quot;,&quot;&quot;&quot;&amp;[.D$1]&amp;&quot;&quot;&quot;:&quot;&amp;[.D18]&amp;REPT(&quot; &quot;;3-LEN([.D18])) &amp;&quot;,&quot;&quot;&quot;&amp;[.E$1]&amp;&quot;&quot;&quot;:&quot;&quot;&quot;&amp;[.E18]&amp;&quot;&quot;&quot;&quot;&amp;REPT(&quot; &quot;;6-LEN([.E18])) &amp;&quot;,&quot;&quot;&quot;&amp;[.F$1]&amp;&quot;&quot;&quot;:&quot;&quot;&quot;&amp;[.F18]&amp;&quot;&quot;&quot;&quot;&amp;REPT(&quot; &quot;;7-LEN([.F18])) &amp;&quot;,&quot;&quot;&quot;&amp;[.G$1]&amp;&quot;&quot;&quot;:&quot;&amp;IF([.G18]&lt;&gt;&quot;&quot;;&quot;&quot;&quot;&quot;&amp;[.G18]&amp;&quot;&quot;&quot;&quot;&amp;REPT(&quot; &quot;;5-LEN([.G18]));&quot;null&quot;&amp;REPT(&quot; &quot;;5-4+2)) &amp;&quot;,&quot;&quot;&quot;&amp;[.H$1]&amp;&quot;&quot;&quot;:&quot;&amp;IF([.H18]&lt;&gt;&quot;&quot;;&quot;&quot;&quot;&quot;&amp;[.H18]&amp;&quot;&quot;&quot;&quot;&amp;REPT(&quot; &quot;;19-LEN([.H18]));&quot;null&quot;&amp;REPT(&quot; &quot;;19-4+2)) &amp;&quot;,&quot;&quot;&quot;&amp;[.I$1]&amp;&quot;&quot;&quot;:&quot;&amp;IF([.I18]&lt;&gt;&quot;&quot;;&quot;&quot;&quot;&quot;&amp;[.I18]&amp;&quot;&quot;&quot;&quot;&amp;REPT(&quot; &quot;;8-LEN([.I18]));&quot;null&quot;&amp;REPT(&quot; &quot;;8-4+2)) &amp;&quot;,&quot;&quot;&quot;&amp;[.J$1]&amp;&quot;&quot;&quot;:&quot;&amp;IF([.J18]&lt;&gt;&quot;&quot;;[.J18]&amp;REPT(&quot; &quot;;4-LEN([.J18]));&quot;null&quot;) &amp;&quot;,&quot;&quot;&quot;&amp;[.K$1]&amp;&quot;&quot;&quot;:&quot;&amp;IF([.K18]&lt;&gt;&quot;&quot;;[.K18]&amp;REPT(&quot; &quot;;4-LEN([.K18]));&quot;null&quot;) &amp;&quot;,&quot;&quot;&quot;&amp;[.L$1]&amp;&quot;&quot;&quot;:&quot;&amp;IF([.L18]&lt;&gt;&quot;&quot;;[.L18]&amp;REPT(&quot; &quot;;5-LEN([.L18]));&quot;null &quot;) &amp;&quot;,&quot;&quot;&quot;&amp;[.M$1]&amp;&quot;&quot;&quot;:&quot;&amp;IF([.M18]&lt;&gt;&quot;&quot;;&quot;&quot;&quot;&quot;&amp;[.M18]&amp;&quot;&quot;&quot;&quot;&amp;REPT(&quot; &quot;;20-LEN([.M18]));&quot;null&quot;&amp;REPT(&quot; &quot;;20-4+2)) &amp;&quot;,&quot;&quot;&quot;&amp;[.N$1]&amp;&quot;&quot;&quot;:&quot;&amp;IF([.N18]&lt;&gt;&quot;&quot;;&quot;&quot;&amp;[.N18]&amp;&quot;&quot;&amp;REPT(&quot; &quot;;5-LEN([.N18]));&quot;null&quot;&amp;REPT(&quot; &quot;;5-4+2)) &amp;&quot;,&quot;&quot;&quot;&amp;[.O$1]&amp;&quot;&quot;&quot;:&quot;&amp;[.O18] &amp;&quot;,&quot;&quot;&quot;&amp;[.P$1]&amp;&quot;&quot;&quot;:&quot;&amp;[.P18] &amp;&quot;}&quot;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9])" office:value-type="float" office:value="0" calcext:value-type="float">
            <text:p>0</text:p>
          </table:table-cell>
          <table:table-cell/>
          <table:table-cell table:style-name="ce17" table:formula="of:=&quot;&quot;&amp;IF([.T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&quot;:&quot; &amp;&quot;{&quot;&quot;&quot;&amp;[.B$1]&amp;&quot;&quot;&quot;:&quot;&quot;&quot;&amp;[.B19]&amp;&quot;&quot;&quot;&quot;&amp;REPT(&quot; &quot;;20-LEN([.B19])) &amp;&quot;,&quot;&quot;&quot;&amp;[.C$1]&amp;&quot;&quot;&quot;:&quot;&quot;&quot;&amp;[.C19]&amp;&quot;&quot;&quot;&quot;&amp;REPT(&quot; &quot;;35-LEN([.C19])) &amp;&quot;,&quot;&quot;&quot;&amp;[.D$1]&amp;&quot;&quot;&quot;:&quot;&amp;[.D19]&amp;REPT(&quot; &quot;;3-LEN([.D19])) &amp;&quot;,&quot;&quot;&quot;&amp;[.E$1]&amp;&quot;&quot;&quot;:&quot;&quot;&quot;&amp;[.E19]&amp;&quot;&quot;&quot;&quot;&amp;REPT(&quot; &quot;;6-LEN([.E19])) &amp;&quot;,&quot;&quot;&quot;&amp;[.F$1]&amp;&quot;&quot;&quot;:&quot;&quot;&quot;&amp;[.F19]&amp;&quot;&quot;&quot;&quot;&amp;REPT(&quot; &quot;;7-LEN([.F19])) &amp;&quot;,&quot;&quot;&quot;&amp;[.G$1]&amp;&quot;&quot;&quot;:&quot;&amp;IF([.G19]&lt;&gt;&quot;&quot;;&quot;&quot;&quot;&quot;&amp;[.G19]&amp;&quot;&quot;&quot;&quot;&amp;REPT(&quot; &quot;;5-LEN([.G19]));&quot;null&quot;&amp;REPT(&quot; &quot;;5-4+2)) &amp;&quot;,&quot;&quot;&quot;&amp;[.H$1]&amp;&quot;&quot;&quot;:&quot;&amp;IF([.H19]&lt;&gt;&quot;&quot;;&quot;&quot;&quot;&quot;&amp;[.H19]&amp;&quot;&quot;&quot;&quot;&amp;REPT(&quot; &quot;;19-LEN([.H19]));&quot;null&quot;&amp;REPT(&quot; &quot;;19-4+2)) &amp;&quot;,&quot;&quot;&quot;&amp;[.I$1]&amp;&quot;&quot;&quot;:&quot;&amp;IF([.I19]&lt;&gt;&quot;&quot;;&quot;&quot;&quot;&quot;&amp;[.I19]&amp;&quot;&quot;&quot;&quot;&amp;REPT(&quot; &quot;;8-LEN([.I19]));&quot;null&quot;&amp;REPT(&quot; &quot;;8-4+2)) &amp;&quot;,&quot;&quot;&quot;&amp;[.J$1]&amp;&quot;&quot;&quot;:&quot;&amp;IF([.J19]&lt;&gt;&quot;&quot;;[.J19]&amp;REPT(&quot; &quot;;4-LEN([.J19]));&quot;null&quot;) &amp;&quot;,&quot;&quot;&quot;&amp;[.K$1]&amp;&quot;&quot;&quot;:&quot;&amp;IF([.K19]&lt;&gt;&quot;&quot;;[.K19]&amp;REPT(&quot; &quot;;4-LEN([.K19]));&quot;null&quot;) &amp;&quot;,&quot;&quot;&quot;&amp;[.L$1]&amp;&quot;&quot;&quot;:&quot;&amp;IF([.L19]&lt;&gt;&quot;&quot;;[.L19]&amp;REPT(&quot; &quot;;5-LEN([.L19]));&quot;null &quot;) &amp;&quot;,&quot;&quot;&quot;&amp;[.M$1]&amp;&quot;&quot;&quot;:&quot;&amp;IF([.M19]&lt;&gt;&quot;&quot;;&quot;&quot;&quot;&quot;&amp;[.M19]&amp;&quot;&quot;&quot;&quot;&amp;REPT(&quot; &quot;;20-LEN([.M19]));&quot;null&quot;&amp;REPT(&quot; &quot;;20-4+2)) &amp;&quot;,&quot;&quot;&quot;&amp;[.N$1]&amp;&quot;&quot;&quot;:&quot;&amp;IF([.N19]&lt;&gt;&quot;&quot;;&quot;&quot;&amp;[.N19]&amp;&quot;&quot;&amp;REPT(&quot; &quot;;5-LEN([.N19]));&quot;null&quot;&amp;REPT(&quot; &quot;;5-4+2)) &amp;&quot;,&quot;&quot;&quot;&amp;[.O$1]&amp;&quot;&quot;&quot;:&quot;&amp;[.O19] &amp;&quot;,&quot;&quot;&quot;&amp;[.P$1]&amp;&quot;&quot;&quot;:&quot;&amp;[.P19] &amp;&quot;}&quot;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0])" office:value-type="float" office:value="0" calcext:value-type="float">
            <text:p>0</text:p>
          </table:table-cell>
          <table:table-cell/>
          <table:table-cell table:style-name="ce17" table:formula="of:=&quot;&quot;&amp;IF([.T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&quot;:&quot; &amp;&quot;{&quot;&quot;&quot;&amp;[.B$1]&amp;&quot;&quot;&quot;:&quot;&quot;&quot;&amp;[.B20]&amp;&quot;&quot;&quot;&quot;&amp;REPT(&quot; &quot;;20-LEN([.B20])) &amp;&quot;,&quot;&quot;&quot;&amp;[.C$1]&amp;&quot;&quot;&quot;:&quot;&quot;&quot;&amp;[.C20]&amp;&quot;&quot;&quot;&quot;&amp;REPT(&quot; &quot;;35-LEN([.C20])) &amp;&quot;,&quot;&quot;&quot;&amp;[.D$1]&amp;&quot;&quot;&quot;:&quot;&amp;[.D20]&amp;REPT(&quot; &quot;;3-LEN([.D20])) &amp;&quot;,&quot;&quot;&quot;&amp;[.E$1]&amp;&quot;&quot;&quot;:&quot;&quot;&quot;&amp;[.E20]&amp;&quot;&quot;&quot;&quot;&amp;REPT(&quot; &quot;;6-LEN([.E20])) &amp;&quot;,&quot;&quot;&quot;&amp;[.F$1]&amp;&quot;&quot;&quot;:&quot;&quot;&quot;&amp;[.F20]&amp;&quot;&quot;&quot;&quot;&amp;REPT(&quot; &quot;;7-LEN([.F20])) &amp;&quot;,&quot;&quot;&quot;&amp;[.G$1]&amp;&quot;&quot;&quot;:&quot;&amp;IF([.G20]&lt;&gt;&quot;&quot;;&quot;&quot;&quot;&quot;&amp;[.G20]&amp;&quot;&quot;&quot;&quot;&amp;REPT(&quot; &quot;;5-LEN([.G20]));&quot;null&quot;&amp;REPT(&quot; &quot;;5-4+2)) &amp;&quot;,&quot;&quot;&quot;&amp;[.H$1]&amp;&quot;&quot;&quot;:&quot;&amp;IF([.H20]&lt;&gt;&quot;&quot;;&quot;&quot;&quot;&quot;&amp;[.H20]&amp;&quot;&quot;&quot;&quot;&amp;REPT(&quot; &quot;;19-LEN([.H20]));&quot;null&quot;&amp;REPT(&quot; &quot;;19-4+2)) &amp;&quot;,&quot;&quot;&quot;&amp;[.I$1]&amp;&quot;&quot;&quot;:&quot;&amp;IF([.I20]&lt;&gt;&quot;&quot;;&quot;&quot;&quot;&quot;&amp;[.I20]&amp;&quot;&quot;&quot;&quot;&amp;REPT(&quot; &quot;;8-LEN([.I20]));&quot;null&quot;&amp;REPT(&quot; &quot;;8-4+2)) &amp;&quot;,&quot;&quot;&quot;&amp;[.J$1]&amp;&quot;&quot;&quot;:&quot;&amp;IF([.J20]&lt;&gt;&quot;&quot;;[.J20]&amp;REPT(&quot; &quot;;4-LEN([.J20]));&quot;null&quot;) &amp;&quot;,&quot;&quot;&quot;&amp;[.K$1]&amp;&quot;&quot;&quot;:&quot;&amp;IF([.K20]&lt;&gt;&quot;&quot;;[.K20]&amp;REPT(&quot; &quot;;4-LEN([.K20]));&quot;null&quot;) &amp;&quot;,&quot;&quot;&quot;&amp;[.L$1]&amp;&quot;&quot;&quot;:&quot;&amp;IF([.L20]&lt;&gt;&quot;&quot;;[.L20]&amp;REPT(&quot; &quot;;5-LEN([.L20]));&quot;null &quot;) &amp;&quot;,&quot;&quot;&quot;&amp;[.M$1]&amp;&quot;&quot;&quot;:&quot;&amp;IF([.M20]&lt;&gt;&quot;&quot;;&quot;&quot;&quot;&quot;&amp;[.M20]&amp;&quot;&quot;&quot;&quot;&amp;REPT(&quot; &quot;;20-LEN([.M20]));&quot;null&quot;&amp;REPT(&quot; &quot;;20-4+2)) &amp;&quot;,&quot;&quot;&quot;&amp;[.N$1]&amp;&quot;&quot;&quot;:&quot;&amp;IF([.N20]&lt;&gt;&quot;&quot;;&quot;&quot;&amp;[.N20]&amp;&quot;&quot;&amp;REPT(&quot; &quot;;5-LEN([.N20]));&quot;null&quot;&amp;REPT(&quot; &quot;;5-4+2)) &amp;&quot;,&quot;&quot;&quot;&amp;[.O$1]&amp;&quot;&quot;&quot;:&quot;&amp;[.O20] &amp;&quot;,&quot;&quot;&quot;&amp;[.P$1]&amp;&quot;&quot;&quot;:&quot;&amp;[.P20] &amp;&quot;}&quot;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1])" office:value-type="float" office:value="0" calcext:value-type="float">
            <text:p>0</text:p>
          </table:table-cell>
          <table:table-cell/>
          <table:table-cell table:style-name="ce17" table:formula="of:=&quot;&quot;&amp;IF([.T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&quot;:&quot; &amp;&quot;{&quot;&quot;&quot;&amp;[.B$1]&amp;&quot;&quot;&quot;:&quot;&quot;&quot;&amp;[.B21]&amp;&quot;&quot;&quot;&quot;&amp;REPT(&quot; &quot;;20-LEN([.B21])) &amp;&quot;,&quot;&quot;&quot;&amp;[.C$1]&amp;&quot;&quot;&quot;:&quot;&quot;&quot;&amp;[.C21]&amp;&quot;&quot;&quot;&quot;&amp;REPT(&quot; &quot;;35-LEN([.C21])) &amp;&quot;,&quot;&quot;&quot;&amp;[.D$1]&amp;&quot;&quot;&quot;:&quot;&amp;[.D21]&amp;REPT(&quot; &quot;;3-LEN([.D21])) &amp;&quot;,&quot;&quot;&quot;&amp;[.E$1]&amp;&quot;&quot;&quot;:&quot;&quot;&quot;&amp;[.E21]&amp;&quot;&quot;&quot;&quot;&amp;REPT(&quot; &quot;;6-LEN([.E21])) &amp;&quot;,&quot;&quot;&quot;&amp;[.F$1]&amp;&quot;&quot;&quot;:&quot;&quot;&quot;&amp;[.F21]&amp;&quot;&quot;&quot;&quot;&amp;REPT(&quot; &quot;;7-LEN([.F21])) &amp;&quot;,&quot;&quot;&quot;&amp;[.G$1]&amp;&quot;&quot;&quot;:&quot;&amp;IF([.G21]&lt;&gt;&quot;&quot;;&quot;&quot;&quot;&quot;&amp;[.G21]&amp;&quot;&quot;&quot;&quot;&amp;REPT(&quot; &quot;;5-LEN([.G21]));&quot;null&quot;&amp;REPT(&quot; &quot;;5-4+2)) &amp;&quot;,&quot;&quot;&quot;&amp;[.H$1]&amp;&quot;&quot;&quot;:&quot;&amp;IF([.H21]&lt;&gt;&quot;&quot;;&quot;&quot;&quot;&quot;&amp;[.H21]&amp;&quot;&quot;&quot;&quot;&amp;REPT(&quot; &quot;;19-LEN([.H21]));&quot;null&quot;&amp;REPT(&quot; &quot;;19-4+2)) &amp;&quot;,&quot;&quot;&quot;&amp;[.I$1]&amp;&quot;&quot;&quot;:&quot;&amp;IF([.I21]&lt;&gt;&quot;&quot;;&quot;&quot;&quot;&quot;&amp;[.I21]&amp;&quot;&quot;&quot;&quot;&amp;REPT(&quot; &quot;;8-LEN([.I21]));&quot;null&quot;&amp;REPT(&quot; &quot;;8-4+2)) &amp;&quot;,&quot;&quot;&quot;&amp;[.J$1]&amp;&quot;&quot;&quot;:&quot;&amp;IF([.J21]&lt;&gt;&quot;&quot;;[.J21]&amp;REPT(&quot; &quot;;4-LEN([.J21]));&quot;null&quot;) &amp;&quot;,&quot;&quot;&quot;&amp;[.K$1]&amp;&quot;&quot;&quot;:&quot;&amp;IF([.K21]&lt;&gt;&quot;&quot;;[.K21]&amp;REPT(&quot; &quot;;4-LEN([.K21]));&quot;null&quot;) &amp;&quot;,&quot;&quot;&quot;&amp;[.L$1]&amp;&quot;&quot;&quot;:&quot;&amp;IF([.L21]&lt;&gt;&quot;&quot;;[.L21]&amp;REPT(&quot; &quot;;5-LEN([.L21]));&quot;null &quot;) &amp;&quot;,&quot;&quot;&quot;&amp;[.M$1]&amp;&quot;&quot;&quot;:&quot;&amp;IF([.M21]&lt;&gt;&quot;&quot;;&quot;&quot;&quot;&quot;&amp;[.M21]&amp;&quot;&quot;&quot;&quot;&amp;REPT(&quot; &quot;;20-LEN([.M21]));&quot;null&quot;&amp;REPT(&quot; &quot;;20-4+2)) &amp;&quot;,&quot;&quot;&quot;&amp;[.N$1]&amp;&quot;&quot;&quot;:&quot;&amp;IF([.N21]&lt;&gt;&quot;&quot;;&quot;&quot;&amp;[.N21]&amp;&quot;&quot;&amp;REPT(&quot; &quot;;5-LEN([.N21]));&quot;null&quot;&amp;REPT(&quot; &quot;;5-4+2)) &amp;&quot;,&quot;&quot;&quot;&amp;[.O$1]&amp;&quot;&quot;&quot;:&quot;&amp;[.O21] &amp;&quot;,&quot;&quot;&quot;&amp;[.P$1]&amp;&quot;&quot;&quot;:&quot;&amp;[.P21] &amp;&quot;}&quot;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2])" office:value-type="float" office:value="0" calcext:value-type="float">
            <text:p>0</text:p>
          </table:table-cell>
          <table:table-cell/>
          <table:table-cell table:style-name="ce17" table:formula="of:=&quot;&quot;&amp;IF([.T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&quot;:&quot; &amp;&quot;{&quot;&quot;&quot;&amp;[.B$1]&amp;&quot;&quot;&quot;:&quot;&quot;&quot;&amp;[.B22]&amp;&quot;&quot;&quot;&quot;&amp;REPT(&quot; &quot;;20-LEN([.B22])) &amp;&quot;,&quot;&quot;&quot;&amp;[.C$1]&amp;&quot;&quot;&quot;:&quot;&quot;&quot;&amp;[.C22]&amp;&quot;&quot;&quot;&quot;&amp;REPT(&quot; &quot;;35-LEN([.C22])) &amp;&quot;,&quot;&quot;&quot;&amp;[.D$1]&amp;&quot;&quot;&quot;:&quot;&amp;[.D22]&amp;REPT(&quot; &quot;;3-LEN([.D22])) &amp;&quot;,&quot;&quot;&quot;&amp;[.E$1]&amp;&quot;&quot;&quot;:&quot;&quot;&quot;&amp;[.E22]&amp;&quot;&quot;&quot;&quot;&amp;REPT(&quot; &quot;;6-LEN([.E22])) &amp;&quot;,&quot;&quot;&quot;&amp;[.F$1]&amp;&quot;&quot;&quot;:&quot;&quot;&quot;&amp;[.F22]&amp;&quot;&quot;&quot;&quot;&amp;REPT(&quot; &quot;;7-LEN([.F22])) &amp;&quot;,&quot;&quot;&quot;&amp;[.G$1]&amp;&quot;&quot;&quot;:&quot;&amp;IF([.G22]&lt;&gt;&quot;&quot;;&quot;&quot;&quot;&quot;&amp;[.G22]&amp;&quot;&quot;&quot;&quot;&amp;REPT(&quot; &quot;;5-LEN([.G22]));&quot;null&quot;&amp;REPT(&quot; &quot;;5-4+2)) &amp;&quot;,&quot;&quot;&quot;&amp;[.H$1]&amp;&quot;&quot;&quot;:&quot;&amp;IF([.H22]&lt;&gt;&quot;&quot;;&quot;&quot;&quot;&quot;&amp;[.H22]&amp;&quot;&quot;&quot;&quot;&amp;REPT(&quot; &quot;;19-LEN([.H22]));&quot;null&quot;&amp;REPT(&quot; &quot;;19-4+2)) &amp;&quot;,&quot;&quot;&quot;&amp;[.I$1]&amp;&quot;&quot;&quot;:&quot;&amp;IF([.I22]&lt;&gt;&quot;&quot;;&quot;&quot;&quot;&quot;&amp;[.I22]&amp;&quot;&quot;&quot;&quot;&amp;REPT(&quot; &quot;;8-LEN([.I22]));&quot;null&quot;&amp;REPT(&quot; &quot;;8-4+2)) &amp;&quot;,&quot;&quot;&quot;&amp;[.J$1]&amp;&quot;&quot;&quot;:&quot;&amp;IF([.J22]&lt;&gt;&quot;&quot;;[.J22]&amp;REPT(&quot; &quot;;4-LEN([.J22]));&quot;null&quot;) &amp;&quot;,&quot;&quot;&quot;&amp;[.K$1]&amp;&quot;&quot;&quot;:&quot;&amp;IF([.K22]&lt;&gt;&quot;&quot;;[.K22]&amp;REPT(&quot; &quot;;4-LEN([.K22]));&quot;null&quot;) &amp;&quot;,&quot;&quot;&quot;&amp;[.L$1]&amp;&quot;&quot;&quot;:&quot;&amp;IF([.L22]&lt;&gt;&quot;&quot;;[.L22]&amp;REPT(&quot; &quot;;5-LEN([.L22]));&quot;null &quot;) &amp;&quot;,&quot;&quot;&quot;&amp;[.M$1]&amp;&quot;&quot;&quot;:&quot;&amp;IF([.M22]&lt;&gt;&quot;&quot;;&quot;&quot;&quot;&quot;&amp;[.M22]&amp;&quot;&quot;&quot;&quot;&amp;REPT(&quot; &quot;;20-LEN([.M22]));&quot;null&quot;&amp;REPT(&quot; &quot;;20-4+2)) &amp;&quot;,&quot;&quot;&quot;&amp;[.N$1]&amp;&quot;&quot;&quot;:&quot;&amp;IF([.N22]&lt;&gt;&quot;&quot;;&quot;&quot;&amp;[.N22]&amp;&quot;&quot;&amp;REPT(&quot; &quot;;5-LEN([.N22]));&quot;null&quot;&amp;REPT(&quot; &quot;;5-4+2)) &amp;&quot;,&quot;&quot;&quot;&amp;[.O$1]&amp;&quot;&quot;&quot;:&quot;&amp;[.O22] &amp;&quot;,&quot;&quot;&quot;&amp;[.P$1]&amp;&quot;&quot;&quot;:&quot;&amp;[.P22] &amp;&quot;}&quot;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3])" office:value-type="float" office:value="0" calcext:value-type="float">
            <text:p>0</text:p>
          </table:table-cell>
          <table:table-cell/>
          <table:table-cell table:style-name="ce17" table:formula="of:=&quot;&quot;&amp;IF([.T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&quot;:&quot; &amp;&quot;{&quot;&quot;&quot;&amp;[.B$1]&amp;&quot;&quot;&quot;:&quot;&quot;&quot;&amp;[.B23]&amp;&quot;&quot;&quot;&quot;&amp;REPT(&quot; &quot;;20-LEN([.B23])) &amp;&quot;,&quot;&quot;&quot;&amp;[.C$1]&amp;&quot;&quot;&quot;:&quot;&quot;&quot;&amp;[.C23]&amp;&quot;&quot;&quot;&quot;&amp;REPT(&quot; &quot;;35-LEN([.C23])) &amp;&quot;,&quot;&quot;&quot;&amp;[.D$1]&amp;&quot;&quot;&quot;:&quot;&amp;[.D23]&amp;REPT(&quot; &quot;;3-LEN([.D23])) &amp;&quot;,&quot;&quot;&quot;&amp;[.E$1]&amp;&quot;&quot;&quot;:&quot;&quot;&quot;&amp;[.E23]&amp;&quot;&quot;&quot;&quot;&amp;REPT(&quot; &quot;;6-LEN([.E23])) &amp;&quot;,&quot;&quot;&quot;&amp;[.F$1]&amp;&quot;&quot;&quot;:&quot;&quot;&quot;&amp;[.F23]&amp;&quot;&quot;&quot;&quot;&amp;REPT(&quot; &quot;;7-LEN([.F23])) &amp;&quot;,&quot;&quot;&quot;&amp;[.G$1]&amp;&quot;&quot;&quot;:&quot;&amp;IF([.G23]&lt;&gt;&quot;&quot;;&quot;&quot;&quot;&quot;&amp;[.G23]&amp;&quot;&quot;&quot;&quot;&amp;REPT(&quot; &quot;;5-LEN([.G23]));&quot;null&quot;&amp;REPT(&quot; &quot;;5-4+2)) &amp;&quot;,&quot;&quot;&quot;&amp;[.H$1]&amp;&quot;&quot;&quot;:&quot;&amp;IF([.H23]&lt;&gt;&quot;&quot;;&quot;&quot;&quot;&quot;&amp;[.H23]&amp;&quot;&quot;&quot;&quot;&amp;REPT(&quot; &quot;;19-LEN([.H23]));&quot;null&quot;&amp;REPT(&quot; &quot;;19-4+2)) &amp;&quot;,&quot;&quot;&quot;&amp;[.I$1]&amp;&quot;&quot;&quot;:&quot;&amp;IF([.I23]&lt;&gt;&quot;&quot;;&quot;&quot;&quot;&quot;&amp;[.I23]&amp;&quot;&quot;&quot;&quot;&amp;REPT(&quot; &quot;;8-LEN([.I23]));&quot;null&quot;&amp;REPT(&quot; &quot;;8-4+2)) &amp;&quot;,&quot;&quot;&quot;&amp;[.J$1]&amp;&quot;&quot;&quot;:&quot;&amp;IF([.J23]&lt;&gt;&quot;&quot;;[.J23]&amp;REPT(&quot; &quot;;4-LEN([.J23]));&quot;null&quot;) &amp;&quot;,&quot;&quot;&quot;&amp;[.K$1]&amp;&quot;&quot;&quot;:&quot;&amp;IF([.K23]&lt;&gt;&quot;&quot;;[.K23]&amp;REPT(&quot; &quot;;4-LEN([.K23]));&quot;null&quot;) &amp;&quot;,&quot;&quot;&quot;&amp;[.L$1]&amp;&quot;&quot;&quot;:&quot;&amp;IF([.L23]&lt;&gt;&quot;&quot;;[.L23]&amp;REPT(&quot; &quot;;5-LEN([.L23]));&quot;null &quot;) &amp;&quot;,&quot;&quot;&quot;&amp;[.M$1]&amp;&quot;&quot;&quot;:&quot;&amp;IF([.M23]&lt;&gt;&quot;&quot;;&quot;&quot;&quot;&quot;&amp;[.M23]&amp;&quot;&quot;&quot;&quot;&amp;REPT(&quot; &quot;;20-LEN([.M23]));&quot;null&quot;&amp;REPT(&quot; &quot;;20-4+2)) &amp;&quot;,&quot;&quot;&quot;&amp;[.N$1]&amp;&quot;&quot;&quot;:&quot;&amp;IF([.N23]&lt;&gt;&quot;&quot;;&quot;&quot;&amp;[.N23]&amp;&quot;&quot;&amp;REPT(&quot; &quot;;5-LEN([.N23]));&quot;null&quot;&amp;REPT(&quot; &quot;;5-4+2)) &amp;&quot;,&quot;&quot;&quot;&amp;[.O$1]&amp;&quot;&quot;&quot;:&quot;&amp;[.O23] &amp;&quot;,&quot;&quot;&quot;&amp;[.P$1]&amp;&quot;&quot;&quot;:&quot;&amp;[.P23] &amp;&quot;}&quot;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4])" office:value-type="float" office:value="0" calcext:value-type="float">
            <text:p>0</text:p>
          </table:table-cell>
          <table:table-cell/>
          <table:table-cell table:style-name="ce17" table:formula="of:=&quot;&quot;&amp;IF([.T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&quot;:&quot; &amp;&quot;{&quot;&quot;&quot;&amp;[.B$1]&amp;&quot;&quot;&quot;:&quot;&quot;&quot;&amp;[.B24]&amp;&quot;&quot;&quot;&quot;&amp;REPT(&quot; &quot;;20-LEN([.B24])) &amp;&quot;,&quot;&quot;&quot;&amp;[.C$1]&amp;&quot;&quot;&quot;:&quot;&quot;&quot;&amp;[.C24]&amp;&quot;&quot;&quot;&quot;&amp;REPT(&quot; &quot;;35-LEN([.C24])) &amp;&quot;,&quot;&quot;&quot;&amp;[.D$1]&amp;&quot;&quot;&quot;:&quot;&amp;[.D24]&amp;REPT(&quot; &quot;;3-LEN([.D24])) &amp;&quot;,&quot;&quot;&quot;&amp;[.E$1]&amp;&quot;&quot;&quot;:&quot;&quot;&quot;&amp;[.E24]&amp;&quot;&quot;&quot;&quot;&amp;REPT(&quot; &quot;;6-LEN([.E24])) &amp;&quot;,&quot;&quot;&quot;&amp;[.F$1]&amp;&quot;&quot;&quot;:&quot;&quot;&quot;&amp;[.F24]&amp;&quot;&quot;&quot;&quot;&amp;REPT(&quot; &quot;;7-LEN([.F24])) &amp;&quot;,&quot;&quot;&quot;&amp;[.G$1]&amp;&quot;&quot;&quot;:&quot;&amp;IF([.G24]&lt;&gt;&quot;&quot;;&quot;&quot;&quot;&quot;&amp;[.G24]&amp;&quot;&quot;&quot;&quot;&amp;REPT(&quot; &quot;;5-LEN([.G24]));&quot;null&quot;&amp;REPT(&quot; &quot;;5-4+2)) &amp;&quot;,&quot;&quot;&quot;&amp;[.H$1]&amp;&quot;&quot;&quot;:&quot;&amp;IF([.H24]&lt;&gt;&quot;&quot;;&quot;&quot;&quot;&quot;&amp;[.H24]&amp;&quot;&quot;&quot;&quot;&amp;REPT(&quot; &quot;;19-LEN([.H24]));&quot;null&quot;&amp;REPT(&quot; &quot;;19-4+2)) &amp;&quot;,&quot;&quot;&quot;&amp;[.I$1]&amp;&quot;&quot;&quot;:&quot;&amp;IF([.I24]&lt;&gt;&quot;&quot;;&quot;&quot;&quot;&quot;&amp;[.I24]&amp;&quot;&quot;&quot;&quot;&amp;REPT(&quot; &quot;;8-LEN([.I24]));&quot;null&quot;&amp;REPT(&quot; &quot;;8-4+2)) &amp;&quot;,&quot;&quot;&quot;&amp;[.J$1]&amp;&quot;&quot;&quot;:&quot;&amp;IF([.J24]&lt;&gt;&quot;&quot;;[.J24]&amp;REPT(&quot; &quot;;4-LEN([.J24]));&quot;null&quot;) &amp;&quot;,&quot;&quot;&quot;&amp;[.K$1]&amp;&quot;&quot;&quot;:&quot;&amp;IF([.K24]&lt;&gt;&quot;&quot;;[.K24]&amp;REPT(&quot; &quot;;4-LEN([.K24]));&quot;null&quot;) &amp;&quot;,&quot;&quot;&quot;&amp;[.L$1]&amp;&quot;&quot;&quot;:&quot;&amp;IF([.L24]&lt;&gt;&quot;&quot;;[.L24]&amp;REPT(&quot; &quot;;5-LEN([.L24]));&quot;null &quot;) &amp;&quot;,&quot;&quot;&quot;&amp;[.M$1]&amp;&quot;&quot;&quot;:&quot;&amp;IF([.M24]&lt;&gt;&quot;&quot;;&quot;&quot;&quot;&quot;&amp;[.M24]&amp;&quot;&quot;&quot;&quot;&amp;REPT(&quot; &quot;;20-LEN([.M24]));&quot;null&quot;&amp;REPT(&quot; &quot;;20-4+2)) &amp;&quot;,&quot;&quot;&quot;&amp;[.N$1]&amp;&quot;&quot;&quot;:&quot;&amp;IF([.N24]&lt;&gt;&quot;&quot;;&quot;&quot;&amp;[.N24]&amp;&quot;&quot;&amp;REPT(&quot; &quot;;5-LEN([.N24]));&quot;null&quot;&amp;REPT(&quot; &quot;;5-4+2)) &amp;&quot;,&quot;&quot;&quot;&amp;[.O$1]&amp;&quot;&quot;&quot;:&quot;&amp;[.O24] &amp;&quot;,&quot;&quot;&quot;&amp;[.P$1]&amp;&quot;&quot;&quot;:&quot;&amp;[.P24] &amp;&quot;}&quot;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5])" office:value-type="float" office:value="0" calcext:value-type="float">
            <text:p>0</text:p>
          </table:table-cell>
          <table:table-cell/>
          <table:table-cell table:style-name="ce17" table:formula="of:=&quot;&quot;&amp;IF([.T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&quot;:&quot; &amp;&quot;{&quot;&quot;&quot;&amp;[.B$1]&amp;&quot;&quot;&quot;:&quot;&quot;&quot;&amp;[.B25]&amp;&quot;&quot;&quot;&quot;&amp;REPT(&quot; &quot;;20-LEN([.B25])) &amp;&quot;,&quot;&quot;&quot;&amp;[.C$1]&amp;&quot;&quot;&quot;:&quot;&quot;&quot;&amp;[.C25]&amp;&quot;&quot;&quot;&quot;&amp;REPT(&quot; &quot;;35-LEN([.C25])) &amp;&quot;,&quot;&quot;&quot;&amp;[.D$1]&amp;&quot;&quot;&quot;:&quot;&amp;[.D25]&amp;REPT(&quot; &quot;;3-LEN([.D25])) &amp;&quot;,&quot;&quot;&quot;&amp;[.E$1]&amp;&quot;&quot;&quot;:&quot;&quot;&quot;&amp;[.E25]&amp;&quot;&quot;&quot;&quot;&amp;REPT(&quot; &quot;;6-LEN([.E25])) &amp;&quot;,&quot;&quot;&quot;&amp;[.F$1]&amp;&quot;&quot;&quot;:&quot;&quot;&quot;&amp;[.F25]&amp;&quot;&quot;&quot;&quot;&amp;REPT(&quot; &quot;;7-LEN([.F25])) &amp;&quot;,&quot;&quot;&quot;&amp;[.G$1]&amp;&quot;&quot;&quot;:&quot;&amp;IF([.G25]&lt;&gt;&quot;&quot;;&quot;&quot;&quot;&quot;&amp;[.G25]&amp;&quot;&quot;&quot;&quot;&amp;REPT(&quot; &quot;;5-LEN([.G25]));&quot;null&quot;&amp;REPT(&quot; &quot;;5-4+2)) &amp;&quot;,&quot;&quot;&quot;&amp;[.H$1]&amp;&quot;&quot;&quot;:&quot;&amp;IF([.H25]&lt;&gt;&quot;&quot;;&quot;&quot;&quot;&quot;&amp;[.H25]&amp;&quot;&quot;&quot;&quot;&amp;REPT(&quot; &quot;;19-LEN([.H25]));&quot;null&quot;&amp;REPT(&quot; &quot;;19-4+2)) &amp;&quot;,&quot;&quot;&quot;&amp;[.I$1]&amp;&quot;&quot;&quot;:&quot;&amp;IF([.I25]&lt;&gt;&quot;&quot;;&quot;&quot;&quot;&quot;&amp;[.I25]&amp;&quot;&quot;&quot;&quot;&amp;REPT(&quot; &quot;;8-LEN([.I25]));&quot;null&quot;&amp;REPT(&quot; &quot;;8-4+2)) &amp;&quot;,&quot;&quot;&quot;&amp;[.J$1]&amp;&quot;&quot;&quot;:&quot;&amp;IF([.J25]&lt;&gt;&quot;&quot;;[.J25]&amp;REPT(&quot; &quot;;4-LEN([.J25]));&quot;null&quot;) &amp;&quot;,&quot;&quot;&quot;&amp;[.K$1]&amp;&quot;&quot;&quot;:&quot;&amp;IF([.K25]&lt;&gt;&quot;&quot;;[.K25]&amp;REPT(&quot; &quot;;4-LEN([.K25]));&quot;null&quot;) &amp;&quot;,&quot;&quot;&quot;&amp;[.L$1]&amp;&quot;&quot;&quot;:&quot;&amp;IF([.L25]&lt;&gt;&quot;&quot;;[.L25]&amp;REPT(&quot; &quot;;5-LEN([.L25]));&quot;null &quot;) &amp;&quot;,&quot;&quot;&quot;&amp;[.M$1]&amp;&quot;&quot;&quot;:&quot;&amp;IF([.M25]&lt;&gt;&quot;&quot;;&quot;&quot;&quot;&quot;&amp;[.M25]&amp;&quot;&quot;&quot;&quot;&amp;REPT(&quot; &quot;;20-LEN([.M25]));&quot;null&quot;&amp;REPT(&quot; &quot;;20-4+2)) &amp;&quot;,&quot;&quot;&quot;&amp;[.N$1]&amp;&quot;&quot;&quot;:&quot;&amp;IF([.N25]&lt;&gt;&quot;&quot;;&quot;&quot;&amp;[.N25]&amp;&quot;&quot;&amp;REPT(&quot; &quot;;5-LEN([.N25]));&quot;null&quot;&amp;REPT(&quot; &quot;;5-4+2)) &amp;&quot;,&quot;&quot;&quot;&amp;[.O$1]&amp;&quot;&quot;&quot;:&quot;&amp;[.O25] &amp;&quot;,&quot;&quot;&quot;&amp;[.P$1]&amp;&quot;&quot;&quot;:&quot;&amp;[.P25] &amp;&quot;}&quot;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6])" office:value-type="float" office:value="0" calcext:value-type="float">
            <text:p>0</text:p>
          </table:table-cell>
          <table:table-cell/>
          <table:table-cell table:style-name="ce17" table:formula="of:=&quot;&quot;&amp;IF([.T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&quot;:&quot; &amp;&quot;{&quot;&quot;&quot;&amp;[.B$1]&amp;&quot;&quot;&quot;:&quot;&quot;&quot;&amp;[.B26]&amp;&quot;&quot;&quot;&quot;&amp;REPT(&quot; &quot;;20-LEN([.B26])) &amp;&quot;,&quot;&quot;&quot;&amp;[.C$1]&amp;&quot;&quot;&quot;:&quot;&quot;&quot;&amp;[.C26]&amp;&quot;&quot;&quot;&quot;&amp;REPT(&quot; &quot;;35-LEN([.C26])) &amp;&quot;,&quot;&quot;&quot;&amp;[.D$1]&amp;&quot;&quot;&quot;:&quot;&amp;[.D26]&amp;REPT(&quot; &quot;;3-LEN([.D26])) &amp;&quot;,&quot;&quot;&quot;&amp;[.E$1]&amp;&quot;&quot;&quot;:&quot;&quot;&quot;&amp;[.E26]&amp;&quot;&quot;&quot;&quot;&amp;REPT(&quot; &quot;;6-LEN([.E26])) &amp;&quot;,&quot;&quot;&quot;&amp;[.F$1]&amp;&quot;&quot;&quot;:&quot;&quot;&quot;&amp;[.F26]&amp;&quot;&quot;&quot;&quot;&amp;REPT(&quot; &quot;;7-LEN([.F26])) &amp;&quot;,&quot;&quot;&quot;&amp;[.G$1]&amp;&quot;&quot;&quot;:&quot;&amp;IF([.G26]&lt;&gt;&quot;&quot;;&quot;&quot;&quot;&quot;&amp;[.G26]&amp;&quot;&quot;&quot;&quot;&amp;REPT(&quot; &quot;;5-LEN([.G26]));&quot;null&quot;&amp;REPT(&quot; &quot;;5-4+2)) &amp;&quot;,&quot;&quot;&quot;&amp;[.H$1]&amp;&quot;&quot;&quot;:&quot;&amp;IF([.H26]&lt;&gt;&quot;&quot;;&quot;&quot;&quot;&quot;&amp;[.H26]&amp;&quot;&quot;&quot;&quot;&amp;REPT(&quot; &quot;;19-LEN([.H26]));&quot;null&quot;&amp;REPT(&quot; &quot;;19-4+2)) &amp;&quot;,&quot;&quot;&quot;&amp;[.I$1]&amp;&quot;&quot;&quot;:&quot;&amp;IF([.I26]&lt;&gt;&quot;&quot;;&quot;&quot;&quot;&quot;&amp;[.I26]&amp;&quot;&quot;&quot;&quot;&amp;REPT(&quot; &quot;;8-LEN([.I26]));&quot;null&quot;&amp;REPT(&quot; &quot;;8-4+2)) &amp;&quot;,&quot;&quot;&quot;&amp;[.J$1]&amp;&quot;&quot;&quot;:&quot;&amp;IF([.J26]&lt;&gt;&quot;&quot;;[.J26]&amp;REPT(&quot; &quot;;4-LEN([.J26]));&quot;null&quot;) &amp;&quot;,&quot;&quot;&quot;&amp;[.K$1]&amp;&quot;&quot;&quot;:&quot;&amp;IF([.K26]&lt;&gt;&quot;&quot;;[.K26]&amp;REPT(&quot; &quot;;4-LEN([.K26]));&quot;null&quot;) &amp;&quot;,&quot;&quot;&quot;&amp;[.L$1]&amp;&quot;&quot;&quot;:&quot;&amp;IF([.L26]&lt;&gt;&quot;&quot;;[.L26]&amp;REPT(&quot; &quot;;5-LEN([.L26]));&quot;null &quot;) &amp;&quot;,&quot;&quot;&quot;&amp;[.M$1]&amp;&quot;&quot;&quot;:&quot;&amp;IF([.M26]&lt;&gt;&quot;&quot;;&quot;&quot;&quot;&quot;&amp;[.M26]&amp;&quot;&quot;&quot;&quot;&amp;REPT(&quot; &quot;;20-LEN([.M26]));&quot;null&quot;&amp;REPT(&quot; &quot;;20-4+2)) &amp;&quot;,&quot;&quot;&quot;&amp;[.N$1]&amp;&quot;&quot;&quot;:&quot;&amp;IF([.N26]&lt;&gt;&quot;&quot;;&quot;&quot;&amp;[.N26]&amp;&quot;&quot;&amp;REPT(&quot; &quot;;5-LEN([.N26]));&quot;null&quot;&amp;REPT(&quot; &quot;;5-4+2)) &amp;&quot;,&quot;&quot;&quot;&amp;[.O$1]&amp;&quot;&quot;&quot;:&quot;&amp;[.O26] &amp;&quot;,&quot;&quot;&quot;&amp;[.P$1]&amp;&quot;&quot;&quot;:&quot;&amp;[.P26] &amp;&quot;}&quot;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7])" office:value-type="float" office:value="0" calcext:value-type="float">
            <text:p>0</text:p>
          </table:table-cell>
          <table:table-cell/>
          <table:table-cell table:style-name="ce17" table:formula="of:=&quot;&quot;&amp;IF([.T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&quot;:&quot; &amp;&quot;{&quot;&quot;&quot;&amp;[.B$1]&amp;&quot;&quot;&quot;:&quot;&quot;&quot;&amp;[.B27]&amp;&quot;&quot;&quot;&quot;&amp;REPT(&quot; &quot;;20-LEN([.B27])) &amp;&quot;,&quot;&quot;&quot;&amp;[.C$1]&amp;&quot;&quot;&quot;:&quot;&quot;&quot;&amp;[.C27]&amp;&quot;&quot;&quot;&quot;&amp;REPT(&quot; &quot;;35-LEN([.C27])) &amp;&quot;,&quot;&quot;&quot;&amp;[.D$1]&amp;&quot;&quot;&quot;:&quot;&amp;[.D27]&amp;REPT(&quot; &quot;;3-LEN([.D27])) &amp;&quot;,&quot;&quot;&quot;&amp;[.E$1]&amp;&quot;&quot;&quot;:&quot;&quot;&quot;&amp;[.E27]&amp;&quot;&quot;&quot;&quot;&amp;REPT(&quot; &quot;;6-LEN([.E27])) &amp;&quot;,&quot;&quot;&quot;&amp;[.F$1]&amp;&quot;&quot;&quot;:&quot;&quot;&quot;&amp;[.F27]&amp;&quot;&quot;&quot;&quot;&amp;REPT(&quot; &quot;;7-LEN([.F27])) &amp;&quot;,&quot;&quot;&quot;&amp;[.G$1]&amp;&quot;&quot;&quot;:&quot;&amp;IF([.G27]&lt;&gt;&quot;&quot;;&quot;&quot;&quot;&quot;&amp;[.G27]&amp;&quot;&quot;&quot;&quot;&amp;REPT(&quot; &quot;;5-LEN([.G27]));&quot;null&quot;&amp;REPT(&quot; &quot;;5-4+2)) &amp;&quot;,&quot;&quot;&quot;&amp;[.H$1]&amp;&quot;&quot;&quot;:&quot;&amp;IF([.H27]&lt;&gt;&quot;&quot;;&quot;&quot;&quot;&quot;&amp;[.H27]&amp;&quot;&quot;&quot;&quot;&amp;REPT(&quot; &quot;;19-LEN([.H27]));&quot;null&quot;&amp;REPT(&quot; &quot;;19-4+2)) &amp;&quot;,&quot;&quot;&quot;&amp;[.I$1]&amp;&quot;&quot;&quot;:&quot;&amp;IF([.I27]&lt;&gt;&quot;&quot;;&quot;&quot;&quot;&quot;&amp;[.I27]&amp;&quot;&quot;&quot;&quot;&amp;REPT(&quot; &quot;;8-LEN([.I27]));&quot;null&quot;&amp;REPT(&quot; &quot;;8-4+2)) &amp;&quot;,&quot;&quot;&quot;&amp;[.J$1]&amp;&quot;&quot;&quot;:&quot;&amp;IF([.J27]&lt;&gt;&quot;&quot;;[.J27]&amp;REPT(&quot; &quot;;4-LEN([.J27]));&quot;null&quot;) &amp;&quot;,&quot;&quot;&quot;&amp;[.K$1]&amp;&quot;&quot;&quot;:&quot;&amp;IF([.K27]&lt;&gt;&quot;&quot;;[.K27]&amp;REPT(&quot; &quot;;4-LEN([.K27]));&quot;null&quot;) &amp;&quot;,&quot;&quot;&quot;&amp;[.L$1]&amp;&quot;&quot;&quot;:&quot;&amp;IF([.L27]&lt;&gt;&quot;&quot;;[.L27]&amp;REPT(&quot; &quot;;5-LEN([.L27]));&quot;null &quot;) &amp;&quot;,&quot;&quot;&quot;&amp;[.M$1]&amp;&quot;&quot;&quot;:&quot;&amp;IF([.M27]&lt;&gt;&quot;&quot;;&quot;&quot;&quot;&quot;&amp;[.M27]&amp;&quot;&quot;&quot;&quot;&amp;REPT(&quot; &quot;;20-LEN([.M27]));&quot;null&quot;&amp;REPT(&quot; &quot;;20-4+2)) &amp;&quot;,&quot;&quot;&quot;&amp;[.N$1]&amp;&quot;&quot;&quot;:&quot;&amp;IF([.N27]&lt;&gt;&quot;&quot;;&quot;&quot;&amp;[.N27]&amp;&quot;&quot;&amp;REPT(&quot; &quot;;5-LEN([.N27]));&quot;null&quot;&amp;REPT(&quot; &quot;;5-4+2)) &amp;&quot;,&quot;&quot;&quot;&amp;[.O$1]&amp;&quot;&quot;&quot;:&quot;&amp;[.O27] &amp;&quot;,&quot;&quot;&quot;&amp;[.P$1]&amp;&quot;&quot;&quot;:&quot;&amp;[.P27] &amp;&quot;}&quot;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8])" office:value-type="float" office:value="0" calcext:value-type="float">
            <text:p>0</text:p>
          </table:table-cell>
          <table:table-cell/>
          <table:table-cell table:style-name="ce17" table:formula="of:=&quot;&quot;&amp;IF([.T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&quot;:&quot; &amp;&quot;{&quot;&quot;&quot;&amp;[.B$1]&amp;&quot;&quot;&quot;:&quot;&quot;&quot;&amp;[.B28]&amp;&quot;&quot;&quot;&quot;&amp;REPT(&quot; &quot;;20-LEN([.B28])) &amp;&quot;,&quot;&quot;&quot;&amp;[.C$1]&amp;&quot;&quot;&quot;:&quot;&quot;&quot;&amp;[.C28]&amp;&quot;&quot;&quot;&quot;&amp;REPT(&quot; &quot;;35-LEN([.C28])) &amp;&quot;,&quot;&quot;&quot;&amp;[.D$1]&amp;&quot;&quot;&quot;:&quot;&amp;[.D28]&amp;REPT(&quot; &quot;;3-LEN([.D28])) &amp;&quot;,&quot;&quot;&quot;&amp;[.E$1]&amp;&quot;&quot;&quot;:&quot;&quot;&quot;&amp;[.E28]&amp;&quot;&quot;&quot;&quot;&amp;REPT(&quot; &quot;;6-LEN([.E28])) &amp;&quot;,&quot;&quot;&quot;&amp;[.F$1]&amp;&quot;&quot;&quot;:&quot;&quot;&quot;&amp;[.F28]&amp;&quot;&quot;&quot;&quot;&amp;REPT(&quot; &quot;;7-LEN([.F28])) &amp;&quot;,&quot;&quot;&quot;&amp;[.G$1]&amp;&quot;&quot;&quot;:&quot;&amp;IF([.G28]&lt;&gt;&quot;&quot;;&quot;&quot;&quot;&quot;&amp;[.G28]&amp;&quot;&quot;&quot;&quot;&amp;REPT(&quot; &quot;;5-LEN([.G28]));&quot;null&quot;&amp;REPT(&quot; &quot;;5-4+2)) &amp;&quot;,&quot;&quot;&quot;&amp;[.H$1]&amp;&quot;&quot;&quot;:&quot;&amp;IF([.H28]&lt;&gt;&quot;&quot;;&quot;&quot;&quot;&quot;&amp;[.H28]&amp;&quot;&quot;&quot;&quot;&amp;REPT(&quot; &quot;;19-LEN([.H28]));&quot;null&quot;&amp;REPT(&quot; &quot;;19-4+2)) &amp;&quot;,&quot;&quot;&quot;&amp;[.I$1]&amp;&quot;&quot;&quot;:&quot;&amp;IF([.I28]&lt;&gt;&quot;&quot;;&quot;&quot;&quot;&quot;&amp;[.I28]&amp;&quot;&quot;&quot;&quot;&amp;REPT(&quot; &quot;;8-LEN([.I28]));&quot;null&quot;&amp;REPT(&quot; &quot;;8-4+2)) &amp;&quot;,&quot;&quot;&quot;&amp;[.J$1]&amp;&quot;&quot;&quot;:&quot;&amp;IF([.J28]&lt;&gt;&quot;&quot;;[.J28]&amp;REPT(&quot; &quot;;4-LEN([.J28]));&quot;null&quot;) &amp;&quot;,&quot;&quot;&quot;&amp;[.K$1]&amp;&quot;&quot;&quot;:&quot;&amp;IF([.K28]&lt;&gt;&quot;&quot;;[.K28]&amp;REPT(&quot; &quot;;4-LEN([.K28]));&quot;null&quot;) &amp;&quot;,&quot;&quot;&quot;&amp;[.L$1]&amp;&quot;&quot;&quot;:&quot;&amp;IF([.L28]&lt;&gt;&quot;&quot;;[.L28]&amp;REPT(&quot; &quot;;5-LEN([.L28]));&quot;null &quot;) &amp;&quot;,&quot;&quot;&quot;&amp;[.M$1]&amp;&quot;&quot;&quot;:&quot;&amp;IF([.M28]&lt;&gt;&quot;&quot;;&quot;&quot;&quot;&quot;&amp;[.M28]&amp;&quot;&quot;&quot;&quot;&amp;REPT(&quot; &quot;;20-LEN([.M28]));&quot;null&quot;&amp;REPT(&quot; &quot;;20-4+2)) &amp;&quot;,&quot;&quot;&quot;&amp;[.N$1]&amp;&quot;&quot;&quot;:&quot;&amp;IF([.N28]&lt;&gt;&quot;&quot;;&quot;&quot;&amp;[.N28]&amp;&quot;&quot;&amp;REPT(&quot; &quot;;5-LEN([.N28]));&quot;null&quot;&amp;REPT(&quot; &quot;;5-4+2)) &amp;&quot;,&quot;&quot;&quot;&amp;[.O$1]&amp;&quot;&quot;&quot;:&quot;&amp;[.O28] &amp;&quot;,&quot;&quot;&quot;&amp;[.P$1]&amp;&quot;&quot;&quot;:&quot;&amp;[.P28] &amp;&quot;}&quot;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9])" office:value-type="float" office:value="0" calcext:value-type="float">
            <text:p>0</text:p>
          </table:table-cell>
          <table:table-cell/>
          <table:table-cell table:style-name="ce17" table:formula="of:=&quot;&quot;&amp;IF([.T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&quot;:&quot; &amp;&quot;{&quot;&quot;&quot;&amp;[.B$1]&amp;&quot;&quot;&quot;:&quot;&quot;&quot;&amp;[.B29]&amp;&quot;&quot;&quot;&quot;&amp;REPT(&quot; &quot;;20-LEN([.B29])) &amp;&quot;,&quot;&quot;&quot;&amp;[.C$1]&amp;&quot;&quot;&quot;:&quot;&quot;&quot;&amp;[.C29]&amp;&quot;&quot;&quot;&quot;&amp;REPT(&quot; &quot;;35-LEN([.C29])) &amp;&quot;,&quot;&quot;&quot;&amp;[.D$1]&amp;&quot;&quot;&quot;:&quot;&amp;[.D29]&amp;REPT(&quot; &quot;;3-LEN([.D29])) &amp;&quot;,&quot;&quot;&quot;&amp;[.E$1]&amp;&quot;&quot;&quot;:&quot;&quot;&quot;&amp;[.E29]&amp;&quot;&quot;&quot;&quot;&amp;REPT(&quot; &quot;;6-LEN([.E29])) &amp;&quot;,&quot;&quot;&quot;&amp;[.F$1]&amp;&quot;&quot;&quot;:&quot;&quot;&quot;&amp;[.F29]&amp;&quot;&quot;&quot;&quot;&amp;REPT(&quot; &quot;;7-LEN([.F29])) &amp;&quot;,&quot;&quot;&quot;&amp;[.G$1]&amp;&quot;&quot;&quot;:&quot;&amp;IF([.G29]&lt;&gt;&quot;&quot;;&quot;&quot;&quot;&quot;&amp;[.G29]&amp;&quot;&quot;&quot;&quot;&amp;REPT(&quot; &quot;;5-LEN([.G29]));&quot;null&quot;&amp;REPT(&quot; &quot;;5-4+2)) &amp;&quot;,&quot;&quot;&quot;&amp;[.H$1]&amp;&quot;&quot;&quot;:&quot;&amp;IF([.H29]&lt;&gt;&quot;&quot;;&quot;&quot;&quot;&quot;&amp;[.H29]&amp;&quot;&quot;&quot;&quot;&amp;REPT(&quot; &quot;;19-LEN([.H29]));&quot;null&quot;&amp;REPT(&quot; &quot;;19-4+2)) &amp;&quot;,&quot;&quot;&quot;&amp;[.I$1]&amp;&quot;&quot;&quot;:&quot;&amp;IF([.I29]&lt;&gt;&quot;&quot;;&quot;&quot;&quot;&quot;&amp;[.I29]&amp;&quot;&quot;&quot;&quot;&amp;REPT(&quot; &quot;;8-LEN([.I29]));&quot;null&quot;&amp;REPT(&quot; &quot;;8-4+2)) &amp;&quot;,&quot;&quot;&quot;&amp;[.J$1]&amp;&quot;&quot;&quot;:&quot;&amp;IF([.J29]&lt;&gt;&quot;&quot;;[.J29]&amp;REPT(&quot; &quot;;4-LEN([.J29]));&quot;null&quot;) &amp;&quot;,&quot;&quot;&quot;&amp;[.K$1]&amp;&quot;&quot;&quot;:&quot;&amp;IF([.K29]&lt;&gt;&quot;&quot;;[.K29]&amp;REPT(&quot; &quot;;4-LEN([.K29]));&quot;null&quot;) &amp;&quot;,&quot;&quot;&quot;&amp;[.L$1]&amp;&quot;&quot;&quot;:&quot;&amp;IF([.L29]&lt;&gt;&quot;&quot;;[.L29]&amp;REPT(&quot; &quot;;5-LEN([.L29]));&quot;null &quot;) &amp;&quot;,&quot;&quot;&quot;&amp;[.M$1]&amp;&quot;&quot;&quot;:&quot;&amp;IF([.M29]&lt;&gt;&quot;&quot;;&quot;&quot;&quot;&quot;&amp;[.M29]&amp;&quot;&quot;&quot;&quot;&amp;REPT(&quot; &quot;;20-LEN([.M29]));&quot;null&quot;&amp;REPT(&quot; &quot;;20-4+2)) &amp;&quot;,&quot;&quot;&quot;&amp;[.N$1]&amp;&quot;&quot;&quot;:&quot;&amp;IF([.N29]&lt;&gt;&quot;&quot;;&quot;&quot;&amp;[.N29]&amp;&quot;&quot;&amp;REPT(&quot; &quot;;5-LEN([.N29]));&quot;null&quot;&amp;REPT(&quot; &quot;;5-4+2)) &amp;&quot;,&quot;&quot;&quot;&amp;[.O$1]&amp;&quot;&quot;&quot;:&quot;&amp;[.O29] &amp;&quot;,&quot;&quot;&quot;&amp;[.P$1]&amp;&quot;&quot;&quot;:&quot;&amp;[.P29] &amp;&quot;}&quot;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0])" office:value-type="float" office:value="0" calcext:value-type="float">
            <text:p>0</text:p>
          </table:table-cell>
          <table:table-cell/>
          <table:table-cell table:style-name="ce17" table:formula="of:=&quot;&quot;&amp;IF([.T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&quot;:&quot; &amp;&quot;{&quot;&quot;&quot;&amp;[.B$1]&amp;&quot;&quot;&quot;:&quot;&quot;&quot;&amp;[.B30]&amp;&quot;&quot;&quot;&quot;&amp;REPT(&quot; &quot;;20-LEN([.B30])) &amp;&quot;,&quot;&quot;&quot;&amp;[.C$1]&amp;&quot;&quot;&quot;:&quot;&quot;&quot;&amp;[.C30]&amp;&quot;&quot;&quot;&quot;&amp;REPT(&quot; &quot;;35-LEN([.C30])) &amp;&quot;,&quot;&quot;&quot;&amp;[.D$1]&amp;&quot;&quot;&quot;:&quot;&amp;[.D30]&amp;REPT(&quot; &quot;;3-LEN([.D30])) &amp;&quot;,&quot;&quot;&quot;&amp;[.E$1]&amp;&quot;&quot;&quot;:&quot;&quot;&quot;&amp;[.E30]&amp;&quot;&quot;&quot;&quot;&amp;REPT(&quot; &quot;;6-LEN([.E30])) &amp;&quot;,&quot;&quot;&quot;&amp;[.F$1]&amp;&quot;&quot;&quot;:&quot;&quot;&quot;&amp;[.F30]&amp;&quot;&quot;&quot;&quot;&amp;REPT(&quot; &quot;;7-LEN([.F30])) &amp;&quot;,&quot;&quot;&quot;&amp;[.G$1]&amp;&quot;&quot;&quot;:&quot;&amp;IF([.G30]&lt;&gt;&quot;&quot;;&quot;&quot;&quot;&quot;&amp;[.G30]&amp;&quot;&quot;&quot;&quot;&amp;REPT(&quot; &quot;;5-LEN([.G30]));&quot;null&quot;&amp;REPT(&quot; &quot;;5-4+2)) &amp;&quot;,&quot;&quot;&quot;&amp;[.H$1]&amp;&quot;&quot;&quot;:&quot;&amp;IF([.H30]&lt;&gt;&quot;&quot;;&quot;&quot;&quot;&quot;&amp;[.H30]&amp;&quot;&quot;&quot;&quot;&amp;REPT(&quot; &quot;;19-LEN([.H30]));&quot;null&quot;&amp;REPT(&quot; &quot;;19-4+2)) &amp;&quot;,&quot;&quot;&quot;&amp;[.I$1]&amp;&quot;&quot;&quot;:&quot;&amp;IF([.I30]&lt;&gt;&quot;&quot;;&quot;&quot;&quot;&quot;&amp;[.I30]&amp;&quot;&quot;&quot;&quot;&amp;REPT(&quot; &quot;;8-LEN([.I30]));&quot;null&quot;&amp;REPT(&quot; &quot;;8-4+2)) &amp;&quot;,&quot;&quot;&quot;&amp;[.J$1]&amp;&quot;&quot;&quot;:&quot;&amp;IF([.J30]&lt;&gt;&quot;&quot;;[.J30]&amp;REPT(&quot; &quot;;4-LEN([.J30]));&quot;null&quot;) &amp;&quot;,&quot;&quot;&quot;&amp;[.K$1]&amp;&quot;&quot;&quot;:&quot;&amp;IF([.K30]&lt;&gt;&quot;&quot;;[.K30]&amp;REPT(&quot; &quot;;4-LEN([.K30]));&quot;null&quot;) &amp;&quot;,&quot;&quot;&quot;&amp;[.L$1]&amp;&quot;&quot;&quot;:&quot;&amp;IF([.L30]&lt;&gt;&quot;&quot;;[.L30]&amp;REPT(&quot; &quot;;5-LEN([.L30]));&quot;null &quot;) &amp;&quot;,&quot;&quot;&quot;&amp;[.M$1]&amp;&quot;&quot;&quot;:&quot;&amp;IF([.M30]&lt;&gt;&quot;&quot;;&quot;&quot;&quot;&quot;&amp;[.M30]&amp;&quot;&quot;&quot;&quot;&amp;REPT(&quot; &quot;;20-LEN([.M30]));&quot;null&quot;&amp;REPT(&quot; &quot;;20-4+2)) &amp;&quot;,&quot;&quot;&quot;&amp;[.N$1]&amp;&quot;&quot;&quot;:&quot;&amp;IF([.N30]&lt;&gt;&quot;&quot;;&quot;&quot;&amp;[.N30]&amp;&quot;&quot;&amp;REPT(&quot; &quot;;5-LEN([.N30]));&quot;null&quot;&amp;REPT(&quot; &quot;;5-4+2)) &amp;&quot;,&quot;&quot;&quot;&amp;[.O$1]&amp;&quot;&quot;&quot;:&quot;&amp;[.O30] &amp;&quot;,&quot;&quot;&quot;&amp;[.P$1]&amp;&quot;&quot;&quot;:&quot;&amp;[.P30] &amp;&quot;}&quot;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1])" office:value-type="float" office:value="0" calcext:value-type="float">
            <text:p>0</text:p>
          </table:table-cell>
          <table:table-cell/>
          <table:table-cell table:style-name="ce17" table:formula="of:=&quot;&quot;&amp;IF([.T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&quot;:&quot; &amp;&quot;{&quot;&quot;&quot;&amp;[.B$1]&amp;&quot;&quot;&quot;:&quot;&quot;&quot;&amp;[.B31]&amp;&quot;&quot;&quot;&quot;&amp;REPT(&quot; &quot;;20-LEN([.B31])) &amp;&quot;,&quot;&quot;&quot;&amp;[.C$1]&amp;&quot;&quot;&quot;:&quot;&quot;&quot;&amp;[.C31]&amp;&quot;&quot;&quot;&quot;&amp;REPT(&quot; &quot;;35-LEN([.C31])) &amp;&quot;,&quot;&quot;&quot;&amp;[.D$1]&amp;&quot;&quot;&quot;:&quot;&amp;[.D31]&amp;REPT(&quot; &quot;;3-LEN([.D31])) &amp;&quot;,&quot;&quot;&quot;&amp;[.E$1]&amp;&quot;&quot;&quot;:&quot;&quot;&quot;&amp;[.E31]&amp;&quot;&quot;&quot;&quot;&amp;REPT(&quot; &quot;;6-LEN([.E31])) &amp;&quot;,&quot;&quot;&quot;&amp;[.F$1]&amp;&quot;&quot;&quot;:&quot;&quot;&quot;&amp;[.F31]&amp;&quot;&quot;&quot;&quot;&amp;REPT(&quot; &quot;;7-LEN([.F31])) &amp;&quot;,&quot;&quot;&quot;&amp;[.G$1]&amp;&quot;&quot;&quot;:&quot;&amp;IF([.G31]&lt;&gt;&quot;&quot;;&quot;&quot;&quot;&quot;&amp;[.G31]&amp;&quot;&quot;&quot;&quot;&amp;REPT(&quot; &quot;;5-LEN([.G31]));&quot;null&quot;&amp;REPT(&quot; &quot;;5-4+2)) &amp;&quot;,&quot;&quot;&quot;&amp;[.H$1]&amp;&quot;&quot;&quot;:&quot;&amp;IF([.H31]&lt;&gt;&quot;&quot;;&quot;&quot;&quot;&quot;&amp;[.H31]&amp;&quot;&quot;&quot;&quot;&amp;REPT(&quot; &quot;;19-LEN([.H31]));&quot;null&quot;&amp;REPT(&quot; &quot;;19-4+2)) &amp;&quot;,&quot;&quot;&quot;&amp;[.I$1]&amp;&quot;&quot;&quot;:&quot;&amp;IF([.I31]&lt;&gt;&quot;&quot;;&quot;&quot;&quot;&quot;&amp;[.I31]&amp;&quot;&quot;&quot;&quot;&amp;REPT(&quot; &quot;;8-LEN([.I31]));&quot;null&quot;&amp;REPT(&quot; &quot;;8-4+2)) &amp;&quot;,&quot;&quot;&quot;&amp;[.J$1]&amp;&quot;&quot;&quot;:&quot;&amp;IF([.J31]&lt;&gt;&quot;&quot;;[.J31]&amp;REPT(&quot; &quot;;4-LEN([.J31]));&quot;null&quot;) &amp;&quot;,&quot;&quot;&quot;&amp;[.K$1]&amp;&quot;&quot;&quot;:&quot;&amp;IF([.K31]&lt;&gt;&quot;&quot;;[.K31]&amp;REPT(&quot; &quot;;4-LEN([.K31]));&quot;null&quot;) &amp;&quot;,&quot;&quot;&quot;&amp;[.L$1]&amp;&quot;&quot;&quot;:&quot;&amp;IF([.L31]&lt;&gt;&quot;&quot;;[.L31]&amp;REPT(&quot; &quot;;5-LEN([.L31]));&quot;null &quot;) &amp;&quot;,&quot;&quot;&quot;&amp;[.M$1]&amp;&quot;&quot;&quot;:&quot;&amp;IF([.M31]&lt;&gt;&quot;&quot;;&quot;&quot;&quot;&quot;&amp;[.M31]&amp;&quot;&quot;&quot;&quot;&amp;REPT(&quot; &quot;;20-LEN([.M31]));&quot;null&quot;&amp;REPT(&quot; &quot;;20-4+2)) &amp;&quot;,&quot;&quot;&quot;&amp;[.N$1]&amp;&quot;&quot;&quot;:&quot;&amp;IF([.N31]&lt;&gt;&quot;&quot;;&quot;&quot;&amp;[.N31]&amp;&quot;&quot;&amp;REPT(&quot; &quot;;5-LEN([.N31]));&quot;null&quot;&amp;REPT(&quot; &quot;;5-4+2)) &amp;&quot;,&quot;&quot;&quot;&amp;[.O$1]&amp;&quot;&quot;&quot;:&quot;&amp;[.O31] &amp;&quot;,&quot;&quot;&quot;&amp;[.P$1]&amp;&quot;&quot;&quot;:&quot;&amp;[.P31] &amp;&quot;}&quot;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2])" office:value-type="float" office:value="0" calcext:value-type="float">
            <text:p>0</text:p>
          </table:table-cell>
          <table:table-cell/>
          <table:table-cell table:style-name="ce17" table:formula="of:=&quot;&quot;&amp;IF([.T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&quot;:&quot; &amp;&quot;{&quot;&quot;&quot;&amp;[.B$1]&amp;&quot;&quot;&quot;:&quot;&quot;&quot;&amp;[.B32]&amp;&quot;&quot;&quot;&quot;&amp;REPT(&quot; &quot;;20-LEN([.B32])) &amp;&quot;,&quot;&quot;&quot;&amp;[.C$1]&amp;&quot;&quot;&quot;:&quot;&quot;&quot;&amp;[.C32]&amp;&quot;&quot;&quot;&quot;&amp;REPT(&quot; &quot;;35-LEN([.C32])) &amp;&quot;,&quot;&quot;&quot;&amp;[.D$1]&amp;&quot;&quot;&quot;:&quot;&amp;[.D32]&amp;REPT(&quot; &quot;;3-LEN([.D32])) &amp;&quot;,&quot;&quot;&quot;&amp;[.E$1]&amp;&quot;&quot;&quot;:&quot;&quot;&quot;&amp;[.E32]&amp;&quot;&quot;&quot;&quot;&amp;REPT(&quot; &quot;;6-LEN([.E32])) &amp;&quot;,&quot;&quot;&quot;&amp;[.F$1]&amp;&quot;&quot;&quot;:&quot;&quot;&quot;&amp;[.F32]&amp;&quot;&quot;&quot;&quot;&amp;REPT(&quot; &quot;;7-LEN([.F32])) &amp;&quot;,&quot;&quot;&quot;&amp;[.G$1]&amp;&quot;&quot;&quot;:&quot;&amp;IF([.G32]&lt;&gt;&quot;&quot;;&quot;&quot;&quot;&quot;&amp;[.G32]&amp;&quot;&quot;&quot;&quot;&amp;REPT(&quot; &quot;;5-LEN([.G32]));&quot;null&quot;&amp;REPT(&quot; &quot;;5-4+2)) &amp;&quot;,&quot;&quot;&quot;&amp;[.H$1]&amp;&quot;&quot;&quot;:&quot;&amp;IF([.H32]&lt;&gt;&quot;&quot;;&quot;&quot;&quot;&quot;&amp;[.H32]&amp;&quot;&quot;&quot;&quot;&amp;REPT(&quot; &quot;;19-LEN([.H32]));&quot;null&quot;&amp;REPT(&quot; &quot;;19-4+2)) &amp;&quot;,&quot;&quot;&quot;&amp;[.I$1]&amp;&quot;&quot;&quot;:&quot;&amp;IF([.I32]&lt;&gt;&quot;&quot;;&quot;&quot;&quot;&quot;&amp;[.I32]&amp;&quot;&quot;&quot;&quot;&amp;REPT(&quot; &quot;;8-LEN([.I32]));&quot;null&quot;&amp;REPT(&quot; &quot;;8-4+2)) &amp;&quot;,&quot;&quot;&quot;&amp;[.J$1]&amp;&quot;&quot;&quot;:&quot;&amp;IF([.J32]&lt;&gt;&quot;&quot;;[.J32]&amp;REPT(&quot; &quot;;4-LEN([.J32]));&quot;null&quot;) &amp;&quot;,&quot;&quot;&quot;&amp;[.K$1]&amp;&quot;&quot;&quot;:&quot;&amp;IF([.K32]&lt;&gt;&quot;&quot;;[.K32]&amp;REPT(&quot; &quot;;4-LEN([.K32]));&quot;null&quot;) &amp;&quot;,&quot;&quot;&quot;&amp;[.L$1]&amp;&quot;&quot;&quot;:&quot;&amp;IF([.L32]&lt;&gt;&quot;&quot;;[.L32]&amp;REPT(&quot; &quot;;5-LEN([.L32]));&quot;null &quot;) &amp;&quot;,&quot;&quot;&quot;&amp;[.M$1]&amp;&quot;&quot;&quot;:&quot;&amp;IF([.M32]&lt;&gt;&quot;&quot;;&quot;&quot;&quot;&quot;&amp;[.M32]&amp;&quot;&quot;&quot;&quot;&amp;REPT(&quot; &quot;;20-LEN([.M32]));&quot;null&quot;&amp;REPT(&quot; &quot;;20-4+2)) &amp;&quot;,&quot;&quot;&quot;&amp;[.N$1]&amp;&quot;&quot;&quot;:&quot;&amp;IF([.N32]&lt;&gt;&quot;&quot;;&quot;&quot;&amp;[.N32]&amp;&quot;&quot;&amp;REPT(&quot; &quot;;5-LEN([.N32]));&quot;null&quot;&amp;REPT(&quot; &quot;;5-4+2)) &amp;&quot;,&quot;&quot;&quot;&amp;[.O$1]&amp;&quot;&quot;&quot;:&quot;&amp;[.O32] &amp;&quot;,&quot;&quot;&quot;&amp;[.P$1]&amp;&quot;&quot;&quot;:&quot;&amp;[.P32] &amp;&quot;}&quot;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3])" office:value-type="float" office:value="0" calcext:value-type="float">
            <text:p>0</text:p>
          </table:table-cell>
          <table:table-cell/>
          <table:table-cell table:style-name="ce17" table:formula="of:=&quot;&quot;&amp;IF([.T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&quot;:&quot; &amp;&quot;{&quot;&quot;&quot;&amp;[.B$1]&amp;&quot;&quot;&quot;:&quot;&quot;&quot;&amp;[.B33]&amp;&quot;&quot;&quot;&quot;&amp;REPT(&quot; &quot;;20-LEN([.B33])) &amp;&quot;,&quot;&quot;&quot;&amp;[.C$1]&amp;&quot;&quot;&quot;:&quot;&quot;&quot;&amp;[.C33]&amp;&quot;&quot;&quot;&quot;&amp;REPT(&quot; &quot;;35-LEN([.C33])) &amp;&quot;,&quot;&quot;&quot;&amp;[.D$1]&amp;&quot;&quot;&quot;:&quot;&amp;[.D33]&amp;REPT(&quot; &quot;;3-LEN([.D33])) &amp;&quot;,&quot;&quot;&quot;&amp;[.E$1]&amp;&quot;&quot;&quot;:&quot;&quot;&quot;&amp;[.E33]&amp;&quot;&quot;&quot;&quot;&amp;REPT(&quot; &quot;;6-LEN([.E33])) &amp;&quot;,&quot;&quot;&quot;&amp;[.F$1]&amp;&quot;&quot;&quot;:&quot;&quot;&quot;&amp;[.F33]&amp;&quot;&quot;&quot;&quot;&amp;REPT(&quot; &quot;;7-LEN([.F33])) &amp;&quot;,&quot;&quot;&quot;&amp;[.G$1]&amp;&quot;&quot;&quot;:&quot;&amp;IF([.G33]&lt;&gt;&quot;&quot;;&quot;&quot;&quot;&quot;&amp;[.G33]&amp;&quot;&quot;&quot;&quot;&amp;REPT(&quot; &quot;;5-LEN([.G33]));&quot;null&quot;&amp;REPT(&quot; &quot;;5-4+2)) &amp;&quot;,&quot;&quot;&quot;&amp;[.H$1]&amp;&quot;&quot;&quot;:&quot;&amp;IF([.H33]&lt;&gt;&quot;&quot;;&quot;&quot;&quot;&quot;&amp;[.H33]&amp;&quot;&quot;&quot;&quot;&amp;REPT(&quot; &quot;;19-LEN([.H33]));&quot;null&quot;&amp;REPT(&quot; &quot;;19-4+2)) &amp;&quot;,&quot;&quot;&quot;&amp;[.I$1]&amp;&quot;&quot;&quot;:&quot;&amp;IF([.I33]&lt;&gt;&quot;&quot;;&quot;&quot;&quot;&quot;&amp;[.I33]&amp;&quot;&quot;&quot;&quot;&amp;REPT(&quot; &quot;;8-LEN([.I33]));&quot;null&quot;&amp;REPT(&quot; &quot;;8-4+2)) &amp;&quot;,&quot;&quot;&quot;&amp;[.J$1]&amp;&quot;&quot;&quot;:&quot;&amp;IF([.J33]&lt;&gt;&quot;&quot;;[.J33]&amp;REPT(&quot; &quot;;4-LEN([.J33]));&quot;null&quot;) &amp;&quot;,&quot;&quot;&quot;&amp;[.K$1]&amp;&quot;&quot;&quot;:&quot;&amp;IF([.K33]&lt;&gt;&quot;&quot;;[.K33]&amp;REPT(&quot; &quot;;4-LEN([.K33]));&quot;null&quot;) &amp;&quot;,&quot;&quot;&quot;&amp;[.L$1]&amp;&quot;&quot;&quot;:&quot;&amp;IF([.L33]&lt;&gt;&quot;&quot;;[.L33]&amp;REPT(&quot; &quot;;5-LEN([.L33]));&quot;null &quot;) &amp;&quot;,&quot;&quot;&quot;&amp;[.M$1]&amp;&quot;&quot;&quot;:&quot;&amp;IF([.M33]&lt;&gt;&quot;&quot;;&quot;&quot;&quot;&quot;&amp;[.M33]&amp;&quot;&quot;&quot;&quot;&amp;REPT(&quot; &quot;;20-LEN([.M33]));&quot;null&quot;&amp;REPT(&quot; &quot;;20-4+2)) &amp;&quot;,&quot;&quot;&quot;&amp;[.N$1]&amp;&quot;&quot;&quot;:&quot;&amp;IF([.N33]&lt;&gt;&quot;&quot;;&quot;&quot;&amp;[.N33]&amp;&quot;&quot;&amp;REPT(&quot; &quot;;5-LEN([.N33]));&quot;null&quot;&amp;REPT(&quot; &quot;;5-4+2)) &amp;&quot;,&quot;&quot;&quot;&amp;[.O$1]&amp;&quot;&quot;&quot;:&quot;&amp;[.O33] &amp;&quot;,&quot;&quot;&quot;&amp;[.P$1]&amp;&quot;&quot;&quot;:&quot;&amp;[.P33] &amp;&quot;}&quot;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4])" office:value-type="float" office:value="0" calcext:value-type="float">
            <text:p>0</text:p>
          </table:table-cell>
          <table:table-cell/>
          <table:table-cell table:style-name="ce17" table:formula="of:=&quot;&quot;&amp;IF([.T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&quot;:&quot; &amp;&quot;{&quot;&quot;&quot;&amp;[.B$1]&amp;&quot;&quot;&quot;:&quot;&quot;&quot;&amp;[.B34]&amp;&quot;&quot;&quot;&quot;&amp;REPT(&quot; &quot;;20-LEN([.B34])) &amp;&quot;,&quot;&quot;&quot;&amp;[.C$1]&amp;&quot;&quot;&quot;:&quot;&quot;&quot;&amp;[.C34]&amp;&quot;&quot;&quot;&quot;&amp;REPT(&quot; &quot;;35-LEN([.C34])) &amp;&quot;,&quot;&quot;&quot;&amp;[.D$1]&amp;&quot;&quot;&quot;:&quot;&amp;[.D34]&amp;REPT(&quot; &quot;;3-LEN([.D34])) &amp;&quot;,&quot;&quot;&quot;&amp;[.E$1]&amp;&quot;&quot;&quot;:&quot;&quot;&quot;&amp;[.E34]&amp;&quot;&quot;&quot;&quot;&amp;REPT(&quot; &quot;;6-LEN([.E34])) &amp;&quot;,&quot;&quot;&quot;&amp;[.F$1]&amp;&quot;&quot;&quot;:&quot;&quot;&quot;&amp;[.F34]&amp;&quot;&quot;&quot;&quot;&amp;REPT(&quot; &quot;;7-LEN([.F34])) &amp;&quot;,&quot;&quot;&quot;&amp;[.G$1]&amp;&quot;&quot;&quot;:&quot;&amp;IF([.G34]&lt;&gt;&quot;&quot;;&quot;&quot;&quot;&quot;&amp;[.G34]&amp;&quot;&quot;&quot;&quot;&amp;REPT(&quot; &quot;;5-LEN([.G34]));&quot;null&quot;&amp;REPT(&quot; &quot;;5-4+2)) &amp;&quot;,&quot;&quot;&quot;&amp;[.H$1]&amp;&quot;&quot;&quot;:&quot;&amp;IF([.H34]&lt;&gt;&quot;&quot;;&quot;&quot;&quot;&quot;&amp;[.H34]&amp;&quot;&quot;&quot;&quot;&amp;REPT(&quot; &quot;;19-LEN([.H34]));&quot;null&quot;&amp;REPT(&quot; &quot;;19-4+2)) &amp;&quot;,&quot;&quot;&quot;&amp;[.I$1]&amp;&quot;&quot;&quot;:&quot;&amp;IF([.I34]&lt;&gt;&quot;&quot;;&quot;&quot;&quot;&quot;&amp;[.I34]&amp;&quot;&quot;&quot;&quot;&amp;REPT(&quot; &quot;;8-LEN([.I34]));&quot;null&quot;&amp;REPT(&quot; &quot;;8-4+2)) &amp;&quot;,&quot;&quot;&quot;&amp;[.J$1]&amp;&quot;&quot;&quot;:&quot;&amp;IF([.J34]&lt;&gt;&quot;&quot;;[.J34]&amp;REPT(&quot; &quot;;4-LEN([.J34]));&quot;null&quot;) &amp;&quot;,&quot;&quot;&quot;&amp;[.K$1]&amp;&quot;&quot;&quot;:&quot;&amp;IF([.K34]&lt;&gt;&quot;&quot;;[.K34]&amp;REPT(&quot; &quot;;4-LEN([.K34]));&quot;null&quot;) &amp;&quot;,&quot;&quot;&quot;&amp;[.L$1]&amp;&quot;&quot;&quot;:&quot;&amp;IF([.L34]&lt;&gt;&quot;&quot;;[.L34]&amp;REPT(&quot; &quot;;5-LEN([.L34]));&quot;null &quot;) &amp;&quot;,&quot;&quot;&quot;&amp;[.M$1]&amp;&quot;&quot;&quot;:&quot;&amp;IF([.M34]&lt;&gt;&quot;&quot;;&quot;&quot;&quot;&quot;&amp;[.M34]&amp;&quot;&quot;&quot;&quot;&amp;REPT(&quot; &quot;;20-LEN([.M34]));&quot;null&quot;&amp;REPT(&quot; &quot;;20-4+2)) &amp;&quot;,&quot;&quot;&quot;&amp;[.N$1]&amp;&quot;&quot;&quot;:&quot;&amp;IF([.N34]&lt;&gt;&quot;&quot;;&quot;&quot;&amp;[.N34]&amp;&quot;&quot;&amp;REPT(&quot; &quot;;5-LEN([.N34]));&quot;null&quot;&amp;REPT(&quot; &quot;;5-4+2)) &amp;&quot;,&quot;&quot;&quot;&amp;[.O$1]&amp;&quot;&quot;&quot;:&quot;&amp;[.O34] &amp;&quot;,&quot;&quot;&quot;&amp;[.P$1]&amp;&quot;&quot;&quot;:&quot;&amp;[.P34] &amp;&quot;}&quot;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5])" office:value-type="float" office:value="0" calcext:value-type="float">
            <text:p>0</text:p>
          </table:table-cell>
          <table:table-cell/>
          <table:table-cell table:style-name="ce17" table:formula="of:=&quot;&quot;&amp;IF([.T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&quot;:&quot; &amp;&quot;{&quot;&quot;&quot;&amp;[.B$1]&amp;&quot;&quot;&quot;:&quot;&quot;&quot;&amp;[.B35]&amp;&quot;&quot;&quot;&quot;&amp;REPT(&quot; &quot;;20-LEN([.B35])) &amp;&quot;,&quot;&quot;&quot;&amp;[.C$1]&amp;&quot;&quot;&quot;:&quot;&quot;&quot;&amp;[.C35]&amp;&quot;&quot;&quot;&quot;&amp;REPT(&quot; &quot;;35-LEN([.C35])) &amp;&quot;,&quot;&quot;&quot;&amp;[.D$1]&amp;&quot;&quot;&quot;:&quot;&amp;[.D35]&amp;REPT(&quot; &quot;;3-LEN([.D35])) &amp;&quot;,&quot;&quot;&quot;&amp;[.E$1]&amp;&quot;&quot;&quot;:&quot;&quot;&quot;&amp;[.E35]&amp;&quot;&quot;&quot;&quot;&amp;REPT(&quot; &quot;;6-LEN([.E35])) &amp;&quot;,&quot;&quot;&quot;&amp;[.F$1]&amp;&quot;&quot;&quot;:&quot;&quot;&quot;&amp;[.F35]&amp;&quot;&quot;&quot;&quot;&amp;REPT(&quot; &quot;;7-LEN([.F35])) &amp;&quot;,&quot;&quot;&quot;&amp;[.G$1]&amp;&quot;&quot;&quot;:&quot;&amp;IF([.G35]&lt;&gt;&quot;&quot;;&quot;&quot;&quot;&quot;&amp;[.G35]&amp;&quot;&quot;&quot;&quot;&amp;REPT(&quot; &quot;;5-LEN([.G35]));&quot;null&quot;&amp;REPT(&quot; &quot;;5-4+2)) &amp;&quot;,&quot;&quot;&quot;&amp;[.H$1]&amp;&quot;&quot;&quot;:&quot;&amp;IF([.H35]&lt;&gt;&quot;&quot;;&quot;&quot;&quot;&quot;&amp;[.H35]&amp;&quot;&quot;&quot;&quot;&amp;REPT(&quot; &quot;;19-LEN([.H35]));&quot;null&quot;&amp;REPT(&quot; &quot;;19-4+2)) &amp;&quot;,&quot;&quot;&quot;&amp;[.I$1]&amp;&quot;&quot;&quot;:&quot;&amp;IF([.I35]&lt;&gt;&quot;&quot;;&quot;&quot;&quot;&quot;&amp;[.I35]&amp;&quot;&quot;&quot;&quot;&amp;REPT(&quot; &quot;;8-LEN([.I35]));&quot;null&quot;&amp;REPT(&quot; &quot;;8-4+2)) &amp;&quot;,&quot;&quot;&quot;&amp;[.J$1]&amp;&quot;&quot;&quot;:&quot;&amp;IF([.J35]&lt;&gt;&quot;&quot;;[.J35]&amp;REPT(&quot; &quot;;4-LEN([.J35]));&quot;null&quot;) &amp;&quot;,&quot;&quot;&quot;&amp;[.K$1]&amp;&quot;&quot;&quot;:&quot;&amp;IF([.K35]&lt;&gt;&quot;&quot;;[.K35]&amp;REPT(&quot; &quot;;4-LEN([.K35]));&quot;null&quot;) &amp;&quot;,&quot;&quot;&quot;&amp;[.L$1]&amp;&quot;&quot;&quot;:&quot;&amp;IF([.L35]&lt;&gt;&quot;&quot;;[.L35]&amp;REPT(&quot; &quot;;5-LEN([.L35]));&quot;null &quot;) &amp;&quot;,&quot;&quot;&quot;&amp;[.M$1]&amp;&quot;&quot;&quot;:&quot;&amp;IF([.M35]&lt;&gt;&quot;&quot;;&quot;&quot;&quot;&quot;&amp;[.M35]&amp;&quot;&quot;&quot;&quot;&amp;REPT(&quot; &quot;;20-LEN([.M35]));&quot;null&quot;&amp;REPT(&quot; &quot;;20-4+2)) &amp;&quot;,&quot;&quot;&quot;&amp;[.N$1]&amp;&quot;&quot;&quot;:&quot;&amp;IF([.N35]&lt;&gt;&quot;&quot;;&quot;&quot;&amp;[.N35]&amp;&quot;&quot;&amp;REPT(&quot; &quot;;5-LEN([.N35]));&quot;null&quot;&amp;REPT(&quot; &quot;;5-4+2)) &amp;&quot;,&quot;&quot;&quot;&amp;[.O$1]&amp;&quot;&quot;&quot;:&quot;&amp;[.O35] &amp;&quot;,&quot;&quot;&quot;&amp;[.P$1]&amp;&quot;&quot;&quot;:&quot;&amp;[.P35] &amp;&quot;}&quot;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6])" office:value-type="float" office:value="0" calcext:value-type="float">
            <text:p>0</text:p>
          </table:table-cell>
          <table:table-cell/>
          <table:table-cell table:style-name="ce17" table:formula="of:=&quot;&quot;&amp;IF([.T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&quot;:&quot; &amp;&quot;{&quot;&quot;&quot;&amp;[.B$1]&amp;&quot;&quot;&quot;:&quot;&quot;&quot;&amp;[.B36]&amp;&quot;&quot;&quot;&quot;&amp;REPT(&quot; &quot;;20-LEN([.B36])) &amp;&quot;,&quot;&quot;&quot;&amp;[.C$1]&amp;&quot;&quot;&quot;:&quot;&quot;&quot;&amp;[.C36]&amp;&quot;&quot;&quot;&quot;&amp;REPT(&quot; &quot;;35-LEN([.C36])) &amp;&quot;,&quot;&quot;&quot;&amp;[.D$1]&amp;&quot;&quot;&quot;:&quot;&amp;[.D36]&amp;REPT(&quot; &quot;;3-LEN([.D36])) &amp;&quot;,&quot;&quot;&quot;&amp;[.E$1]&amp;&quot;&quot;&quot;:&quot;&quot;&quot;&amp;[.E36]&amp;&quot;&quot;&quot;&quot;&amp;REPT(&quot; &quot;;6-LEN([.E36])) &amp;&quot;,&quot;&quot;&quot;&amp;[.F$1]&amp;&quot;&quot;&quot;:&quot;&quot;&quot;&amp;[.F36]&amp;&quot;&quot;&quot;&quot;&amp;REPT(&quot; &quot;;7-LEN([.F36])) &amp;&quot;,&quot;&quot;&quot;&amp;[.G$1]&amp;&quot;&quot;&quot;:&quot;&amp;IF([.G36]&lt;&gt;&quot;&quot;;&quot;&quot;&quot;&quot;&amp;[.G36]&amp;&quot;&quot;&quot;&quot;&amp;REPT(&quot; &quot;;5-LEN([.G36]));&quot;null&quot;&amp;REPT(&quot; &quot;;5-4+2)) &amp;&quot;,&quot;&quot;&quot;&amp;[.H$1]&amp;&quot;&quot;&quot;:&quot;&amp;IF([.H36]&lt;&gt;&quot;&quot;;&quot;&quot;&quot;&quot;&amp;[.H36]&amp;&quot;&quot;&quot;&quot;&amp;REPT(&quot; &quot;;19-LEN([.H36]));&quot;null&quot;&amp;REPT(&quot; &quot;;19-4+2)) &amp;&quot;,&quot;&quot;&quot;&amp;[.I$1]&amp;&quot;&quot;&quot;:&quot;&amp;IF([.I36]&lt;&gt;&quot;&quot;;&quot;&quot;&quot;&quot;&amp;[.I36]&amp;&quot;&quot;&quot;&quot;&amp;REPT(&quot; &quot;;8-LEN([.I36]));&quot;null&quot;&amp;REPT(&quot; &quot;;8-4+2)) &amp;&quot;,&quot;&quot;&quot;&amp;[.J$1]&amp;&quot;&quot;&quot;:&quot;&amp;IF([.J36]&lt;&gt;&quot;&quot;;[.J36]&amp;REPT(&quot; &quot;;4-LEN([.J36]));&quot;null&quot;) &amp;&quot;,&quot;&quot;&quot;&amp;[.K$1]&amp;&quot;&quot;&quot;:&quot;&amp;IF([.K36]&lt;&gt;&quot;&quot;;[.K36]&amp;REPT(&quot; &quot;;4-LEN([.K36]));&quot;null&quot;) &amp;&quot;,&quot;&quot;&quot;&amp;[.L$1]&amp;&quot;&quot;&quot;:&quot;&amp;IF([.L36]&lt;&gt;&quot;&quot;;[.L36]&amp;REPT(&quot; &quot;;5-LEN([.L36]));&quot;null &quot;) &amp;&quot;,&quot;&quot;&quot;&amp;[.M$1]&amp;&quot;&quot;&quot;:&quot;&amp;IF([.M36]&lt;&gt;&quot;&quot;;&quot;&quot;&quot;&quot;&amp;[.M36]&amp;&quot;&quot;&quot;&quot;&amp;REPT(&quot; &quot;;20-LEN([.M36]));&quot;null&quot;&amp;REPT(&quot; &quot;;20-4+2)) &amp;&quot;,&quot;&quot;&quot;&amp;[.N$1]&amp;&quot;&quot;&quot;:&quot;&amp;IF([.N36]&lt;&gt;&quot;&quot;;&quot;&quot;&amp;[.N36]&amp;&quot;&quot;&amp;REPT(&quot; &quot;;5-LEN([.N36]));&quot;null&quot;&amp;REPT(&quot; &quot;;5-4+2)) &amp;&quot;,&quot;&quot;&quot;&amp;[.O$1]&amp;&quot;&quot;&quot;:&quot;&amp;[.O36] &amp;&quot;,&quot;&quot;&quot;&amp;[.P$1]&amp;&quot;&quot;&quot;:&quot;&amp;[.P36] &amp;&quot;}&quot;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7])" office:value-type="float" office:value="0" calcext:value-type="float">
            <text:p>0</text:p>
          </table:table-cell>
          <table:table-cell/>
          <table:table-cell table:style-name="ce17" table:formula="of:=&quot;&quot;&amp;IF([.T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&quot;:&quot; &amp;&quot;{&quot;&quot;&quot;&amp;[.B$1]&amp;&quot;&quot;&quot;:&quot;&quot;&quot;&amp;[.B37]&amp;&quot;&quot;&quot;&quot;&amp;REPT(&quot; &quot;;20-LEN([.B37])) &amp;&quot;,&quot;&quot;&quot;&amp;[.C$1]&amp;&quot;&quot;&quot;:&quot;&quot;&quot;&amp;[.C37]&amp;&quot;&quot;&quot;&quot;&amp;REPT(&quot; &quot;;35-LEN([.C37])) &amp;&quot;,&quot;&quot;&quot;&amp;[.D$1]&amp;&quot;&quot;&quot;:&quot;&amp;[.D37]&amp;REPT(&quot; &quot;;3-LEN([.D37])) &amp;&quot;,&quot;&quot;&quot;&amp;[.E$1]&amp;&quot;&quot;&quot;:&quot;&quot;&quot;&amp;[.E37]&amp;&quot;&quot;&quot;&quot;&amp;REPT(&quot; &quot;;6-LEN([.E37])) &amp;&quot;,&quot;&quot;&quot;&amp;[.F$1]&amp;&quot;&quot;&quot;:&quot;&quot;&quot;&amp;[.F37]&amp;&quot;&quot;&quot;&quot;&amp;REPT(&quot; &quot;;7-LEN([.F37])) &amp;&quot;,&quot;&quot;&quot;&amp;[.G$1]&amp;&quot;&quot;&quot;:&quot;&amp;IF([.G37]&lt;&gt;&quot;&quot;;&quot;&quot;&quot;&quot;&amp;[.G37]&amp;&quot;&quot;&quot;&quot;&amp;REPT(&quot; &quot;;5-LEN([.G37]));&quot;null&quot;&amp;REPT(&quot; &quot;;5-4+2)) &amp;&quot;,&quot;&quot;&quot;&amp;[.H$1]&amp;&quot;&quot;&quot;:&quot;&amp;IF([.H37]&lt;&gt;&quot;&quot;;&quot;&quot;&quot;&quot;&amp;[.H37]&amp;&quot;&quot;&quot;&quot;&amp;REPT(&quot; &quot;;19-LEN([.H37]));&quot;null&quot;&amp;REPT(&quot; &quot;;19-4+2)) &amp;&quot;,&quot;&quot;&quot;&amp;[.I$1]&amp;&quot;&quot;&quot;:&quot;&amp;IF([.I37]&lt;&gt;&quot;&quot;;&quot;&quot;&quot;&quot;&amp;[.I37]&amp;&quot;&quot;&quot;&quot;&amp;REPT(&quot; &quot;;8-LEN([.I37]));&quot;null&quot;&amp;REPT(&quot; &quot;;8-4+2)) &amp;&quot;,&quot;&quot;&quot;&amp;[.J$1]&amp;&quot;&quot;&quot;:&quot;&amp;IF([.J37]&lt;&gt;&quot;&quot;;[.J37]&amp;REPT(&quot; &quot;;4-LEN([.J37]));&quot;null&quot;) &amp;&quot;,&quot;&quot;&quot;&amp;[.K$1]&amp;&quot;&quot;&quot;:&quot;&amp;IF([.K37]&lt;&gt;&quot;&quot;;[.K37]&amp;REPT(&quot; &quot;;4-LEN([.K37]));&quot;null&quot;) &amp;&quot;,&quot;&quot;&quot;&amp;[.L$1]&amp;&quot;&quot;&quot;:&quot;&amp;IF([.L37]&lt;&gt;&quot;&quot;;[.L37]&amp;REPT(&quot; &quot;;5-LEN([.L37]));&quot;null &quot;) &amp;&quot;,&quot;&quot;&quot;&amp;[.M$1]&amp;&quot;&quot;&quot;:&quot;&amp;IF([.M37]&lt;&gt;&quot;&quot;;&quot;&quot;&quot;&quot;&amp;[.M37]&amp;&quot;&quot;&quot;&quot;&amp;REPT(&quot; &quot;;20-LEN([.M37]));&quot;null&quot;&amp;REPT(&quot; &quot;;20-4+2)) &amp;&quot;,&quot;&quot;&quot;&amp;[.N$1]&amp;&quot;&quot;&quot;:&quot;&amp;IF([.N37]&lt;&gt;&quot;&quot;;&quot;&quot;&amp;[.N37]&amp;&quot;&quot;&amp;REPT(&quot; &quot;;5-LEN([.N37]));&quot;null&quot;&amp;REPT(&quot; &quot;;5-4+2)) &amp;&quot;,&quot;&quot;&quot;&amp;[.O$1]&amp;&quot;&quot;&quot;:&quot;&amp;[.O37] &amp;&quot;,&quot;&quot;&quot;&amp;[.P$1]&amp;&quot;&quot;&quot;:&quot;&amp;[.P37] &amp;&quot;}&quot;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8])" office:value-type="float" office:value="0" calcext:value-type="float">
            <text:p>0</text:p>
          </table:table-cell>
          <table:table-cell/>
          <table:table-cell table:style-name="ce17" table:formula="of:=&quot;&quot;&amp;IF([.T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&quot;:&quot; &amp;&quot;{&quot;&quot;&quot;&amp;[.B$1]&amp;&quot;&quot;&quot;:&quot;&quot;&quot;&amp;[.B38]&amp;&quot;&quot;&quot;&quot;&amp;REPT(&quot; &quot;;20-LEN([.B38])) &amp;&quot;,&quot;&quot;&quot;&amp;[.C$1]&amp;&quot;&quot;&quot;:&quot;&quot;&quot;&amp;[.C38]&amp;&quot;&quot;&quot;&quot;&amp;REPT(&quot; &quot;;35-LEN([.C38])) &amp;&quot;,&quot;&quot;&quot;&amp;[.D$1]&amp;&quot;&quot;&quot;:&quot;&amp;[.D38]&amp;REPT(&quot; &quot;;3-LEN([.D38])) &amp;&quot;,&quot;&quot;&quot;&amp;[.E$1]&amp;&quot;&quot;&quot;:&quot;&quot;&quot;&amp;[.E38]&amp;&quot;&quot;&quot;&quot;&amp;REPT(&quot; &quot;;6-LEN([.E38])) &amp;&quot;,&quot;&quot;&quot;&amp;[.F$1]&amp;&quot;&quot;&quot;:&quot;&quot;&quot;&amp;[.F38]&amp;&quot;&quot;&quot;&quot;&amp;REPT(&quot; &quot;;7-LEN([.F38])) &amp;&quot;,&quot;&quot;&quot;&amp;[.G$1]&amp;&quot;&quot;&quot;:&quot;&amp;IF([.G38]&lt;&gt;&quot;&quot;;&quot;&quot;&quot;&quot;&amp;[.G38]&amp;&quot;&quot;&quot;&quot;&amp;REPT(&quot; &quot;;5-LEN([.G38]));&quot;null&quot;&amp;REPT(&quot; &quot;;5-4+2)) &amp;&quot;,&quot;&quot;&quot;&amp;[.H$1]&amp;&quot;&quot;&quot;:&quot;&amp;IF([.H38]&lt;&gt;&quot;&quot;;&quot;&quot;&quot;&quot;&amp;[.H38]&amp;&quot;&quot;&quot;&quot;&amp;REPT(&quot; &quot;;19-LEN([.H38]));&quot;null&quot;&amp;REPT(&quot; &quot;;19-4+2)) &amp;&quot;,&quot;&quot;&quot;&amp;[.I$1]&amp;&quot;&quot;&quot;:&quot;&amp;IF([.I38]&lt;&gt;&quot;&quot;;&quot;&quot;&quot;&quot;&amp;[.I38]&amp;&quot;&quot;&quot;&quot;&amp;REPT(&quot; &quot;;8-LEN([.I38]));&quot;null&quot;&amp;REPT(&quot; &quot;;8-4+2)) &amp;&quot;,&quot;&quot;&quot;&amp;[.J$1]&amp;&quot;&quot;&quot;:&quot;&amp;IF([.J38]&lt;&gt;&quot;&quot;;[.J38]&amp;REPT(&quot; &quot;;4-LEN([.J38]));&quot;null&quot;) &amp;&quot;,&quot;&quot;&quot;&amp;[.K$1]&amp;&quot;&quot;&quot;:&quot;&amp;IF([.K38]&lt;&gt;&quot;&quot;;[.K38]&amp;REPT(&quot; &quot;;4-LEN([.K38]));&quot;null&quot;) &amp;&quot;,&quot;&quot;&quot;&amp;[.L$1]&amp;&quot;&quot;&quot;:&quot;&amp;IF([.L38]&lt;&gt;&quot;&quot;;[.L38]&amp;REPT(&quot; &quot;;5-LEN([.L38]));&quot;null &quot;) &amp;&quot;,&quot;&quot;&quot;&amp;[.M$1]&amp;&quot;&quot;&quot;:&quot;&amp;IF([.M38]&lt;&gt;&quot;&quot;;&quot;&quot;&quot;&quot;&amp;[.M38]&amp;&quot;&quot;&quot;&quot;&amp;REPT(&quot; &quot;;20-LEN([.M38]));&quot;null&quot;&amp;REPT(&quot; &quot;;20-4+2)) &amp;&quot;,&quot;&quot;&quot;&amp;[.N$1]&amp;&quot;&quot;&quot;:&quot;&amp;IF([.N38]&lt;&gt;&quot;&quot;;&quot;&quot;&amp;[.N38]&amp;&quot;&quot;&amp;REPT(&quot; &quot;;5-LEN([.N38]));&quot;null&quot;&amp;REPT(&quot; &quot;;5-4+2)) &amp;&quot;,&quot;&quot;&quot;&amp;[.O$1]&amp;&quot;&quot;&quot;:&quot;&amp;[.O38] &amp;&quot;,&quot;&quot;&quot;&amp;[.P$1]&amp;&quot;&quot;&quot;:&quot;&amp;[.P38] &amp;&quot;}&quot;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9])" office:value-type="float" office:value="0" calcext:value-type="float">
            <text:p>0</text:p>
          </table:table-cell>
          <table:table-cell/>
          <table:table-cell table:style-name="ce17" table:formula="of:=&quot;&quot;&amp;IF([.T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&quot;:&quot; &amp;&quot;{&quot;&quot;&quot;&amp;[.B$1]&amp;&quot;&quot;&quot;:&quot;&quot;&quot;&amp;[.B39]&amp;&quot;&quot;&quot;&quot;&amp;REPT(&quot; &quot;;20-LEN([.B39])) &amp;&quot;,&quot;&quot;&quot;&amp;[.C$1]&amp;&quot;&quot;&quot;:&quot;&quot;&quot;&amp;[.C39]&amp;&quot;&quot;&quot;&quot;&amp;REPT(&quot; &quot;;35-LEN([.C39])) &amp;&quot;,&quot;&quot;&quot;&amp;[.D$1]&amp;&quot;&quot;&quot;:&quot;&amp;[.D39]&amp;REPT(&quot; &quot;;3-LEN([.D39])) &amp;&quot;,&quot;&quot;&quot;&amp;[.E$1]&amp;&quot;&quot;&quot;:&quot;&quot;&quot;&amp;[.E39]&amp;&quot;&quot;&quot;&quot;&amp;REPT(&quot; &quot;;6-LEN([.E39])) &amp;&quot;,&quot;&quot;&quot;&amp;[.F$1]&amp;&quot;&quot;&quot;:&quot;&quot;&quot;&amp;[.F39]&amp;&quot;&quot;&quot;&quot;&amp;REPT(&quot; &quot;;7-LEN([.F39])) &amp;&quot;,&quot;&quot;&quot;&amp;[.G$1]&amp;&quot;&quot;&quot;:&quot;&amp;IF([.G39]&lt;&gt;&quot;&quot;;&quot;&quot;&quot;&quot;&amp;[.G39]&amp;&quot;&quot;&quot;&quot;&amp;REPT(&quot; &quot;;5-LEN([.G39]));&quot;null&quot;&amp;REPT(&quot; &quot;;5-4+2)) &amp;&quot;,&quot;&quot;&quot;&amp;[.H$1]&amp;&quot;&quot;&quot;:&quot;&amp;IF([.H39]&lt;&gt;&quot;&quot;;&quot;&quot;&quot;&quot;&amp;[.H39]&amp;&quot;&quot;&quot;&quot;&amp;REPT(&quot; &quot;;19-LEN([.H39]));&quot;null&quot;&amp;REPT(&quot; &quot;;19-4+2)) &amp;&quot;,&quot;&quot;&quot;&amp;[.I$1]&amp;&quot;&quot;&quot;:&quot;&amp;IF([.I39]&lt;&gt;&quot;&quot;;&quot;&quot;&quot;&quot;&amp;[.I39]&amp;&quot;&quot;&quot;&quot;&amp;REPT(&quot; &quot;;8-LEN([.I39]));&quot;null&quot;&amp;REPT(&quot; &quot;;8-4+2)) &amp;&quot;,&quot;&quot;&quot;&amp;[.J$1]&amp;&quot;&quot;&quot;:&quot;&amp;IF([.J39]&lt;&gt;&quot;&quot;;[.J39]&amp;REPT(&quot; &quot;;4-LEN([.J39]));&quot;null&quot;) &amp;&quot;,&quot;&quot;&quot;&amp;[.K$1]&amp;&quot;&quot;&quot;:&quot;&amp;IF([.K39]&lt;&gt;&quot;&quot;;[.K39]&amp;REPT(&quot; &quot;;4-LEN([.K39]));&quot;null&quot;) &amp;&quot;,&quot;&quot;&quot;&amp;[.L$1]&amp;&quot;&quot;&quot;:&quot;&amp;IF([.L39]&lt;&gt;&quot;&quot;;[.L39]&amp;REPT(&quot; &quot;;5-LEN([.L39]));&quot;null &quot;) &amp;&quot;,&quot;&quot;&quot;&amp;[.M$1]&amp;&quot;&quot;&quot;:&quot;&amp;IF([.M39]&lt;&gt;&quot;&quot;;&quot;&quot;&quot;&quot;&amp;[.M39]&amp;&quot;&quot;&quot;&quot;&amp;REPT(&quot; &quot;;20-LEN([.M39]));&quot;null&quot;&amp;REPT(&quot; &quot;;20-4+2)) &amp;&quot;,&quot;&quot;&quot;&amp;[.N$1]&amp;&quot;&quot;&quot;:&quot;&amp;IF([.N39]&lt;&gt;&quot;&quot;;&quot;&quot;&amp;[.N39]&amp;&quot;&quot;&amp;REPT(&quot; &quot;;5-LEN([.N39]));&quot;null&quot;&amp;REPT(&quot; &quot;;5-4+2)) &amp;&quot;,&quot;&quot;&quot;&amp;[.O$1]&amp;&quot;&quot;&quot;:&quot;&amp;[.O39] &amp;&quot;,&quot;&quot;&quot;&amp;[.P$1]&amp;&quot;&quot;&quot;:&quot;&amp;[.P39] &amp;&quot;}&quot;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0])" office:value-type="float" office:value="0" calcext:value-type="float">
            <text:p>0</text:p>
          </table:table-cell>
          <table:table-cell/>
          <table:table-cell table:style-name="ce17" table:formula="of:=&quot;&quot;&amp;IF([.T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&quot;:&quot; &amp;&quot;{&quot;&quot;&quot;&amp;[.B$1]&amp;&quot;&quot;&quot;:&quot;&quot;&quot;&amp;[.B40]&amp;&quot;&quot;&quot;&quot;&amp;REPT(&quot; &quot;;20-LEN([.B40])) &amp;&quot;,&quot;&quot;&quot;&amp;[.C$1]&amp;&quot;&quot;&quot;:&quot;&quot;&quot;&amp;[.C40]&amp;&quot;&quot;&quot;&quot;&amp;REPT(&quot; &quot;;35-LEN([.C40])) &amp;&quot;,&quot;&quot;&quot;&amp;[.D$1]&amp;&quot;&quot;&quot;:&quot;&amp;[.D40]&amp;REPT(&quot; &quot;;3-LEN([.D40])) &amp;&quot;,&quot;&quot;&quot;&amp;[.E$1]&amp;&quot;&quot;&quot;:&quot;&quot;&quot;&amp;[.E40]&amp;&quot;&quot;&quot;&quot;&amp;REPT(&quot; &quot;;6-LEN([.E40])) &amp;&quot;,&quot;&quot;&quot;&amp;[.F$1]&amp;&quot;&quot;&quot;:&quot;&quot;&quot;&amp;[.F40]&amp;&quot;&quot;&quot;&quot;&amp;REPT(&quot; &quot;;7-LEN([.F40])) &amp;&quot;,&quot;&quot;&quot;&amp;[.G$1]&amp;&quot;&quot;&quot;:&quot;&amp;IF([.G40]&lt;&gt;&quot;&quot;;&quot;&quot;&quot;&quot;&amp;[.G40]&amp;&quot;&quot;&quot;&quot;&amp;REPT(&quot; &quot;;5-LEN([.G40]));&quot;null&quot;&amp;REPT(&quot; &quot;;5-4+2)) &amp;&quot;,&quot;&quot;&quot;&amp;[.H$1]&amp;&quot;&quot;&quot;:&quot;&amp;IF([.H40]&lt;&gt;&quot;&quot;;&quot;&quot;&quot;&quot;&amp;[.H40]&amp;&quot;&quot;&quot;&quot;&amp;REPT(&quot; &quot;;19-LEN([.H40]));&quot;null&quot;&amp;REPT(&quot; &quot;;19-4+2)) &amp;&quot;,&quot;&quot;&quot;&amp;[.I$1]&amp;&quot;&quot;&quot;:&quot;&amp;IF([.I40]&lt;&gt;&quot;&quot;;&quot;&quot;&quot;&quot;&amp;[.I40]&amp;&quot;&quot;&quot;&quot;&amp;REPT(&quot; &quot;;8-LEN([.I40]));&quot;null&quot;&amp;REPT(&quot; &quot;;8-4+2)) &amp;&quot;,&quot;&quot;&quot;&amp;[.J$1]&amp;&quot;&quot;&quot;:&quot;&amp;IF([.J40]&lt;&gt;&quot;&quot;;[.J40]&amp;REPT(&quot; &quot;;4-LEN([.J40]));&quot;null&quot;) &amp;&quot;,&quot;&quot;&quot;&amp;[.K$1]&amp;&quot;&quot;&quot;:&quot;&amp;IF([.K40]&lt;&gt;&quot;&quot;;[.K40]&amp;REPT(&quot; &quot;;4-LEN([.K40]));&quot;null&quot;) &amp;&quot;,&quot;&quot;&quot;&amp;[.L$1]&amp;&quot;&quot;&quot;:&quot;&amp;IF([.L40]&lt;&gt;&quot;&quot;;[.L40]&amp;REPT(&quot; &quot;;5-LEN([.L40]));&quot;null &quot;) &amp;&quot;,&quot;&quot;&quot;&amp;[.M$1]&amp;&quot;&quot;&quot;:&quot;&amp;IF([.M40]&lt;&gt;&quot;&quot;;&quot;&quot;&quot;&quot;&amp;[.M40]&amp;&quot;&quot;&quot;&quot;&amp;REPT(&quot; &quot;;20-LEN([.M40]));&quot;null&quot;&amp;REPT(&quot; &quot;;20-4+2)) &amp;&quot;,&quot;&quot;&quot;&amp;[.N$1]&amp;&quot;&quot;&quot;:&quot;&amp;IF([.N40]&lt;&gt;&quot;&quot;;&quot;&quot;&amp;[.N40]&amp;&quot;&quot;&amp;REPT(&quot; &quot;;5-LEN([.N40]));&quot;null&quot;&amp;REPT(&quot; &quot;;5-4+2)) &amp;&quot;,&quot;&quot;&quot;&amp;[.O$1]&amp;&quot;&quot;&quot;:&quot;&amp;[.O40] &amp;&quot;,&quot;&quot;&quot;&amp;[.P$1]&amp;&quot;&quot;&quot;:&quot;&amp;[.P40] &amp;&quot;}&quot;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1])" office:value-type="float" office:value="0" calcext:value-type="float">
            <text:p>0</text:p>
          </table:table-cell>
          <table:table-cell/>
          <table:table-cell table:style-name="ce17" table:formula="of:=&quot;&quot;&amp;IF([.T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&quot;:&quot; &amp;&quot;{&quot;&quot;&quot;&amp;[.B$1]&amp;&quot;&quot;&quot;:&quot;&quot;&quot;&amp;[.B41]&amp;&quot;&quot;&quot;&quot;&amp;REPT(&quot; &quot;;20-LEN([.B41])) &amp;&quot;,&quot;&quot;&quot;&amp;[.C$1]&amp;&quot;&quot;&quot;:&quot;&quot;&quot;&amp;[.C41]&amp;&quot;&quot;&quot;&quot;&amp;REPT(&quot; &quot;;35-LEN([.C41])) &amp;&quot;,&quot;&quot;&quot;&amp;[.D$1]&amp;&quot;&quot;&quot;:&quot;&amp;[.D41]&amp;REPT(&quot; &quot;;3-LEN([.D41])) &amp;&quot;,&quot;&quot;&quot;&amp;[.E$1]&amp;&quot;&quot;&quot;:&quot;&quot;&quot;&amp;[.E41]&amp;&quot;&quot;&quot;&quot;&amp;REPT(&quot; &quot;;6-LEN([.E41])) &amp;&quot;,&quot;&quot;&quot;&amp;[.F$1]&amp;&quot;&quot;&quot;:&quot;&quot;&quot;&amp;[.F41]&amp;&quot;&quot;&quot;&quot;&amp;REPT(&quot; &quot;;7-LEN([.F41])) &amp;&quot;,&quot;&quot;&quot;&amp;[.G$1]&amp;&quot;&quot;&quot;:&quot;&amp;IF([.G41]&lt;&gt;&quot;&quot;;&quot;&quot;&quot;&quot;&amp;[.G41]&amp;&quot;&quot;&quot;&quot;&amp;REPT(&quot; &quot;;5-LEN([.G41]));&quot;null&quot;&amp;REPT(&quot; &quot;;5-4+2)) &amp;&quot;,&quot;&quot;&quot;&amp;[.H$1]&amp;&quot;&quot;&quot;:&quot;&amp;IF([.H41]&lt;&gt;&quot;&quot;;&quot;&quot;&quot;&quot;&amp;[.H41]&amp;&quot;&quot;&quot;&quot;&amp;REPT(&quot; &quot;;19-LEN([.H41]));&quot;null&quot;&amp;REPT(&quot; &quot;;19-4+2)) &amp;&quot;,&quot;&quot;&quot;&amp;[.I$1]&amp;&quot;&quot;&quot;:&quot;&amp;IF([.I41]&lt;&gt;&quot;&quot;;&quot;&quot;&quot;&quot;&amp;[.I41]&amp;&quot;&quot;&quot;&quot;&amp;REPT(&quot; &quot;;8-LEN([.I41]));&quot;null&quot;&amp;REPT(&quot; &quot;;8-4+2)) &amp;&quot;,&quot;&quot;&quot;&amp;[.J$1]&amp;&quot;&quot;&quot;:&quot;&amp;IF([.J41]&lt;&gt;&quot;&quot;;[.J41]&amp;REPT(&quot; &quot;;4-LEN([.J41]));&quot;null&quot;) &amp;&quot;,&quot;&quot;&quot;&amp;[.K$1]&amp;&quot;&quot;&quot;:&quot;&amp;IF([.K41]&lt;&gt;&quot;&quot;;[.K41]&amp;REPT(&quot; &quot;;4-LEN([.K41]));&quot;null&quot;) &amp;&quot;,&quot;&quot;&quot;&amp;[.L$1]&amp;&quot;&quot;&quot;:&quot;&amp;IF([.L41]&lt;&gt;&quot;&quot;;[.L41]&amp;REPT(&quot; &quot;;5-LEN([.L41]));&quot;null &quot;) &amp;&quot;,&quot;&quot;&quot;&amp;[.M$1]&amp;&quot;&quot;&quot;:&quot;&amp;IF([.M41]&lt;&gt;&quot;&quot;;&quot;&quot;&quot;&quot;&amp;[.M41]&amp;&quot;&quot;&quot;&quot;&amp;REPT(&quot; &quot;;20-LEN([.M41]));&quot;null&quot;&amp;REPT(&quot; &quot;;20-4+2)) &amp;&quot;,&quot;&quot;&quot;&amp;[.N$1]&amp;&quot;&quot;&quot;:&quot;&amp;IF([.N41]&lt;&gt;&quot;&quot;;&quot;&quot;&amp;[.N41]&amp;&quot;&quot;&amp;REPT(&quot; &quot;;5-LEN([.N41]));&quot;null&quot;&amp;REPT(&quot; &quot;;5-4+2)) &amp;&quot;,&quot;&quot;&quot;&amp;[.O$1]&amp;&quot;&quot;&quot;:&quot;&amp;[.O41] &amp;&quot;,&quot;&quot;&quot;&amp;[.P$1]&amp;&quot;&quot;&quot;:&quot;&amp;[.P41] &amp;&quot;}&quot;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2])" office:value-type="float" office:value="1" calcext:value-type="float">
            <text:p>1</text:p>
          </table:table-cell>
          <table:table-cell/>
          <table:table-cell table:style-name="ce17" table:formula="of:=&quot;&quot;&amp;IF([.T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&quot;:&quot; &amp;&quot;{&quot;&quot;&quot;&amp;[.B$1]&amp;&quot;&quot;&quot;:&quot;&quot;&quot;&amp;[.B42]&amp;&quot;&quot;&quot;&quot;&amp;REPT(&quot; &quot;;20-LEN([.B42])) &amp;&quot;,&quot;&quot;&quot;&amp;[.C$1]&amp;&quot;&quot;&quot;:&quot;&quot;&quot;&amp;[.C42]&amp;&quot;&quot;&quot;&quot;&amp;REPT(&quot; &quot;;35-LEN([.C42])) &amp;&quot;,&quot;&quot;&quot;&amp;[.D$1]&amp;&quot;&quot;&quot;:&quot;&amp;[.D42]&amp;REPT(&quot; &quot;;3-LEN([.D42])) &amp;&quot;,&quot;&quot;&quot;&amp;[.E$1]&amp;&quot;&quot;&quot;:&quot;&quot;&quot;&amp;[.E42]&amp;&quot;&quot;&quot;&quot;&amp;REPT(&quot; &quot;;6-LEN([.E42])) &amp;&quot;,&quot;&quot;&quot;&amp;[.F$1]&amp;&quot;&quot;&quot;:&quot;&quot;&quot;&amp;[.F42]&amp;&quot;&quot;&quot;&quot;&amp;REPT(&quot; &quot;;7-LEN([.F42])) &amp;&quot;,&quot;&quot;&quot;&amp;[.G$1]&amp;&quot;&quot;&quot;:&quot;&amp;IF([.G42]&lt;&gt;&quot;&quot;;&quot;&quot;&quot;&quot;&amp;[.G42]&amp;&quot;&quot;&quot;&quot;&amp;REPT(&quot; &quot;;5-LEN([.G42]));&quot;null&quot;&amp;REPT(&quot; &quot;;5-4+2)) &amp;&quot;,&quot;&quot;&quot;&amp;[.H$1]&amp;&quot;&quot;&quot;:&quot;&amp;IF([.H42]&lt;&gt;&quot;&quot;;&quot;&quot;&quot;&quot;&amp;[.H42]&amp;&quot;&quot;&quot;&quot;&amp;REPT(&quot; &quot;;19-LEN([.H42]));&quot;null&quot;&amp;REPT(&quot; &quot;;19-4+2)) &amp;&quot;,&quot;&quot;&quot;&amp;[.I$1]&amp;&quot;&quot;&quot;:&quot;&amp;IF([.I42]&lt;&gt;&quot;&quot;;&quot;&quot;&quot;&quot;&amp;[.I42]&amp;&quot;&quot;&quot;&quot;&amp;REPT(&quot; &quot;;8-LEN([.I42]));&quot;null&quot;&amp;REPT(&quot; &quot;;8-4+2)) &amp;&quot;,&quot;&quot;&quot;&amp;[.J$1]&amp;&quot;&quot;&quot;:&quot;&amp;IF([.J42]&lt;&gt;&quot;&quot;;[.J42]&amp;REPT(&quot; &quot;;4-LEN([.J42]));&quot;null&quot;) &amp;&quot;,&quot;&quot;&quot;&amp;[.K$1]&amp;&quot;&quot;&quot;:&quot;&amp;IF([.K42]&lt;&gt;&quot;&quot;;[.K42]&amp;REPT(&quot; &quot;;4-LEN([.K42]));&quot;null&quot;) &amp;&quot;,&quot;&quot;&quot;&amp;[.L$1]&amp;&quot;&quot;&quot;:&quot;&amp;IF([.L42]&lt;&gt;&quot;&quot;;[.L42]&amp;REPT(&quot; &quot;;5-LEN([.L42]));&quot;null &quot;) &amp;&quot;,&quot;&quot;&quot;&amp;[.M$1]&amp;&quot;&quot;&quot;:&quot;&amp;IF([.M42]&lt;&gt;&quot;&quot;;&quot;&quot;&quot;&quot;&amp;[.M42]&amp;&quot;&quot;&quot;&quot;&amp;REPT(&quot; &quot;;20-LEN([.M42]));&quot;null&quot;&amp;REPT(&quot; &quot;;20-4+2)) &amp;&quot;,&quot;&quot;&quot;&amp;[.N$1]&amp;&quot;&quot;&quot;:&quot;&amp;IF([.N42]&lt;&gt;&quot;&quot;;&quot;&quot;&amp;[.N42]&amp;&quot;&quot;&amp;REPT(&quot; &quot;;5-LEN([.N42]));&quot;null&quot;&amp;REPT(&quot; &quot;;5-4+2)) &amp;&quot;,&quot;&quot;&quot;&amp;[.O$1]&amp;&quot;&quot;&quot;:&quot;&amp;[.O42] &amp;&quot;,&quot;&quot;&quot;&amp;[.P$1]&amp;&quot;&quot;&quot;:&quot;&amp;[.P42] &amp;&quot;}&quot;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3])" office:value-type="float" office:value="0" calcext:value-type="float">
            <text:p>0</text:p>
          </table:table-cell>
          <table:table-cell/>
          <table:table-cell table:style-name="ce17" table:formula="of:=&quot;&quot;&amp;IF([.T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&quot;:&quot; &amp;&quot;{&quot;&quot;&quot;&amp;[.B$1]&amp;&quot;&quot;&quot;:&quot;&quot;&quot;&amp;[.B43]&amp;&quot;&quot;&quot;&quot;&amp;REPT(&quot; &quot;;20-LEN([.B43])) &amp;&quot;,&quot;&quot;&quot;&amp;[.C$1]&amp;&quot;&quot;&quot;:&quot;&quot;&quot;&amp;[.C43]&amp;&quot;&quot;&quot;&quot;&amp;REPT(&quot; &quot;;35-LEN([.C43])) &amp;&quot;,&quot;&quot;&quot;&amp;[.D$1]&amp;&quot;&quot;&quot;:&quot;&amp;[.D43]&amp;REPT(&quot; &quot;;3-LEN([.D43])) &amp;&quot;,&quot;&quot;&quot;&amp;[.E$1]&amp;&quot;&quot;&quot;:&quot;&quot;&quot;&amp;[.E43]&amp;&quot;&quot;&quot;&quot;&amp;REPT(&quot; &quot;;6-LEN([.E43])) &amp;&quot;,&quot;&quot;&quot;&amp;[.F$1]&amp;&quot;&quot;&quot;:&quot;&quot;&quot;&amp;[.F43]&amp;&quot;&quot;&quot;&quot;&amp;REPT(&quot; &quot;;7-LEN([.F43])) &amp;&quot;,&quot;&quot;&quot;&amp;[.G$1]&amp;&quot;&quot;&quot;:&quot;&amp;IF([.G43]&lt;&gt;&quot;&quot;;&quot;&quot;&quot;&quot;&amp;[.G43]&amp;&quot;&quot;&quot;&quot;&amp;REPT(&quot; &quot;;5-LEN([.G43]));&quot;null&quot;&amp;REPT(&quot; &quot;;5-4+2)) &amp;&quot;,&quot;&quot;&quot;&amp;[.H$1]&amp;&quot;&quot;&quot;:&quot;&amp;IF([.H43]&lt;&gt;&quot;&quot;;&quot;&quot;&quot;&quot;&amp;[.H43]&amp;&quot;&quot;&quot;&quot;&amp;REPT(&quot; &quot;;19-LEN([.H43]));&quot;null&quot;&amp;REPT(&quot; &quot;;19-4+2)) &amp;&quot;,&quot;&quot;&quot;&amp;[.I$1]&amp;&quot;&quot;&quot;:&quot;&amp;IF([.I43]&lt;&gt;&quot;&quot;;&quot;&quot;&quot;&quot;&amp;[.I43]&amp;&quot;&quot;&quot;&quot;&amp;REPT(&quot; &quot;;8-LEN([.I43]));&quot;null&quot;&amp;REPT(&quot; &quot;;8-4+2)) &amp;&quot;,&quot;&quot;&quot;&amp;[.J$1]&amp;&quot;&quot;&quot;:&quot;&amp;IF([.J43]&lt;&gt;&quot;&quot;;[.J43]&amp;REPT(&quot; &quot;;4-LEN([.J43]));&quot;null&quot;) &amp;&quot;,&quot;&quot;&quot;&amp;[.K$1]&amp;&quot;&quot;&quot;:&quot;&amp;IF([.K43]&lt;&gt;&quot;&quot;;[.K43]&amp;REPT(&quot; &quot;;4-LEN([.K43]));&quot;null&quot;) &amp;&quot;,&quot;&quot;&quot;&amp;[.L$1]&amp;&quot;&quot;&quot;:&quot;&amp;IF([.L43]&lt;&gt;&quot;&quot;;[.L43]&amp;REPT(&quot; &quot;;5-LEN([.L43]));&quot;null &quot;) &amp;&quot;,&quot;&quot;&quot;&amp;[.M$1]&amp;&quot;&quot;&quot;:&quot;&amp;IF([.M43]&lt;&gt;&quot;&quot;;&quot;&quot;&quot;&quot;&amp;[.M43]&amp;&quot;&quot;&quot;&quot;&amp;REPT(&quot; &quot;;20-LEN([.M43]));&quot;null&quot;&amp;REPT(&quot; &quot;;20-4+2)) &amp;&quot;,&quot;&quot;&quot;&amp;[.N$1]&amp;&quot;&quot;&quot;:&quot;&amp;IF([.N43]&lt;&gt;&quot;&quot;;&quot;&quot;&amp;[.N43]&amp;&quot;&quot;&amp;REPT(&quot; &quot;;5-LEN([.N43]));&quot;null&quot;&amp;REPT(&quot; &quot;;5-4+2)) &amp;&quot;,&quot;&quot;&quot;&amp;[.O$1]&amp;&quot;&quot;&quot;:&quot;&amp;[.O43] &amp;&quot;,&quot;&quot;&quot;&amp;[.P$1]&amp;&quot;&quot;&quot;:&quot;&amp;[.P43] &amp;&quot;}&quot;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4])" office:value-type="float" office:value="2" calcext:value-type="float">
            <text:p>2</text:p>
          </table:table-cell>
          <table:table-cell/>
          <table:table-cell table:style-name="ce17" table:formula="of:=&quot;&quot;&amp;IF([.T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&quot;:&quot; &amp;&quot;{&quot;&quot;&quot;&amp;[.B$1]&amp;&quot;&quot;&quot;:&quot;&quot;&quot;&amp;[.B44]&amp;&quot;&quot;&quot;&quot;&amp;REPT(&quot; &quot;;20-LEN([.B44])) &amp;&quot;,&quot;&quot;&quot;&amp;[.C$1]&amp;&quot;&quot;&quot;:&quot;&quot;&quot;&amp;[.C44]&amp;&quot;&quot;&quot;&quot;&amp;REPT(&quot; &quot;;35-LEN([.C44])) &amp;&quot;,&quot;&quot;&quot;&amp;[.D$1]&amp;&quot;&quot;&quot;:&quot;&amp;[.D44]&amp;REPT(&quot; &quot;;3-LEN([.D44])) &amp;&quot;,&quot;&quot;&quot;&amp;[.E$1]&amp;&quot;&quot;&quot;:&quot;&quot;&quot;&amp;[.E44]&amp;&quot;&quot;&quot;&quot;&amp;REPT(&quot; &quot;;6-LEN([.E44])) &amp;&quot;,&quot;&quot;&quot;&amp;[.F$1]&amp;&quot;&quot;&quot;:&quot;&quot;&quot;&amp;[.F44]&amp;&quot;&quot;&quot;&quot;&amp;REPT(&quot; &quot;;7-LEN([.F44])) &amp;&quot;,&quot;&quot;&quot;&amp;[.G$1]&amp;&quot;&quot;&quot;:&quot;&amp;IF([.G44]&lt;&gt;&quot;&quot;;&quot;&quot;&quot;&quot;&amp;[.G44]&amp;&quot;&quot;&quot;&quot;&amp;REPT(&quot; &quot;;5-LEN([.G44]));&quot;null&quot;&amp;REPT(&quot; &quot;;5-4+2)) &amp;&quot;,&quot;&quot;&quot;&amp;[.H$1]&amp;&quot;&quot;&quot;:&quot;&amp;IF([.H44]&lt;&gt;&quot;&quot;;&quot;&quot;&quot;&quot;&amp;[.H44]&amp;&quot;&quot;&quot;&quot;&amp;REPT(&quot; &quot;;19-LEN([.H44]));&quot;null&quot;&amp;REPT(&quot; &quot;;19-4+2)) &amp;&quot;,&quot;&quot;&quot;&amp;[.I$1]&amp;&quot;&quot;&quot;:&quot;&amp;IF([.I44]&lt;&gt;&quot;&quot;;&quot;&quot;&quot;&quot;&amp;[.I44]&amp;&quot;&quot;&quot;&quot;&amp;REPT(&quot; &quot;;8-LEN([.I44]));&quot;null&quot;&amp;REPT(&quot; &quot;;8-4+2)) &amp;&quot;,&quot;&quot;&quot;&amp;[.J$1]&amp;&quot;&quot;&quot;:&quot;&amp;IF([.J44]&lt;&gt;&quot;&quot;;[.J44]&amp;REPT(&quot; &quot;;4-LEN([.J44]));&quot;null&quot;) &amp;&quot;,&quot;&quot;&quot;&amp;[.K$1]&amp;&quot;&quot;&quot;:&quot;&amp;IF([.K44]&lt;&gt;&quot;&quot;;[.K44]&amp;REPT(&quot; &quot;;4-LEN([.K44]));&quot;null&quot;) &amp;&quot;,&quot;&quot;&quot;&amp;[.L$1]&amp;&quot;&quot;&quot;:&quot;&amp;IF([.L44]&lt;&gt;&quot;&quot;;[.L44]&amp;REPT(&quot; &quot;;5-LEN([.L44]));&quot;null &quot;) &amp;&quot;,&quot;&quot;&quot;&amp;[.M$1]&amp;&quot;&quot;&quot;:&quot;&amp;IF([.M44]&lt;&gt;&quot;&quot;;&quot;&quot;&quot;&quot;&amp;[.M44]&amp;&quot;&quot;&quot;&quot;&amp;REPT(&quot; &quot;;20-LEN([.M44]));&quot;null&quot;&amp;REPT(&quot; &quot;;20-4+2)) &amp;&quot;,&quot;&quot;&quot;&amp;[.N$1]&amp;&quot;&quot;&quot;:&quot;&amp;IF([.N44]&lt;&gt;&quot;&quot;;&quot;&quot;&amp;[.N44]&amp;&quot;&quot;&amp;REPT(&quot; &quot;;5-LEN([.N44]));&quot;null&quot;&amp;REPT(&quot; &quot;;5-4+2)) &amp;&quot;,&quot;&quot;&quot;&amp;[.O$1]&amp;&quot;&quot;&quot;:&quot;&amp;[.O44] &amp;&quot;,&quot;&quot;&quot;&amp;[.P$1]&amp;&quot;&quot;&quot;:&quot;&amp;[.P44] &amp;&quot;}&quot;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5])" office:value-type="float" office:value="0" calcext:value-type="float">
            <text:p>0</text:p>
          </table:table-cell>
          <table:table-cell/>
          <table:table-cell table:style-name="ce17" table:formula="of:=&quot;&quot;&amp;IF([.T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&quot;:&quot; &amp;&quot;{&quot;&quot;&quot;&amp;[.B$1]&amp;&quot;&quot;&quot;:&quot;&quot;&quot;&amp;[.B45]&amp;&quot;&quot;&quot;&quot;&amp;REPT(&quot; &quot;;20-LEN([.B45])) &amp;&quot;,&quot;&quot;&quot;&amp;[.C$1]&amp;&quot;&quot;&quot;:&quot;&quot;&quot;&amp;[.C45]&amp;&quot;&quot;&quot;&quot;&amp;REPT(&quot; &quot;;35-LEN([.C45])) &amp;&quot;,&quot;&quot;&quot;&amp;[.D$1]&amp;&quot;&quot;&quot;:&quot;&amp;[.D45]&amp;REPT(&quot; &quot;;3-LEN([.D45])) &amp;&quot;,&quot;&quot;&quot;&amp;[.E$1]&amp;&quot;&quot;&quot;:&quot;&quot;&quot;&amp;[.E45]&amp;&quot;&quot;&quot;&quot;&amp;REPT(&quot; &quot;;6-LEN([.E45])) &amp;&quot;,&quot;&quot;&quot;&amp;[.F$1]&amp;&quot;&quot;&quot;:&quot;&quot;&quot;&amp;[.F45]&amp;&quot;&quot;&quot;&quot;&amp;REPT(&quot; &quot;;7-LEN([.F45])) &amp;&quot;,&quot;&quot;&quot;&amp;[.G$1]&amp;&quot;&quot;&quot;:&quot;&amp;IF([.G45]&lt;&gt;&quot;&quot;;&quot;&quot;&quot;&quot;&amp;[.G45]&amp;&quot;&quot;&quot;&quot;&amp;REPT(&quot; &quot;;5-LEN([.G45]));&quot;null&quot;&amp;REPT(&quot; &quot;;5-4+2)) &amp;&quot;,&quot;&quot;&quot;&amp;[.H$1]&amp;&quot;&quot;&quot;:&quot;&amp;IF([.H45]&lt;&gt;&quot;&quot;;&quot;&quot;&quot;&quot;&amp;[.H45]&amp;&quot;&quot;&quot;&quot;&amp;REPT(&quot; &quot;;19-LEN([.H45]));&quot;null&quot;&amp;REPT(&quot; &quot;;19-4+2)) &amp;&quot;,&quot;&quot;&quot;&amp;[.I$1]&amp;&quot;&quot;&quot;:&quot;&amp;IF([.I45]&lt;&gt;&quot;&quot;;&quot;&quot;&quot;&quot;&amp;[.I45]&amp;&quot;&quot;&quot;&quot;&amp;REPT(&quot; &quot;;8-LEN([.I45]));&quot;null&quot;&amp;REPT(&quot; &quot;;8-4+2)) &amp;&quot;,&quot;&quot;&quot;&amp;[.J$1]&amp;&quot;&quot;&quot;:&quot;&amp;IF([.J45]&lt;&gt;&quot;&quot;;[.J45]&amp;REPT(&quot; &quot;;4-LEN([.J45]));&quot;null&quot;) &amp;&quot;,&quot;&quot;&quot;&amp;[.K$1]&amp;&quot;&quot;&quot;:&quot;&amp;IF([.K45]&lt;&gt;&quot;&quot;;[.K45]&amp;REPT(&quot; &quot;;4-LEN([.K45]));&quot;null&quot;) &amp;&quot;,&quot;&quot;&quot;&amp;[.L$1]&amp;&quot;&quot;&quot;:&quot;&amp;IF([.L45]&lt;&gt;&quot;&quot;;[.L45]&amp;REPT(&quot; &quot;;5-LEN([.L45]));&quot;null &quot;) &amp;&quot;,&quot;&quot;&quot;&amp;[.M$1]&amp;&quot;&quot;&quot;:&quot;&amp;IF([.M45]&lt;&gt;&quot;&quot;;&quot;&quot;&quot;&quot;&amp;[.M45]&amp;&quot;&quot;&quot;&quot;&amp;REPT(&quot; &quot;;20-LEN([.M45]));&quot;null&quot;&amp;REPT(&quot; &quot;;20-4+2)) &amp;&quot;,&quot;&quot;&quot;&amp;[.N$1]&amp;&quot;&quot;&quot;:&quot;&amp;IF([.N45]&lt;&gt;&quot;&quot;;&quot;&quot;&amp;[.N45]&amp;&quot;&quot;&amp;REPT(&quot; &quot;;5-LEN([.N45]));&quot;null&quot;&amp;REPT(&quot; &quot;;5-4+2)) &amp;&quot;,&quot;&quot;&quot;&amp;[.O$1]&amp;&quot;&quot;&quot;:&quot;&amp;[.O45] &amp;&quot;,&quot;&quot;&quot;&amp;[.P$1]&amp;&quot;&quot;&quot;:&quot;&amp;[.P45] &amp;&quot;}&quot;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6])" office:value-type="float" office:value="0" calcext:value-type="float">
            <text:p>0</text:p>
          </table:table-cell>
          <table:table-cell/>
          <table:table-cell table:style-name="ce17" table:formula="of:=&quot;&quot;&amp;IF([.T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&quot;:&quot; &amp;&quot;{&quot;&quot;&quot;&amp;[.B$1]&amp;&quot;&quot;&quot;:&quot;&quot;&quot;&amp;[.B46]&amp;&quot;&quot;&quot;&quot;&amp;REPT(&quot; &quot;;20-LEN([.B46])) &amp;&quot;,&quot;&quot;&quot;&amp;[.C$1]&amp;&quot;&quot;&quot;:&quot;&quot;&quot;&amp;[.C46]&amp;&quot;&quot;&quot;&quot;&amp;REPT(&quot; &quot;;35-LEN([.C46])) &amp;&quot;,&quot;&quot;&quot;&amp;[.D$1]&amp;&quot;&quot;&quot;:&quot;&amp;[.D46]&amp;REPT(&quot; &quot;;3-LEN([.D46])) &amp;&quot;,&quot;&quot;&quot;&amp;[.E$1]&amp;&quot;&quot;&quot;:&quot;&quot;&quot;&amp;[.E46]&amp;&quot;&quot;&quot;&quot;&amp;REPT(&quot; &quot;;6-LEN([.E46])) &amp;&quot;,&quot;&quot;&quot;&amp;[.F$1]&amp;&quot;&quot;&quot;:&quot;&quot;&quot;&amp;[.F46]&amp;&quot;&quot;&quot;&quot;&amp;REPT(&quot; &quot;;7-LEN([.F46])) &amp;&quot;,&quot;&quot;&quot;&amp;[.G$1]&amp;&quot;&quot;&quot;:&quot;&amp;IF([.G46]&lt;&gt;&quot;&quot;;&quot;&quot;&quot;&quot;&amp;[.G46]&amp;&quot;&quot;&quot;&quot;&amp;REPT(&quot; &quot;;5-LEN([.G46]));&quot;null&quot;&amp;REPT(&quot; &quot;;5-4+2)) &amp;&quot;,&quot;&quot;&quot;&amp;[.H$1]&amp;&quot;&quot;&quot;:&quot;&amp;IF([.H46]&lt;&gt;&quot;&quot;;&quot;&quot;&quot;&quot;&amp;[.H46]&amp;&quot;&quot;&quot;&quot;&amp;REPT(&quot; &quot;;19-LEN([.H46]));&quot;null&quot;&amp;REPT(&quot; &quot;;19-4+2)) &amp;&quot;,&quot;&quot;&quot;&amp;[.I$1]&amp;&quot;&quot;&quot;:&quot;&amp;IF([.I46]&lt;&gt;&quot;&quot;;&quot;&quot;&quot;&quot;&amp;[.I46]&amp;&quot;&quot;&quot;&quot;&amp;REPT(&quot; &quot;;8-LEN([.I46]));&quot;null&quot;&amp;REPT(&quot; &quot;;8-4+2)) &amp;&quot;,&quot;&quot;&quot;&amp;[.J$1]&amp;&quot;&quot;&quot;:&quot;&amp;IF([.J46]&lt;&gt;&quot;&quot;;[.J46]&amp;REPT(&quot; &quot;;4-LEN([.J46]));&quot;null&quot;) &amp;&quot;,&quot;&quot;&quot;&amp;[.K$1]&amp;&quot;&quot;&quot;:&quot;&amp;IF([.K46]&lt;&gt;&quot;&quot;;[.K46]&amp;REPT(&quot; &quot;;4-LEN([.K46]));&quot;null&quot;) &amp;&quot;,&quot;&quot;&quot;&amp;[.L$1]&amp;&quot;&quot;&quot;:&quot;&amp;IF([.L46]&lt;&gt;&quot;&quot;;[.L46]&amp;REPT(&quot; &quot;;5-LEN([.L46]));&quot;null &quot;) &amp;&quot;,&quot;&quot;&quot;&amp;[.M$1]&amp;&quot;&quot;&quot;:&quot;&amp;IF([.M46]&lt;&gt;&quot;&quot;;&quot;&quot;&quot;&quot;&amp;[.M46]&amp;&quot;&quot;&quot;&quot;&amp;REPT(&quot; &quot;;20-LEN([.M46]));&quot;null&quot;&amp;REPT(&quot; &quot;;20-4+2)) &amp;&quot;,&quot;&quot;&quot;&amp;[.N$1]&amp;&quot;&quot;&quot;:&quot;&amp;IF([.N46]&lt;&gt;&quot;&quot;;&quot;&quot;&amp;[.N46]&amp;&quot;&quot;&amp;REPT(&quot; &quot;;5-LEN([.N46]));&quot;null&quot;&amp;REPT(&quot; &quot;;5-4+2)) &amp;&quot;,&quot;&quot;&quot;&amp;[.O$1]&amp;&quot;&quot;&quot;:&quot;&amp;[.O46] &amp;&quot;,&quot;&quot;&quot;&amp;[.P$1]&amp;&quot;&quot;&quot;:&quot;&amp;[.P46] &amp;&quot;}&quot;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7])" office:value-type="float" office:value="0" calcext:value-type="float">
            <text:p>0</text:p>
          </table:table-cell>
          <table:table-cell/>
          <table:table-cell table:style-name="ce17" table:formula="of:=&quot;&quot;&amp;IF([.T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&quot;:&quot; &amp;&quot;{&quot;&quot;&quot;&amp;[.B$1]&amp;&quot;&quot;&quot;:&quot;&quot;&quot;&amp;[.B47]&amp;&quot;&quot;&quot;&quot;&amp;REPT(&quot; &quot;;20-LEN([.B47])) &amp;&quot;,&quot;&quot;&quot;&amp;[.C$1]&amp;&quot;&quot;&quot;:&quot;&quot;&quot;&amp;[.C47]&amp;&quot;&quot;&quot;&quot;&amp;REPT(&quot; &quot;;35-LEN([.C47])) &amp;&quot;,&quot;&quot;&quot;&amp;[.D$1]&amp;&quot;&quot;&quot;:&quot;&amp;[.D47]&amp;REPT(&quot; &quot;;3-LEN([.D47])) &amp;&quot;,&quot;&quot;&quot;&amp;[.E$1]&amp;&quot;&quot;&quot;:&quot;&quot;&quot;&amp;[.E47]&amp;&quot;&quot;&quot;&quot;&amp;REPT(&quot; &quot;;6-LEN([.E47])) &amp;&quot;,&quot;&quot;&quot;&amp;[.F$1]&amp;&quot;&quot;&quot;:&quot;&quot;&quot;&amp;[.F47]&amp;&quot;&quot;&quot;&quot;&amp;REPT(&quot; &quot;;7-LEN([.F47])) &amp;&quot;,&quot;&quot;&quot;&amp;[.G$1]&amp;&quot;&quot;&quot;:&quot;&amp;IF([.G47]&lt;&gt;&quot;&quot;;&quot;&quot;&quot;&quot;&amp;[.G47]&amp;&quot;&quot;&quot;&quot;&amp;REPT(&quot; &quot;;5-LEN([.G47]));&quot;null&quot;&amp;REPT(&quot; &quot;;5-4+2)) &amp;&quot;,&quot;&quot;&quot;&amp;[.H$1]&amp;&quot;&quot;&quot;:&quot;&amp;IF([.H47]&lt;&gt;&quot;&quot;;&quot;&quot;&quot;&quot;&amp;[.H47]&amp;&quot;&quot;&quot;&quot;&amp;REPT(&quot; &quot;;19-LEN([.H47]));&quot;null&quot;&amp;REPT(&quot; &quot;;19-4+2)) &amp;&quot;,&quot;&quot;&quot;&amp;[.I$1]&amp;&quot;&quot;&quot;:&quot;&amp;IF([.I47]&lt;&gt;&quot;&quot;;&quot;&quot;&quot;&quot;&amp;[.I47]&amp;&quot;&quot;&quot;&quot;&amp;REPT(&quot; &quot;;8-LEN([.I47]));&quot;null&quot;&amp;REPT(&quot; &quot;;8-4+2)) &amp;&quot;,&quot;&quot;&quot;&amp;[.J$1]&amp;&quot;&quot;&quot;:&quot;&amp;IF([.J47]&lt;&gt;&quot;&quot;;[.J47]&amp;REPT(&quot; &quot;;4-LEN([.J47]));&quot;null&quot;) &amp;&quot;,&quot;&quot;&quot;&amp;[.K$1]&amp;&quot;&quot;&quot;:&quot;&amp;IF([.K47]&lt;&gt;&quot;&quot;;[.K47]&amp;REPT(&quot; &quot;;4-LEN([.K47]));&quot;null&quot;) &amp;&quot;,&quot;&quot;&quot;&amp;[.L$1]&amp;&quot;&quot;&quot;:&quot;&amp;IF([.L47]&lt;&gt;&quot;&quot;;[.L47]&amp;REPT(&quot; &quot;;5-LEN([.L47]));&quot;null &quot;) &amp;&quot;,&quot;&quot;&quot;&amp;[.M$1]&amp;&quot;&quot;&quot;:&quot;&amp;IF([.M47]&lt;&gt;&quot;&quot;;&quot;&quot;&quot;&quot;&amp;[.M47]&amp;&quot;&quot;&quot;&quot;&amp;REPT(&quot; &quot;;20-LEN([.M47]));&quot;null&quot;&amp;REPT(&quot; &quot;;20-4+2)) &amp;&quot;,&quot;&quot;&quot;&amp;[.N$1]&amp;&quot;&quot;&quot;:&quot;&amp;IF([.N47]&lt;&gt;&quot;&quot;;&quot;&quot;&amp;[.N47]&amp;&quot;&quot;&amp;REPT(&quot; &quot;;5-LEN([.N47]));&quot;null&quot;&amp;REPT(&quot; &quot;;5-4+2)) &amp;&quot;,&quot;&quot;&quot;&amp;[.O$1]&amp;&quot;&quot;&quot;:&quot;&amp;[.O47] &amp;&quot;,&quot;&quot;&quot;&amp;[.P$1]&amp;&quot;&quot;&quot;:&quot;&amp;[.P47] &amp;&quot;}&quot;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8])" office:value-type="float" office:value="0" calcext:value-type="float">
            <text:p>0</text:p>
          </table:table-cell>
          <table:table-cell/>
          <table:table-cell table:style-name="ce17" table:formula="of:=&quot;&quot;&amp;IF([.T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&quot;:&quot; &amp;&quot;{&quot;&quot;&quot;&amp;[.B$1]&amp;&quot;&quot;&quot;:&quot;&quot;&quot;&amp;[.B48]&amp;&quot;&quot;&quot;&quot;&amp;REPT(&quot; &quot;;20-LEN([.B48])) &amp;&quot;,&quot;&quot;&quot;&amp;[.C$1]&amp;&quot;&quot;&quot;:&quot;&quot;&quot;&amp;[.C48]&amp;&quot;&quot;&quot;&quot;&amp;REPT(&quot; &quot;;35-LEN([.C48])) &amp;&quot;,&quot;&quot;&quot;&amp;[.D$1]&amp;&quot;&quot;&quot;:&quot;&amp;[.D48]&amp;REPT(&quot; &quot;;3-LEN([.D48])) &amp;&quot;,&quot;&quot;&quot;&amp;[.E$1]&amp;&quot;&quot;&quot;:&quot;&quot;&quot;&amp;[.E48]&amp;&quot;&quot;&quot;&quot;&amp;REPT(&quot; &quot;;6-LEN([.E48])) &amp;&quot;,&quot;&quot;&quot;&amp;[.F$1]&amp;&quot;&quot;&quot;:&quot;&quot;&quot;&amp;[.F48]&amp;&quot;&quot;&quot;&quot;&amp;REPT(&quot; &quot;;7-LEN([.F48])) &amp;&quot;,&quot;&quot;&quot;&amp;[.G$1]&amp;&quot;&quot;&quot;:&quot;&amp;IF([.G48]&lt;&gt;&quot;&quot;;&quot;&quot;&quot;&quot;&amp;[.G48]&amp;&quot;&quot;&quot;&quot;&amp;REPT(&quot; &quot;;5-LEN([.G48]));&quot;null&quot;&amp;REPT(&quot; &quot;;5-4+2)) &amp;&quot;,&quot;&quot;&quot;&amp;[.H$1]&amp;&quot;&quot;&quot;:&quot;&amp;IF([.H48]&lt;&gt;&quot;&quot;;&quot;&quot;&quot;&quot;&amp;[.H48]&amp;&quot;&quot;&quot;&quot;&amp;REPT(&quot; &quot;;19-LEN([.H48]));&quot;null&quot;&amp;REPT(&quot; &quot;;19-4+2)) &amp;&quot;,&quot;&quot;&quot;&amp;[.I$1]&amp;&quot;&quot;&quot;:&quot;&amp;IF([.I48]&lt;&gt;&quot;&quot;;&quot;&quot;&quot;&quot;&amp;[.I48]&amp;&quot;&quot;&quot;&quot;&amp;REPT(&quot; &quot;;8-LEN([.I48]));&quot;null&quot;&amp;REPT(&quot; &quot;;8-4+2)) &amp;&quot;,&quot;&quot;&quot;&amp;[.J$1]&amp;&quot;&quot;&quot;:&quot;&amp;IF([.J48]&lt;&gt;&quot;&quot;;[.J48]&amp;REPT(&quot; &quot;;4-LEN([.J48]));&quot;null&quot;) &amp;&quot;,&quot;&quot;&quot;&amp;[.K$1]&amp;&quot;&quot;&quot;:&quot;&amp;IF([.K48]&lt;&gt;&quot;&quot;;[.K48]&amp;REPT(&quot; &quot;;4-LEN([.K48]));&quot;null&quot;) &amp;&quot;,&quot;&quot;&quot;&amp;[.L$1]&amp;&quot;&quot;&quot;:&quot;&amp;IF([.L48]&lt;&gt;&quot;&quot;;[.L48]&amp;REPT(&quot; &quot;;5-LEN([.L48]));&quot;null &quot;) &amp;&quot;,&quot;&quot;&quot;&amp;[.M$1]&amp;&quot;&quot;&quot;:&quot;&amp;IF([.M48]&lt;&gt;&quot;&quot;;&quot;&quot;&quot;&quot;&amp;[.M48]&amp;&quot;&quot;&quot;&quot;&amp;REPT(&quot; &quot;;20-LEN([.M48]));&quot;null&quot;&amp;REPT(&quot; &quot;;20-4+2)) &amp;&quot;,&quot;&quot;&quot;&amp;[.N$1]&amp;&quot;&quot;&quot;:&quot;&amp;IF([.N48]&lt;&gt;&quot;&quot;;&quot;&quot;&amp;[.N48]&amp;&quot;&quot;&amp;REPT(&quot; &quot;;5-LEN([.N48]));&quot;null&quot;&amp;REPT(&quot; &quot;;5-4+2)) &amp;&quot;,&quot;&quot;&quot;&amp;[.O$1]&amp;&quot;&quot;&quot;:&quot;&amp;[.O48] &amp;&quot;,&quot;&quot;&quot;&amp;[.P$1]&amp;&quot;&quot;&quot;:&quot;&amp;[.P48] &amp;&quot;}&quot;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9])" office:value-type="float" office:value="0" calcext:value-type="float">
            <text:p>0</text:p>
          </table:table-cell>
          <table:table-cell/>
          <table:table-cell table:style-name="ce17" table:formula="of:=&quot;&quot;&amp;IF([.T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&quot;:&quot; &amp;&quot;{&quot;&quot;&quot;&amp;[.B$1]&amp;&quot;&quot;&quot;:&quot;&quot;&quot;&amp;[.B49]&amp;&quot;&quot;&quot;&quot;&amp;REPT(&quot; &quot;;20-LEN([.B49])) &amp;&quot;,&quot;&quot;&quot;&amp;[.C$1]&amp;&quot;&quot;&quot;:&quot;&quot;&quot;&amp;[.C49]&amp;&quot;&quot;&quot;&quot;&amp;REPT(&quot; &quot;;35-LEN([.C49])) &amp;&quot;,&quot;&quot;&quot;&amp;[.D$1]&amp;&quot;&quot;&quot;:&quot;&amp;[.D49]&amp;REPT(&quot; &quot;;3-LEN([.D49])) &amp;&quot;,&quot;&quot;&quot;&amp;[.E$1]&amp;&quot;&quot;&quot;:&quot;&quot;&quot;&amp;[.E49]&amp;&quot;&quot;&quot;&quot;&amp;REPT(&quot; &quot;;6-LEN([.E49])) &amp;&quot;,&quot;&quot;&quot;&amp;[.F$1]&amp;&quot;&quot;&quot;:&quot;&quot;&quot;&amp;[.F49]&amp;&quot;&quot;&quot;&quot;&amp;REPT(&quot; &quot;;7-LEN([.F49])) &amp;&quot;,&quot;&quot;&quot;&amp;[.G$1]&amp;&quot;&quot;&quot;:&quot;&amp;IF([.G49]&lt;&gt;&quot;&quot;;&quot;&quot;&quot;&quot;&amp;[.G49]&amp;&quot;&quot;&quot;&quot;&amp;REPT(&quot; &quot;;5-LEN([.G49]));&quot;null&quot;&amp;REPT(&quot; &quot;;5-4+2)) &amp;&quot;,&quot;&quot;&quot;&amp;[.H$1]&amp;&quot;&quot;&quot;:&quot;&amp;IF([.H49]&lt;&gt;&quot;&quot;;&quot;&quot;&quot;&quot;&amp;[.H49]&amp;&quot;&quot;&quot;&quot;&amp;REPT(&quot; &quot;;19-LEN([.H49]));&quot;null&quot;&amp;REPT(&quot; &quot;;19-4+2)) &amp;&quot;,&quot;&quot;&quot;&amp;[.I$1]&amp;&quot;&quot;&quot;:&quot;&amp;IF([.I49]&lt;&gt;&quot;&quot;;&quot;&quot;&quot;&quot;&amp;[.I49]&amp;&quot;&quot;&quot;&quot;&amp;REPT(&quot; &quot;;8-LEN([.I49]));&quot;null&quot;&amp;REPT(&quot; &quot;;8-4+2)) &amp;&quot;,&quot;&quot;&quot;&amp;[.J$1]&amp;&quot;&quot;&quot;:&quot;&amp;IF([.J49]&lt;&gt;&quot;&quot;;[.J49]&amp;REPT(&quot; &quot;;4-LEN([.J49]));&quot;null&quot;) &amp;&quot;,&quot;&quot;&quot;&amp;[.K$1]&amp;&quot;&quot;&quot;:&quot;&amp;IF([.K49]&lt;&gt;&quot;&quot;;[.K49]&amp;REPT(&quot; &quot;;4-LEN([.K49]));&quot;null&quot;) &amp;&quot;,&quot;&quot;&quot;&amp;[.L$1]&amp;&quot;&quot;&quot;:&quot;&amp;IF([.L49]&lt;&gt;&quot;&quot;;[.L49]&amp;REPT(&quot; &quot;;5-LEN([.L49]));&quot;null &quot;) &amp;&quot;,&quot;&quot;&quot;&amp;[.M$1]&amp;&quot;&quot;&quot;:&quot;&amp;IF([.M49]&lt;&gt;&quot;&quot;;&quot;&quot;&quot;&quot;&amp;[.M49]&amp;&quot;&quot;&quot;&quot;&amp;REPT(&quot; &quot;;20-LEN([.M49]));&quot;null&quot;&amp;REPT(&quot; &quot;;20-4+2)) &amp;&quot;,&quot;&quot;&quot;&amp;[.N$1]&amp;&quot;&quot;&quot;:&quot;&amp;IF([.N49]&lt;&gt;&quot;&quot;;&quot;&quot;&amp;[.N49]&amp;&quot;&quot;&amp;REPT(&quot; &quot;;5-LEN([.N49]));&quot;null&quot;&amp;REPT(&quot; &quot;;5-4+2)) &amp;&quot;,&quot;&quot;&quot;&amp;[.O$1]&amp;&quot;&quot;&quot;:&quot;&amp;[.O49] &amp;&quot;,&quot;&quot;&quot;&amp;[.P$1]&amp;&quot;&quot;&quot;:&quot;&amp;[.P49] &amp;&quot;}&quot;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50])" office:value-type="float" office:value="0" calcext:value-type="float">
            <text:p>0</text:p>
          </table:table-cell>
          <table:table-cell/>
          <table:table-cell table:style-name="ce17" table:formula="of:=&quot;&quot;&amp;IF([.T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&quot;:&quot; &amp;&quot;{&quot;&quot;&quot;&amp;[.B$1]&amp;&quot;&quot;&quot;:&quot;&quot;&quot;&amp;[.B50]&amp;&quot;&quot;&quot;&quot;&amp;REPT(&quot; &quot;;20-LEN([.B50])) &amp;&quot;,&quot;&quot;&quot;&amp;[.C$1]&amp;&quot;&quot;&quot;:&quot;&quot;&quot;&amp;[.C50]&amp;&quot;&quot;&quot;&quot;&amp;REPT(&quot; &quot;;35-LEN([.C50])) &amp;&quot;,&quot;&quot;&quot;&amp;[.D$1]&amp;&quot;&quot;&quot;:&quot;&amp;[.D50]&amp;REPT(&quot; &quot;;3-LEN([.D50])) &amp;&quot;,&quot;&quot;&quot;&amp;[.E$1]&amp;&quot;&quot;&quot;:&quot;&quot;&quot;&amp;[.E50]&amp;&quot;&quot;&quot;&quot;&amp;REPT(&quot; &quot;;6-LEN([.E50])) &amp;&quot;,&quot;&quot;&quot;&amp;[.F$1]&amp;&quot;&quot;&quot;:&quot;&quot;&quot;&amp;[.F50]&amp;&quot;&quot;&quot;&quot;&amp;REPT(&quot; &quot;;7-LEN([.F50])) &amp;&quot;,&quot;&quot;&quot;&amp;[.G$1]&amp;&quot;&quot;&quot;:&quot;&amp;IF([.G50]&lt;&gt;&quot;&quot;;&quot;&quot;&quot;&quot;&amp;[.G50]&amp;&quot;&quot;&quot;&quot;&amp;REPT(&quot; &quot;;5-LEN([.G50]));&quot;null&quot;&amp;REPT(&quot; &quot;;5-4+2)) &amp;&quot;,&quot;&quot;&quot;&amp;[.H$1]&amp;&quot;&quot;&quot;:&quot;&amp;IF([.H50]&lt;&gt;&quot;&quot;;&quot;&quot;&quot;&quot;&amp;[.H50]&amp;&quot;&quot;&quot;&quot;&amp;REPT(&quot; &quot;;19-LEN([.H50]));&quot;null&quot;&amp;REPT(&quot; &quot;;19-4+2)) &amp;&quot;,&quot;&quot;&quot;&amp;[.I$1]&amp;&quot;&quot;&quot;:&quot;&amp;IF([.I50]&lt;&gt;&quot;&quot;;&quot;&quot;&quot;&quot;&amp;[.I50]&amp;&quot;&quot;&quot;&quot;&amp;REPT(&quot; &quot;;8-LEN([.I50]));&quot;null&quot;&amp;REPT(&quot; &quot;;8-4+2)) &amp;&quot;,&quot;&quot;&quot;&amp;[.J$1]&amp;&quot;&quot;&quot;:&quot;&amp;IF([.J50]&lt;&gt;&quot;&quot;;[.J50]&amp;REPT(&quot; &quot;;4-LEN([.J50]));&quot;null&quot;) &amp;&quot;,&quot;&quot;&quot;&amp;[.K$1]&amp;&quot;&quot;&quot;:&quot;&amp;IF([.K50]&lt;&gt;&quot;&quot;;[.K50]&amp;REPT(&quot; &quot;;4-LEN([.K50]));&quot;null&quot;) &amp;&quot;,&quot;&quot;&quot;&amp;[.L$1]&amp;&quot;&quot;&quot;:&quot;&amp;IF([.L50]&lt;&gt;&quot;&quot;;[.L50]&amp;REPT(&quot; &quot;;5-LEN([.L50]));&quot;null &quot;) &amp;&quot;,&quot;&quot;&quot;&amp;[.M$1]&amp;&quot;&quot;&quot;:&quot;&amp;IF([.M50]&lt;&gt;&quot;&quot;;&quot;&quot;&quot;&quot;&amp;[.M50]&amp;&quot;&quot;&quot;&quot;&amp;REPT(&quot; &quot;;20-LEN([.M50]));&quot;null&quot;&amp;REPT(&quot; &quot;;20-4+2)) &amp;&quot;,&quot;&quot;&quot;&amp;[.N$1]&amp;&quot;&quot;&quot;:&quot;&amp;IF([.N50]&lt;&gt;&quot;&quot;;&quot;&quot;&amp;[.N50]&amp;&quot;&quot;&amp;REPT(&quot; &quot;;5-LEN([.N50]));&quot;null&quot;&amp;REPT(&quot; &quot;;5-4+2)) &amp;&quot;,&quot;&quot;&quot;&amp;[.O$1]&amp;&quot;&quot;&quot;:&quot;&amp;[.O50] &amp;&quot;,&quot;&quot;&quot;&amp;[.P$1]&amp;&quot;&quot;&quot;:&quot;&amp;[.P50] &amp;&quot;}&quot;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O$1]&amp;&quot;&quot;&quot;:&quot;&amp;[.O50]&#10;&amp;&quot;,&quot;&quot;&quot;&amp;[.P$1]&amp;&quot;&quot;&quot;:&quot;&amp;[.P50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51])" office:value-type="float" office:value="0" calcext:value-type="float">
            <text:p>0</text:p>
          </table:table-cell>
          <table:table-cell/>
          <table:table-cell table:style-name="ce17" table:formula="of:=&quot;&quot;&amp;IF([.T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&quot;:&quot; &amp;&quot;{&quot;&quot;&quot;&amp;[.B$1]&amp;&quot;&quot;&quot;:&quot;&quot;&quot;&amp;[.B51]&amp;&quot;&quot;&quot;&quot;&amp;REPT(&quot; &quot;;20-LEN([.B51])) &amp;&quot;,&quot;&quot;&quot;&amp;[.C$1]&amp;&quot;&quot;&quot;:&quot;&quot;&quot;&amp;[.C51]&amp;&quot;&quot;&quot;&quot;&amp;REPT(&quot; &quot;;35-LEN([.C51])) &amp;&quot;,&quot;&quot;&quot;&amp;[.D$1]&amp;&quot;&quot;&quot;:&quot;&amp;[.D51]&amp;REPT(&quot; &quot;;3-LEN([.D51])) &amp;&quot;,&quot;&quot;&quot;&amp;[.E$1]&amp;&quot;&quot;&quot;:&quot;&quot;&quot;&amp;[.E51]&amp;&quot;&quot;&quot;&quot;&amp;REPT(&quot; &quot;;6-LEN([.E51])) &amp;&quot;,&quot;&quot;&quot;&amp;[.F$1]&amp;&quot;&quot;&quot;:&quot;&quot;&quot;&amp;[.F51]&amp;&quot;&quot;&quot;&quot;&amp;REPT(&quot; &quot;;7-LEN([.F51])) &amp;&quot;,&quot;&quot;&quot;&amp;[.G$1]&amp;&quot;&quot;&quot;:&quot;&amp;IF([.G51]&lt;&gt;&quot;&quot;;&quot;&quot;&quot;&quot;&amp;[.G51]&amp;&quot;&quot;&quot;&quot;&amp;REPT(&quot; &quot;;5-LEN([.G51]));&quot;null&quot;&amp;REPT(&quot; &quot;;5-4+2)) &amp;&quot;,&quot;&quot;&quot;&amp;[.H$1]&amp;&quot;&quot;&quot;:&quot;&amp;IF([.H51]&lt;&gt;&quot;&quot;;&quot;&quot;&quot;&quot;&amp;[.H51]&amp;&quot;&quot;&quot;&quot;&amp;REPT(&quot; &quot;;19-LEN([.H51]));&quot;null&quot;&amp;REPT(&quot; &quot;;19-4+2)) &amp;&quot;,&quot;&quot;&quot;&amp;[.I$1]&amp;&quot;&quot;&quot;:&quot;&amp;IF([.I51]&lt;&gt;&quot;&quot;;&quot;&quot;&quot;&quot;&amp;[.I51]&amp;&quot;&quot;&quot;&quot;&amp;REPT(&quot; &quot;;8-LEN([.I51]));&quot;null&quot;&amp;REPT(&quot; &quot;;8-4+2)) &amp;&quot;,&quot;&quot;&quot;&amp;[.J$1]&amp;&quot;&quot;&quot;:&quot;&amp;IF([.J51]&lt;&gt;&quot;&quot;;[.J51]&amp;REPT(&quot; &quot;;4-LEN([.J51]));&quot;null&quot;) &amp;&quot;,&quot;&quot;&quot;&amp;[.K$1]&amp;&quot;&quot;&quot;:&quot;&amp;IF([.K51]&lt;&gt;&quot;&quot;;[.K51]&amp;REPT(&quot; &quot;;4-LEN([.K51]));&quot;null&quot;) &amp;&quot;,&quot;&quot;&quot;&amp;[.L$1]&amp;&quot;&quot;&quot;:&quot;&amp;IF([.L51]&lt;&gt;&quot;&quot;;[.L51]&amp;REPT(&quot; &quot;;5-LEN([.L51]));&quot;null &quot;) &amp;&quot;,&quot;&quot;&quot;&amp;[.M$1]&amp;&quot;&quot;&quot;:&quot;&amp;IF([.M51]&lt;&gt;&quot;&quot;;&quot;&quot;&quot;&quot;&amp;[.M51]&amp;&quot;&quot;&quot;&quot;&amp;REPT(&quot; &quot;;20-LEN([.M51]));&quot;null&quot;&amp;REPT(&quot; &quot;;20-4+2)) &amp;&quot;,&quot;&quot;&quot;&amp;[.N$1]&amp;&quot;&quot;&quot;:&quot;&amp;IF([.N51]&lt;&gt;&quot;&quot;;&quot;&quot;&amp;[.N51]&amp;&quot;&quot;&amp;REPT(&quot; &quot;;5-LEN([.N51]));&quot;null&quot;&amp;REPT(&quot; &quot;;5-4+2)) &amp;&quot;,&quot;&quot;&quot;&amp;[.O$1]&amp;&quot;&quot;&quot;:&quot;&amp;[.O51] &amp;&quot;,&quot;&quot;&quot;&amp;[.P$1]&amp;&quot;&quot;&quot;:&quot;&amp;[.P51] &amp;&quot;}&quot;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O$1]&amp;&quot;&quot;&quot;:&quot;&amp;[.O51]&#10;&amp;&quot;,&quot;&quot;&quot;&amp;[.P$1]&amp;&quot;&quot;&quot;:&quot;&amp;[.P51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52])" office:value-type="float" office:value="0" calcext:value-type="float">
            <text:p>0</text:p>
          </table:table-cell>
          <table:table-cell/>
          <table:table-cell table:style-name="ce17" table:formula="of:=&quot;&quot;&amp;IF([.T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&quot;:&quot; &amp;&quot;{&quot;&quot;&quot;&amp;[.B$1]&amp;&quot;&quot;&quot;:&quot;&quot;&quot;&amp;[.B52]&amp;&quot;&quot;&quot;&quot;&amp;REPT(&quot; &quot;;20-LEN([.B52])) &amp;&quot;,&quot;&quot;&quot;&amp;[.C$1]&amp;&quot;&quot;&quot;:&quot;&quot;&quot;&amp;[.C52]&amp;&quot;&quot;&quot;&quot;&amp;REPT(&quot; &quot;;35-LEN([.C52])) &amp;&quot;,&quot;&quot;&quot;&amp;[.D$1]&amp;&quot;&quot;&quot;:&quot;&amp;[.D52]&amp;REPT(&quot; &quot;;3-LEN([.D52])) &amp;&quot;,&quot;&quot;&quot;&amp;[.E$1]&amp;&quot;&quot;&quot;:&quot;&quot;&quot;&amp;[.E52]&amp;&quot;&quot;&quot;&quot;&amp;REPT(&quot; &quot;;6-LEN([.E52])) &amp;&quot;,&quot;&quot;&quot;&amp;[.F$1]&amp;&quot;&quot;&quot;:&quot;&quot;&quot;&amp;[.F52]&amp;&quot;&quot;&quot;&quot;&amp;REPT(&quot; &quot;;7-LEN([.F52])) &amp;&quot;,&quot;&quot;&quot;&amp;[.G$1]&amp;&quot;&quot;&quot;:&quot;&amp;IF([.G52]&lt;&gt;&quot;&quot;;&quot;&quot;&quot;&quot;&amp;[.G52]&amp;&quot;&quot;&quot;&quot;&amp;REPT(&quot; &quot;;5-LEN([.G52]));&quot;null&quot;&amp;REPT(&quot; &quot;;5-4+2)) &amp;&quot;,&quot;&quot;&quot;&amp;[.H$1]&amp;&quot;&quot;&quot;:&quot;&amp;IF([.H52]&lt;&gt;&quot;&quot;;&quot;&quot;&quot;&quot;&amp;[.H52]&amp;&quot;&quot;&quot;&quot;&amp;REPT(&quot; &quot;;19-LEN([.H52]));&quot;null&quot;&amp;REPT(&quot; &quot;;19-4+2)) &amp;&quot;,&quot;&quot;&quot;&amp;[.I$1]&amp;&quot;&quot;&quot;:&quot;&amp;IF([.I52]&lt;&gt;&quot;&quot;;&quot;&quot;&quot;&quot;&amp;[.I52]&amp;&quot;&quot;&quot;&quot;&amp;REPT(&quot; &quot;;8-LEN([.I52]));&quot;null&quot;&amp;REPT(&quot; &quot;;8-4+2)) &amp;&quot;,&quot;&quot;&quot;&amp;[.J$1]&amp;&quot;&quot;&quot;:&quot;&amp;IF([.J52]&lt;&gt;&quot;&quot;;[.J52]&amp;REPT(&quot; &quot;;4-LEN([.J52]));&quot;null&quot;) &amp;&quot;,&quot;&quot;&quot;&amp;[.K$1]&amp;&quot;&quot;&quot;:&quot;&amp;IF([.K52]&lt;&gt;&quot;&quot;;[.K52]&amp;REPT(&quot; &quot;;4-LEN([.K52]));&quot;null&quot;) &amp;&quot;,&quot;&quot;&quot;&amp;[.L$1]&amp;&quot;&quot;&quot;:&quot;&amp;IF([.L52]&lt;&gt;&quot;&quot;;[.L52]&amp;REPT(&quot; &quot;;5-LEN([.L52]));&quot;null &quot;) &amp;&quot;,&quot;&quot;&quot;&amp;[.M$1]&amp;&quot;&quot;&quot;:&quot;&amp;IF([.M52]&lt;&gt;&quot;&quot;;&quot;&quot;&quot;&quot;&amp;[.M52]&amp;&quot;&quot;&quot;&quot;&amp;REPT(&quot; &quot;;20-LEN([.M52]));&quot;null&quot;&amp;REPT(&quot; &quot;;20-4+2)) &amp;&quot;,&quot;&quot;&quot;&amp;[.N$1]&amp;&quot;&quot;&quot;:&quot;&amp;IF([.N52]&lt;&gt;&quot;&quot;;&quot;&quot;&amp;[.N52]&amp;&quot;&quot;&amp;REPT(&quot; &quot;;5-LEN([.N52]));&quot;null&quot;&amp;REPT(&quot; &quot;;5-4+2)) &amp;&quot;,&quot;&quot;&quot;&amp;[.O$1]&amp;&quot;&quot;&quot;:&quot;&amp;[.O52] &amp;&quot;,&quot;&quot;&quot;&amp;[.P$1]&amp;&quot;&quot;&quot;:&quot;&amp;[.P52] &amp;&quot;}&quot;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O$1]&amp;&quot;&quot;&quot;:&quot;&amp;[.O52]&#10;&amp;&quot;,&quot;&quot;&quot;&amp;[.P$1]&amp;&quot;&quot;&quot;:&quot;&amp;[.P52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&quot;:&quot; &amp;&quot;{&quot;&quot;&quot;&amp;[.B$1]&amp;&quot;&quot;&quot;:&quot;&quot;&quot;&amp;[.B53]&amp;&quot;&quot;&quot;&quot;&amp;REPT(&quot; &quot;;20-LEN([.B53])) &amp;&quot;,&quot;&quot;&quot;&amp;[.C$1]&amp;&quot;&quot;&quot;:&quot;&quot;&quot;&amp;[.C53]&amp;&quot;&quot;&quot;&quot;&amp;REPT(&quot; &quot;;35-LEN([.C53])) &amp;&quot;,&quot;&quot;&quot;&amp;[.D$1]&amp;&quot;&quot;&quot;:&quot;&amp;[.D53]&amp;REPT(&quot; &quot;;3-LEN([.D53])) &amp;&quot;,&quot;&quot;&quot;&amp;[.E$1]&amp;&quot;&quot;&quot;:&quot;&quot;&quot;&amp;[.E53]&amp;&quot;&quot;&quot;&quot;&amp;REPT(&quot; &quot;;6-LEN([.E53])) &amp;&quot;,&quot;&quot;&quot;&amp;[.F$1]&amp;&quot;&quot;&quot;:&quot;&quot;&quot;&amp;[.F53]&amp;&quot;&quot;&quot;&quot;&amp;REPT(&quot; &quot;;7-LEN([.F53])) &amp;&quot;,&quot;&quot;&quot;&amp;[.G$1]&amp;&quot;&quot;&quot;:&quot;&amp;IF([.G53]&lt;&gt;&quot;&quot;;&quot;&quot;&quot;&quot;&amp;[.G53]&amp;&quot;&quot;&quot;&quot;&amp;REPT(&quot; &quot;;5-LEN([.G53]));&quot;null&quot;&amp;REPT(&quot; &quot;;5-4+2)) &amp;&quot;,&quot;&quot;&quot;&amp;[.H$1]&amp;&quot;&quot;&quot;:&quot;&amp;IF([.H53]&lt;&gt;&quot;&quot;;&quot;&quot;&quot;&quot;&amp;[.H53]&amp;&quot;&quot;&quot;&quot;&amp;REPT(&quot; &quot;;19-LEN([.H53]));&quot;null&quot;&amp;REPT(&quot; &quot;;19-4+2)) &amp;&quot;,&quot;&quot;&quot;&amp;[.I$1]&amp;&quot;&quot;&quot;:&quot;&amp;IF([.I53]&lt;&gt;&quot;&quot;;&quot;&quot;&quot;&quot;&amp;[.I53]&amp;&quot;&quot;&quot;&quot;&amp;REPT(&quot; &quot;;8-LEN([.I53]));&quot;null&quot;&amp;REPT(&quot; &quot;;8-4+2)) &amp;&quot;,&quot;&quot;&quot;&amp;[.J$1]&amp;&quot;&quot;&quot;:&quot;&amp;IF([.J53]&lt;&gt;&quot;&quot;;[.J53]&amp;REPT(&quot; &quot;;4-LEN([.J53]));&quot;null&quot;) &amp;&quot;,&quot;&quot;&quot;&amp;[.K$1]&amp;&quot;&quot;&quot;:&quot;&amp;IF([.K53]&lt;&gt;&quot;&quot;;[.K53]&amp;REPT(&quot; &quot;;4-LEN([.K53]));&quot;null&quot;) &amp;&quot;,&quot;&quot;&quot;&amp;[.L$1]&amp;&quot;&quot;&quot;:&quot;&amp;IF([.L53]&lt;&gt;&quot;&quot;;[.L53]&amp;REPT(&quot; &quot;;5-LEN([.L53]));&quot;null &quot;) &amp;&quot;,&quot;&quot;&quot;&amp;[.M$1]&amp;&quot;&quot;&quot;:&quot;&amp;IF([.M53]&lt;&gt;&quot;&quot;;&quot;&quot;&quot;&quot;&amp;[.M53]&amp;&quot;&quot;&quot;&quot;&amp;REPT(&quot; &quot;;20-LEN([.M53]));&quot;null&quot;&amp;REPT(&quot; &quot;;20-4+2)) &amp;&quot;,&quot;&quot;&quot;&amp;[.N$1]&amp;&quot;&quot;&quot;:&quot;&amp;IF([.N53]&lt;&gt;&quot;&quot;;&quot;&quot;&amp;[.N53]&amp;&quot;&quot;&amp;REPT(&quot; &quot;;5-LEN([.N53]));&quot;null&quot;&amp;REPT(&quot; &quot;;5-4+2)) &amp;&quot;,&quot;&quot;&quot;&amp;[.O$1]&amp;&quot;&quot;&quot;:&quot;&amp;[.O53] &amp;&quot;,&quot;&quot;&quot;&amp;[.P$1]&amp;&quot;&quot;&quot;:&quot;&amp;[.P53] &amp;&quot;}&quot;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O$1]&amp;&quot;&quot;&quot;:&quot;&amp;[.O53]&#10;&amp;&quot;,&quot;&quot;&quot;&amp;[.P$1]&amp;&quot;&quot;&quot;:&quot;&amp;[.P53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&quot;:&quot; &amp;&quot;{&quot;&quot;&quot;&amp;[.B$1]&amp;&quot;&quot;&quot;:&quot;&quot;&quot;&amp;[.B54]&amp;&quot;&quot;&quot;&quot;&amp;REPT(&quot; &quot;;20-LEN([.B54])) &amp;&quot;,&quot;&quot;&quot;&amp;[.C$1]&amp;&quot;&quot;&quot;:&quot;&quot;&quot;&amp;[.C54]&amp;&quot;&quot;&quot;&quot;&amp;REPT(&quot; &quot;;35-LEN([.C54])) &amp;&quot;,&quot;&quot;&quot;&amp;[.D$1]&amp;&quot;&quot;&quot;:&quot;&amp;[.D54]&amp;REPT(&quot; &quot;;3-LEN([.D54])) &amp;&quot;,&quot;&quot;&quot;&amp;[.E$1]&amp;&quot;&quot;&quot;:&quot;&quot;&quot;&amp;[.E54]&amp;&quot;&quot;&quot;&quot;&amp;REPT(&quot; &quot;;6-LEN([.E54])) &amp;&quot;,&quot;&quot;&quot;&amp;[.F$1]&amp;&quot;&quot;&quot;:&quot;&quot;&quot;&amp;[.F54]&amp;&quot;&quot;&quot;&quot;&amp;REPT(&quot; &quot;;7-LEN([.F54])) &amp;&quot;,&quot;&quot;&quot;&amp;[.G$1]&amp;&quot;&quot;&quot;:&quot;&amp;IF([.G54]&lt;&gt;&quot;&quot;;&quot;&quot;&quot;&quot;&amp;[.G54]&amp;&quot;&quot;&quot;&quot;&amp;REPT(&quot; &quot;;5-LEN([.G54]));&quot;null&quot;&amp;REPT(&quot; &quot;;5-4+2)) &amp;&quot;,&quot;&quot;&quot;&amp;[.H$1]&amp;&quot;&quot;&quot;:&quot;&amp;IF([.H54]&lt;&gt;&quot;&quot;;&quot;&quot;&quot;&quot;&amp;[.H54]&amp;&quot;&quot;&quot;&quot;&amp;REPT(&quot; &quot;;19-LEN([.H54]));&quot;null&quot;&amp;REPT(&quot; &quot;;19-4+2)) &amp;&quot;,&quot;&quot;&quot;&amp;[.I$1]&amp;&quot;&quot;&quot;:&quot;&amp;IF([.I54]&lt;&gt;&quot;&quot;;&quot;&quot;&quot;&quot;&amp;[.I54]&amp;&quot;&quot;&quot;&quot;&amp;REPT(&quot; &quot;;8-LEN([.I54]));&quot;null&quot;&amp;REPT(&quot; &quot;;8-4+2)) &amp;&quot;,&quot;&quot;&quot;&amp;[.J$1]&amp;&quot;&quot;&quot;:&quot;&amp;IF([.J54]&lt;&gt;&quot;&quot;;[.J54]&amp;REPT(&quot; &quot;;4-LEN([.J54]));&quot;null&quot;) &amp;&quot;,&quot;&quot;&quot;&amp;[.K$1]&amp;&quot;&quot;&quot;:&quot;&amp;IF([.K54]&lt;&gt;&quot;&quot;;[.K54]&amp;REPT(&quot; &quot;;4-LEN([.K54]));&quot;null&quot;) &amp;&quot;,&quot;&quot;&quot;&amp;[.L$1]&amp;&quot;&quot;&quot;:&quot;&amp;IF([.L54]&lt;&gt;&quot;&quot;;[.L54]&amp;REPT(&quot; &quot;;5-LEN([.L54]));&quot;null &quot;) &amp;&quot;,&quot;&quot;&quot;&amp;[.M$1]&amp;&quot;&quot;&quot;:&quot;&amp;IF([.M54]&lt;&gt;&quot;&quot;;&quot;&quot;&quot;&quot;&amp;[.M54]&amp;&quot;&quot;&quot;&quot;&amp;REPT(&quot; &quot;;20-LEN([.M54]));&quot;null&quot;&amp;REPT(&quot; &quot;;20-4+2)) &amp;&quot;,&quot;&quot;&quot;&amp;[.N$1]&amp;&quot;&quot;&quot;:&quot;&amp;IF([.N54]&lt;&gt;&quot;&quot;;&quot;&quot;&amp;[.N54]&amp;&quot;&quot;&amp;REPT(&quot; &quot;;5-LEN([.N54]));&quot;null&quot;&amp;REPT(&quot; &quot;;5-4+2)) &amp;&quot;,&quot;&quot;&quot;&amp;[.O$1]&amp;&quot;&quot;&quot;:&quot;&amp;[.O54] &amp;&quot;,&quot;&quot;&quot;&amp;[.P$1]&amp;&quot;&quot;&quot;:&quot;&amp;[.P54] &amp;&quot;}&quot;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O$1]&amp;&quot;&quot;&quot;:&quot;&amp;[.O54]&#10;&amp;&quot;,&quot;&quot;&quot;&amp;[.P$1]&amp;&quot;&quot;&quot;:&quot;&amp;[.P54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8"/>
          <table:table-cell table:style-name="ce17" table:formula="of:=&quot;&quot;&amp;IF([.T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}" calcext:value-type="string">
            <text:p>}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8"/>
          <table:table-cell table:style-name="ce17" table:formula="of:=&quot;&quot;&amp;IF([.T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 " calcext:value-type="string">
            <text:p><text:s/>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6"/>
          <table:table-cell table:formula="of:=MAX([.Q1:.Q56])" office:value-type="float" office:value="3" calcext:value-type="float">
            <text:p>3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8"/>
          <table:table-cell table:style-name="ce17"/>
          <table:table-cell table:number-columns-repeated="6"/>
        </table:table-row>
        <table:table-row table:style-name="ro1" table:number-rows-repeated="104838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Learning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cknow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" table:number-columns-repeated="3" table:default-cell-style-name="Default"/>
        <table:table-column table:style-name="co28" table:default-cell-style-name="Default"/>
        <table:table-column table:style-name="co29" table:default-cell-style-name="ce7"/>
        <table:table-column table:style-name="co1" table:number-columns-repeated="2" table:default-cell-style-name="Default"/>
        <table:table-column table:style-name="co30" table:default-cell-style-name="Default"/>
        <table:table-row table:style-name="ro1">
          <table:table-cell table:number-columns-repeated="9"/>
          <table:table-cell table:style-name="ce14" office:value-type="string" calcext:value-type="string">
            <text:p>{</text:p>
          </table:table-cell>
          <table:table-cell table:style-name="ce14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14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14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14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14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14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14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&quot;]" calcext:value-type="string">
            <text:p>"eco_tempH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14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14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&quot;]" calcext:value-type="string">
            <text:p>"eco_tempL":["eco_temp","eco_temp_consign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14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14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14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14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&quot;]" calcext:value-type="string">
            <text:p>"cft_tempH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14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14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&quot;]" calcext:value-type="string">
            <text:p>"cft_tempL":["cft_temp","cft_temp_consign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14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14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14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14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14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14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14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14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14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14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14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14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14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14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14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14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14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14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14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14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14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14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14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14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14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14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14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14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14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14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14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14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14" table:formula="of:=IF([.A25]=&quot;&quot;;&quot; &quot;;IF([.A26]&lt;&gt;&quot;&quot;;&quot;,&quot;;&quot;}&quot;))" office:value-type="string" office:string-value="}" calcext:value-type="string">
            <text:p>}</text:p>
          </table:table-cell>
          <table:table-cell table:style-name="ce14" table:formula="of:=IF([.A26]&lt;&gt;&quot;&quot;;&quot;&quot;&quot;&quot;&amp;[.A26]&amp;&quot;&quot;&quot;:[&quot;&quot;&quot;&amp;COM.MICROSOFT.TEXTJOIN(&quot;&quot;&quot;,&quot;&quot;&quot;;1;[.B26:.H26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6]=&quot;&quot;;&quot; &quot;;IF([.A27]&lt;&gt;&quot;&quot;;&quot;,&quot;;&quot;}&quot;))" office:value-type="string" office:string-value=" " calcext:value-type="string">
            <text:p><text:s/></text:p>
          </table:table-cell>
          <table:table-cell table:formula="of:=IF([.A27]&lt;&gt;&quot;&quot;;&quot;&quot;&quot;&quot;&amp;[.A27]&amp;&quot;&quot;&quot;:[&quot;&quot;&quot;&amp;COM.MICROSOFT.TEXTJOIN(&quot;&quot;&quot;,&quot;&quot;&quot;;1;[.B27:.H27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7]=&quot;&quot;;&quot; &quot;;IF([.A28]&lt;&gt;&quot;&quot;;&quot;,&quot;;&quot;}&quot;))" office:value-type="string" office:string-value=" " calcext:value-type="string">
            <text:p><text:s/></text:p>
          </table:table-cell>
          <table:table-cell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4:.E34])&amp;&quot;&quot;&quot;]&quot;;&quot;&quot;)">
            <text:p/>
          </table:table-cell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08:18:50.36560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01T21:18:59.417911200</dc:date>
    <meta:editing-duration>PT13H46M5S</meta:editing-duration>
    <meta:editing-cycles>18</meta:editing-cycles>
    <meta:generator>LibreOffice/26.2.0.3$Windows_X86_64 LibreOffice_project/620$Build-3</meta:generator>
    <meta:document-statistic meta:table-count="5" meta:cell-count="1666" meta:object-count="0"/>
  </office:meta>
</office:document-meta>
</file>