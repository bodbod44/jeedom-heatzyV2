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5" style:family="table-column">
      <style:table-column-properties fo:break-before="auto" style:column-width="57.566cm"/>
    </style:style>
    <style:style style:name="co32" style:family="table-column">
      <style:table-column-properties fo:break-before="auto" style:column-width="3.849cm"/>
    </style:style>
    <style:style style:name="co33" style:family="table-column">
      <style:table-column-properties fo:break-before="auto" style:column-width="23.172cm"/>
    </style:style>
    <style:style style:name="co5" style:family="table-column">
      <style:table-column-properties fo:break-before="auto" style:column-width="4.431cm"/>
    </style:style>
    <style:style style:name="co6" style:family="table-column">
      <style:table-column-properties fo:break-before="auto" style:column-width="5.946cm"/>
    </style:style>
    <style:style style:name="co7" style:family="table-column">
      <style:table-column-properties fo:break-before="auto" style:column-width="7.518cm"/>
    </style:style>
    <style:style style:name="co8" style:family="table-column">
      <style:table-column-properties fo:break-before="auto" style:column-width="1.288cm"/>
    </style:style>
    <style:style style:name="co9" style:family="table-column">
      <style:table-column-properties fo:break-before="auto" style:column-width="1.833cm"/>
    </style:style>
    <style:style style:name="co10" style:family="table-column">
      <style:table-column-properties fo:break-before="auto" style:column-width="1.778cm"/>
    </style:style>
    <style:style style:name="co11" style:family="table-column">
      <style:table-column-properties fo:break-before="auto" style:column-width="3.787cm"/>
    </style:style>
    <style:style style:name="co12" style:family="table-column">
      <style:table-column-properties fo:break-before="auto" style:column-width="3.575cm"/>
    </style:style>
    <style:style style:name="co13" style:family="table-column">
      <style:table-column-properties fo:break-before="auto" style:column-width="3.14cm"/>
    </style:style>
    <style:style style:name="co14" style:family="table-column">
      <style:table-column-properties fo:break-before="auto" style:column-width="3.249cm"/>
    </style:style>
    <style:style style:name="co15" style:family="table-column">
      <style:table-column-properties fo:break-before="auto" style:column-width="2.886cm"/>
    </style:style>
    <style:style style:name="co16" style:family="table-column">
      <style:table-column-properties fo:break-before="auto" style:column-width="3.413cm"/>
    </style:style>
    <style:style style:name="co17" style:family="table-column">
      <style:table-column-properties fo:break-before="auto" style:column-width="3.916cm"/>
    </style:style>
    <style:style style:name="co18" style:family="table-column">
      <style:table-column-properties fo:break-before="auto" style:column-width="2.378cm"/>
    </style:style>
    <style:style style:name="co19" style:family="table-column">
      <style:table-column-properties fo:break-before="auto" style:column-width="1.416cm"/>
    </style:style>
    <style:style style:name="co20" style:family="table-column">
      <style:table-column-properties fo:break-before="auto" style:column-width="2.833cm"/>
    </style:style>
    <style:style style:name="co21" style:family="table-column">
      <style:table-column-properties fo:break-before="auto" style:column-width="5.156cm"/>
    </style:style>
    <style:style style:name="co22" style:family="table-column">
      <style:table-column-properties fo:break-before="auto" style:column-width="7.445cm"/>
    </style:style>
    <style:style style:name="co23" style:family="table-column">
      <style:table-column-properties fo:break-before="auto" style:column-width="0.907cm"/>
    </style:style>
    <style:style style:name="co24" style:family="table-column">
      <style:table-column-properties fo:break-before="auto" style:column-width="5.447cm"/>
    </style:style>
    <style:style style:name="co26" style:family="table-column">
      <style:table-column-properties fo:break-before="auto" style:column-width="4.357cm"/>
    </style:style>
    <style:style style:name="co27" style:family="table-column">
      <style:table-column-properties fo:break-before="auto" style:column-width="4.212cm"/>
    </style:style>
    <style:style style:name="co28" style:family="table-column">
      <style:table-column-properties fo:break-before="auto" style:column-width="2.242cm"/>
    </style:style>
    <style:style style:name="co29" style:family="table-column">
      <style:table-column-properties fo:break-before="auto" style:column-width="2.868cm"/>
    </style:style>
    <style:style style:name="co30" style:family="table-column">
      <style:table-column-properties fo:break-before="auto" style:column-width="4.175cm"/>
    </style:style>
    <style:style style:name="co31" style:family="table-column">
      <style:table-column-properties fo:break-before="auto" style:column-width="3.921cm"/>
    </style:style>
    <style:style style:name="co34" style:family="table-column">
      <style:table-column-properties fo:break-before="auto" style:column-width="2.034cm"/>
    </style:style>
    <style:style style:name="co35" style:family="table-column">
      <style:table-column-properties fo:break-before="auto" style:column-width="0.799cm"/>
    </style:style>
    <style:style style:name="co36" style:family="table-column">
      <style:table-column-properties fo:break-before="auto" style:column-width="10.71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91cm" fo:break-before="auto" style:use-optimal-row-height="fals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9" style:family="table-cell" style:parent-style-name="Default">
      <style:table-cell-properties fo:background-color="#e8f2a1"/>
      <style:text-properties style:font-name="Courier New" fo:font-size="12pt"/>
    </style:style>
    <style:style style:name="ce44" style:family="table-cell" style:parent-style-name="Default">
      <style:text-properties fo:font-size="12pt"/>
    </style:style>
    <style:style style:name="ce45" style:family="table-cell" style:parent-style-name="Default">
      <style:text-properties style:font-name="Courier New" fo:font-size="12pt"/>
    </style:style>
    <style:style style:name="ce51" style:family="table-cell" style:parent-style-name="Default">
      <style:table-cell-properties fo:background-color="#ffff00"/>
      <style:text-properties fo:font-size="12pt"/>
    </style:style>
    <style:style style:name="ce53" style:family="table-cell" style:parent-style-name="Default">
      <style:table-cell-properties fo:background-color="#ffff00"/>
      <style:text-properties style:font-name="Courier New" fo:font-size="12pt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b4c7dc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b4c7dc"/>
    </style:style>
    <style:style style:name="ce27" style:family="table-cell" style:parent-style-name="Default">
      <style:table-cell-properties fo:background-color="#e8f2a1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e8f2a1"/>
    </style:style>
    <style:style style:name="ce17" style:family="table-cell" style:parent-style-name="Default">
      <style:table-cell-properties fo:background-color="#e8f2a1"/>
      <style:text-properties style:font-name="Courier New" fo:font-size="8pt"/>
    </style:style>
    <style:style style:name="ce15" style:family="table-cell" style:parent-style-name="Default">
      <style:table-cell-properties fo:background-color="#81aca6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81aca6"/>
    </style:style>
    <style:style style:name="ce23" style:family="table-cell" style:parent-style-name="Default">
      <style:text-properties style:font-name="Courier New"/>
    </style:style>
    <style:style style:name="ce28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9" style:family="table-cell" style:parent-style-name="Default">
      <style:table-cell-properties fo:background-color="transparent"/>
    </style:style>
    <style:style style:name="ce20" style:family="table-cell" style:parent-style-name="Default">
      <style:table-cell-properties fo:background-color="transparent"/>
      <style:text-properties fo:font-size="8pt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6" style:family="table-cell" style:parent-style-name="Default">
      <style:table-cell-properties fo:background-color="#b2b2b2"/>
    </style:style>
    <style:style style:name="ce7" style:family="table-cell" style:parent-style-name="Default">
      <style:table-cell-properties fo:background-color="#b3cac7"/>
    </style:style>
    <style:style style:name="ce38" style:family="table-cell" style:parent-style-name="Default">
      <style:table-cell-properties fo:background-color="#ffdbb6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ackground-color="#ffdbb6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ffdbb6" style:text-align-source="fix" style:repeat-content="false"/>
      <style:paragraph-properties fo:text-align="center" fo:margin-left="0cm"/>
    </style:style>
    <style:style style:name="ce18" style:family="table-cell" style:parent-style-name="Default">
      <style:table-cell-properties fo:background-color="#b3cac7" style:text-align-source="fix" style:repeat-content="false"/>
      <style:paragraph-properties fo:text-align="center" fo:margin-left="0cm"/>
    </style:style>
    <style:style style:name="ce4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b2b2b2" style:text-align-source="fix" style:repeat-content="false"/>
      <style:paragraph-properties fo:text-align="center" fo:margin-left="0cm"/>
    </style:style>
    <style:style style:name="ce29" style:family="table-cell" style:parent-style-name="Default">
      <style:table-cell-properties fo:background-color="#81d41a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81d41a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ackground-color="#81d41a" style:text-align-source="fix" style:repeat-content="false"/>
      <style:paragraph-properties fo:text-align="center" fo:margin-left="0cm"/>
    </style:style>
    <style:style style:name="ce46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ourier New"/>
    </style:style>
    <style:style style:name="ce24" style:family="table-cell" style:parent-style-name="Default">
      <style:table-cell-properties fo:background-color="#f6f9d4"/>
      <style:text-properties style:font-name="Courier New"/>
    </style:style>
    <style:style style:name="ce25" style:family="table-cell" style:parent-style-name="Default">
      <style:table-cell-properties fo:background-color="#f6f9d4"/>
    </style:style>
    <style:style style:name="ce72" style:family="table-cell" style:parent-style-name="Default">
      <style:table-cell-properties fo:background-color="#e8f2a1"/>
      <style:text-properties style:font-name="Courier New" fo:font-size="12pt"/>
    </style:style>
    <style:style style:name="ce73" style:family="table-cell" style:parent-style-name="Default">
      <style:text-properties fo:font-size="12pt"/>
    </style:style>
    <style:style style:name="ce74" style:family="table-cell" style:parent-style-name="Default">
      <style:table-cell-properties fo:background-color="#ffff00"/>
      <style:text-properties fo:font-size="12pt"/>
    </style:style>
    <style:style style:name="ce75" style:family="table-cell" style:parent-style-name="Default">
      <style:text-properties style:font-name="Courier New" fo:font-size="12pt"/>
    </style:style>
    <style:style style:name="ce76" style:family="table-cell" style:parent-style-name="Default">
      <style:table-cell-properties fo:background-color="#ffff00"/>
      <style:text-properties style:font-name="Courier New" fo:font-size="12pt"/>
    </style:style>
  </office:automatic-styles>
  <office:body>
    <office:spreadsheet>
      <table:calculation-settings table:automatic-find-labels="false" table:use-regular-expressions="false" table:use-wildcards="true"/>
      <table:table table:name="JSON" table:style-name="ta1">
        <office:forms form:automatic-focus="false" form:apply-design-mode="false"/>
        <table:table-column table:style-name="co1" table:default-cell-style-name="Default"/>
        <table:table-row table:style-name="ro1">
          <table:table-cell office:value-type="string" calcext:value-type="string">
            <text:p>{</text:p>
          </table:table-cell>
        </table:table-row>
        <table:table-row table:style-name="ro2">
          <table:table-cell office:value-type="string" calcext:value-type="string">
            <text:p>*****module****</text:p>
          </table:table-cell>
        </table:table-row>
        <table:table-row table:style-name="ro1"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*****cmds****</text:p>
          </table:table-cell>
        </table:table-row>
        <table:table-row table:style-name="ro1">
          <table:table-cell office:value-type="string" calcext:value-type="string">
            <text:p>}</text:p>
          </table:table-cell>
        </table:table-row>
      </table:table>
      <table:table table:name="cmds" table:style-name="ta1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9" table:default-cell-style-name="Default"/>
        <table:table-column table:style-name="co19" table:default-cell-style-name="ce4"/>
        <table:table-column table:style-name="co20" table:default-cell-style-name="ce14"/>
        <table:table-column table:style-name="co21" table:default-cell-style-name="ce14"/>
        <table:table-column table:style-name="co22" table:default-cell-style-name="ce14"/>
        <table:table-column table:style-name="co23" table:default-cell-style-name="ce16"/>
        <table:table-column table:style-name="co20" table:default-cell-style-name="ce28"/>
        <table:table-column table:style-name="co24" table:default-cell-style-name="ce28"/>
        <table:table-column table:style-name="co16" table:default-cell-style-name="Default"/>
        <table:table-column table:style-name="co26" table:default-cell-style-name="Default"/>
        <table:table-row table:style-name="ro1">
          <table:table-cell table:style-name="ce6" office:value-type="string" calcext:value-type="string">
            <text:p>cmd_id</text:p>
          </table:table-cell>
          <table:table-cell table:style-name="ce6" office:value-type="string" calcext:value-type="string">
            <text:p>LogicalId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Order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SubType</text:p>
          </table:table-cell>
          <table:table-cell table:style-name="ce6" office:value-type="string" calcext:value-type="string">
            <text:p>Unite</text:p>
          </table:table-cell>
          <table:table-cell table:style-name="ce2" office:value-type="string" calcext:value-type="string">
            <text:p>Config_infoName</text:p>
          </table:table-cell>
          <table:table-cell table:style-name="ce2" office:value-type="string" calcext:value-type="string">
            <text:p>Config_value</text:p>
          </table:table-cell>
          <table:table-cell table:style-name="ce2" office:value-type="string" calcext:value-type="string">
            <text:p>Config_minValue</text:p>
          </table:table-cell>
          <table:table-cell table:style-name="ce2" office:value-type="string" calcext:value-type="string">
            <text:p>Config_maxValue</text:p>
          </table:table-cell>
          <table:table-cell table:style-name="ce2" office:value-type="string" calcext:value-type="string">
            <text:p>Config_tempHL</text:p>
          </table:table-cell>
          <table:table-cell table:style-name="ce2" office:value-type="string" calcext:value-type="string">
            <text:p>setValue</text:p>
          </table:table-cell>
          <table:table-cell table:style-name="ce6" office:value-type="string" calcext:value-type="string">
            <text:p>Display_param_step</text:p>
          </table:table-cell>
          <table:table-cell table:style-name="ce6" office:value-type="string" calcext:value-type="string">
            <text:p>IsHistorized</text:p>
          </table:table-cell>
          <table:table-cell table:style-name="ce6" office:value-type="string" calcext:value-type="string">
            <text:p>IsVisible</text:p>
          </table:table-cell>
          <table:table-cell table:style-name="ce3"/>
          <table:table-cell table:style-name="ce27" office:value-type="string" calcext:value-type="string">
            <text:p>{</text:p>
          </table:table-cell>
          <table:table-cell table:style-name="ce27"/>
          <table:table-cell/>
          <table:table-cell table:style-name="ce15" office:value-type="string" calcext:value-type="string">
            <text:p>.</text:p>
          </table:table-cell>
          <table:table-cell table:style-name="ce27" office:value-type="string" calcext:value-type="string">
            <text:p>"cmds":[</text:p>
          </table:table-cell>
          <table:table-cell table:style-name="ce27"/>
          <table:table-cell table:style-name="ce14"/>
          <table:table-cell table:style-name="ce19"/>
        </table:table-row>
        <table:table-row table:style-name="ro1">
          <table:table-cell table:number-columns-repeated="2" office:value-type="string" calcext:value-type="string">
            <text:p>refresh</text:p>
          </table:table-cell>
          <table:table-cell office:value-type="string" calcext:value-type="string">
            <text:p>Rafraichi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ther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N2])" office:value-type="float" office:value="0" calcext:value-type="float">
            <text:p>0</text:p>
          </table:table-cell>
          <table:table-cell/>
          <table:table-cell table:style-name="ce17" table:formula="of:=&quot;&quot;&amp;IF([.T1]=&quot;&quot;;&quot; &quot;;IF([.A2]&lt;&gt;&quot;&quot;;&quot;,&quot;;&quot;}&quot;)) &amp;IF([.A2]&lt;&gt;&quot;&quot;;&quot;&quot;&quot;&quot;&amp;[.A2]&amp;&quot;&quot;&quot;&quot;&amp;REPT(&quot; &quot;;20-LEN([.A2]));&quot;&quot;)" office:value-type="string" office:string-value=" &quot;refresh&quot;             " calcext:value-type="string">
            <text:p><text:s/>"refresh" <text:s text:c="12"/></text:p>
          </table:table-cell>
          <table:table-cell table:style-name="ce17" table:formula="of:=&quot;:&quot; &amp;&quot;{&quot;&quot;&quot;&amp;[.B$1]&amp;&quot;&quot;&quot;:&quot;&quot;&quot;&amp;[.B2]&amp;&quot;&quot;&quot;&quot;&amp;REPT(&quot; &quot;;20-LEN([.B2])) &amp;&quot;,&quot;&quot;&quot;&amp;[.C$1]&amp;&quot;&quot;&quot;:&quot;&quot;&quot;&amp;[.C2]&amp;&quot;&quot;&quot;&quot;&amp;REPT(&quot; &quot;;35-LEN([.C2])) &amp;&quot;,&quot;&quot;&quot;&amp;[.D$1]&amp;&quot;&quot;&quot;:&quot;&amp;[.D2]&amp;REPT(&quot; &quot;;3-LEN([.D2])) &amp;&quot;,&quot;&quot;&quot;&amp;[.E$1]&amp;&quot;&quot;&quot;:&quot;&quot;&quot;&amp;[.E2]&amp;&quot;&quot;&quot;&quot;&amp;REPT(&quot; &quot;;6-LEN([.E2])) &amp;&quot;,&quot;&quot;&quot;&amp;[.F$1]&amp;&quot;&quot;&quot;:&quot;&quot;&quot;&amp;[.F2]&amp;&quot;&quot;&quot;&quot;&amp;REPT(&quot; &quot;;7-LEN([.F2])) &amp;&quot;,&quot;&quot;&quot;&amp;[.G$1]&amp;&quot;&quot;&quot;:&quot;&amp;IF([.G2]&lt;&gt;&quot;&quot;;&quot;&quot;&quot;&quot;&amp;[.G2]&amp;&quot;&quot;&quot;&quot;&amp;REPT(&quot; &quot;;5-LEN([.G2]));&quot;null&quot;&amp;REPT(&quot; &quot;;5-4+2)) &amp;&quot;,&quot;&quot;&quot;&amp;[.H$1]&amp;&quot;&quot;&quot;:&quot;&amp;IF([.H2]&lt;&gt;&quot;&quot;;&quot;&quot;&quot;&quot;&amp;[.H2]&amp;&quot;&quot;&quot;&quot;&amp;REPT(&quot; &quot;;19-LEN([.H2]));&quot;null&quot;&amp;REPT(&quot; &quot;;19-4+2)) &amp;&quot;,&quot;&quot;&quot;&amp;[.I$1]&amp;&quot;&quot;&quot;:&quot;&amp;IF([.I2]&lt;&gt;&quot;&quot;;&quot;&quot;&quot;&quot;&amp;[.I2]&amp;&quot;&quot;&quot;&quot;&amp;REPT(&quot; &quot;;8-LEN([.I2]));&quot;null&quot;&amp;REPT(&quot; &quot;;8-4+2)) &amp;&quot;,&quot;&quot;&quot;&amp;[.J$1]&amp;&quot;&quot;&quot;:&quot;&amp;IF([.J2]&lt;&gt;&quot;&quot;;[.J2]&amp;REPT(&quot; &quot;;4-LEN([.J2]));&quot;null&quot;) &amp;&quot;,&quot;&quot;&quot;&amp;[.K$1]&amp;&quot;&quot;&quot;:&quot;&amp;IF([.K2]&lt;&gt;&quot;&quot;;[.K2]&amp;REPT(&quot; &quot;;4-LEN([.K2]));&quot;null&quot;) &amp;&quot;,&quot;&quot;&quot;&amp;[.L$1]&amp;&quot;&quot;&quot;:&quot;&amp;IF([.L2]&lt;&gt;&quot;&quot;;[.L2]&amp;REPT(&quot; &quot;;5-LEN([.L2]));&quot;null &quot;) &amp;&quot;,&quot;&quot;&quot;&amp;[.M$1]&amp;&quot;&quot;&quot;:&quot;&amp;IF([.M2]&lt;&gt;&quot;&quot;;&quot;&quot;&quot;&quot;&amp;[.M2]&amp;&quot;&quot;&quot;&quot;&amp;REPT(&quot; &quot;;20-LEN([.M2]));&quot;null&quot;&amp;REPT(&quot; &quot;;20-4+2)) &amp;&quot;,&quot;&quot;&quot;&amp;[.N$1]&amp;&quot;&quot;&quot;:&quot;&amp;IF([.N2]&lt;&gt;&quot;&quot;;&quot;&quot;&amp;[.N2]&amp;&quot;&quot;&amp;REPT(&quot; &quot;;5-LEN([.N2]));&quot;null&quot;&amp;REPT(&quot; &quot;;5-4+2)) &amp;&quot;,&quot;&quot;&quot;&amp;[.O$1]&amp;&quot;&quot;&quot;:&quot;&amp;[.O2] &amp;&quot;,&quot;&quot;&quot;&amp;[.P$1]&amp;&quot;&quot;&quot;:&quot;&amp;[.P2] &amp;&quot;}&quot;" office:value-type="string" office:string-value=":{&quot;LogicalId&quot;:&quot;refresh&quot;             ,&quot;Name&quot;:&quot;Rafraichir&quot;                         ,&quot;Order&quot;:0  ,&quot;Type&quot;:&quot;action&quot;,&quot;SubType&quot;:&quot;other&quot;  ,&quot;Unite&quot;:null   ,&quot;Config_infoName&quot;:null                 ,&quot;Config_value&quot;:null      ,&quot;Config_minValue&quot;:null,&quot;Config_maxValue&quot;:null,&quot;Config_tempHL&quot;:null ,&quot;setValue&quot;:null                  ,&quot;Display_param_step&quot;:null   ,&quot;IsHistorized&quot;:0,&quot;IsVisible&quot;:1}" calcext:value-type="string">
            <text:p>:{"LogicalId":"refresh" <text:s text:c="12"/>,"Name":"Rafraichir" <text:s text:c="24"/>,"Order":0 <text:s/>,"Type":"action","SubType":"other" <text:s/>,"Unite":null <text:s text:c="2"/>,"Config_infoName":null <text:s text:c="16"/>,"Config_value":null <text:s text:c="5"/>,"Config_minValue":null,"Config_maxValue":null,"Config_tempHL":null ,"setValue":null <text:s text:c="17"/>,"Display_param_step":null <text:s text:c="2"/>,"IsHistorized":0,"IsVisible":1}</text:p>
          </table:table-cell>
          <table:table-cell table:style-name="ce15" office:value-type="string" calcext:value-type="string">
            <text:p>.</text:p>
          </table:table-cell>
          <table:table-cell table:style-name="ce14"/>
          <table:table-cell table:style-name="ce17" table:formula="of:=&quot;&quot;&amp;IF([.X1]=&quot;&quot;;&quot; &quot;;IF([.B2]&lt;&gt;&quot;&quot;;&quot;,&quot;;&quot;]&quot;))&#10;&amp;IF([.B2]&lt;&gt;&quot;&quot;;&quot;{&quot;&quot;cmd&quot;&quot;:&quot;&quot;&quot;&amp;[.B2]&amp;&quot;&quot;&quot;&quot;&amp;REPT(&quot; &quot;;20-LEN([.B2]));&quot;&quot;)" office:value-type="string" office:string-value=" {&quot;cmd&quot;:&quot;refresh&quot;             " calcext:value-type="string">
            <text:p><text:s/>{"cmd":"refresh" <text:s text:c="12"/></text:p>
          </table:table-cell>
          <table:table-cell table:style-name="ce17" table:formula="of:=&quot;,&quot;&quot;attrs&quot;&quot;:&quot;&#10;&amp;&quot;{&quot;&quot;&quot;&amp;[.B$1]&amp;&quot;&quot;&quot;:&quot;&quot;&quot;&amp;[.B2]&amp;&quot;&quot;&quot;&quot;&amp;REPT(&quot; &quot;;20-LEN([.B2]))&#10;&amp;&quot;,&quot;&quot;&quot;&amp;[.C$1]&amp;&quot;&quot;&quot;:&quot;&quot;&quot;&amp;[.C2]&amp;&quot;&quot;&quot;&quot;&amp;REPT(&quot; &quot;;35-LEN([.C2]))&#10;&amp;&quot;,&quot;&quot;&quot;&amp;[.D$1]&amp;&quot;&quot;&quot;:&quot;&amp;[.D2]&amp;REPT(&quot; &quot;;3-LEN([.D2]))&#10;&amp;&quot;,&quot;&quot;&quot;&amp;[.E$1]&amp;&quot;&quot;&quot;:&quot;&quot;&quot;&amp;[.E2]&amp;&quot;&quot;&quot;&quot;&amp;REPT(&quot; &quot;;6-LEN([.E2]))&#10;&amp;&quot;,&quot;&quot;&quot;&amp;[.F$1]&amp;&quot;&quot;&quot;:&quot;&quot;&quot;&amp;[.F2]&amp;&quot;&quot;&quot;&quot;&amp;REPT(&quot; &quot;;7-LEN([.F2]))&#10;&amp;&quot;,&quot;&quot;&quot;&amp;[.G$1]&amp;&quot;&quot;&quot;:&quot;&amp;IF([.G2]&lt;&gt;&quot;&quot;;&quot;&quot;&quot;&quot;&amp;[.G2]&amp;&quot;&quot;&quot;&quot;&amp;REPT(&quot; &quot;;5-LEN([.G2]));&quot;null&quot;&amp;REPT(&quot; &quot;;5-4+2))&#10;&amp;&quot;,&quot;&quot;&quot;&amp;[.H$1]&amp;&quot;&quot;&quot;:&quot;&amp;IF([.H2]&lt;&gt;&quot;&quot;;&quot;&quot;&quot;&quot;&amp;[.H2]&amp;&quot;&quot;&quot;&quot;&amp;REPT(&quot; &quot;;19-LEN([.H2]));&quot;null&quot;&amp;REPT(&quot; &quot;;19-4+2))&#10;&amp;&quot;,&quot;&quot;&quot;&amp;[.I$1]&amp;&quot;&quot;&quot;:&quot;&amp;IF([.I2]&lt;&gt;&quot;&quot;;&quot;&quot;&quot;&quot;&amp;[.I2]&amp;&quot;&quot;&quot;&quot;&amp;REPT(&quot; &quot;;8-LEN([.I2]));&quot;null&quot;&amp;REPT(&quot; &quot;;8-4+2))&#10;&amp;&quot;,&quot;&quot;&quot;&amp;[.J$1]&amp;&quot;&quot;&quot;:&quot;&amp;IF([.J2]&lt;&gt;&quot;&quot;;[.J2]&amp;REPT(&quot; &quot;;4-LEN([.J2]));&quot;null&quot;)&#10;&amp;&quot;,&quot;&quot;&quot;&amp;[.K$1]&amp;&quot;&quot;&quot;:&quot;&amp;IF([.K2]&lt;&gt;&quot;&quot;;[.K2]&amp;REPT(&quot; &quot;;4-LEN([.K2]));&quot;null&quot;)&#10;&amp;&quot;,&quot;&quot;&quot;&amp;[.L$1]&amp;&quot;&quot;&quot;:&quot;&amp;IF([.L2]&lt;&gt;&quot;&quot;;[.L2]&amp;REPT(&quot; &quot;;5-LEN([.L2]));&quot;null &quot;)&#10;&amp;&quot;,&quot;&quot;&quot;&amp;[.M$1]&amp;&quot;&quot;&quot;:&quot;&amp;IF([.M2]&lt;&gt;&quot;&quot;;&quot;&quot;&quot;&quot;&amp;[.M2]&amp;&quot;&quot;&quot;&quot;&amp;REPT(&quot; &quot;;20-LEN([.M2]));&quot;null&quot;&amp;REPT(&quot; &quot;;20-4+2))&#10;&amp;&quot;,&quot;&quot;&quot;&amp;[.N$1]&amp;&quot;&quot;&quot;:&quot;&amp;IF([.N2]&lt;&gt;&quot;&quot;;&quot;&quot;&quot;&quot;&amp;[.N2]&amp;&quot;&quot;&quot;&quot;&amp;REPT(&quot; &quot;;30-LEN([.N2]));&quot;null&quot;&amp;REPT(&quot; &quot;;30-4+2))&#10;&amp;&quot;,&quot;&quot;&quot;&amp;[.O$1]&amp;&quot;&quot;&quot;:&quot;&amp;[.O2]&#10;&amp;&quot;,&quot;&quot;&quot;&amp;[.P$1]&amp;&quot;&quot;&quot;:&quot;&amp;[.P2]&#10;&amp;&quot;}}&quot;" office:value-type="string" office:string-value=",&quot;attrs&quot;:{&quot;LogicalId&quot;:&quot;refresh&quot;             ,&quot;Name&quot;:&quot;Rafraichir&quot;                         ,&quot;Order&quot;:0  ,&quot;Type&quot;:&quot;action&quot;,&quot;SubType&quot;:&quot;other&quot;  ,&quot;Unite&quot;:null   ,&quot;Config_infoName&quot;:null      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refresh" <text:s text:c="12"/>,"Name":"Rafraichir" <text:s text:c="24"/>,"Order":0 <text:s/>,"Type":"action","SubType":"other" <text:s/>,"Unite":null <text:s text:c="2"/>,"Config_infoName":null <text:s text:c="16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IsOnLine</text:p>
          </table:table-cell>
          <table:table-cell office:value-type="string" calcext:value-type="string">
            <text:p>Onl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binary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 table:formula="of:=LEN([.N3])" office:value-type="float" office:value="0" calcext:value-type="float">
            <text:p>0</text:p>
          </table:table-cell>
          <table:table-cell/>
          <table:table-cell table:style-name="ce17" table:formula="of:=&quot;&quot;&amp;IF([.T2]=&quot;&quot;;&quot; &quot;;IF([.A3]&lt;&gt;&quot;&quot;;&quot;,&quot;;&quot;}&quot;)) &amp;IF([.A3]&lt;&gt;&quot;&quot;;&quot;&quot;&quot;&quot;&amp;[.A3]&amp;&quot;&quot;&quot;&quot;&amp;REPT(&quot; &quot;;20-LEN([.A3]));&quot;&quot;)" office:value-type="string" office:string-value=",&quot;IsOnLine&quot;            " calcext:value-type="string">
            <text:p>,"IsOnLine" <text:s text:c="11"/></text:p>
          </table:table-cell>
          <table:table-cell table:style-name="ce17" table:formula="of:=&quot;:&quot; &amp;&quot;{&quot;&quot;&quot;&amp;[.B$1]&amp;&quot;&quot;&quot;:&quot;&quot;&quot;&amp;[.B3]&amp;&quot;&quot;&quot;&quot;&amp;REPT(&quot; &quot;;20-LEN([.B3])) &amp;&quot;,&quot;&quot;&quot;&amp;[.C$1]&amp;&quot;&quot;&quot;:&quot;&quot;&quot;&amp;[.C3]&amp;&quot;&quot;&quot;&quot;&amp;REPT(&quot; &quot;;35-LEN([.C3])) &amp;&quot;,&quot;&quot;&quot;&amp;[.D$1]&amp;&quot;&quot;&quot;:&quot;&amp;[.D3]&amp;REPT(&quot; &quot;;3-LEN([.D3])) &amp;&quot;,&quot;&quot;&quot;&amp;[.E$1]&amp;&quot;&quot;&quot;:&quot;&quot;&quot;&amp;[.E3]&amp;&quot;&quot;&quot;&quot;&amp;REPT(&quot; &quot;;6-LEN([.E3])) &amp;&quot;,&quot;&quot;&quot;&amp;[.F$1]&amp;&quot;&quot;&quot;:&quot;&quot;&quot;&amp;[.F3]&amp;&quot;&quot;&quot;&quot;&amp;REPT(&quot; &quot;;7-LEN([.F3])) &amp;&quot;,&quot;&quot;&quot;&amp;[.G$1]&amp;&quot;&quot;&quot;:&quot;&amp;IF([.G3]&lt;&gt;&quot;&quot;;&quot;&quot;&quot;&quot;&amp;[.G3]&amp;&quot;&quot;&quot;&quot;&amp;REPT(&quot; &quot;;5-LEN([.G3]));&quot;null&quot;&amp;REPT(&quot; &quot;;5-4+2)) &amp;&quot;,&quot;&quot;&quot;&amp;[.H$1]&amp;&quot;&quot;&quot;:&quot;&amp;IF([.H3]&lt;&gt;&quot;&quot;;&quot;&quot;&quot;&quot;&amp;[.H3]&amp;&quot;&quot;&quot;&quot;&amp;REPT(&quot; &quot;;19-LEN([.H3]));&quot;null&quot;&amp;REPT(&quot; &quot;;19-4+2)) &amp;&quot;,&quot;&quot;&quot;&amp;[.I$1]&amp;&quot;&quot;&quot;:&quot;&amp;IF([.I3]&lt;&gt;&quot;&quot;;&quot;&quot;&quot;&quot;&amp;[.I3]&amp;&quot;&quot;&quot;&quot;&amp;REPT(&quot; &quot;;8-LEN([.I3]));&quot;null&quot;&amp;REPT(&quot; &quot;;8-4+2)) &amp;&quot;,&quot;&quot;&quot;&amp;[.J$1]&amp;&quot;&quot;&quot;:&quot;&amp;IF([.J3]&lt;&gt;&quot;&quot;;[.J3]&amp;REPT(&quot; &quot;;4-LEN([.J3]));&quot;null&quot;) &amp;&quot;,&quot;&quot;&quot;&amp;[.K$1]&amp;&quot;&quot;&quot;:&quot;&amp;IF([.K3]&lt;&gt;&quot;&quot;;[.K3]&amp;REPT(&quot; &quot;;4-LEN([.K3]));&quot;null&quot;) &amp;&quot;,&quot;&quot;&quot;&amp;[.L$1]&amp;&quot;&quot;&quot;:&quot;&amp;IF([.L3]&lt;&gt;&quot;&quot;;[.L3]&amp;REPT(&quot; &quot;;5-LEN([.L3]));&quot;null &quot;) &amp;&quot;,&quot;&quot;&quot;&amp;[.M$1]&amp;&quot;&quot;&quot;:&quot;&amp;IF([.M3]&lt;&gt;&quot;&quot;;&quot;&quot;&quot;&quot;&amp;[.M3]&amp;&quot;&quot;&quot;&quot;&amp;REPT(&quot; &quot;;20-LEN([.M3]));&quot;null&quot;&amp;REPT(&quot; &quot;;20-4+2)) &amp;&quot;,&quot;&quot;&quot;&amp;[.N$1]&amp;&quot;&quot;&quot;:&quot;&amp;IF([.N3]&lt;&gt;&quot;&quot;;&quot;&quot;&amp;[.N3]&amp;&quot;&quot;&amp;REPT(&quot; &quot;;5-LEN([.N3]));&quot;null&quot;&amp;REPT(&quot; &quot;;5-4+2)) &amp;&quot;,&quot;&quot;&quot;&amp;[.O$1]&amp;&quot;&quot;&quot;:&quot;&amp;[.O3] &amp;&quot;,&quot;&quot;&quot;&amp;[.P$1]&amp;&quot;&quot;&quot;:&quot;&amp;[.P3] &amp;&quot;}&quot;" office:value-type="string" office:string-value=":{&quot;LogicalId&quot;:&quot;IsOnLine&quot;            ,&quot;Name&quot;:&quot;Online&quot;                             ,&quot;Order&quot;:1  ,&quot;Type&quot;:&quot;info&quot;  ,&quot;SubType&quot;:&quot;binary&quot; ,&quot;Unite&quot;:null   ,&quot;Config_infoName&quot;:null                 ,&quot;Config_value&quot;:null      ,&quot;Config_minValue&quot;:null,&quot;Config_maxValue&quot;:null,&quot;Config_tempHL&quot;:null ,&quot;setValue&quot;:null                  ,&quot;Display_param_step&quot;:null   ,&quot;IsHistorized&quot;:0,&quot;IsVisible&quot;:0}" calcext:value-type="string">
            <text:p>:{"LogicalId":"IsOnLine" <text:s text:c="11"/>,"Name":"Online" <text:s text:c="28"/>,"Order":1 <text:s/>,"Type":"info" <text:s/>,"SubType":"binary" ,"Unite":null <text:s text:c="2"/>,"Config_infoName":null <text:s text:c="16"/>,"Config_value":null <text:s text:c="5"/>,"Config_minValue":null,"Config_maxValue":null,"Config_tempHL":null ,"setValue":null <text:s text:c="17"/>,"Display_param_step":null <text:s text:c="2"/>,"IsHistorized":0,"IsVisible":0}</text:p>
          </table:table-cell>
          <table:table-cell table:style-name="ce15" office:value-type="string" calcext:value-type="string">
            <text:p>.</text:p>
          </table:table-cell>
          <table:table-cell table:style-name="ce14"/>
          <table:table-cell table:style-name="ce17" table:formula="of:=IF([.W2]=&quot;&quot;;&quot; &quot;;IF([.B3]&lt;&gt;&quot;&quot;;&quot;,&quot;;&quot;]&quot;))&#10;&amp;IF([.B3]&lt;&gt;&quot;&quot;;&quot;{&quot;&quot;cmd&quot;&quot;:&quot;&quot;&quot;&amp;[.B3]&amp;&quot;&quot;&quot;&quot;&amp;REPT(&quot; &quot;;20-LEN([.B3]));&quot;&quot;)" office:value-type="string" office:string-value=",{&quot;cmd&quot;:&quot;IsOnLine&quot;            " calcext:value-type="string">
            <text:p>,{"cmd":"IsOnLine" <text:s text:c="11"/></text:p>
          </table:table-cell>
          <table:table-cell table:style-name="ce17" table:formula="of:=&quot;,&quot;&quot;attrs&quot;&quot;:&quot;&#10;&amp;&quot;{&quot;&quot;&quot;&amp;[.B$1]&amp;&quot;&quot;&quot;:&quot;&quot;&quot;&amp;[.B3]&amp;&quot;&quot;&quot;&quot;&amp;REPT(&quot; &quot;;20-LEN([.B3]))&#10;&amp;&quot;,&quot;&quot;&quot;&amp;[.C$1]&amp;&quot;&quot;&quot;:&quot;&quot;&quot;&amp;[.C3]&amp;&quot;&quot;&quot;&quot;&amp;REPT(&quot; &quot;;35-LEN([.C3]))&#10;&amp;&quot;,&quot;&quot;&quot;&amp;[.D$1]&amp;&quot;&quot;&quot;:&quot;&amp;[.D3]&amp;REPT(&quot; &quot;;3-LEN([.D3]))&#10;&amp;&quot;,&quot;&quot;&quot;&amp;[.E$1]&amp;&quot;&quot;&quot;:&quot;&quot;&quot;&amp;[.E3]&amp;&quot;&quot;&quot;&quot;&amp;REPT(&quot; &quot;;6-LEN([.E3]))&#10;&amp;&quot;,&quot;&quot;&quot;&amp;[.F$1]&amp;&quot;&quot;&quot;:&quot;&quot;&quot;&amp;[.F3]&amp;&quot;&quot;&quot;&quot;&amp;REPT(&quot; &quot;;7-LEN([.F3]))&#10;&amp;&quot;,&quot;&quot;&quot;&amp;[.G$1]&amp;&quot;&quot;&quot;:&quot;&amp;IF([.G3]&lt;&gt;&quot;&quot;;&quot;&quot;&quot;&quot;&amp;[.G3]&amp;&quot;&quot;&quot;&quot;&amp;REPT(&quot; &quot;;5-LEN([.G3]));&quot;null&quot;&amp;REPT(&quot; &quot;;5-4+2))&#10;&amp;&quot;,&quot;&quot;&quot;&amp;[.H$1]&amp;&quot;&quot;&quot;:&quot;&amp;IF([.H3]&lt;&gt;&quot;&quot;;&quot;&quot;&quot;&quot;&amp;[.H3]&amp;&quot;&quot;&quot;&quot;&amp;REPT(&quot; &quot;;19-LEN([.H3]));&quot;null&quot;&amp;REPT(&quot; &quot;;19-4+2))&#10;&amp;&quot;,&quot;&quot;&quot;&amp;[.I$1]&amp;&quot;&quot;&quot;:&quot;&amp;IF([.I3]&lt;&gt;&quot;&quot;;&quot;&quot;&quot;&quot;&amp;[.I3]&amp;&quot;&quot;&quot;&quot;&amp;REPT(&quot; &quot;;8-LEN([.I3]));&quot;null&quot;&amp;REPT(&quot; &quot;;8-4+2))&#10;&amp;&quot;,&quot;&quot;&quot;&amp;[.J$1]&amp;&quot;&quot;&quot;:&quot;&amp;IF([.J3]&lt;&gt;&quot;&quot;;[.J3]&amp;REPT(&quot; &quot;;4-LEN([.J3]));&quot;null&quot;)&#10;&amp;&quot;,&quot;&quot;&quot;&amp;[.K$1]&amp;&quot;&quot;&quot;:&quot;&amp;IF([.K3]&lt;&gt;&quot;&quot;;[.K3]&amp;REPT(&quot; &quot;;4-LEN([.K3]));&quot;null&quot;)&#10;&amp;&quot;,&quot;&quot;&quot;&amp;[.L$1]&amp;&quot;&quot;&quot;:&quot;&amp;IF([.L3]&lt;&gt;&quot;&quot;;[.L3]&amp;REPT(&quot; &quot;;5-LEN([.L3]));&quot;null &quot;)&#10;&amp;&quot;,&quot;&quot;&quot;&amp;[.M$1]&amp;&quot;&quot;&quot;:&quot;&amp;IF([.M3]&lt;&gt;&quot;&quot;;&quot;&quot;&quot;&quot;&amp;[.M3]&amp;&quot;&quot;&quot;&quot;&amp;REPT(&quot; &quot;;20-LEN([.M3]));&quot;null&quot;&amp;REPT(&quot; &quot;;20-4+2))&#10;&amp;&quot;,&quot;&quot;&quot;&amp;[.N$1]&amp;&quot;&quot;&quot;:&quot;&amp;IF([.N3]&lt;&gt;&quot;&quot;;&quot;&quot;&quot;&quot;&amp;[.N3]&amp;&quot;&quot;&quot;&quot;&amp;REPT(&quot; &quot;;30-LEN([.N3]));&quot;null&quot;&amp;REPT(&quot; &quot;;30-4+2))&#10;&amp;&quot;,&quot;&quot;&quot;&amp;[.O$1]&amp;&quot;&quot;&quot;:&quot;&amp;[.O3]&#10;&amp;&quot;,&quot;&quot;&quot;&amp;[.P$1]&amp;&quot;&quot;&quot;:&quot;&amp;[.P3]&#10;&amp;&quot;}}&quot;" office:value-type="string" office:string-value=",&quot;attrs&quot;:{&quot;LogicalId&quot;:&quot;IsOnLine&quot;            ,&quot;Name&quot;:&quot;Online&quot;                             ,&quot;Order&quot;:1  ,&quot;Type&quot;:&quot;info&quot;  ,&quot;SubType&quot;:&quot;binary&quot; ,&quot;Unite&quot;:null   ,&quot;Config_infoName&quot;:null      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0}}" calcext:value-type="string">
            <text:p>,"attrs":{"LogicalId":"IsOnLine" <text:s text:c="11"/>,"Name":"Online" <text:s text:c="28"/>,"Order":1 <text:s/>,"Type":"info" <text:s/>,"SubType":"binary" ,"Unite":null <text:s text:c="2"/>,"Config_infoName":null <text:s text:c="16"/>,"Config_value":null <text:s text:c="5"/>,"Config_minValue":null,"Config_maxValue":null,"Config_tempHL":null ,"setValue":null <text:s text:c="17"/>,"Display_param_step":null <text:s text:c="27"/>,"IsHistorized":0,"IsVisible":0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ur_temp</text:p>
          </table:table-cell>
          <table:table-cell office:value-type="string" calcext:value-type="string">
            <text:p>Temperatu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°C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N4])" office:value-type="float" office:value="0" calcext:value-type="float">
            <text:p>0</text:p>
          </table:table-cell>
          <table:table-cell/>
          <table:table-cell table:style-name="ce17" table:formula="of:=&quot;&quot;&amp;IF([.T3]=&quot;&quot;;&quot; &quot;;IF([.A4]&lt;&gt;&quot;&quot;;&quot;,&quot;;&quot;}&quot;)) &amp;IF([.A4]&lt;&gt;&quot;&quot;;&quot;&quot;&quot;&quot;&amp;[.A4]&amp;&quot;&quot;&quot;&quot;&amp;REPT(&quot; &quot;;20-LEN([.A4]));&quot;&quot;)" office:value-type="string" office:string-value=",&quot;cur_temp&quot;            " calcext:value-type="string">
            <text:p>,"cur_temp" <text:s text:c="11"/></text:p>
          </table:table-cell>
          <table:table-cell table:style-name="ce17" table:formula="of:=&quot;:&quot; &amp;&quot;{&quot;&quot;&quot;&amp;[.B$1]&amp;&quot;&quot;&quot;:&quot;&quot;&quot;&amp;[.B4]&amp;&quot;&quot;&quot;&quot;&amp;REPT(&quot; &quot;;20-LEN([.B4])) &amp;&quot;,&quot;&quot;&quot;&amp;[.C$1]&amp;&quot;&quot;&quot;:&quot;&quot;&quot;&amp;[.C4]&amp;&quot;&quot;&quot;&quot;&amp;REPT(&quot; &quot;;35-LEN([.C4])) &amp;&quot;,&quot;&quot;&quot;&amp;[.D$1]&amp;&quot;&quot;&quot;:&quot;&amp;[.D4]&amp;REPT(&quot; &quot;;3-LEN([.D4])) &amp;&quot;,&quot;&quot;&quot;&amp;[.E$1]&amp;&quot;&quot;&quot;:&quot;&quot;&quot;&amp;[.E4]&amp;&quot;&quot;&quot;&quot;&amp;REPT(&quot; &quot;;6-LEN([.E4])) &amp;&quot;,&quot;&quot;&quot;&amp;[.F$1]&amp;&quot;&quot;&quot;:&quot;&quot;&quot;&amp;[.F4]&amp;&quot;&quot;&quot;&quot;&amp;REPT(&quot; &quot;;7-LEN([.F4])) &amp;&quot;,&quot;&quot;&quot;&amp;[.G$1]&amp;&quot;&quot;&quot;:&quot;&amp;IF([.G4]&lt;&gt;&quot;&quot;;&quot;&quot;&quot;&quot;&amp;[.G4]&amp;&quot;&quot;&quot;&quot;&amp;REPT(&quot; &quot;;5-LEN([.G4]));&quot;null&quot;&amp;REPT(&quot; &quot;;5-4+2)) &amp;&quot;,&quot;&quot;&quot;&amp;[.H$1]&amp;&quot;&quot;&quot;:&quot;&amp;IF([.H4]&lt;&gt;&quot;&quot;;&quot;&quot;&quot;&quot;&amp;[.H4]&amp;&quot;&quot;&quot;&quot;&amp;REPT(&quot; &quot;;19-LEN([.H4]));&quot;null&quot;&amp;REPT(&quot; &quot;;19-4+2)) &amp;&quot;,&quot;&quot;&quot;&amp;[.I$1]&amp;&quot;&quot;&quot;:&quot;&amp;IF([.I4]&lt;&gt;&quot;&quot;;&quot;&quot;&quot;&quot;&amp;[.I4]&amp;&quot;&quot;&quot;&quot;&amp;REPT(&quot; &quot;;8-LEN([.I4]));&quot;null&quot;&amp;REPT(&quot; &quot;;8-4+2)) &amp;&quot;,&quot;&quot;&quot;&amp;[.J$1]&amp;&quot;&quot;&quot;:&quot;&amp;IF([.J4]&lt;&gt;&quot;&quot;;[.J4]&amp;REPT(&quot; &quot;;4-LEN([.J4]));&quot;null&quot;) &amp;&quot;,&quot;&quot;&quot;&amp;[.K$1]&amp;&quot;&quot;&quot;:&quot;&amp;IF([.K4]&lt;&gt;&quot;&quot;;[.K4]&amp;REPT(&quot; &quot;;4-LEN([.K4]));&quot;null&quot;) &amp;&quot;,&quot;&quot;&quot;&amp;[.L$1]&amp;&quot;&quot;&quot;:&quot;&amp;IF([.L4]&lt;&gt;&quot;&quot;;[.L4]&amp;REPT(&quot; &quot;;5-LEN([.L4]));&quot;null &quot;) &amp;&quot;,&quot;&quot;&quot;&amp;[.M$1]&amp;&quot;&quot;&quot;:&quot;&amp;IF([.M4]&lt;&gt;&quot;&quot;;&quot;&quot;&quot;&quot;&amp;[.M4]&amp;&quot;&quot;&quot;&quot;&amp;REPT(&quot; &quot;;20-LEN([.M4]));&quot;null&quot;&amp;REPT(&quot; &quot;;20-4+2)) &amp;&quot;,&quot;&quot;&quot;&amp;[.N$1]&amp;&quot;&quot;&quot;:&quot;&amp;IF([.N4]&lt;&gt;&quot;&quot;;&quot;&quot;&amp;[.N4]&amp;&quot;&quot;&amp;REPT(&quot; &quot;;5-LEN([.N4]));&quot;null&quot;&amp;REPT(&quot; &quot;;5-4+2)) &amp;&quot;,&quot;&quot;&quot;&amp;[.O$1]&amp;&quot;&quot;&quot;:&quot;&amp;[.O4] &amp;&quot;,&quot;&quot;&quot;&amp;[.P$1]&amp;&quot;&quot;&quot;:&quot;&amp;[.P4] &amp;&quot;}&quot;" office:value-type="string" office:string-value=":{&quot;LogicalId&quot;:&quot;cur_temp&quot;            ,&quot;Name&quot;:&quot;Temperature&quot;                        ,&quot;Order&quot;:10 ,&quot;Type&quot;:&quot;info&quot;  ,&quot;SubType&quot;:&quot;numeric&quot;,&quot;Unite&quot;:&quot;°C&quot;   ,&quot;Config_infoName&quot;:null                 ,&quot;Config_value&quot;:null      ,&quot;Config_minValue&quot;:null,&quot;Config_maxValue&quot;:null,&quot;Config_tempHL&quot;:null ,&quot;setValue&quot;:null                  ,&quot;Display_param_step&quot;:null   ,&quot;IsHistorized&quot;:0,&quot;IsVisible&quot;:1}" calcext:value-type="string">
            <text:p>:{"LogicalId":"cur_temp" <text:s text:c="11"/>,"Name":"Temperature" <text:s text:c="23"/>,"Order":10 ,"Type":"info" <text:s/>,"SubType":"numeric","Unite":"°C" <text:s text:c="2"/>,"Config_infoName":null <text:s text:c="16"/>,"Config_value":null <text:s text:c="5"/>,"Config_minValue":null,"Config_maxValue":null,"Config_tempHL":null ,"setValue":null <text:s text:c="17"/>,"Display_param_step":null <text:s text:c="2"/>,"IsHistorized":0,"IsVisible":1}</text:p>
          </table:table-cell>
          <table:table-cell table:style-name="ce15" office:value-type="string" calcext:value-type="string">
            <text:p>.</text:p>
          </table:table-cell>
          <table:table-cell table:style-name="ce14"/>
          <table:table-cell table:style-name="ce17" table:formula="of:=IF([.W3]=&quot;&quot;;&quot; &quot;;IF([.B4]&lt;&gt;&quot;&quot;;&quot;,&quot;;&quot;]&quot;))&#10;&amp;IF([.B4]&lt;&gt;&quot;&quot;;&quot;{&quot;&quot;cmd&quot;&quot;:&quot;&quot;&quot;&amp;[.B4]&amp;&quot;&quot;&quot;&quot;&amp;REPT(&quot; &quot;;20-LEN([.B4]));&quot;&quot;)" office:value-type="string" office:string-value=",{&quot;cmd&quot;:&quot;cur_temp&quot;            " calcext:value-type="string">
            <text:p>,{"cmd":"cur_temp" <text:s text:c="11"/></text:p>
          </table:table-cell>
          <table:table-cell table:style-name="ce17" table:formula="of:=&quot;,&quot;&quot;attrs&quot;&quot;:&quot;&#10;&amp;&quot;{&quot;&quot;&quot;&amp;[.B$1]&amp;&quot;&quot;&quot;:&quot;&quot;&quot;&amp;[.B4]&amp;&quot;&quot;&quot;&quot;&amp;REPT(&quot; &quot;;20-LEN([.B4]))&#10;&amp;&quot;,&quot;&quot;&quot;&amp;[.C$1]&amp;&quot;&quot;&quot;:&quot;&quot;&quot;&amp;[.C4]&amp;&quot;&quot;&quot;&quot;&amp;REPT(&quot; &quot;;35-LEN([.C4]))&#10;&amp;&quot;,&quot;&quot;&quot;&amp;[.D$1]&amp;&quot;&quot;&quot;:&quot;&amp;[.D4]&amp;REPT(&quot; &quot;;3-LEN([.D4]))&#10;&amp;&quot;,&quot;&quot;&quot;&amp;[.E$1]&amp;&quot;&quot;&quot;:&quot;&quot;&quot;&amp;[.E4]&amp;&quot;&quot;&quot;&quot;&amp;REPT(&quot; &quot;;6-LEN([.E4]))&#10;&amp;&quot;,&quot;&quot;&quot;&amp;[.F$1]&amp;&quot;&quot;&quot;:&quot;&quot;&quot;&amp;[.F4]&amp;&quot;&quot;&quot;&quot;&amp;REPT(&quot; &quot;;7-LEN([.F4]))&#10;&amp;&quot;,&quot;&quot;&quot;&amp;[.G$1]&amp;&quot;&quot;&quot;:&quot;&amp;IF([.G4]&lt;&gt;&quot;&quot;;&quot;&quot;&quot;&quot;&amp;[.G4]&amp;&quot;&quot;&quot;&quot;&amp;REPT(&quot; &quot;;5-LEN([.G4]));&quot;null&quot;&amp;REPT(&quot; &quot;;5-4+2))&#10;&amp;&quot;,&quot;&quot;&quot;&amp;[.H$1]&amp;&quot;&quot;&quot;:&quot;&amp;IF([.H4]&lt;&gt;&quot;&quot;;&quot;&quot;&quot;&quot;&amp;[.H4]&amp;&quot;&quot;&quot;&quot;&amp;REPT(&quot; &quot;;19-LEN([.H4]));&quot;null&quot;&amp;REPT(&quot; &quot;;19-4+2))&#10;&amp;&quot;,&quot;&quot;&quot;&amp;[.I$1]&amp;&quot;&quot;&quot;:&quot;&amp;IF([.I4]&lt;&gt;&quot;&quot;;&quot;&quot;&quot;&quot;&amp;[.I4]&amp;&quot;&quot;&quot;&quot;&amp;REPT(&quot; &quot;;8-LEN([.I4]));&quot;null&quot;&amp;REPT(&quot; &quot;;8-4+2))&#10;&amp;&quot;,&quot;&quot;&quot;&amp;[.J$1]&amp;&quot;&quot;&quot;:&quot;&amp;IF([.J4]&lt;&gt;&quot;&quot;;[.J4]&amp;REPT(&quot; &quot;;4-LEN([.J4]));&quot;null&quot;)&#10;&amp;&quot;,&quot;&quot;&quot;&amp;[.K$1]&amp;&quot;&quot;&quot;:&quot;&amp;IF([.K4]&lt;&gt;&quot;&quot;;[.K4]&amp;REPT(&quot; &quot;;4-LEN([.K4]));&quot;null&quot;)&#10;&amp;&quot;,&quot;&quot;&quot;&amp;[.L$1]&amp;&quot;&quot;&quot;:&quot;&amp;IF([.L4]&lt;&gt;&quot;&quot;;[.L4]&amp;REPT(&quot; &quot;;5-LEN([.L4]));&quot;null &quot;)&#10;&amp;&quot;,&quot;&quot;&quot;&amp;[.M$1]&amp;&quot;&quot;&quot;:&quot;&amp;IF([.M4]&lt;&gt;&quot;&quot;;&quot;&quot;&quot;&quot;&amp;[.M4]&amp;&quot;&quot;&quot;&quot;&amp;REPT(&quot; &quot;;20-LEN([.M4]));&quot;null&quot;&amp;REPT(&quot; &quot;;20-4+2))&#10;&amp;&quot;,&quot;&quot;&quot;&amp;[.N$1]&amp;&quot;&quot;&quot;:&quot;&amp;IF([.N4]&lt;&gt;&quot;&quot;;&quot;&quot;&quot;&quot;&amp;[.N4]&amp;&quot;&quot;&quot;&quot;&amp;REPT(&quot; &quot;;30-LEN([.N4]));&quot;null&quot;&amp;REPT(&quot; &quot;;30-4+2))&#10;&amp;&quot;,&quot;&quot;&quot;&amp;[.O$1]&amp;&quot;&quot;&quot;:&quot;&amp;[.O4]&#10;&amp;&quot;,&quot;&quot;&quot;&amp;[.P$1]&amp;&quot;&quot;&quot;:&quot;&amp;[.P4]&#10;&amp;&quot;}}&quot;" office:value-type="string" office:string-value=",&quot;attrs&quot;:{&quot;LogicalId&quot;:&quot;cur_temp&quot;            ,&quot;Name&quot;:&quot;Temperature&quot;                        ,&quot;Order&quot;:10 ,&quot;Type&quot;:&quot;info&quot;  ,&quot;SubType&quot;:&quot;numeric&quot;,&quot;Unite&quot;:&quot;°C&quot;   ,&quot;Config_infoName&quot;:null      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cur_temp" <text:s text:c="11"/>,"Name":"Temperature" <text:s text:c="23"/>,"Order":10 ,"Type":"info" <text:s/>,"SubType":"numeric","Unite":"°C" <text:s text:c="2"/>,"Config_infoName":null <text:s text:c="16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ur_humi</text:p>
          </table:table-cell>
          <table:table-cell office:value-type="string" calcext:value-type="string">
            <text:p>Taux Humidité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%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N5])" office:value-type="float" office:value="0" calcext:value-type="float">
            <text:p>0</text:p>
          </table:table-cell>
          <table:table-cell/>
          <table:table-cell table:style-name="ce17" table:formula="of:=&quot;&quot;&amp;IF([.T4]=&quot;&quot;;&quot; &quot;;IF([.A5]&lt;&gt;&quot;&quot;;&quot;,&quot;;&quot;}&quot;)) &amp;IF([.A5]&lt;&gt;&quot;&quot;;&quot;&quot;&quot;&quot;&amp;[.A5]&amp;&quot;&quot;&quot;&quot;&amp;REPT(&quot; &quot;;20-LEN([.A5]));&quot;&quot;)" office:value-type="string" office:string-value=",&quot;cur_humi&quot;            " calcext:value-type="string">
            <text:p>,"cur_humi" <text:s text:c="11"/></text:p>
          </table:table-cell>
          <table:table-cell table:style-name="ce17" table:formula="of:=&quot;:&quot; &amp;&quot;{&quot;&quot;&quot;&amp;[.B$1]&amp;&quot;&quot;&quot;:&quot;&quot;&quot;&amp;[.B5]&amp;&quot;&quot;&quot;&quot;&amp;REPT(&quot; &quot;;20-LEN([.B5])) &amp;&quot;,&quot;&quot;&quot;&amp;[.C$1]&amp;&quot;&quot;&quot;:&quot;&quot;&quot;&amp;[.C5]&amp;&quot;&quot;&quot;&quot;&amp;REPT(&quot; &quot;;35-LEN([.C5])) &amp;&quot;,&quot;&quot;&quot;&amp;[.D$1]&amp;&quot;&quot;&quot;:&quot;&amp;[.D5]&amp;REPT(&quot; &quot;;3-LEN([.D5])) &amp;&quot;,&quot;&quot;&quot;&amp;[.E$1]&amp;&quot;&quot;&quot;:&quot;&quot;&quot;&amp;[.E5]&amp;&quot;&quot;&quot;&quot;&amp;REPT(&quot; &quot;;6-LEN([.E5])) &amp;&quot;,&quot;&quot;&quot;&amp;[.F$1]&amp;&quot;&quot;&quot;:&quot;&quot;&quot;&amp;[.F5]&amp;&quot;&quot;&quot;&quot;&amp;REPT(&quot; &quot;;7-LEN([.F5])) &amp;&quot;,&quot;&quot;&quot;&amp;[.G$1]&amp;&quot;&quot;&quot;:&quot;&amp;IF([.G5]&lt;&gt;&quot;&quot;;&quot;&quot;&quot;&quot;&amp;[.G5]&amp;&quot;&quot;&quot;&quot;&amp;REPT(&quot; &quot;;5-LEN([.G5]));&quot;null&quot;&amp;REPT(&quot; &quot;;5-4+2)) &amp;&quot;,&quot;&quot;&quot;&amp;[.H$1]&amp;&quot;&quot;&quot;:&quot;&amp;IF([.H5]&lt;&gt;&quot;&quot;;&quot;&quot;&quot;&quot;&amp;[.H5]&amp;&quot;&quot;&quot;&quot;&amp;REPT(&quot; &quot;;19-LEN([.H5]));&quot;null&quot;&amp;REPT(&quot; &quot;;19-4+2)) &amp;&quot;,&quot;&quot;&quot;&amp;[.I$1]&amp;&quot;&quot;&quot;:&quot;&amp;IF([.I5]&lt;&gt;&quot;&quot;;&quot;&quot;&quot;&quot;&amp;[.I5]&amp;&quot;&quot;&quot;&quot;&amp;REPT(&quot; &quot;;8-LEN([.I5]));&quot;null&quot;&amp;REPT(&quot; &quot;;8-4+2)) &amp;&quot;,&quot;&quot;&quot;&amp;[.J$1]&amp;&quot;&quot;&quot;:&quot;&amp;IF([.J5]&lt;&gt;&quot;&quot;;[.J5]&amp;REPT(&quot; &quot;;4-LEN([.J5]));&quot;null&quot;) &amp;&quot;,&quot;&quot;&quot;&amp;[.K$1]&amp;&quot;&quot;&quot;:&quot;&amp;IF([.K5]&lt;&gt;&quot;&quot;;[.K5]&amp;REPT(&quot; &quot;;4-LEN([.K5]));&quot;null&quot;) &amp;&quot;,&quot;&quot;&quot;&amp;[.L$1]&amp;&quot;&quot;&quot;:&quot;&amp;IF([.L5]&lt;&gt;&quot;&quot;;[.L5]&amp;REPT(&quot; &quot;;5-LEN([.L5]));&quot;null &quot;) &amp;&quot;,&quot;&quot;&quot;&amp;[.M$1]&amp;&quot;&quot;&quot;:&quot;&amp;IF([.M5]&lt;&gt;&quot;&quot;;&quot;&quot;&quot;&quot;&amp;[.M5]&amp;&quot;&quot;&quot;&quot;&amp;REPT(&quot; &quot;;20-LEN([.M5]));&quot;null&quot;&amp;REPT(&quot; &quot;;20-4+2)) &amp;&quot;,&quot;&quot;&quot;&amp;[.N$1]&amp;&quot;&quot;&quot;:&quot;&amp;IF([.N5]&lt;&gt;&quot;&quot;;&quot;&quot;&amp;[.N5]&amp;&quot;&quot;&amp;REPT(&quot; &quot;;5-LEN([.N5]));&quot;null&quot;&amp;REPT(&quot; &quot;;5-4+2)) &amp;&quot;,&quot;&quot;&quot;&amp;[.O$1]&amp;&quot;&quot;&quot;:&quot;&amp;[.O5] &amp;&quot;,&quot;&quot;&quot;&amp;[.P$1]&amp;&quot;&quot;&quot;:&quot;&amp;[.P5] &amp;&quot;}&quot;" office:value-type="string" office:string-value=":{&quot;LogicalId&quot;:&quot;cur_humi&quot;            ,&quot;Name&quot;:&quot;Taux Humidité&quot;                      ,&quot;Order&quot;:11 ,&quot;Type&quot;:&quot;info&quot;  ,&quot;SubType&quot;:&quot;numeric&quot;,&quot;Unite&quot;:&quot;%&quot;    ,&quot;Config_infoName&quot;:null                 ,&quot;Config_value&quot;:null      ,&quot;Config_minValue&quot;:null,&quot;Config_maxValue&quot;:null,&quot;Config_tempHL&quot;:null ,&quot;setValue&quot;:null                  ,&quot;Display_param_step&quot;:null   ,&quot;IsHistorized&quot;:0,&quot;IsVisible&quot;:1}" calcext:value-type="string">
            <text:p>:{"LogicalId":"cur_humi" <text:s text:c="11"/>,"Name":"Taux Humidité" <text:s text:c="21"/>,"Order":11 ,"Type":"info" <text:s/>,"SubType":"numeric","Unite":"%" <text:s text:c="3"/>,"Config_infoName":null <text:s text:c="16"/>,"Config_value":null <text:s text:c="5"/>,"Config_minValue":null,"Config_maxValue":null,"Config_tempHL":null ,"setValue":null <text:s text:c="17"/>,"Display_param_step":null <text:s text:c="2"/>,"IsHistorized":0,"IsVisible":1}</text:p>
          </table:table-cell>
          <table:table-cell table:style-name="ce15" office:value-type="string" calcext:value-type="string">
            <text:p>.</text:p>
          </table:table-cell>
          <table:table-cell table:style-name="ce14"/>
          <table:table-cell table:style-name="ce17" table:formula="of:=IF([.W4]=&quot;&quot;;&quot; &quot;;IF([.B5]&lt;&gt;&quot;&quot;;&quot;,&quot;;&quot;]&quot;))&#10;&amp;IF([.B5]&lt;&gt;&quot;&quot;;&quot;{&quot;&quot;cmd&quot;&quot;:&quot;&quot;&quot;&amp;[.B5]&amp;&quot;&quot;&quot;&quot;&amp;REPT(&quot; &quot;;20-LEN([.B5]));&quot;&quot;)" office:value-type="string" office:string-value=",{&quot;cmd&quot;:&quot;cur_humi&quot;            " calcext:value-type="string">
            <text:p>,{"cmd":"cur_humi" <text:s text:c="11"/></text:p>
          </table:table-cell>
          <table:table-cell table:style-name="ce17" table:formula="of:=&quot;,&quot;&quot;attrs&quot;&quot;:&quot;&#10;&amp;&quot;{&quot;&quot;&quot;&amp;[.B$1]&amp;&quot;&quot;&quot;:&quot;&quot;&quot;&amp;[.B5]&amp;&quot;&quot;&quot;&quot;&amp;REPT(&quot; &quot;;20-LEN([.B5]))&#10;&amp;&quot;,&quot;&quot;&quot;&amp;[.C$1]&amp;&quot;&quot;&quot;:&quot;&quot;&quot;&amp;[.C5]&amp;&quot;&quot;&quot;&quot;&amp;REPT(&quot; &quot;;35-LEN([.C5]))&#10;&amp;&quot;,&quot;&quot;&quot;&amp;[.D$1]&amp;&quot;&quot;&quot;:&quot;&amp;[.D5]&amp;REPT(&quot; &quot;;3-LEN([.D5]))&#10;&amp;&quot;,&quot;&quot;&quot;&amp;[.E$1]&amp;&quot;&quot;&quot;:&quot;&quot;&quot;&amp;[.E5]&amp;&quot;&quot;&quot;&quot;&amp;REPT(&quot; &quot;;6-LEN([.E5]))&#10;&amp;&quot;,&quot;&quot;&quot;&amp;[.F$1]&amp;&quot;&quot;&quot;:&quot;&quot;&quot;&amp;[.F5]&amp;&quot;&quot;&quot;&quot;&amp;REPT(&quot; &quot;;7-LEN([.F5]))&#10;&amp;&quot;,&quot;&quot;&quot;&amp;[.G$1]&amp;&quot;&quot;&quot;:&quot;&amp;IF([.G5]&lt;&gt;&quot;&quot;;&quot;&quot;&quot;&quot;&amp;[.G5]&amp;&quot;&quot;&quot;&quot;&amp;REPT(&quot; &quot;;5-LEN([.G5]));&quot;null&quot;&amp;REPT(&quot; &quot;;5-4+2))&#10;&amp;&quot;,&quot;&quot;&quot;&amp;[.H$1]&amp;&quot;&quot;&quot;:&quot;&amp;IF([.H5]&lt;&gt;&quot;&quot;;&quot;&quot;&quot;&quot;&amp;[.H5]&amp;&quot;&quot;&quot;&quot;&amp;REPT(&quot; &quot;;19-LEN([.H5]));&quot;null&quot;&amp;REPT(&quot; &quot;;19-4+2))&#10;&amp;&quot;,&quot;&quot;&quot;&amp;[.I$1]&amp;&quot;&quot;&quot;:&quot;&amp;IF([.I5]&lt;&gt;&quot;&quot;;&quot;&quot;&quot;&quot;&amp;[.I5]&amp;&quot;&quot;&quot;&quot;&amp;REPT(&quot; &quot;;8-LEN([.I5]));&quot;null&quot;&amp;REPT(&quot; &quot;;8-4+2))&#10;&amp;&quot;,&quot;&quot;&quot;&amp;[.J$1]&amp;&quot;&quot;&quot;:&quot;&amp;IF([.J5]&lt;&gt;&quot;&quot;;[.J5]&amp;REPT(&quot; &quot;;4-LEN([.J5]));&quot;null&quot;)&#10;&amp;&quot;,&quot;&quot;&quot;&amp;[.K$1]&amp;&quot;&quot;&quot;:&quot;&amp;IF([.K5]&lt;&gt;&quot;&quot;;[.K5]&amp;REPT(&quot; &quot;;4-LEN([.K5]));&quot;null&quot;)&#10;&amp;&quot;,&quot;&quot;&quot;&amp;[.L$1]&amp;&quot;&quot;&quot;:&quot;&amp;IF([.L5]&lt;&gt;&quot;&quot;;[.L5]&amp;REPT(&quot; &quot;;5-LEN([.L5]));&quot;null &quot;)&#10;&amp;&quot;,&quot;&quot;&quot;&amp;[.M$1]&amp;&quot;&quot;&quot;:&quot;&amp;IF([.M5]&lt;&gt;&quot;&quot;;&quot;&quot;&quot;&quot;&amp;[.M5]&amp;&quot;&quot;&quot;&quot;&amp;REPT(&quot; &quot;;20-LEN([.M5]));&quot;null&quot;&amp;REPT(&quot; &quot;;20-4+2))&#10;&amp;&quot;,&quot;&quot;&quot;&amp;[.N$1]&amp;&quot;&quot;&quot;:&quot;&amp;IF([.N5]&lt;&gt;&quot;&quot;;&quot;&quot;&quot;&quot;&amp;[.N5]&amp;&quot;&quot;&quot;&quot;&amp;REPT(&quot; &quot;;30-LEN([.N5]));&quot;null&quot;&amp;REPT(&quot; &quot;;30-4+2))&#10;&amp;&quot;,&quot;&quot;&quot;&amp;[.O$1]&amp;&quot;&quot;&quot;:&quot;&amp;[.O5]&#10;&amp;&quot;,&quot;&quot;&quot;&amp;[.P$1]&amp;&quot;&quot;&quot;:&quot;&amp;[.P5]&#10;&amp;&quot;}}&quot;" office:value-type="string" office:string-value=",&quot;attrs&quot;:{&quot;LogicalId&quot;:&quot;cur_humi&quot;            ,&quot;Name&quot;:&quot;Taux Humidité&quot;                      ,&quot;Order&quot;:11 ,&quot;Type&quot;:&quot;info&quot;  ,&quot;SubType&quot;:&quot;numeric&quot;,&quot;Unite&quot;:&quot;%&quot;    ,&quot;Config_infoName&quot;:null      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cur_humi" <text:s text:c="11"/>,"Name":"Taux Humidité" <text:s text:c="21"/>,"Order":11 ,"Type":"info" <text:s/>,"SubType":"numeric","Unite":"%" <text:s text:c="3"/>,"Config_infoName":null <text:s text:c="16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co_temp</text:p>
          </table:table-cell>
          <table:table-cell office:value-type="string" calcext:value-type="string">
            <text:p>Temp. eco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°C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N6])" office:value-type="float" office:value="0" calcext:value-type="float">
            <text:p>0</text:p>
          </table:table-cell>
          <table:table-cell/>
          <table:table-cell table:style-name="ce17" table:formula="of:=&quot;&quot;&amp;IF([.T5]=&quot;&quot;;&quot; &quot;;IF([.A6]&lt;&gt;&quot;&quot;;&quot;,&quot;;&quot;}&quot;)) &amp;IF([.A6]&lt;&gt;&quot;&quot;;&quot;&quot;&quot;&quot;&amp;[.A6]&amp;&quot;&quot;&quot;&quot;&amp;REPT(&quot; &quot;;20-LEN([.A6]));&quot;&quot;)" office:value-type="string" office:string-value=",&quot;eco_temp&quot;            " calcext:value-type="string">
            <text:p>,"eco_temp" <text:s text:c="11"/></text:p>
          </table:table-cell>
          <table:table-cell table:style-name="ce17" table:formula="of:=&quot;:&quot; &amp;&quot;{&quot;&quot;&quot;&amp;[.B$1]&amp;&quot;&quot;&quot;:&quot;&quot;&quot;&amp;[.B6]&amp;&quot;&quot;&quot;&quot;&amp;REPT(&quot; &quot;;20-LEN([.B6])) &amp;&quot;,&quot;&quot;&quot;&amp;[.C$1]&amp;&quot;&quot;&quot;:&quot;&quot;&quot;&amp;[.C6]&amp;&quot;&quot;&quot;&quot;&amp;REPT(&quot; &quot;;35-LEN([.C6])) &amp;&quot;,&quot;&quot;&quot;&amp;[.D$1]&amp;&quot;&quot;&quot;:&quot;&amp;[.D6]&amp;REPT(&quot; &quot;;3-LEN([.D6])) &amp;&quot;,&quot;&quot;&quot;&amp;[.E$1]&amp;&quot;&quot;&quot;:&quot;&quot;&quot;&amp;[.E6]&amp;&quot;&quot;&quot;&quot;&amp;REPT(&quot; &quot;;6-LEN([.E6])) &amp;&quot;,&quot;&quot;&quot;&amp;[.F$1]&amp;&quot;&quot;&quot;:&quot;&quot;&quot;&amp;[.F6]&amp;&quot;&quot;&quot;&quot;&amp;REPT(&quot; &quot;;7-LEN([.F6])) &amp;&quot;,&quot;&quot;&quot;&amp;[.G$1]&amp;&quot;&quot;&quot;:&quot;&amp;IF([.G6]&lt;&gt;&quot;&quot;;&quot;&quot;&quot;&quot;&amp;[.G6]&amp;&quot;&quot;&quot;&quot;&amp;REPT(&quot; &quot;;5-LEN([.G6]));&quot;null&quot;&amp;REPT(&quot; &quot;;5-4+2)) &amp;&quot;,&quot;&quot;&quot;&amp;[.H$1]&amp;&quot;&quot;&quot;:&quot;&amp;IF([.H6]&lt;&gt;&quot;&quot;;&quot;&quot;&quot;&quot;&amp;[.H6]&amp;&quot;&quot;&quot;&quot;&amp;REPT(&quot; &quot;;19-LEN([.H6]));&quot;null&quot;&amp;REPT(&quot; &quot;;19-4+2)) &amp;&quot;,&quot;&quot;&quot;&amp;[.I$1]&amp;&quot;&quot;&quot;:&quot;&amp;IF([.I6]&lt;&gt;&quot;&quot;;&quot;&quot;&quot;&quot;&amp;[.I6]&amp;&quot;&quot;&quot;&quot;&amp;REPT(&quot; &quot;;8-LEN([.I6]));&quot;null&quot;&amp;REPT(&quot; &quot;;8-4+2)) &amp;&quot;,&quot;&quot;&quot;&amp;[.J$1]&amp;&quot;&quot;&quot;:&quot;&amp;IF([.J6]&lt;&gt;&quot;&quot;;[.J6]&amp;REPT(&quot; &quot;;4-LEN([.J6]));&quot;null&quot;) &amp;&quot;,&quot;&quot;&quot;&amp;[.K$1]&amp;&quot;&quot;&quot;:&quot;&amp;IF([.K6]&lt;&gt;&quot;&quot;;[.K6]&amp;REPT(&quot; &quot;;4-LEN([.K6]));&quot;null&quot;) &amp;&quot;,&quot;&quot;&quot;&amp;[.L$1]&amp;&quot;&quot;&quot;:&quot;&amp;IF([.L6]&lt;&gt;&quot;&quot;;[.L6]&amp;REPT(&quot; &quot;;5-LEN([.L6]));&quot;null &quot;) &amp;&quot;,&quot;&quot;&quot;&amp;[.M$1]&amp;&quot;&quot;&quot;:&quot;&amp;IF([.M6]&lt;&gt;&quot;&quot;;&quot;&quot;&quot;&quot;&amp;[.M6]&amp;&quot;&quot;&quot;&quot;&amp;REPT(&quot; &quot;;20-LEN([.M6]));&quot;null&quot;&amp;REPT(&quot; &quot;;20-4+2)) &amp;&quot;,&quot;&quot;&quot;&amp;[.N$1]&amp;&quot;&quot;&quot;:&quot;&amp;IF([.N6]&lt;&gt;&quot;&quot;;&quot;&quot;&amp;[.N6]&amp;&quot;&quot;&amp;REPT(&quot; &quot;;5-LEN([.N6]));&quot;null&quot;&amp;REPT(&quot; &quot;;5-4+2)) &amp;&quot;,&quot;&quot;&quot;&amp;[.O$1]&amp;&quot;&quot;&quot;:&quot;&amp;[.O6] &amp;&quot;,&quot;&quot;&quot;&amp;[.P$1]&amp;&quot;&quot;&quot;:&quot;&amp;[.P6] &amp;&quot;}&quot;" office:value-type="string" office:string-value=":{&quot;LogicalId&quot;:&quot;eco_temp&quot;            ,&quot;Name&quot;:&quot;Temp. eco&quot;                          ,&quot;Order&quot;:12 ,&quot;Type&quot;:&quot;info&quot;  ,&quot;SubType&quot;:&quot;numeric&quot;,&quot;Unite&quot;:&quot;°C&quot;   ,&quot;Config_infoName&quot;:null                 ,&quot;Config_value&quot;:null      ,&quot;Config_minValue&quot;:null,&quot;Config_maxValue&quot;:null,&quot;Config_tempHL&quot;:null ,&quot;setValue&quot;:null                  ,&quot;Display_param_step&quot;:null   ,&quot;IsHistorized&quot;:0,&quot;IsVisible&quot;:1}" calcext:value-type="string">
            <text:p>:{"LogicalId":"eco_temp" <text:s text:c="11"/>,"Name":"Temp. eco" <text:s text:c="25"/>,"Order":12 ,"Type":"info" <text:s/>,"SubType":"numeric","Unite":"°C" <text:s text:c="2"/>,"Config_infoName":null <text:s text:c="16"/>,"Config_value":null <text:s text:c="5"/>,"Config_minValue":null,"Config_maxValue":null,"Config_tempHL":null ,"setValue":null <text:s text:c="17"/>,"Display_param_step":null <text:s text:c="2"/>,"IsHistorized":0,"IsVisible":1}</text:p>
          </table:table-cell>
          <table:table-cell table:style-name="ce15" office:value-type="string" calcext:value-type="string">
            <text:p>.</text:p>
          </table:table-cell>
          <table:table-cell table:style-name="ce14"/>
          <table:table-cell table:style-name="ce17" table:formula="of:=IF([.W5]=&quot;&quot;;&quot; &quot;;IF([.B6]&lt;&gt;&quot;&quot;;&quot;,&quot;;&quot;]&quot;))&#10;&amp;IF([.B6]&lt;&gt;&quot;&quot;;&quot;{&quot;&quot;cmd&quot;&quot;:&quot;&quot;&quot;&amp;[.B6]&amp;&quot;&quot;&quot;&quot;&amp;REPT(&quot; &quot;;20-LEN([.B6]));&quot;&quot;)" office:value-type="string" office:string-value=",{&quot;cmd&quot;:&quot;eco_temp&quot;            " calcext:value-type="string">
            <text:p>,{"cmd":"eco_temp" <text:s text:c="11"/></text:p>
          </table:table-cell>
          <table:table-cell table:style-name="ce17" table:formula="of:=&quot;,&quot;&quot;attrs&quot;&quot;:&quot;&#10;&amp;&quot;{&quot;&quot;&quot;&amp;[.B$1]&amp;&quot;&quot;&quot;:&quot;&quot;&quot;&amp;[.B6]&amp;&quot;&quot;&quot;&quot;&amp;REPT(&quot; &quot;;20-LEN([.B6]))&#10;&amp;&quot;,&quot;&quot;&quot;&amp;[.C$1]&amp;&quot;&quot;&quot;:&quot;&quot;&quot;&amp;[.C6]&amp;&quot;&quot;&quot;&quot;&amp;REPT(&quot; &quot;;35-LEN([.C6]))&#10;&amp;&quot;,&quot;&quot;&quot;&amp;[.D$1]&amp;&quot;&quot;&quot;:&quot;&amp;[.D6]&amp;REPT(&quot; &quot;;3-LEN([.D6]))&#10;&amp;&quot;,&quot;&quot;&quot;&amp;[.E$1]&amp;&quot;&quot;&quot;:&quot;&quot;&quot;&amp;[.E6]&amp;&quot;&quot;&quot;&quot;&amp;REPT(&quot; &quot;;6-LEN([.E6]))&#10;&amp;&quot;,&quot;&quot;&quot;&amp;[.F$1]&amp;&quot;&quot;&quot;:&quot;&quot;&quot;&amp;[.F6]&amp;&quot;&quot;&quot;&quot;&amp;REPT(&quot; &quot;;7-LEN([.F6]))&#10;&amp;&quot;,&quot;&quot;&quot;&amp;[.G$1]&amp;&quot;&quot;&quot;:&quot;&amp;IF([.G6]&lt;&gt;&quot;&quot;;&quot;&quot;&quot;&quot;&amp;[.G6]&amp;&quot;&quot;&quot;&quot;&amp;REPT(&quot; &quot;;5-LEN([.G6]));&quot;null&quot;&amp;REPT(&quot; &quot;;5-4+2))&#10;&amp;&quot;,&quot;&quot;&quot;&amp;[.H$1]&amp;&quot;&quot;&quot;:&quot;&amp;IF([.H6]&lt;&gt;&quot;&quot;;&quot;&quot;&quot;&quot;&amp;[.H6]&amp;&quot;&quot;&quot;&quot;&amp;REPT(&quot; &quot;;19-LEN([.H6]));&quot;null&quot;&amp;REPT(&quot; &quot;;19-4+2))&#10;&amp;&quot;,&quot;&quot;&quot;&amp;[.I$1]&amp;&quot;&quot;&quot;:&quot;&amp;IF([.I6]&lt;&gt;&quot;&quot;;&quot;&quot;&quot;&quot;&amp;[.I6]&amp;&quot;&quot;&quot;&quot;&amp;REPT(&quot; &quot;;8-LEN([.I6]));&quot;null&quot;&amp;REPT(&quot; &quot;;8-4+2))&#10;&amp;&quot;,&quot;&quot;&quot;&amp;[.J$1]&amp;&quot;&quot;&quot;:&quot;&amp;IF([.J6]&lt;&gt;&quot;&quot;;[.J6]&amp;REPT(&quot; &quot;;4-LEN([.J6]));&quot;null&quot;)&#10;&amp;&quot;,&quot;&quot;&quot;&amp;[.K$1]&amp;&quot;&quot;&quot;:&quot;&amp;IF([.K6]&lt;&gt;&quot;&quot;;[.K6]&amp;REPT(&quot; &quot;;4-LEN([.K6]));&quot;null&quot;)&#10;&amp;&quot;,&quot;&quot;&quot;&amp;[.L$1]&amp;&quot;&quot;&quot;:&quot;&amp;IF([.L6]&lt;&gt;&quot;&quot;;[.L6]&amp;REPT(&quot; &quot;;5-LEN([.L6]));&quot;null &quot;)&#10;&amp;&quot;,&quot;&quot;&quot;&amp;[.M$1]&amp;&quot;&quot;&quot;:&quot;&amp;IF([.M6]&lt;&gt;&quot;&quot;;&quot;&quot;&quot;&quot;&amp;[.M6]&amp;&quot;&quot;&quot;&quot;&amp;REPT(&quot; &quot;;20-LEN([.M6]));&quot;null&quot;&amp;REPT(&quot; &quot;;20-4+2))&#10;&amp;&quot;,&quot;&quot;&quot;&amp;[.N$1]&amp;&quot;&quot;&quot;:&quot;&amp;IF([.N6]&lt;&gt;&quot;&quot;;&quot;&quot;&quot;&quot;&amp;[.N6]&amp;&quot;&quot;&quot;&quot;&amp;REPT(&quot; &quot;;30-LEN([.N6]));&quot;null&quot;&amp;REPT(&quot; &quot;;30-4+2))&#10;&amp;&quot;,&quot;&quot;&quot;&amp;[.O$1]&amp;&quot;&quot;&quot;:&quot;&amp;[.O6]&#10;&amp;&quot;,&quot;&quot;&quot;&amp;[.P$1]&amp;&quot;&quot;&quot;:&quot;&amp;[.P6]&#10;&amp;&quot;}}&quot;" office:value-type="string" office:string-value=",&quot;attrs&quot;:{&quot;LogicalId&quot;:&quot;eco_temp&quot;            ,&quot;Name&quot;:&quot;Temp. eco&quot;                          ,&quot;Order&quot;:12 ,&quot;Type&quot;:&quot;info&quot;  ,&quot;SubType&quot;:&quot;numeric&quot;,&quot;Unite&quot;:&quot;°C&quot;   ,&quot;Config_infoName&quot;:null      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eco_temp" <text:s text:c="11"/>,"Name":"Temp. eco" <text:s text:c="25"/>,"Order":12 ,"Type":"info" <text:s/>,"SubType":"numeric","Unite":"°C" <text:s text:c="2"/>,"Config_infoName":null <text:s text:c="16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co_temp_consigne</text:p>
          </table:table-cell>
          <table:table-cell office:value-type="string" calcext:value-type="string">
            <text:p>Consigne Temp. eco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slider</text:p>
          </table:table-cell>
          <table:table-cell/>
          <table:table-cell office:value-type="string" calcext:value-type="string">
            <text:p>eco_temp</text:p>
          </table:table-cell>
          <table:table-cell office:value-type="string" calcext:value-type="string">
            <text:p>#slider#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eco_temp</text:p>
          </table:table-cell>
          <table:table-cell office:value-type="string" calcext:value-type="string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LEN([.N7])" office:value-type="float" office:value="3" calcext:value-type="float">
            <text:p>3</text:p>
          </table:table-cell>
          <table:table-cell/>
          <table:table-cell table:style-name="ce17" table:formula="of:=&quot;&quot;&amp;IF([.T6]=&quot;&quot;;&quot; &quot;;IF([.A7]&lt;&gt;&quot;&quot;;&quot;,&quot;;&quot;}&quot;)) &amp;IF([.A7]&lt;&gt;&quot;&quot;;&quot;&quot;&quot;&quot;&amp;[.A7]&amp;&quot;&quot;&quot;&quot;&amp;REPT(&quot; &quot;;20-LEN([.A7]));&quot;&quot;)" office:value-type="string" office:string-value=",&quot;eco_temp_consigne&quot;   " calcext:value-type="string">
            <text:p>,"eco_temp_consigne" <text:s text:c="2"/></text:p>
          </table:table-cell>
          <table:table-cell table:style-name="ce17" table:formula="of:=&quot;:&quot; &amp;&quot;{&quot;&quot;&quot;&amp;[.B$1]&amp;&quot;&quot;&quot;:&quot;&quot;&quot;&amp;[.B7]&amp;&quot;&quot;&quot;&quot;&amp;REPT(&quot; &quot;;20-LEN([.B7])) &amp;&quot;,&quot;&quot;&quot;&amp;[.C$1]&amp;&quot;&quot;&quot;:&quot;&quot;&quot;&amp;[.C7]&amp;&quot;&quot;&quot;&quot;&amp;REPT(&quot; &quot;;35-LEN([.C7])) &amp;&quot;,&quot;&quot;&quot;&amp;[.D$1]&amp;&quot;&quot;&quot;:&quot;&amp;[.D7]&amp;REPT(&quot; &quot;;3-LEN([.D7])) &amp;&quot;,&quot;&quot;&quot;&amp;[.E$1]&amp;&quot;&quot;&quot;:&quot;&quot;&quot;&amp;[.E7]&amp;&quot;&quot;&quot;&quot;&amp;REPT(&quot; &quot;;6-LEN([.E7])) &amp;&quot;,&quot;&quot;&quot;&amp;[.F$1]&amp;&quot;&quot;&quot;:&quot;&quot;&quot;&amp;[.F7]&amp;&quot;&quot;&quot;&quot;&amp;REPT(&quot; &quot;;7-LEN([.F7])) &amp;&quot;,&quot;&quot;&quot;&amp;[.G$1]&amp;&quot;&quot;&quot;:&quot;&amp;IF([.G7]&lt;&gt;&quot;&quot;;&quot;&quot;&quot;&quot;&amp;[.G7]&amp;&quot;&quot;&quot;&quot;&amp;REPT(&quot; &quot;;5-LEN([.G7]));&quot;null&quot;&amp;REPT(&quot; &quot;;5-4+2)) &amp;&quot;,&quot;&quot;&quot;&amp;[.H$1]&amp;&quot;&quot;&quot;:&quot;&amp;IF([.H7]&lt;&gt;&quot;&quot;;&quot;&quot;&quot;&quot;&amp;[.H7]&amp;&quot;&quot;&quot;&quot;&amp;REPT(&quot; &quot;;19-LEN([.H7]));&quot;null&quot;&amp;REPT(&quot; &quot;;19-4+2)) &amp;&quot;,&quot;&quot;&quot;&amp;[.I$1]&amp;&quot;&quot;&quot;:&quot;&amp;IF([.I7]&lt;&gt;&quot;&quot;;&quot;&quot;&quot;&quot;&amp;[.I7]&amp;&quot;&quot;&quot;&quot;&amp;REPT(&quot; &quot;;8-LEN([.I7]));&quot;null&quot;&amp;REPT(&quot; &quot;;8-4+2)) &amp;&quot;,&quot;&quot;&quot;&amp;[.J$1]&amp;&quot;&quot;&quot;:&quot;&amp;IF([.J7]&lt;&gt;&quot;&quot;;[.J7]&amp;REPT(&quot; &quot;;4-LEN([.J7]));&quot;null&quot;) &amp;&quot;,&quot;&quot;&quot;&amp;[.K$1]&amp;&quot;&quot;&quot;:&quot;&amp;IF([.K7]&lt;&gt;&quot;&quot;;[.K7]&amp;REPT(&quot; &quot;;4-LEN([.K7]));&quot;null&quot;) &amp;&quot;,&quot;&quot;&quot;&amp;[.L$1]&amp;&quot;&quot;&quot;:&quot;&amp;IF([.L7]&lt;&gt;&quot;&quot;;[.L7]&amp;REPT(&quot; &quot;;5-LEN([.L7]));&quot;null &quot;) &amp;&quot;,&quot;&quot;&quot;&amp;[.M$1]&amp;&quot;&quot;&quot;:&quot;&amp;IF([.M7]&lt;&gt;&quot;&quot;;&quot;&quot;&quot;&quot;&amp;[.M7]&amp;&quot;&quot;&quot;&quot;&amp;REPT(&quot; &quot;;20-LEN([.M7]));&quot;null&quot;&amp;REPT(&quot; &quot;;20-4+2)) &amp;&quot;,&quot;&quot;&quot;&amp;[.N$1]&amp;&quot;&quot;&quot;:&quot;&amp;IF([.N7]&lt;&gt;&quot;&quot;;&quot;&quot;&amp;[.N7]&amp;&quot;&quot;&amp;REPT(&quot; &quot;;5-LEN([.N7]));&quot;null&quot;&amp;REPT(&quot; &quot;;5-4+2)) &amp;&quot;,&quot;&quot;&quot;&amp;[.O$1]&amp;&quot;&quot;&quot;:&quot;&amp;[.O7] &amp;&quot;,&quot;&quot;&quot;&amp;[.P$1]&amp;&quot;&quot;&quot;:&quot;&amp;[.P7] &amp;&quot;}&quot;" office:value-type="string" office:string-value=":{&quot;LogicalId&quot;:&quot;eco_temp_consigne&quot;   ,&quot;Name&quot;:&quot;Consigne Temp. eco&quot;                 ,&quot;Order&quot;:13 ,&quot;Type&quot;:&quot;action&quot;,&quot;SubType&quot;:&quot;slider&quot; ,&quot;Unite&quot;:null   ,&quot;Config_infoName&quot;:&quot;eco_temp&quot;           ,&quot;Config_value&quot;:&quot;#slider#&quot;,&quot;Config_minValue&quot;:10  ,&quot;Config_maxValue&quot;:20  ,&quot;Config_tempHL&quot;:null ,&quot;setValue&quot;:&quot;eco_temp&quot;            ,&quot;Display_param_step&quot;:0.5  ,&quot;IsHistorized&quot;:0,&quot;IsVisible&quot;:0}" calcext:value-type="string">
            <text:p>:{"LogicalId":"eco_temp_consigne" <text:s text:c="2"/>,"Name":"Consigne Temp. eco" <text:s text:c="16"/>,"Order":13 ,"Type":"action","SubType":"slider" ,"Unite":null <text:s text:c="2"/>,"Config_infoName":"eco_temp" <text:s text:c="10"/>,"Config_value":"#slider#","Config_minValue":10 <text:s/>,"Config_maxValue":20 <text:s/>,"Config_tempHL":null ,"setValue":"eco_temp" <text:s text:c="11"/>,"Display_param_step":0.5 <text:s/>,"IsHistorized":0,"IsVisible":0}</text:p>
          </table:table-cell>
          <table:table-cell table:style-name="ce15"/>
          <table:table-cell table:style-name="ce14"/>
          <table:table-cell table:style-name="ce17" table:number-columns-repeated="2"/>
          <table:table-cell/>
        </table:table-row>
        <table:table-row table:style-name="ro1">
          <table:table-cell office:value-type="string" calcext:value-type="string">
            <text:p>eco_temp_consigneHL</text:p>
          </table:table-cell>
          <table:table-cell office:value-type="string" calcext:value-type="string">
            <text:p>eco_temp_consigne</text:p>
          </table:table-cell>
          <table:table-cell office:value-type="string" calcext:value-type="string">
            <text:p>Consigne Temp. eco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slider</text:p>
          </table:table-cell>
          <table:table-cell/>
          <table:table-cell office:value-type="string" calcext:value-type="string">
            <text:p>eco_temp</text:p>
          </table:table-cell>
          <table:table-cell office:value-type="string" calcext:value-type="string">
            <text:p>#slider#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co_temp</text:p>
          </table:table-cell>
          <table:table-cell office:value-type="string" calcext:value-type="string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LEN([.N8])" office:value-type="float" office:value="3" calcext:value-type="float">
            <text:p>3</text:p>
          </table:table-cell>
          <table:table-cell/>
          <table:table-cell table:style-name="ce17" table:formula="of:=&quot;&quot;&amp;IF([.T7]=&quot;&quot;;&quot; &quot;;IF([.A8]&lt;&gt;&quot;&quot;;&quot;,&quot;;&quot;}&quot;)) &amp;IF([.A8]&lt;&gt;&quot;&quot;;&quot;&quot;&quot;&quot;&amp;[.A8]&amp;&quot;&quot;&quot;&quot;&amp;REPT(&quot; &quot;;20-LEN([.A8]));&quot;&quot;)" office:value-type="string" office:string-value=",&quot;eco_temp_consigneHL&quot; " calcext:value-type="string">
            <text:p>,"eco_temp_consigneHL" </text:p>
          </table:table-cell>
          <table:table-cell table:style-name="ce17" table:formula="of:=&quot;:&quot; &amp;&quot;{&quot;&quot;&quot;&amp;[.B$1]&amp;&quot;&quot;&quot;:&quot;&quot;&quot;&amp;[.B8]&amp;&quot;&quot;&quot;&quot;&amp;REPT(&quot; &quot;;20-LEN([.B8])) &amp;&quot;,&quot;&quot;&quot;&amp;[.C$1]&amp;&quot;&quot;&quot;:&quot;&quot;&quot;&amp;[.C8]&amp;&quot;&quot;&quot;&quot;&amp;REPT(&quot; &quot;;35-LEN([.C8])) &amp;&quot;,&quot;&quot;&quot;&amp;[.D$1]&amp;&quot;&quot;&quot;:&quot;&amp;[.D8]&amp;REPT(&quot; &quot;;3-LEN([.D8])) &amp;&quot;,&quot;&quot;&quot;&amp;[.E$1]&amp;&quot;&quot;&quot;:&quot;&quot;&quot;&amp;[.E8]&amp;&quot;&quot;&quot;&quot;&amp;REPT(&quot; &quot;;6-LEN([.E8])) &amp;&quot;,&quot;&quot;&quot;&amp;[.F$1]&amp;&quot;&quot;&quot;:&quot;&quot;&quot;&amp;[.F8]&amp;&quot;&quot;&quot;&quot;&amp;REPT(&quot; &quot;;7-LEN([.F8])) &amp;&quot;,&quot;&quot;&quot;&amp;[.G$1]&amp;&quot;&quot;&quot;:&quot;&amp;IF([.G8]&lt;&gt;&quot;&quot;;&quot;&quot;&quot;&quot;&amp;[.G8]&amp;&quot;&quot;&quot;&quot;&amp;REPT(&quot; &quot;;5-LEN([.G8]));&quot;null&quot;&amp;REPT(&quot; &quot;;5-4+2)) &amp;&quot;,&quot;&quot;&quot;&amp;[.H$1]&amp;&quot;&quot;&quot;:&quot;&amp;IF([.H8]&lt;&gt;&quot;&quot;;&quot;&quot;&quot;&quot;&amp;[.H8]&amp;&quot;&quot;&quot;&quot;&amp;REPT(&quot; &quot;;19-LEN([.H8]));&quot;null&quot;&amp;REPT(&quot; &quot;;19-4+2)) &amp;&quot;,&quot;&quot;&quot;&amp;[.I$1]&amp;&quot;&quot;&quot;:&quot;&amp;IF([.I8]&lt;&gt;&quot;&quot;;&quot;&quot;&quot;&quot;&amp;[.I8]&amp;&quot;&quot;&quot;&quot;&amp;REPT(&quot; &quot;;8-LEN([.I8]));&quot;null&quot;&amp;REPT(&quot; &quot;;8-4+2)) &amp;&quot;,&quot;&quot;&quot;&amp;[.J$1]&amp;&quot;&quot;&quot;:&quot;&amp;IF([.J8]&lt;&gt;&quot;&quot;;[.J8]&amp;REPT(&quot; &quot;;4-LEN([.J8]));&quot;null&quot;) &amp;&quot;,&quot;&quot;&quot;&amp;[.K$1]&amp;&quot;&quot;&quot;:&quot;&amp;IF([.K8]&lt;&gt;&quot;&quot;;[.K8]&amp;REPT(&quot; &quot;;4-LEN([.K8]));&quot;null&quot;) &amp;&quot;,&quot;&quot;&quot;&amp;[.L$1]&amp;&quot;&quot;&quot;:&quot;&amp;IF([.L8]&lt;&gt;&quot;&quot;;[.L8]&amp;REPT(&quot; &quot;;5-LEN([.L8]));&quot;null &quot;) &amp;&quot;,&quot;&quot;&quot;&amp;[.M$1]&amp;&quot;&quot;&quot;:&quot;&amp;IF([.M8]&lt;&gt;&quot;&quot;;&quot;&quot;&quot;&quot;&amp;[.M8]&amp;&quot;&quot;&quot;&quot;&amp;REPT(&quot; &quot;;20-LEN([.M8]));&quot;null&quot;&amp;REPT(&quot; &quot;;20-4+2)) &amp;&quot;,&quot;&quot;&quot;&amp;[.N$1]&amp;&quot;&quot;&quot;:&quot;&amp;IF([.N8]&lt;&gt;&quot;&quot;;&quot;&quot;&amp;[.N8]&amp;&quot;&quot;&amp;REPT(&quot; &quot;;5-LEN([.N8]));&quot;null&quot;&amp;REPT(&quot; &quot;;5-4+2)) &amp;&quot;,&quot;&quot;&quot;&amp;[.O$1]&amp;&quot;&quot;&quot;:&quot;&amp;[.O8] &amp;&quot;,&quot;&quot;&quot;&amp;[.P$1]&amp;&quot;&quot;&quot;:&quot;&amp;[.P8] &amp;&quot;}&quot;" office:value-type="string" office:string-value=":{&quot;LogicalId&quot;:&quot;eco_temp_consigne&quot;   ,&quot;Name&quot;:&quot;Consigne Temp. eco&quot;                 ,&quot;Order&quot;:13 ,&quot;Type&quot;:&quot;action&quot;,&quot;SubType&quot;:&quot;slider&quot; ,&quot;Unite&quot;:null   ,&quot;Config_infoName&quot;:&quot;eco_temp&quot;           ,&quot;Config_value&quot;:&quot;#slider#&quot;,&quot;Config_minValue&quot;:10  ,&quot;Config_maxValue&quot;:20  ,&quot;Config_tempHL&quot;:true ,&quot;setValue&quot;:&quot;eco_temp&quot;            ,&quot;Display_param_step&quot;:0.5  ,&quot;IsHistorized&quot;:0,&quot;IsVisible&quot;:0}" calcext:value-type="string">
            <text:p>:{"LogicalId":"eco_temp_consigne" <text:s text:c="2"/>,"Name":"Consigne Temp. eco" <text:s text:c="16"/>,"Order":13 ,"Type":"action","SubType":"slider" ,"Unite":null <text:s text:c="2"/>,"Config_infoName":"eco_temp" <text:s text:c="10"/>,"Config_value":"#slider#","Config_minValue":10 <text:s/>,"Config_maxValue":20 <text:s/>,"Config_tempHL":true ,"setValue":"eco_temp" <text:s text:c="11"/>,"Display_param_step":0.5 <text:s/>,"IsHistorized":0,"IsVisible":0}</text:p>
          </table:table-cell>
          <table:table-cell table:style-name="ce15" office:value-type="string" calcext:value-type="string">
            <text:p>.</text:p>
          </table:table-cell>
          <table:table-cell table:style-name="ce14"/>
          <table:table-cell table:style-name="ce17" table:formula="of:=IF([.W6]=&quot;&quot;;&quot; &quot;;IF([.B8]&lt;&gt;&quot;&quot;;&quot;,&quot;;&quot;]&quot;))&#10;&amp;IF([.B8]&lt;&gt;&quot;&quot;;&quot;{&quot;&quot;cmd&quot;&quot;:&quot;&quot;&quot;&amp;[.B8]&amp;&quot;&quot;&quot;&quot;&amp;REPT(&quot; &quot;;20-LEN([.B8]));&quot;&quot;)" office:value-type="string" office:string-value=",{&quot;cmd&quot;:&quot;eco_temp_consigne&quot;   " calcext:value-type="string">
            <text:p>,{"cmd":"eco_temp_consigne" <text:s text:c="2"/></text:p>
          </table:table-cell>
          <table:table-cell table:style-name="ce17" table:formula="of:=&quot;,&quot;&quot;attrs&quot;&quot;:&quot;&#10;&amp;&quot;{&quot;&quot;&quot;&amp;[.B$1]&amp;&quot;&quot;&quot;:&quot;&quot;&quot;&amp;[.B8]&amp;&quot;&quot;&quot;&quot;&amp;REPT(&quot; &quot;;20-LEN([.B8]))&#10;&amp;&quot;,&quot;&quot;&quot;&amp;[.C$1]&amp;&quot;&quot;&quot;:&quot;&quot;&quot;&amp;[.C8]&amp;&quot;&quot;&quot;&quot;&amp;REPT(&quot; &quot;;35-LEN([.C8]))&#10;&amp;&quot;,&quot;&quot;&quot;&amp;[.D$1]&amp;&quot;&quot;&quot;:&quot;&amp;[.D8]&amp;REPT(&quot; &quot;;3-LEN([.D8]))&#10;&amp;&quot;,&quot;&quot;&quot;&amp;[.E$1]&amp;&quot;&quot;&quot;:&quot;&quot;&quot;&amp;[.E8]&amp;&quot;&quot;&quot;&quot;&amp;REPT(&quot; &quot;;6-LEN([.E8]))&#10;&amp;&quot;,&quot;&quot;&quot;&amp;[.F$1]&amp;&quot;&quot;&quot;:&quot;&quot;&quot;&amp;[.F8]&amp;&quot;&quot;&quot;&quot;&amp;REPT(&quot; &quot;;7-LEN([.F8]))&#10;&amp;&quot;,&quot;&quot;&quot;&amp;[.G$1]&amp;&quot;&quot;&quot;:&quot;&amp;IF([.G8]&lt;&gt;&quot;&quot;;&quot;&quot;&quot;&quot;&amp;[.G8]&amp;&quot;&quot;&quot;&quot;&amp;REPT(&quot; &quot;;5-LEN([.G8]));&quot;null&quot;&amp;REPT(&quot; &quot;;5-4+2))&#10;&amp;&quot;,&quot;&quot;&quot;&amp;[.H$1]&amp;&quot;&quot;&quot;:&quot;&amp;IF([.H8]&lt;&gt;&quot;&quot;;&quot;&quot;&quot;&quot;&amp;[.H8]&amp;&quot;&quot;&quot;&quot;&amp;REPT(&quot; &quot;;19-LEN([.H8]));&quot;null&quot;&amp;REPT(&quot; &quot;;19-4+2))&#10;&amp;&quot;,&quot;&quot;&quot;&amp;[.I$1]&amp;&quot;&quot;&quot;:&quot;&amp;IF([.I8]&lt;&gt;&quot;&quot;;&quot;&quot;&quot;&quot;&amp;[.I8]&amp;&quot;&quot;&quot;&quot;&amp;REPT(&quot; &quot;;8-LEN([.I8]));&quot;null&quot;&amp;REPT(&quot; &quot;;8-4+2))&#10;&amp;&quot;,&quot;&quot;&quot;&amp;[.J$1]&amp;&quot;&quot;&quot;:&quot;&amp;IF([.J8]&lt;&gt;&quot;&quot;;[.J8]&amp;REPT(&quot; &quot;;4-LEN([.J8]));&quot;null&quot;)&#10;&amp;&quot;,&quot;&quot;&quot;&amp;[.K$1]&amp;&quot;&quot;&quot;:&quot;&amp;IF([.K8]&lt;&gt;&quot;&quot;;[.K8]&amp;REPT(&quot; &quot;;4-LEN([.K8]));&quot;null&quot;)&#10;&amp;&quot;,&quot;&quot;&quot;&amp;[.L$1]&amp;&quot;&quot;&quot;:&quot;&amp;IF([.L8]&lt;&gt;&quot;&quot;;[.L8]&amp;REPT(&quot; &quot;;5-LEN([.L8]));&quot;null &quot;)&#10;&amp;&quot;,&quot;&quot;&quot;&amp;[.M$1]&amp;&quot;&quot;&quot;:&quot;&amp;IF([.M8]&lt;&gt;&quot;&quot;;&quot;&quot;&quot;&quot;&amp;[.M8]&amp;&quot;&quot;&quot;&quot;&amp;REPT(&quot; &quot;;20-LEN([.M8]));&quot;null&quot;&amp;REPT(&quot; &quot;;20-4+2))&#10;&amp;&quot;,&quot;&quot;&quot;&amp;[.N$1]&amp;&quot;&quot;&quot;:&quot;&amp;IF([.N8]&lt;&gt;&quot;&quot;;&quot;&quot;&quot;&quot;&amp;[.N8]&amp;&quot;&quot;&quot;&quot;&amp;REPT(&quot; &quot;;30-LEN([.N8]));&quot;null&quot;&amp;REPT(&quot; &quot;;30-4+2))&#10;&amp;&quot;,&quot;&quot;&quot;&amp;[.O$1]&amp;&quot;&quot;&quot;:&quot;&amp;[.O8]&#10;&amp;&quot;,&quot;&quot;&quot;&amp;[.P$1]&amp;&quot;&quot;&quot;:&quot;&amp;[.P8]&#10;&amp;&quot;}}&quot;" office:value-type="string" office:string-value=",&quot;attrs&quot;:{&quot;LogicalId&quot;:&quot;eco_temp_consigne&quot;   ,&quot;Name&quot;:&quot;Consigne Temp. eco&quot;                 ,&quot;Order&quot;:13 ,&quot;Type&quot;:&quot;action&quot;,&quot;SubType&quot;:&quot;slider&quot; ,&quot;Unite&quot;:null   ,&quot;Config_infoName&quot;:&quot;eco_temp&quot;           ,&quot;Config_value&quot;:&quot;#slider#&quot;,&quot;Config_minValue&quot;:10  ,&quot;Config_maxValue&quot;:20  ,&quot;Config_tempHL&quot;:true ,&quot;setValue&quot;:&quot;eco_temp&quot;            ,&quot;Display_param_step&quot;:&quot;0.5&quot;                           ,&quot;IsHistorized&quot;:0,&quot;IsVisible&quot;:0}}" calcext:value-type="string">
            <text:p>,"attrs":{"LogicalId":"eco_temp_consigne" <text:s text:c="2"/>,"Name":"Consigne Temp. eco" <text:s text:c="16"/>,"Order":13 ,"Type":"action","SubType":"slider" ,"Unite":null <text:s text:c="2"/>,"Config_infoName":"eco_temp" <text:s text:c="10"/>,"Config_value":"#slider#","Config_minValue":10 <text:s/>,"Config_maxValue":20 <text:s/>,"Config_tempHL":true ,"setValue":"eco_temp" <text:s text:c="11"/>,"Display_param_step":"0.5" <text:s text:c="26"/>,"IsHistorized":0,"IsVisible":0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ft_temp</text:p>
          </table:table-cell>
          <table:table-cell office:value-type="string" calcext:value-type="string">
            <text:p>Temp. confort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°C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N9])" office:value-type="float" office:value="0" calcext:value-type="float">
            <text:p>0</text:p>
          </table:table-cell>
          <table:table-cell/>
          <table:table-cell table:style-name="ce17" table:formula="of:=&quot;&quot;&amp;IF([.T8]=&quot;&quot;;&quot; &quot;;IF([.A9]&lt;&gt;&quot;&quot;;&quot;,&quot;;&quot;}&quot;)) &amp;IF([.A9]&lt;&gt;&quot;&quot;;&quot;&quot;&quot;&quot;&amp;[.A9]&amp;&quot;&quot;&quot;&quot;&amp;REPT(&quot; &quot;;20-LEN([.A9]));&quot;&quot;)" office:value-type="string" office:string-value=",&quot;cft_temp&quot;            " calcext:value-type="string">
            <text:p>,"cft_temp" <text:s text:c="11"/></text:p>
          </table:table-cell>
          <table:table-cell table:style-name="ce17" table:formula="of:=&quot;:&quot; &amp;&quot;{&quot;&quot;&quot;&amp;[.B$1]&amp;&quot;&quot;&quot;:&quot;&quot;&quot;&amp;[.B9]&amp;&quot;&quot;&quot;&quot;&amp;REPT(&quot; &quot;;20-LEN([.B9])) &amp;&quot;,&quot;&quot;&quot;&amp;[.C$1]&amp;&quot;&quot;&quot;:&quot;&quot;&quot;&amp;[.C9]&amp;&quot;&quot;&quot;&quot;&amp;REPT(&quot; &quot;;35-LEN([.C9])) &amp;&quot;,&quot;&quot;&quot;&amp;[.D$1]&amp;&quot;&quot;&quot;:&quot;&amp;[.D9]&amp;REPT(&quot; &quot;;3-LEN([.D9])) &amp;&quot;,&quot;&quot;&quot;&amp;[.E$1]&amp;&quot;&quot;&quot;:&quot;&quot;&quot;&amp;[.E9]&amp;&quot;&quot;&quot;&quot;&amp;REPT(&quot; &quot;;6-LEN([.E9])) &amp;&quot;,&quot;&quot;&quot;&amp;[.F$1]&amp;&quot;&quot;&quot;:&quot;&quot;&quot;&amp;[.F9]&amp;&quot;&quot;&quot;&quot;&amp;REPT(&quot; &quot;;7-LEN([.F9])) &amp;&quot;,&quot;&quot;&quot;&amp;[.G$1]&amp;&quot;&quot;&quot;:&quot;&amp;IF([.G9]&lt;&gt;&quot;&quot;;&quot;&quot;&quot;&quot;&amp;[.G9]&amp;&quot;&quot;&quot;&quot;&amp;REPT(&quot; &quot;;5-LEN([.G9]));&quot;null&quot;&amp;REPT(&quot; &quot;;5-4+2)) &amp;&quot;,&quot;&quot;&quot;&amp;[.H$1]&amp;&quot;&quot;&quot;:&quot;&amp;IF([.H9]&lt;&gt;&quot;&quot;;&quot;&quot;&quot;&quot;&amp;[.H9]&amp;&quot;&quot;&quot;&quot;&amp;REPT(&quot; &quot;;19-LEN([.H9]));&quot;null&quot;&amp;REPT(&quot; &quot;;19-4+2)) &amp;&quot;,&quot;&quot;&quot;&amp;[.I$1]&amp;&quot;&quot;&quot;:&quot;&amp;IF([.I9]&lt;&gt;&quot;&quot;;&quot;&quot;&quot;&quot;&amp;[.I9]&amp;&quot;&quot;&quot;&quot;&amp;REPT(&quot; &quot;;8-LEN([.I9]));&quot;null&quot;&amp;REPT(&quot; &quot;;8-4+2)) &amp;&quot;,&quot;&quot;&quot;&amp;[.J$1]&amp;&quot;&quot;&quot;:&quot;&amp;IF([.J9]&lt;&gt;&quot;&quot;;[.J9]&amp;REPT(&quot; &quot;;4-LEN([.J9]));&quot;null&quot;) &amp;&quot;,&quot;&quot;&quot;&amp;[.K$1]&amp;&quot;&quot;&quot;:&quot;&amp;IF([.K9]&lt;&gt;&quot;&quot;;[.K9]&amp;REPT(&quot; &quot;;4-LEN([.K9]));&quot;null&quot;) &amp;&quot;,&quot;&quot;&quot;&amp;[.L$1]&amp;&quot;&quot;&quot;:&quot;&amp;IF([.L9]&lt;&gt;&quot;&quot;;[.L9]&amp;REPT(&quot; &quot;;5-LEN([.L9]));&quot;null &quot;) &amp;&quot;,&quot;&quot;&quot;&amp;[.M$1]&amp;&quot;&quot;&quot;:&quot;&amp;IF([.M9]&lt;&gt;&quot;&quot;;&quot;&quot;&quot;&quot;&amp;[.M9]&amp;&quot;&quot;&quot;&quot;&amp;REPT(&quot; &quot;;20-LEN([.M9]));&quot;null&quot;&amp;REPT(&quot; &quot;;20-4+2)) &amp;&quot;,&quot;&quot;&quot;&amp;[.N$1]&amp;&quot;&quot;&quot;:&quot;&amp;IF([.N9]&lt;&gt;&quot;&quot;;&quot;&quot;&amp;[.N9]&amp;&quot;&quot;&amp;REPT(&quot; &quot;;5-LEN([.N9]));&quot;null&quot;&amp;REPT(&quot; &quot;;5-4+2)) &amp;&quot;,&quot;&quot;&quot;&amp;[.O$1]&amp;&quot;&quot;&quot;:&quot;&amp;[.O9] &amp;&quot;,&quot;&quot;&quot;&amp;[.P$1]&amp;&quot;&quot;&quot;:&quot;&amp;[.P9] &amp;&quot;}&quot;" office:value-type="string" office:string-value=":{&quot;LogicalId&quot;:&quot;cft_temp&quot;            ,&quot;Name&quot;:&quot;Temp. confort&quot;                      ,&quot;Order&quot;:14 ,&quot;Type&quot;:&quot;info&quot;  ,&quot;SubType&quot;:&quot;numeric&quot;,&quot;Unite&quot;:&quot;°C&quot;   ,&quot;Config_infoName&quot;:null                 ,&quot;Config_value&quot;:null      ,&quot;Config_minValue&quot;:null,&quot;Config_maxValue&quot;:null,&quot;Config_tempHL&quot;:null ,&quot;setValue&quot;:null                  ,&quot;Display_param_step&quot;:null   ,&quot;IsHistorized&quot;:0,&quot;IsVisible&quot;:1}" calcext:value-type="string">
            <text:p>:{"LogicalId":"cft_temp" <text:s text:c="11"/>,"Name":"Temp. confort" <text:s text:c="21"/>,"Order":14 ,"Type":"info" <text:s/>,"SubType":"numeric","Unite":"°C" <text:s text:c="2"/>,"Config_infoName":null <text:s text:c="16"/>,"Config_value":null <text:s text:c="5"/>,"Config_minValue":null,"Config_maxValue":null,"Config_tempHL":null ,"setValue":null <text:s text:c="17"/>,"Display_param_step":null <text:s text:c="2"/>,"IsHistorized":0,"IsVisible":1}</text:p>
          </table:table-cell>
          <table:table-cell table:style-name="ce15" office:value-type="string" calcext:value-type="string">
            <text:p>.</text:p>
          </table:table-cell>
          <table:table-cell table:style-name="ce14"/>
          <table:table-cell table:style-name="ce17" table:formula="of:=IF([.W8]=&quot;&quot;;&quot; &quot;;IF([.B9]&lt;&gt;&quot;&quot;;&quot;,&quot;;&quot;]&quot;))&#10;&amp;IF([.B9]&lt;&gt;&quot;&quot;;&quot;{&quot;&quot;cmd&quot;&quot;:&quot;&quot;&quot;&amp;[.B9]&amp;&quot;&quot;&quot;&quot;&amp;REPT(&quot; &quot;;20-LEN([.B9]));&quot;&quot;)" office:value-type="string" office:string-value=",{&quot;cmd&quot;:&quot;cft_temp&quot;            " calcext:value-type="string">
            <text:p>,{"cmd":"cft_temp" <text:s text:c="11"/></text:p>
          </table:table-cell>
          <table:table-cell table:style-name="ce17" table:formula="of:=&quot;,&quot;&quot;attrs&quot;&quot;:&quot;&#10;&amp;&quot;{&quot;&quot;&quot;&amp;[.B$1]&amp;&quot;&quot;&quot;:&quot;&quot;&quot;&amp;[.B9]&amp;&quot;&quot;&quot;&quot;&amp;REPT(&quot; &quot;;20-LEN([.B9]))&#10;&amp;&quot;,&quot;&quot;&quot;&amp;[.C$1]&amp;&quot;&quot;&quot;:&quot;&quot;&quot;&amp;[.C9]&amp;&quot;&quot;&quot;&quot;&amp;REPT(&quot; &quot;;35-LEN([.C9]))&#10;&amp;&quot;,&quot;&quot;&quot;&amp;[.D$1]&amp;&quot;&quot;&quot;:&quot;&amp;[.D9]&amp;REPT(&quot; &quot;;3-LEN([.D9]))&#10;&amp;&quot;,&quot;&quot;&quot;&amp;[.E$1]&amp;&quot;&quot;&quot;:&quot;&quot;&quot;&amp;[.E9]&amp;&quot;&quot;&quot;&quot;&amp;REPT(&quot; &quot;;6-LEN([.E9]))&#10;&amp;&quot;,&quot;&quot;&quot;&amp;[.F$1]&amp;&quot;&quot;&quot;:&quot;&quot;&quot;&amp;[.F9]&amp;&quot;&quot;&quot;&quot;&amp;REPT(&quot; &quot;;7-LEN([.F9]))&#10;&amp;&quot;,&quot;&quot;&quot;&amp;[.G$1]&amp;&quot;&quot;&quot;:&quot;&amp;IF([.G9]&lt;&gt;&quot;&quot;;&quot;&quot;&quot;&quot;&amp;[.G9]&amp;&quot;&quot;&quot;&quot;&amp;REPT(&quot; &quot;;5-LEN([.G9]));&quot;null&quot;&amp;REPT(&quot; &quot;;5-4+2))&#10;&amp;&quot;,&quot;&quot;&quot;&amp;[.H$1]&amp;&quot;&quot;&quot;:&quot;&amp;IF([.H9]&lt;&gt;&quot;&quot;;&quot;&quot;&quot;&quot;&amp;[.H9]&amp;&quot;&quot;&quot;&quot;&amp;REPT(&quot; &quot;;19-LEN([.H9]));&quot;null&quot;&amp;REPT(&quot; &quot;;19-4+2))&#10;&amp;&quot;,&quot;&quot;&quot;&amp;[.I$1]&amp;&quot;&quot;&quot;:&quot;&amp;IF([.I9]&lt;&gt;&quot;&quot;;&quot;&quot;&quot;&quot;&amp;[.I9]&amp;&quot;&quot;&quot;&quot;&amp;REPT(&quot; &quot;;8-LEN([.I9]));&quot;null&quot;&amp;REPT(&quot; &quot;;8-4+2))&#10;&amp;&quot;,&quot;&quot;&quot;&amp;[.J$1]&amp;&quot;&quot;&quot;:&quot;&amp;IF([.J9]&lt;&gt;&quot;&quot;;[.J9]&amp;REPT(&quot; &quot;;4-LEN([.J9]));&quot;null&quot;)&#10;&amp;&quot;,&quot;&quot;&quot;&amp;[.K$1]&amp;&quot;&quot;&quot;:&quot;&amp;IF([.K9]&lt;&gt;&quot;&quot;;[.K9]&amp;REPT(&quot; &quot;;4-LEN([.K9]));&quot;null&quot;)&#10;&amp;&quot;,&quot;&quot;&quot;&amp;[.L$1]&amp;&quot;&quot;&quot;:&quot;&amp;IF([.L9]&lt;&gt;&quot;&quot;;[.L9]&amp;REPT(&quot; &quot;;5-LEN([.L9]));&quot;null &quot;)&#10;&amp;&quot;,&quot;&quot;&quot;&amp;[.M$1]&amp;&quot;&quot;&quot;:&quot;&amp;IF([.M9]&lt;&gt;&quot;&quot;;&quot;&quot;&quot;&quot;&amp;[.M9]&amp;&quot;&quot;&quot;&quot;&amp;REPT(&quot; &quot;;20-LEN([.M9]));&quot;null&quot;&amp;REPT(&quot; &quot;;20-4+2))&#10;&amp;&quot;,&quot;&quot;&quot;&amp;[.N$1]&amp;&quot;&quot;&quot;:&quot;&amp;IF([.N9]&lt;&gt;&quot;&quot;;&quot;&quot;&quot;&quot;&amp;[.N9]&amp;&quot;&quot;&quot;&quot;&amp;REPT(&quot; &quot;;30-LEN([.N9]));&quot;null&quot;&amp;REPT(&quot; &quot;;30-4+2))&#10;&amp;&quot;,&quot;&quot;&quot;&amp;[.O$1]&amp;&quot;&quot;&quot;:&quot;&amp;[.O9]&#10;&amp;&quot;,&quot;&quot;&quot;&amp;[.P$1]&amp;&quot;&quot;&quot;:&quot;&amp;[.P9]&#10;&amp;&quot;}}&quot;" office:value-type="string" office:string-value=",&quot;attrs&quot;:{&quot;LogicalId&quot;:&quot;cft_temp&quot;            ,&quot;Name&quot;:&quot;Temp. confort&quot;                      ,&quot;Order&quot;:14 ,&quot;Type&quot;:&quot;info&quot;  ,&quot;SubType&quot;:&quot;numeric&quot;,&quot;Unite&quot;:&quot;°C&quot;   ,&quot;Config_infoName&quot;:null      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cft_temp" <text:s text:c="11"/>,"Name":"Temp. confort" <text:s text:c="21"/>,"Order":14 ,"Type":"info" <text:s/>,"SubType":"numeric","Unite":"°C" <text:s text:c="2"/>,"Config_infoName":null <text:s text:c="16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ft_temp_consigne</text:p>
          </table:table-cell>
          <table:table-cell office:value-type="string" calcext:value-type="string">
            <text:p>Consigne Temp. confor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slider</text:p>
          </table:table-cell>
          <table:table-cell office:value-type="string" calcext:value-type="string">
            <text:p>°C</text:p>
          </table:table-cell>
          <table:table-cell office:value-type="string" calcext:value-type="string">
            <text:p>cft_temp</text:p>
          </table:table-cell>
          <table:table-cell office:value-type="string" calcext:value-type="string">
            <text:p>#slider#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cft_temp</text:p>
          </table:table-cell>
          <table:table-cell office:value-type="string" calcext:value-type="string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LEN([.N10])" office:value-type="float" office:value="3" calcext:value-type="float">
            <text:p>3</text:p>
          </table:table-cell>
          <table:table-cell/>
          <table:table-cell table:style-name="ce17" table:formula="of:=&quot;&quot;&amp;IF([.T9]=&quot;&quot;;&quot; &quot;;IF([.A10]&lt;&gt;&quot;&quot;;&quot;,&quot;;&quot;}&quot;)) &amp;IF([.A10]&lt;&gt;&quot;&quot;;&quot;&quot;&quot;&quot;&amp;[.A10]&amp;&quot;&quot;&quot;&quot;&amp;REPT(&quot; &quot;;20-LEN([.A10]));&quot;&quot;)" office:value-type="string" office:string-value=",&quot;cft_temp_consigne&quot;   " calcext:value-type="string">
            <text:p>,"cft_temp_consigne" <text:s text:c="2"/></text:p>
          </table:table-cell>
          <table:table-cell table:style-name="ce17" table:formula="of:=&quot;:&quot; &amp;&quot;{&quot;&quot;&quot;&amp;[.B$1]&amp;&quot;&quot;&quot;:&quot;&quot;&quot;&amp;[.B10]&amp;&quot;&quot;&quot;&quot;&amp;REPT(&quot; &quot;;20-LEN([.B10])) &amp;&quot;,&quot;&quot;&quot;&amp;[.C$1]&amp;&quot;&quot;&quot;:&quot;&quot;&quot;&amp;[.C10]&amp;&quot;&quot;&quot;&quot;&amp;REPT(&quot; &quot;;35-LEN([.C10])) &amp;&quot;,&quot;&quot;&quot;&amp;[.D$1]&amp;&quot;&quot;&quot;:&quot;&amp;[.D10]&amp;REPT(&quot; &quot;;3-LEN([.D10])) &amp;&quot;,&quot;&quot;&quot;&amp;[.E$1]&amp;&quot;&quot;&quot;:&quot;&quot;&quot;&amp;[.E10]&amp;&quot;&quot;&quot;&quot;&amp;REPT(&quot; &quot;;6-LEN([.E10])) &amp;&quot;,&quot;&quot;&quot;&amp;[.F$1]&amp;&quot;&quot;&quot;:&quot;&quot;&quot;&amp;[.F10]&amp;&quot;&quot;&quot;&quot;&amp;REPT(&quot; &quot;;7-LEN([.F10])) &amp;&quot;,&quot;&quot;&quot;&amp;[.G$1]&amp;&quot;&quot;&quot;:&quot;&amp;IF([.G10]&lt;&gt;&quot;&quot;;&quot;&quot;&quot;&quot;&amp;[.G10]&amp;&quot;&quot;&quot;&quot;&amp;REPT(&quot; &quot;;5-LEN([.G10]));&quot;null&quot;&amp;REPT(&quot; &quot;;5-4+2)) &amp;&quot;,&quot;&quot;&quot;&amp;[.H$1]&amp;&quot;&quot;&quot;:&quot;&amp;IF([.H10]&lt;&gt;&quot;&quot;;&quot;&quot;&quot;&quot;&amp;[.H10]&amp;&quot;&quot;&quot;&quot;&amp;REPT(&quot; &quot;;19-LEN([.H10]));&quot;null&quot;&amp;REPT(&quot; &quot;;19-4+2)) &amp;&quot;,&quot;&quot;&quot;&amp;[.I$1]&amp;&quot;&quot;&quot;:&quot;&amp;IF([.I10]&lt;&gt;&quot;&quot;;&quot;&quot;&quot;&quot;&amp;[.I10]&amp;&quot;&quot;&quot;&quot;&amp;REPT(&quot; &quot;;8-LEN([.I10]));&quot;null&quot;&amp;REPT(&quot; &quot;;8-4+2)) &amp;&quot;,&quot;&quot;&quot;&amp;[.J$1]&amp;&quot;&quot;&quot;:&quot;&amp;IF([.J10]&lt;&gt;&quot;&quot;;[.J10]&amp;REPT(&quot; &quot;;4-LEN([.J10]));&quot;null&quot;) &amp;&quot;,&quot;&quot;&quot;&amp;[.K$1]&amp;&quot;&quot;&quot;:&quot;&amp;IF([.K10]&lt;&gt;&quot;&quot;;[.K10]&amp;REPT(&quot; &quot;;4-LEN([.K10]));&quot;null&quot;) &amp;&quot;,&quot;&quot;&quot;&amp;[.L$1]&amp;&quot;&quot;&quot;:&quot;&amp;IF([.L10]&lt;&gt;&quot;&quot;;[.L10]&amp;REPT(&quot; &quot;;5-LEN([.L10]));&quot;null &quot;) &amp;&quot;,&quot;&quot;&quot;&amp;[.M$1]&amp;&quot;&quot;&quot;:&quot;&amp;IF([.M10]&lt;&gt;&quot;&quot;;&quot;&quot;&quot;&quot;&amp;[.M10]&amp;&quot;&quot;&quot;&quot;&amp;REPT(&quot; &quot;;20-LEN([.M10]));&quot;null&quot;&amp;REPT(&quot; &quot;;20-4+2)) &amp;&quot;,&quot;&quot;&quot;&amp;[.N$1]&amp;&quot;&quot;&quot;:&quot;&amp;IF([.N10]&lt;&gt;&quot;&quot;;&quot;&quot;&amp;[.N10]&amp;&quot;&quot;&amp;REPT(&quot; &quot;;5-LEN([.N10]));&quot;null&quot;&amp;REPT(&quot; &quot;;5-4+2)) &amp;&quot;,&quot;&quot;&quot;&amp;[.O$1]&amp;&quot;&quot;&quot;:&quot;&amp;[.O10] &amp;&quot;,&quot;&quot;&quot;&amp;[.P$1]&amp;&quot;&quot;&quot;:&quot;&amp;[.P10] &amp;&quot;}&quot;" office:value-type="string" office:string-value=":{&quot;LogicalId&quot;:&quot;cft_temp_consigne&quot;   ,&quot;Name&quot;:&quot;Consigne Temp. confort&quot;             ,&quot;Order&quot;:15 ,&quot;Type&quot;:&quot;action&quot;,&quot;SubType&quot;:&quot;slider&quot; ,&quot;Unite&quot;:&quot;°C&quot;   ,&quot;Config_infoName&quot;:&quot;cft_temp&quot;           ,&quot;Config_value&quot;:&quot;#slider#&quot;,&quot;Config_minValue&quot;:15  ,&quot;Config_maxValue&quot;:25  ,&quot;Config_tempHL&quot;:null ,&quot;setValue&quot;:&quot;cft_temp&quot;            ,&quot;Display_param_step&quot;:0.5  ,&quot;IsHistorized&quot;:0,&quot;IsVisible&quot;:0}" calcext:value-type="string">
            <text:p>:{"LogicalId":"cft_temp_consigne" <text:s text:c="2"/>,"Name":"Consigne Temp. confort" <text:s text:c="12"/>,"Order":15 ,"Type":"action","SubType":"slider" ,"Unite":"°C" <text:s text:c="2"/>,"Config_infoName":"cft_temp" <text:s text:c="10"/>,"Config_value":"#slider#","Config_minValue":15 <text:s/>,"Config_maxValue":25 <text:s/>,"Config_tempHL":null ,"setValue":"cft_temp" <text:s text:c="11"/>,"Display_param_step":0.5 <text:s/>,"IsHistorized":0,"IsVisible":0}</text:p>
          </table:table-cell>
          <table:table-cell table:style-name="ce15"/>
          <table:table-cell table:style-name="ce14"/>
          <table:table-cell table:style-name="ce17" table:number-columns-repeated="2"/>
          <table:table-cell/>
        </table:table-row>
        <table:table-row table:style-name="ro1">
          <table:table-cell office:value-type="string" calcext:value-type="string">
            <text:p>cft_temp_consigneHL</text:p>
          </table:table-cell>
          <table:table-cell office:value-type="string" calcext:value-type="string">
            <text:p>cft_temp_consigne</text:p>
          </table:table-cell>
          <table:table-cell office:value-type="string" calcext:value-type="string">
            <text:p>Consigne Temp. confor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slider</text:p>
          </table:table-cell>
          <table:table-cell office:value-type="string" calcext:value-type="string">
            <text:p>°C</text:p>
          </table:table-cell>
          <table:table-cell office:value-type="string" calcext:value-type="string">
            <text:p>cft_temp</text:p>
          </table:table-cell>
          <table:table-cell office:value-type="string" calcext:value-type="string">
            <text:p>#slider#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ft_temp</text:p>
          </table:table-cell>
          <table:table-cell office:value-type="string" calcext:value-type="string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LEN([.N11])" office:value-type="float" office:value="3" calcext:value-type="float">
            <text:p>3</text:p>
          </table:table-cell>
          <table:table-cell/>
          <table:table-cell table:style-name="ce17" table:formula="of:=&quot;&quot;&amp;IF([.T10]=&quot;&quot;;&quot; &quot;;IF([.A11]&lt;&gt;&quot;&quot;;&quot;,&quot;;&quot;}&quot;)) &amp;IF([.A11]&lt;&gt;&quot;&quot;;&quot;&quot;&quot;&quot;&amp;[.A11]&amp;&quot;&quot;&quot;&quot;&amp;REPT(&quot; &quot;;20-LEN([.A11]));&quot;&quot;)" office:value-type="string" office:string-value=",&quot;cft_temp_consigneHL&quot; " calcext:value-type="string">
            <text:p>,"cft_temp_consigneHL" </text:p>
          </table:table-cell>
          <table:table-cell table:style-name="ce17" table:formula="of:=&quot;:&quot; &amp;&quot;{&quot;&quot;&quot;&amp;[.B$1]&amp;&quot;&quot;&quot;:&quot;&quot;&quot;&amp;[.B11]&amp;&quot;&quot;&quot;&quot;&amp;REPT(&quot; &quot;;20-LEN([.B11])) &amp;&quot;,&quot;&quot;&quot;&amp;[.C$1]&amp;&quot;&quot;&quot;:&quot;&quot;&quot;&amp;[.C11]&amp;&quot;&quot;&quot;&quot;&amp;REPT(&quot; &quot;;35-LEN([.C11])) &amp;&quot;,&quot;&quot;&quot;&amp;[.D$1]&amp;&quot;&quot;&quot;:&quot;&amp;[.D11]&amp;REPT(&quot; &quot;;3-LEN([.D11])) &amp;&quot;,&quot;&quot;&quot;&amp;[.E$1]&amp;&quot;&quot;&quot;:&quot;&quot;&quot;&amp;[.E11]&amp;&quot;&quot;&quot;&quot;&amp;REPT(&quot; &quot;;6-LEN([.E11])) &amp;&quot;,&quot;&quot;&quot;&amp;[.F$1]&amp;&quot;&quot;&quot;:&quot;&quot;&quot;&amp;[.F11]&amp;&quot;&quot;&quot;&quot;&amp;REPT(&quot; &quot;;7-LEN([.F11])) &amp;&quot;,&quot;&quot;&quot;&amp;[.G$1]&amp;&quot;&quot;&quot;:&quot;&amp;IF([.G11]&lt;&gt;&quot;&quot;;&quot;&quot;&quot;&quot;&amp;[.G11]&amp;&quot;&quot;&quot;&quot;&amp;REPT(&quot; &quot;;5-LEN([.G11]));&quot;null&quot;&amp;REPT(&quot; &quot;;5-4+2)) &amp;&quot;,&quot;&quot;&quot;&amp;[.H$1]&amp;&quot;&quot;&quot;:&quot;&amp;IF([.H11]&lt;&gt;&quot;&quot;;&quot;&quot;&quot;&quot;&amp;[.H11]&amp;&quot;&quot;&quot;&quot;&amp;REPT(&quot; &quot;;19-LEN([.H11]));&quot;null&quot;&amp;REPT(&quot; &quot;;19-4+2)) &amp;&quot;,&quot;&quot;&quot;&amp;[.I$1]&amp;&quot;&quot;&quot;:&quot;&amp;IF([.I11]&lt;&gt;&quot;&quot;;&quot;&quot;&quot;&quot;&amp;[.I11]&amp;&quot;&quot;&quot;&quot;&amp;REPT(&quot; &quot;;8-LEN([.I11]));&quot;null&quot;&amp;REPT(&quot; &quot;;8-4+2)) &amp;&quot;,&quot;&quot;&quot;&amp;[.J$1]&amp;&quot;&quot;&quot;:&quot;&amp;IF([.J11]&lt;&gt;&quot;&quot;;[.J11]&amp;REPT(&quot; &quot;;4-LEN([.J11]));&quot;null&quot;) &amp;&quot;,&quot;&quot;&quot;&amp;[.K$1]&amp;&quot;&quot;&quot;:&quot;&amp;IF([.K11]&lt;&gt;&quot;&quot;;[.K11]&amp;REPT(&quot; &quot;;4-LEN([.K11]));&quot;null&quot;) &amp;&quot;,&quot;&quot;&quot;&amp;[.L$1]&amp;&quot;&quot;&quot;:&quot;&amp;IF([.L11]&lt;&gt;&quot;&quot;;[.L11]&amp;REPT(&quot; &quot;;5-LEN([.L11]));&quot;null &quot;) &amp;&quot;,&quot;&quot;&quot;&amp;[.M$1]&amp;&quot;&quot;&quot;:&quot;&amp;IF([.M11]&lt;&gt;&quot;&quot;;&quot;&quot;&quot;&quot;&amp;[.M11]&amp;&quot;&quot;&quot;&quot;&amp;REPT(&quot; &quot;;20-LEN([.M11]));&quot;null&quot;&amp;REPT(&quot; &quot;;20-4+2)) &amp;&quot;,&quot;&quot;&quot;&amp;[.N$1]&amp;&quot;&quot;&quot;:&quot;&amp;IF([.N11]&lt;&gt;&quot;&quot;;&quot;&quot;&amp;[.N11]&amp;&quot;&quot;&amp;REPT(&quot; &quot;;5-LEN([.N11]));&quot;null&quot;&amp;REPT(&quot; &quot;;5-4+2)) &amp;&quot;,&quot;&quot;&quot;&amp;[.O$1]&amp;&quot;&quot;&quot;:&quot;&amp;[.O11] &amp;&quot;,&quot;&quot;&quot;&amp;[.P$1]&amp;&quot;&quot;&quot;:&quot;&amp;[.P11] &amp;&quot;}&quot;" office:value-type="string" office:string-value=":{&quot;LogicalId&quot;:&quot;cft_temp_consigne&quot;   ,&quot;Name&quot;:&quot;Consigne Temp. confort&quot;             ,&quot;Order&quot;:15 ,&quot;Type&quot;:&quot;action&quot;,&quot;SubType&quot;:&quot;slider&quot; ,&quot;Unite&quot;:&quot;°C&quot;   ,&quot;Config_infoName&quot;:&quot;cft_temp&quot;           ,&quot;Config_value&quot;:&quot;#slider#&quot;,&quot;Config_minValue&quot;:15  ,&quot;Config_maxValue&quot;:25  ,&quot;Config_tempHL&quot;:true ,&quot;setValue&quot;:&quot;cft_temp&quot;            ,&quot;Display_param_step&quot;:0.5  ,&quot;IsHistorized&quot;:0,&quot;IsVisible&quot;:0}" calcext:value-type="string">
            <text:p>:{"LogicalId":"cft_temp_consigne" <text:s text:c="2"/>,"Name":"Consigne Temp. confort" <text:s text:c="12"/>,"Order":15 ,"Type":"action","SubType":"slider" ,"Unite":"°C" <text:s text:c="2"/>,"Config_infoName":"cft_temp" <text:s text:c="10"/>,"Config_value":"#slider#","Config_minValue":15 <text:s/>,"Config_maxValue":25 <text:s/>,"Config_tempHL":true ,"setValue":"cft_temp" <text:s text:c="11"/>,"Display_param_step":0.5 <text:s/>,"IsHistorized":0,"IsVisible":0}</text:p>
          </table:table-cell>
          <table:table-cell table:style-name="ce15" office:value-type="string" calcext:value-type="string">
            <text:p>.</text:p>
          </table:table-cell>
          <table:table-cell table:style-name="ce14"/>
          <table:table-cell table:style-name="ce17" table:formula="of:=IF([.W9]=&quot;&quot;;&quot; &quot;;IF([.B11]&lt;&gt;&quot;&quot;;&quot;,&quot;;&quot;]&quot;))&#10;&amp;IF([.B11]&lt;&gt;&quot;&quot;;&quot;{&quot;&quot;cmd&quot;&quot;:&quot;&quot;&quot;&amp;[.B11]&amp;&quot;&quot;&quot;&quot;&amp;REPT(&quot; &quot;;20-LEN([.B11]));&quot;&quot;)" office:value-type="string" office:string-value=",{&quot;cmd&quot;:&quot;cft_temp_consigne&quot;   " calcext:value-type="string">
            <text:p>,{"cmd":"cft_temp_consigne" <text:s text:c="2"/></text:p>
          </table:table-cell>
          <table:table-cell table:style-name="ce17" table:formula="of:=&quot;,&quot;&quot;attrs&quot;&quot;:&quot;&#10;&amp;&quot;{&quot;&quot;&quot;&amp;[.B$1]&amp;&quot;&quot;&quot;:&quot;&quot;&quot;&amp;[.B11]&amp;&quot;&quot;&quot;&quot;&amp;REPT(&quot; &quot;;20-LEN([.B11]))&#10;&amp;&quot;,&quot;&quot;&quot;&amp;[.C$1]&amp;&quot;&quot;&quot;:&quot;&quot;&quot;&amp;[.C11]&amp;&quot;&quot;&quot;&quot;&amp;REPT(&quot; &quot;;35-LEN([.C11]))&#10;&amp;&quot;,&quot;&quot;&quot;&amp;[.D$1]&amp;&quot;&quot;&quot;:&quot;&amp;[.D11]&amp;REPT(&quot; &quot;;3-LEN([.D11]))&#10;&amp;&quot;,&quot;&quot;&quot;&amp;[.E$1]&amp;&quot;&quot;&quot;:&quot;&quot;&quot;&amp;[.E11]&amp;&quot;&quot;&quot;&quot;&amp;REPT(&quot; &quot;;6-LEN([.E11]))&#10;&amp;&quot;,&quot;&quot;&quot;&amp;[.F$1]&amp;&quot;&quot;&quot;:&quot;&quot;&quot;&amp;[.F11]&amp;&quot;&quot;&quot;&quot;&amp;REPT(&quot; &quot;;7-LEN([.F11]))&#10;&amp;&quot;,&quot;&quot;&quot;&amp;[.G$1]&amp;&quot;&quot;&quot;:&quot;&amp;IF([.G11]&lt;&gt;&quot;&quot;;&quot;&quot;&quot;&quot;&amp;[.G11]&amp;&quot;&quot;&quot;&quot;&amp;REPT(&quot; &quot;;5-LEN([.G11]));&quot;null&quot;&amp;REPT(&quot; &quot;;5-4+2))&#10;&amp;&quot;,&quot;&quot;&quot;&amp;[.H$1]&amp;&quot;&quot;&quot;:&quot;&amp;IF([.H11]&lt;&gt;&quot;&quot;;&quot;&quot;&quot;&quot;&amp;[.H11]&amp;&quot;&quot;&quot;&quot;&amp;REPT(&quot; &quot;;19-LEN([.H11]));&quot;null&quot;&amp;REPT(&quot; &quot;;19-4+2))&#10;&amp;&quot;,&quot;&quot;&quot;&amp;[.I$1]&amp;&quot;&quot;&quot;:&quot;&amp;IF([.I11]&lt;&gt;&quot;&quot;;&quot;&quot;&quot;&quot;&amp;[.I11]&amp;&quot;&quot;&quot;&quot;&amp;REPT(&quot; &quot;;8-LEN([.I11]));&quot;null&quot;&amp;REPT(&quot; &quot;;8-4+2))&#10;&amp;&quot;,&quot;&quot;&quot;&amp;[.J$1]&amp;&quot;&quot;&quot;:&quot;&amp;IF([.J11]&lt;&gt;&quot;&quot;;[.J11]&amp;REPT(&quot; &quot;;4-LEN([.J11]));&quot;null&quot;)&#10;&amp;&quot;,&quot;&quot;&quot;&amp;[.K$1]&amp;&quot;&quot;&quot;:&quot;&amp;IF([.K11]&lt;&gt;&quot;&quot;;[.K11]&amp;REPT(&quot; &quot;;4-LEN([.K11]));&quot;null&quot;)&#10;&amp;&quot;,&quot;&quot;&quot;&amp;[.L$1]&amp;&quot;&quot;&quot;:&quot;&amp;IF([.L11]&lt;&gt;&quot;&quot;;[.L11]&amp;REPT(&quot; &quot;;5-LEN([.L11]));&quot;null &quot;)&#10;&amp;&quot;,&quot;&quot;&quot;&amp;[.M$1]&amp;&quot;&quot;&quot;:&quot;&amp;IF([.M11]&lt;&gt;&quot;&quot;;&quot;&quot;&quot;&quot;&amp;[.M11]&amp;&quot;&quot;&quot;&quot;&amp;REPT(&quot; &quot;;20-LEN([.M11]));&quot;null&quot;&amp;REPT(&quot; &quot;;20-4+2))&#10;&amp;&quot;,&quot;&quot;&quot;&amp;[.N$1]&amp;&quot;&quot;&quot;:&quot;&amp;IF([.N11]&lt;&gt;&quot;&quot;;&quot;&quot;&quot;&quot;&amp;[.N11]&amp;&quot;&quot;&quot;&quot;&amp;REPT(&quot; &quot;;30-LEN([.N11]));&quot;null&quot;&amp;REPT(&quot; &quot;;30-4+2))&#10;&amp;&quot;,&quot;&quot;&quot;&amp;[.O$1]&amp;&quot;&quot;&quot;:&quot;&amp;[.O11]&#10;&amp;&quot;,&quot;&quot;&quot;&amp;[.P$1]&amp;&quot;&quot;&quot;:&quot;&amp;[.P11]&#10;&amp;&quot;}}&quot;" office:value-type="string" office:string-value=",&quot;attrs&quot;:{&quot;LogicalId&quot;:&quot;cft_temp_consigne&quot;   ,&quot;Name&quot;:&quot;Consigne Temp. confort&quot;             ,&quot;Order&quot;:15 ,&quot;Type&quot;:&quot;action&quot;,&quot;SubType&quot;:&quot;slider&quot; ,&quot;Unite&quot;:&quot;°C&quot;   ,&quot;Config_infoName&quot;:&quot;cft_temp&quot;           ,&quot;Config_value&quot;:&quot;#slider#&quot;,&quot;Config_minValue&quot;:15  ,&quot;Config_maxValue&quot;:25  ,&quot;Config_tempHL&quot;:true ,&quot;setValue&quot;:&quot;cft_temp&quot;            ,&quot;Display_param_step&quot;:&quot;0.5&quot;                           ,&quot;IsHistorized&quot;:0,&quot;IsVisible&quot;:0}}" calcext:value-type="string">
            <text:p>,"attrs":{"LogicalId":"cft_temp_consigne" <text:s text:c="2"/>,"Name":"Consigne Temp. confort" <text:s text:c="12"/>,"Order":15 ,"Type":"action","SubType":"slider" ,"Unite":"°C" <text:s text:c="2"/>,"Config_infoName":"cft_temp" <text:s text:c="10"/>,"Config_value":"#slider#","Config_minValue":15 <text:s/>,"Config_maxValue":25 <text:s/>,"Config_tempHL":true ,"setValue":"cft_temp" <text:s text:c="11"/>,"Display_param_step":"0.5" <text:s text:c="26"/>,"IsHistorized":0,"IsVisible":0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endance</text:p>
          </table:table-cell>
          <table:table-cell office:value-type="string" calcext:value-type="string">
            <text:p>Tendance Températur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numeric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 table:formula="of:=LEN([.N12])" office:value-type="float" office:value="0" calcext:value-type="float">
            <text:p>0</text:p>
          </table:table-cell>
          <table:table-cell/>
          <table:table-cell table:style-name="ce17" table:formula="of:=&quot;&quot;&amp;IF([.T11]=&quot;&quot;;&quot; &quot;;IF([.A12]&lt;&gt;&quot;&quot;;&quot;,&quot;;&quot;}&quot;)) &amp;IF([.A12]&lt;&gt;&quot;&quot;;&quot;&quot;&quot;&quot;&amp;[.A12]&amp;&quot;&quot;&quot;&quot;&amp;REPT(&quot; &quot;;20-LEN([.A12]));&quot;&quot;)" office:value-type="string" office:string-value=",&quot;Tendance&quot;            " calcext:value-type="string">
            <text:p>,"Tendance" <text:s text:c="11"/></text:p>
          </table:table-cell>
          <table:table-cell table:style-name="ce17" table:formula="of:=&quot;:&quot; &amp;&quot;{&quot;&quot;&quot;&amp;[.B$1]&amp;&quot;&quot;&quot;:&quot;&quot;&quot;&amp;[.B12]&amp;&quot;&quot;&quot;&quot;&amp;REPT(&quot; &quot;;20-LEN([.B12])) &amp;&quot;,&quot;&quot;&quot;&amp;[.C$1]&amp;&quot;&quot;&quot;:&quot;&quot;&quot;&amp;[.C12]&amp;&quot;&quot;&quot;&quot;&amp;REPT(&quot; &quot;;35-LEN([.C12])) &amp;&quot;,&quot;&quot;&quot;&amp;[.D$1]&amp;&quot;&quot;&quot;:&quot;&amp;[.D12]&amp;REPT(&quot; &quot;;3-LEN([.D12])) &amp;&quot;,&quot;&quot;&quot;&amp;[.E$1]&amp;&quot;&quot;&quot;:&quot;&quot;&quot;&amp;[.E12]&amp;&quot;&quot;&quot;&quot;&amp;REPT(&quot; &quot;;6-LEN([.E12])) &amp;&quot;,&quot;&quot;&quot;&amp;[.F$1]&amp;&quot;&quot;&quot;:&quot;&quot;&quot;&amp;[.F12]&amp;&quot;&quot;&quot;&quot;&amp;REPT(&quot; &quot;;7-LEN([.F12])) &amp;&quot;,&quot;&quot;&quot;&amp;[.G$1]&amp;&quot;&quot;&quot;:&quot;&amp;IF([.G12]&lt;&gt;&quot;&quot;;&quot;&quot;&quot;&quot;&amp;[.G12]&amp;&quot;&quot;&quot;&quot;&amp;REPT(&quot; &quot;;5-LEN([.G12]));&quot;null&quot;&amp;REPT(&quot; &quot;;5-4+2)) &amp;&quot;,&quot;&quot;&quot;&amp;[.H$1]&amp;&quot;&quot;&quot;:&quot;&amp;IF([.H12]&lt;&gt;&quot;&quot;;&quot;&quot;&quot;&quot;&amp;[.H12]&amp;&quot;&quot;&quot;&quot;&amp;REPT(&quot; &quot;;19-LEN([.H12]));&quot;null&quot;&amp;REPT(&quot; &quot;;19-4+2)) &amp;&quot;,&quot;&quot;&quot;&amp;[.I$1]&amp;&quot;&quot;&quot;:&quot;&amp;IF([.I12]&lt;&gt;&quot;&quot;;&quot;&quot;&quot;&quot;&amp;[.I12]&amp;&quot;&quot;&quot;&quot;&amp;REPT(&quot; &quot;;8-LEN([.I12]));&quot;null&quot;&amp;REPT(&quot; &quot;;8-4+2)) &amp;&quot;,&quot;&quot;&quot;&amp;[.J$1]&amp;&quot;&quot;&quot;:&quot;&amp;IF([.J12]&lt;&gt;&quot;&quot;;[.J12]&amp;REPT(&quot; &quot;;4-LEN([.J12]));&quot;null&quot;) &amp;&quot;,&quot;&quot;&quot;&amp;[.K$1]&amp;&quot;&quot;&quot;:&quot;&amp;IF([.K12]&lt;&gt;&quot;&quot;;[.K12]&amp;REPT(&quot; &quot;;4-LEN([.K12]));&quot;null&quot;) &amp;&quot;,&quot;&quot;&quot;&amp;[.L$1]&amp;&quot;&quot;&quot;:&quot;&amp;IF([.L12]&lt;&gt;&quot;&quot;;[.L12]&amp;REPT(&quot; &quot;;5-LEN([.L12]));&quot;null &quot;) &amp;&quot;,&quot;&quot;&quot;&amp;[.M$1]&amp;&quot;&quot;&quot;:&quot;&amp;IF([.M12]&lt;&gt;&quot;&quot;;&quot;&quot;&quot;&quot;&amp;[.M12]&amp;&quot;&quot;&quot;&quot;&amp;REPT(&quot; &quot;;20-LEN([.M12]));&quot;null&quot;&amp;REPT(&quot; &quot;;20-4+2)) &amp;&quot;,&quot;&quot;&quot;&amp;[.N$1]&amp;&quot;&quot;&quot;:&quot;&amp;IF([.N12]&lt;&gt;&quot;&quot;;&quot;&quot;&amp;[.N12]&amp;&quot;&quot;&amp;REPT(&quot; &quot;;5-LEN([.N12]));&quot;null&quot;&amp;REPT(&quot; &quot;;5-4+2)) &amp;&quot;,&quot;&quot;&quot;&amp;[.O$1]&amp;&quot;&quot;&quot;:&quot;&amp;[.O12] &amp;&quot;,&quot;&quot;&quot;&amp;[.P$1]&amp;&quot;&quot;&quot;:&quot;&amp;[.P12] &amp;&quot;}&quot;" office:value-type="string" office:string-value=":{&quot;LogicalId&quot;:&quot;Tendance&quot;            ,&quot;Name&quot;:&quot;Tendance Température&quot;               ,&quot;Order&quot;:16 ,&quot;Type&quot;:&quot;info&quot;  ,&quot;SubType&quot;:&quot;numeric&quot;,&quot;Unite&quot;:null   ,&quot;Config_infoName&quot;:null                 ,&quot;Config_value&quot;:null      ,&quot;Config_minValue&quot;:null,&quot;Config_maxValue&quot;:null,&quot;Config_tempHL&quot;:null ,&quot;setValue&quot;:null                  ,&quot;Display_param_step&quot;:null   ,&quot;IsHistorized&quot;:0,&quot;IsVisible&quot;:0}" calcext:value-type="string">
            <text:p>:{"LogicalId":"Tendance" <text:s text:c="11"/>,"Name":"Tendance Température" <text:s text:c="14"/>,"Order":16 ,"Type":"info" <text:s/>,"SubType":"numeric","Unite":null <text:s text:c="2"/>,"Config_infoName":null <text:s text:c="16"/>,"Config_value":null <text:s text:c="5"/>,"Config_minValue":null,"Config_maxValue":null,"Config_tempHL":null ,"setValue":null <text:s text:c="17"/>,"Display_param_step":null <text:s text:c="2"/>,"IsHistorized":0,"IsVisible":0}</text:p>
          </table:table-cell>
          <table:table-cell table:style-name="ce15" office:value-type="string" calcext:value-type="string">
            <text:p>.</text:p>
          </table:table-cell>
          <table:table-cell table:style-name="ce14"/>
          <table:table-cell table:style-name="ce17" table:formula="of:=IF([.W11]=&quot;&quot;;&quot; &quot;;IF([.B12]&lt;&gt;&quot;&quot;;&quot;,&quot;;&quot;]&quot;))&#10;&amp;IF([.B12]&lt;&gt;&quot;&quot;;&quot;{&quot;&quot;cmd&quot;&quot;:&quot;&quot;&quot;&amp;[.B12]&amp;&quot;&quot;&quot;&quot;&amp;REPT(&quot; &quot;;20-LEN([.B12]));&quot;&quot;)" office:value-type="string" office:string-value=",{&quot;cmd&quot;:&quot;Tendance&quot;            " calcext:value-type="string">
            <text:p>,{"cmd":"Tendance" <text:s text:c="11"/></text:p>
          </table:table-cell>
          <table:table-cell table:style-name="ce17" table:formula="of:=&quot;,&quot;&quot;attrs&quot;&quot;:&quot;&#10;&amp;&quot;{&quot;&quot;&quot;&amp;[.B$1]&amp;&quot;&quot;&quot;:&quot;&quot;&quot;&amp;[.B12]&amp;&quot;&quot;&quot;&quot;&amp;REPT(&quot; &quot;;20-LEN([.B12]))&#10;&amp;&quot;,&quot;&quot;&quot;&amp;[.C$1]&amp;&quot;&quot;&quot;:&quot;&quot;&quot;&amp;[.C12]&amp;&quot;&quot;&quot;&quot;&amp;REPT(&quot; &quot;;35-LEN([.C12]))&#10;&amp;&quot;,&quot;&quot;&quot;&amp;[.D$1]&amp;&quot;&quot;&quot;:&quot;&amp;[.D12]&amp;REPT(&quot; &quot;;3-LEN([.D12]))&#10;&amp;&quot;,&quot;&quot;&quot;&amp;[.E$1]&amp;&quot;&quot;&quot;:&quot;&quot;&quot;&amp;[.E12]&amp;&quot;&quot;&quot;&quot;&amp;REPT(&quot; &quot;;6-LEN([.E12]))&#10;&amp;&quot;,&quot;&quot;&quot;&amp;[.F$1]&amp;&quot;&quot;&quot;:&quot;&quot;&quot;&amp;[.F12]&amp;&quot;&quot;&quot;&quot;&amp;REPT(&quot; &quot;;7-LEN([.F12]))&#10;&amp;&quot;,&quot;&quot;&quot;&amp;[.G$1]&amp;&quot;&quot;&quot;:&quot;&amp;IF([.G12]&lt;&gt;&quot;&quot;;&quot;&quot;&quot;&quot;&amp;[.G12]&amp;&quot;&quot;&quot;&quot;&amp;REPT(&quot; &quot;;5-LEN([.G12]));&quot;null&quot;&amp;REPT(&quot; &quot;;5-4+2))&#10;&amp;&quot;,&quot;&quot;&quot;&amp;[.H$1]&amp;&quot;&quot;&quot;:&quot;&amp;IF([.H12]&lt;&gt;&quot;&quot;;&quot;&quot;&quot;&quot;&amp;[.H12]&amp;&quot;&quot;&quot;&quot;&amp;REPT(&quot; &quot;;19-LEN([.H12]));&quot;null&quot;&amp;REPT(&quot; &quot;;19-4+2))&#10;&amp;&quot;,&quot;&quot;&quot;&amp;[.I$1]&amp;&quot;&quot;&quot;:&quot;&amp;IF([.I12]&lt;&gt;&quot;&quot;;&quot;&quot;&quot;&quot;&amp;[.I12]&amp;&quot;&quot;&quot;&quot;&amp;REPT(&quot; &quot;;8-LEN([.I12]));&quot;null&quot;&amp;REPT(&quot; &quot;;8-4+2))&#10;&amp;&quot;,&quot;&quot;&quot;&amp;[.J$1]&amp;&quot;&quot;&quot;:&quot;&amp;IF([.J12]&lt;&gt;&quot;&quot;;[.J12]&amp;REPT(&quot; &quot;;4-LEN([.J12]));&quot;null&quot;)&#10;&amp;&quot;,&quot;&quot;&quot;&amp;[.K$1]&amp;&quot;&quot;&quot;:&quot;&amp;IF([.K12]&lt;&gt;&quot;&quot;;[.K12]&amp;REPT(&quot; &quot;;4-LEN([.K12]));&quot;null&quot;)&#10;&amp;&quot;,&quot;&quot;&quot;&amp;[.L$1]&amp;&quot;&quot;&quot;:&quot;&amp;IF([.L12]&lt;&gt;&quot;&quot;;[.L12]&amp;REPT(&quot; &quot;;5-LEN([.L12]));&quot;null &quot;)&#10;&amp;&quot;,&quot;&quot;&quot;&amp;[.M$1]&amp;&quot;&quot;&quot;:&quot;&amp;IF([.M12]&lt;&gt;&quot;&quot;;&quot;&quot;&quot;&quot;&amp;[.M12]&amp;&quot;&quot;&quot;&quot;&amp;REPT(&quot; &quot;;20-LEN([.M12]));&quot;null&quot;&amp;REPT(&quot; &quot;;20-4+2))&#10;&amp;&quot;,&quot;&quot;&quot;&amp;[.N$1]&amp;&quot;&quot;&quot;:&quot;&amp;IF([.N12]&lt;&gt;&quot;&quot;;&quot;&quot;&quot;&quot;&amp;[.N12]&amp;&quot;&quot;&quot;&quot;&amp;REPT(&quot; &quot;;30-LEN([.N12]));&quot;null&quot;&amp;REPT(&quot; &quot;;30-4+2))&#10;&amp;&quot;,&quot;&quot;&quot;&amp;[.O$1]&amp;&quot;&quot;&quot;:&quot;&amp;[.O12]&#10;&amp;&quot;,&quot;&quot;&quot;&amp;[.P$1]&amp;&quot;&quot;&quot;:&quot;&amp;[.P12]&#10;&amp;&quot;}}&quot;" office:value-type="string" office:string-value=",&quot;attrs&quot;:{&quot;LogicalId&quot;:&quot;Tendance&quot;            ,&quot;Name&quot;:&quot;Tendance Température&quot;               ,&quot;Order&quot;:16 ,&quot;Type&quot;:&quot;info&quot;  ,&quot;SubType&quot;:&quot;numeric&quot;,&quot;Unite&quot;:null   ,&quot;Config_infoName&quot;:null      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0}}" calcext:value-type="string">
            <text:p>,"attrs":{"LogicalId":"Tendance" <text:s text:c="11"/>,"Name":"Tendance Température" <text:s text:c="14"/>,"Order":16 ,"Type":"info" <text:s/>,"SubType":"numeric","Unite":null <text:s text:c="2"/>,"Config_infoName":null <text:s text:c="16"/>,"Config_value":null <text:s text:c="5"/>,"Config_minValue":null,"Config_maxValue":null,"Config_tempHL":null ,"setValue":null <text:s text:c="17"/>,"Display_param_step":null <text:s text:c="27"/>,"IsHistorized":0,"IsVisible":0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WindowOpened</text:p>
          </table:table-cell>
          <table:table-cell office:value-type="string" calcext:value-type="string">
            <text:p>Fenetre Ouvert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binary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N13])" office:value-type="float" office:value="0" calcext:value-type="float">
            <text:p>0</text:p>
          </table:table-cell>
          <table:table-cell/>
          <table:table-cell table:style-name="ce17" table:formula="of:=&quot;&quot;&amp;IF([.T12]=&quot;&quot;;&quot; &quot;;IF([.A13]&lt;&gt;&quot;&quot;;&quot;,&quot;;&quot;}&quot;)) &amp;IF([.A13]&lt;&gt;&quot;&quot;;&quot;&quot;&quot;&quot;&amp;[.A13]&amp;&quot;&quot;&quot;&quot;&amp;REPT(&quot; &quot;;20-LEN([.A13]));&quot;&quot;)" office:value-type="string" office:string-value=",&quot;WindowOpened&quot;        " calcext:value-type="string">
            <text:p>,"WindowOpened" <text:s text:c="7"/></text:p>
          </table:table-cell>
          <table:table-cell table:style-name="ce17" table:formula="of:=&quot;:&quot; &amp;&quot;{&quot;&quot;&quot;&amp;[.B$1]&amp;&quot;&quot;&quot;:&quot;&quot;&quot;&amp;[.B13]&amp;&quot;&quot;&quot;&quot;&amp;REPT(&quot; &quot;;20-LEN([.B13])) &amp;&quot;,&quot;&quot;&quot;&amp;[.C$1]&amp;&quot;&quot;&quot;:&quot;&quot;&quot;&amp;[.C13]&amp;&quot;&quot;&quot;&quot;&amp;REPT(&quot; &quot;;35-LEN([.C13])) &amp;&quot;,&quot;&quot;&quot;&amp;[.D$1]&amp;&quot;&quot;&quot;:&quot;&amp;[.D13]&amp;REPT(&quot; &quot;;3-LEN([.D13])) &amp;&quot;,&quot;&quot;&quot;&amp;[.E$1]&amp;&quot;&quot;&quot;:&quot;&quot;&quot;&amp;[.E13]&amp;&quot;&quot;&quot;&quot;&amp;REPT(&quot; &quot;;6-LEN([.E13])) &amp;&quot;,&quot;&quot;&quot;&amp;[.F$1]&amp;&quot;&quot;&quot;:&quot;&quot;&quot;&amp;[.F13]&amp;&quot;&quot;&quot;&quot;&amp;REPT(&quot; &quot;;7-LEN([.F13])) &amp;&quot;,&quot;&quot;&quot;&amp;[.G$1]&amp;&quot;&quot;&quot;:&quot;&amp;IF([.G13]&lt;&gt;&quot;&quot;;&quot;&quot;&quot;&quot;&amp;[.G13]&amp;&quot;&quot;&quot;&quot;&amp;REPT(&quot; &quot;;5-LEN([.G13]));&quot;null&quot;&amp;REPT(&quot; &quot;;5-4+2)) &amp;&quot;,&quot;&quot;&quot;&amp;[.H$1]&amp;&quot;&quot;&quot;:&quot;&amp;IF([.H13]&lt;&gt;&quot;&quot;;&quot;&quot;&quot;&quot;&amp;[.H13]&amp;&quot;&quot;&quot;&quot;&amp;REPT(&quot; &quot;;19-LEN([.H13]));&quot;null&quot;&amp;REPT(&quot; &quot;;19-4+2)) &amp;&quot;,&quot;&quot;&quot;&amp;[.I$1]&amp;&quot;&quot;&quot;:&quot;&amp;IF([.I13]&lt;&gt;&quot;&quot;;&quot;&quot;&quot;&quot;&amp;[.I13]&amp;&quot;&quot;&quot;&quot;&amp;REPT(&quot; &quot;;8-LEN([.I13]));&quot;null&quot;&amp;REPT(&quot; &quot;;8-4+2)) &amp;&quot;,&quot;&quot;&quot;&amp;[.J$1]&amp;&quot;&quot;&quot;:&quot;&amp;IF([.J13]&lt;&gt;&quot;&quot;;[.J13]&amp;REPT(&quot; &quot;;4-LEN([.J13]));&quot;null&quot;) &amp;&quot;,&quot;&quot;&quot;&amp;[.K$1]&amp;&quot;&quot;&quot;:&quot;&amp;IF([.K13]&lt;&gt;&quot;&quot;;[.K13]&amp;REPT(&quot; &quot;;4-LEN([.K13]));&quot;null&quot;) &amp;&quot;,&quot;&quot;&quot;&amp;[.L$1]&amp;&quot;&quot;&quot;:&quot;&amp;IF([.L13]&lt;&gt;&quot;&quot;;[.L13]&amp;REPT(&quot; &quot;;5-LEN([.L13]));&quot;null &quot;) &amp;&quot;,&quot;&quot;&quot;&amp;[.M$1]&amp;&quot;&quot;&quot;:&quot;&amp;IF([.M13]&lt;&gt;&quot;&quot;;&quot;&quot;&quot;&quot;&amp;[.M13]&amp;&quot;&quot;&quot;&quot;&amp;REPT(&quot; &quot;;20-LEN([.M13]));&quot;null&quot;&amp;REPT(&quot; &quot;;20-4+2)) &amp;&quot;,&quot;&quot;&quot;&amp;[.N$1]&amp;&quot;&quot;&quot;:&quot;&amp;IF([.N13]&lt;&gt;&quot;&quot;;&quot;&quot;&amp;[.N13]&amp;&quot;&quot;&amp;REPT(&quot; &quot;;5-LEN([.N13]));&quot;null&quot;&amp;REPT(&quot; &quot;;5-4+2)) &amp;&quot;,&quot;&quot;&quot;&amp;[.O$1]&amp;&quot;&quot;&quot;:&quot;&amp;[.O13] &amp;&quot;,&quot;&quot;&quot;&amp;[.P$1]&amp;&quot;&quot;&quot;:&quot;&amp;[.P13] &amp;&quot;}&quot;" office:value-type="string" office:string-value=":{&quot;LogicalId&quot;:&quot;WindowOpened&quot;        ,&quot;Name&quot;:&quot;Fenetre Ouverte&quot;                    ,&quot;Order&quot;:17 ,&quot;Type&quot;:&quot;info&quot;  ,&quot;SubType&quot;:&quot;binary&quot; ,&quot;Unite&quot;:null   ,&quot;Config_infoName&quot;:null                 ,&quot;Config_value&quot;:null      ,&quot;Config_minValue&quot;:null,&quot;Config_maxValue&quot;:null,&quot;Config_tempHL&quot;:null ,&quot;setValue&quot;:null                  ,&quot;Display_param_step&quot;:null   ,&quot;IsHistorized&quot;:0,&quot;IsVisible&quot;:1}" calcext:value-type="string">
            <text:p>:{"LogicalId":"WindowOpened" <text:s text:c="7"/>,"Name":"Fenetre Ouverte" <text:s text:c="19"/>,"Order":17 ,"Type":"info" <text:s/>,"SubType":"binary" ,"Unite":null <text:s text:c="2"/>,"Config_infoName":null <text:s text:c="16"/>,"Config_value":null <text:s text:c="5"/>,"Config_minValue":null,"Config_maxValue":null,"Config_tempHL":null ,"setValue":null <text:s text:c="17"/>,"Display_param_step":null <text:s text:c="2"/>,"IsHistorized":0,"IsVisible":1}</text:p>
          </table:table-cell>
          <table:table-cell table:style-name="ce15" office:value-type="string" calcext:value-type="string">
            <text:p>.</text:p>
          </table:table-cell>
          <table:table-cell table:style-name="ce14"/>
          <table:table-cell table:style-name="ce17" table:formula="of:=IF([.W12]=&quot;&quot;;&quot; &quot;;IF([.B13]&lt;&gt;&quot;&quot;;&quot;,&quot;;&quot;]&quot;))&#10;&amp;IF([.B13]&lt;&gt;&quot;&quot;;&quot;{&quot;&quot;cmd&quot;&quot;:&quot;&quot;&quot;&amp;[.B13]&amp;&quot;&quot;&quot;&quot;&amp;REPT(&quot; &quot;;20-LEN([.B13]));&quot;&quot;)" office:value-type="string" office:string-value=",{&quot;cmd&quot;:&quot;WindowOpened&quot;        " calcext:value-type="string">
            <text:p>,{"cmd":"WindowOpened" <text:s text:c="7"/></text:p>
          </table:table-cell>
          <table:table-cell table:style-name="ce17" table:formula="of:=&quot;,&quot;&quot;attrs&quot;&quot;:&quot;&#10;&amp;&quot;{&quot;&quot;&quot;&amp;[.B$1]&amp;&quot;&quot;&quot;:&quot;&quot;&quot;&amp;[.B13]&amp;&quot;&quot;&quot;&quot;&amp;REPT(&quot; &quot;;20-LEN([.B13]))&#10;&amp;&quot;,&quot;&quot;&quot;&amp;[.C$1]&amp;&quot;&quot;&quot;:&quot;&quot;&quot;&amp;[.C13]&amp;&quot;&quot;&quot;&quot;&amp;REPT(&quot; &quot;;35-LEN([.C13]))&#10;&amp;&quot;,&quot;&quot;&quot;&amp;[.D$1]&amp;&quot;&quot;&quot;:&quot;&amp;[.D13]&amp;REPT(&quot; &quot;;3-LEN([.D13]))&#10;&amp;&quot;,&quot;&quot;&quot;&amp;[.E$1]&amp;&quot;&quot;&quot;:&quot;&quot;&quot;&amp;[.E13]&amp;&quot;&quot;&quot;&quot;&amp;REPT(&quot; &quot;;6-LEN([.E13]))&#10;&amp;&quot;,&quot;&quot;&quot;&amp;[.F$1]&amp;&quot;&quot;&quot;:&quot;&quot;&quot;&amp;[.F13]&amp;&quot;&quot;&quot;&quot;&amp;REPT(&quot; &quot;;7-LEN([.F13]))&#10;&amp;&quot;,&quot;&quot;&quot;&amp;[.G$1]&amp;&quot;&quot;&quot;:&quot;&amp;IF([.G13]&lt;&gt;&quot;&quot;;&quot;&quot;&quot;&quot;&amp;[.G13]&amp;&quot;&quot;&quot;&quot;&amp;REPT(&quot; &quot;;5-LEN([.G13]));&quot;null&quot;&amp;REPT(&quot; &quot;;5-4+2))&#10;&amp;&quot;,&quot;&quot;&quot;&amp;[.H$1]&amp;&quot;&quot;&quot;:&quot;&amp;IF([.H13]&lt;&gt;&quot;&quot;;&quot;&quot;&quot;&quot;&amp;[.H13]&amp;&quot;&quot;&quot;&quot;&amp;REPT(&quot; &quot;;19-LEN([.H13]));&quot;null&quot;&amp;REPT(&quot; &quot;;19-4+2))&#10;&amp;&quot;,&quot;&quot;&quot;&amp;[.I$1]&amp;&quot;&quot;&quot;:&quot;&amp;IF([.I13]&lt;&gt;&quot;&quot;;&quot;&quot;&quot;&quot;&amp;[.I13]&amp;&quot;&quot;&quot;&quot;&amp;REPT(&quot; &quot;;8-LEN([.I13]));&quot;null&quot;&amp;REPT(&quot; &quot;;8-4+2))&#10;&amp;&quot;,&quot;&quot;&quot;&amp;[.J$1]&amp;&quot;&quot;&quot;:&quot;&amp;IF([.J13]&lt;&gt;&quot;&quot;;[.J13]&amp;REPT(&quot; &quot;;4-LEN([.J13]));&quot;null&quot;)&#10;&amp;&quot;,&quot;&quot;&quot;&amp;[.K$1]&amp;&quot;&quot;&quot;:&quot;&amp;IF([.K13]&lt;&gt;&quot;&quot;;[.K13]&amp;REPT(&quot; &quot;;4-LEN([.K13]));&quot;null&quot;)&#10;&amp;&quot;,&quot;&quot;&quot;&amp;[.L$1]&amp;&quot;&quot;&quot;:&quot;&amp;IF([.L13]&lt;&gt;&quot;&quot;;[.L13]&amp;REPT(&quot; &quot;;5-LEN([.L13]));&quot;null &quot;)&#10;&amp;&quot;,&quot;&quot;&quot;&amp;[.M$1]&amp;&quot;&quot;&quot;:&quot;&amp;IF([.M13]&lt;&gt;&quot;&quot;;&quot;&quot;&quot;&quot;&amp;[.M13]&amp;&quot;&quot;&quot;&quot;&amp;REPT(&quot; &quot;;20-LEN([.M13]));&quot;null&quot;&amp;REPT(&quot; &quot;;20-4+2))&#10;&amp;&quot;,&quot;&quot;&quot;&amp;[.N$1]&amp;&quot;&quot;&quot;:&quot;&amp;IF([.N13]&lt;&gt;&quot;&quot;;&quot;&quot;&quot;&quot;&amp;[.N13]&amp;&quot;&quot;&quot;&quot;&amp;REPT(&quot; &quot;;30-LEN([.N13]));&quot;null&quot;&amp;REPT(&quot; &quot;;30-4+2))&#10;&amp;&quot;,&quot;&quot;&quot;&amp;[.O$1]&amp;&quot;&quot;&quot;:&quot;&amp;[.O13]&#10;&amp;&quot;,&quot;&quot;&quot;&amp;[.P$1]&amp;&quot;&quot;&quot;:&quot;&amp;[.P13]&#10;&amp;&quot;}}&quot;" office:value-type="string" office:string-value=",&quot;attrs&quot;:{&quot;LogicalId&quot;:&quot;WindowOpened&quot;        ,&quot;Name&quot;:&quot;Fenetre Ouverte&quot;                    ,&quot;Order&quot;:17 ,&quot;Type&quot;:&quot;info&quot;  ,&quot;SubType&quot;:&quot;binary&quot; ,&quot;Unite&quot;:null   ,&quot;Config_infoName&quot;:null      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WindowOpened" <text:s text:c="7"/>,"Name":"Fenetre Ouverte" <text:s text:c="19"/>,"Order":17 ,"Type":"info" <text:s/>,"SubType":"binary" ,"Unite":null <text:s text:c="2"/>,"Config_infoName":null <text:s text:c="16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tatConsigne</text:p>
          </table:table-cell>
          <table:table-cell office:value-type="string" calcext:value-type="string">
            <text:p>Etat Consign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numeric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N14])" office:value-type="float" office:value="0" calcext:value-type="float">
            <text:p>0</text:p>
          </table:table-cell>
          <table:table-cell/>
          <table:table-cell table:style-name="ce17" table:formula="of:=&quot;&quot;&amp;IF([.T13]=&quot;&quot;;&quot; &quot;;IF([.A14]&lt;&gt;&quot;&quot;;&quot;,&quot;;&quot;}&quot;)) &amp;IF([.A14]&lt;&gt;&quot;&quot;;&quot;&quot;&quot;&quot;&amp;[.A14]&amp;&quot;&quot;&quot;&quot;&amp;REPT(&quot; &quot;;20-LEN([.A14]));&quot;&quot;)" office:value-type="string" office:string-value=",&quot;EtatConsigne&quot;        " calcext:value-type="string">
            <text:p>,"EtatConsigne" <text:s text:c="7"/></text:p>
          </table:table-cell>
          <table:table-cell table:style-name="ce17" table:formula="of:=&quot;:&quot; &amp;&quot;{&quot;&quot;&quot;&amp;[.B$1]&amp;&quot;&quot;&quot;:&quot;&quot;&quot;&amp;[.B14]&amp;&quot;&quot;&quot;&quot;&amp;REPT(&quot; &quot;;20-LEN([.B14])) &amp;&quot;,&quot;&quot;&quot;&amp;[.C$1]&amp;&quot;&quot;&quot;:&quot;&quot;&quot;&amp;[.C14]&amp;&quot;&quot;&quot;&quot;&amp;REPT(&quot; &quot;;35-LEN([.C14])) &amp;&quot;,&quot;&quot;&quot;&amp;[.D$1]&amp;&quot;&quot;&quot;:&quot;&amp;[.D14]&amp;REPT(&quot; &quot;;3-LEN([.D14])) &amp;&quot;,&quot;&quot;&quot;&amp;[.E$1]&amp;&quot;&quot;&quot;:&quot;&quot;&quot;&amp;[.E14]&amp;&quot;&quot;&quot;&quot;&amp;REPT(&quot; &quot;;6-LEN([.E14])) &amp;&quot;,&quot;&quot;&quot;&amp;[.F$1]&amp;&quot;&quot;&quot;:&quot;&quot;&quot;&amp;[.F14]&amp;&quot;&quot;&quot;&quot;&amp;REPT(&quot; &quot;;7-LEN([.F14])) &amp;&quot;,&quot;&quot;&quot;&amp;[.G$1]&amp;&quot;&quot;&quot;:&quot;&amp;IF([.G14]&lt;&gt;&quot;&quot;;&quot;&quot;&quot;&quot;&amp;[.G14]&amp;&quot;&quot;&quot;&quot;&amp;REPT(&quot; &quot;;5-LEN([.G14]));&quot;null&quot;&amp;REPT(&quot; &quot;;5-4+2)) &amp;&quot;,&quot;&quot;&quot;&amp;[.H$1]&amp;&quot;&quot;&quot;:&quot;&amp;IF([.H14]&lt;&gt;&quot;&quot;;&quot;&quot;&quot;&quot;&amp;[.H14]&amp;&quot;&quot;&quot;&quot;&amp;REPT(&quot; &quot;;19-LEN([.H14]));&quot;null&quot;&amp;REPT(&quot; &quot;;19-4+2)) &amp;&quot;,&quot;&quot;&quot;&amp;[.I$1]&amp;&quot;&quot;&quot;:&quot;&amp;IF([.I14]&lt;&gt;&quot;&quot;;&quot;&quot;&quot;&quot;&amp;[.I14]&amp;&quot;&quot;&quot;&quot;&amp;REPT(&quot; &quot;;8-LEN([.I14]));&quot;null&quot;&amp;REPT(&quot; &quot;;8-4+2)) &amp;&quot;,&quot;&quot;&quot;&amp;[.J$1]&amp;&quot;&quot;&quot;:&quot;&amp;IF([.J14]&lt;&gt;&quot;&quot;;[.J14]&amp;REPT(&quot; &quot;;4-LEN([.J14]));&quot;null&quot;) &amp;&quot;,&quot;&quot;&quot;&amp;[.K$1]&amp;&quot;&quot;&quot;:&quot;&amp;IF([.K14]&lt;&gt;&quot;&quot;;[.K14]&amp;REPT(&quot; &quot;;4-LEN([.K14]));&quot;null&quot;) &amp;&quot;,&quot;&quot;&quot;&amp;[.L$1]&amp;&quot;&quot;&quot;:&quot;&amp;IF([.L14]&lt;&gt;&quot;&quot;;[.L14]&amp;REPT(&quot; &quot;;5-LEN([.L14]));&quot;null &quot;) &amp;&quot;,&quot;&quot;&quot;&amp;[.M$1]&amp;&quot;&quot;&quot;:&quot;&amp;IF([.M14]&lt;&gt;&quot;&quot;;&quot;&quot;&quot;&quot;&amp;[.M14]&amp;&quot;&quot;&quot;&quot;&amp;REPT(&quot; &quot;;20-LEN([.M14]));&quot;null&quot;&amp;REPT(&quot; &quot;;20-4+2)) &amp;&quot;,&quot;&quot;&quot;&amp;[.N$1]&amp;&quot;&quot;&quot;:&quot;&amp;IF([.N14]&lt;&gt;&quot;&quot;;&quot;&quot;&amp;[.N14]&amp;&quot;&quot;&amp;REPT(&quot; &quot;;5-LEN([.N14]));&quot;null&quot;&amp;REPT(&quot; &quot;;5-4+2)) &amp;&quot;,&quot;&quot;&quot;&amp;[.O$1]&amp;&quot;&quot;&quot;:&quot;&amp;[.O14] &amp;&quot;,&quot;&quot;&quot;&amp;[.P$1]&amp;&quot;&quot;&quot;:&quot;&amp;[.P14] &amp;&quot;}&quot;" office:value-type="string" office:string-value=":{&quot;LogicalId&quot;:&quot;EtatConsigne&quot;        ,&quot;Name&quot;:&quot;Etat Consigne&quot;                      ,&quot;Order&quot;:20 ,&quot;Type&quot;:&quot;info&quot;  ,&quot;SubType&quot;:&quot;numeric&quot;,&quot;Unite&quot;:null   ,&quot;Config_infoName&quot;:null                 ,&quot;Config_value&quot;:null      ,&quot;Config_minValue&quot;:null,&quot;Config_maxValue&quot;:null,&quot;Config_tempHL&quot;:null ,&quot;setValue&quot;:null                  ,&quot;Display_param_step&quot;:null   ,&quot;IsHistorized&quot;:0,&quot;IsVisible&quot;:1}" calcext:value-type="string">
            <text:p>:{"LogicalId":"EtatConsigne" <text:s text:c="7"/>,"Name":"Etat Consigne" <text:s text:c="21"/>,"Order":20 ,"Type":"info" <text:s/>,"SubType":"numeric","Unite":null <text:s text:c="2"/>,"Config_infoName":null <text:s text:c="16"/>,"Config_value":null <text:s text:c="5"/>,"Config_minValue":null,"Config_maxValue":null,"Config_tempHL":null ,"setValue":null <text:s text:c="17"/>,"Display_param_step":null <text:s text:c="2"/>,"IsHistorized":0,"IsVisible":1}</text:p>
          </table:table-cell>
          <table:table-cell table:style-name="ce15" office:value-type="string" calcext:value-type="string">
            <text:p>.</text:p>
          </table:table-cell>
          <table:table-cell table:style-name="ce14"/>
          <table:table-cell table:style-name="ce17" table:formula="of:=IF([.W13]=&quot;&quot;;&quot; &quot;;IF([.B14]&lt;&gt;&quot;&quot;;&quot;,&quot;;&quot;]&quot;))&#10;&amp;IF([.B14]&lt;&gt;&quot;&quot;;&quot;{&quot;&quot;cmd&quot;&quot;:&quot;&quot;&quot;&amp;[.B14]&amp;&quot;&quot;&quot;&quot;&amp;REPT(&quot; &quot;;20-LEN([.B14]));&quot;&quot;)" office:value-type="string" office:string-value=",{&quot;cmd&quot;:&quot;EtatConsigne&quot;        " calcext:value-type="string">
            <text:p>,{"cmd":"EtatConsigne" <text:s text:c="7"/></text:p>
          </table:table-cell>
          <table:table-cell table:style-name="ce17" table:formula="of:=&quot;,&quot;&quot;attrs&quot;&quot;:&quot;&#10;&amp;&quot;{&quot;&quot;&quot;&amp;[.B$1]&amp;&quot;&quot;&quot;:&quot;&quot;&quot;&amp;[.B14]&amp;&quot;&quot;&quot;&quot;&amp;REPT(&quot; &quot;;20-LEN([.B14]))&#10;&amp;&quot;,&quot;&quot;&quot;&amp;[.C$1]&amp;&quot;&quot;&quot;:&quot;&quot;&quot;&amp;[.C14]&amp;&quot;&quot;&quot;&quot;&amp;REPT(&quot; &quot;;35-LEN([.C14]))&#10;&amp;&quot;,&quot;&quot;&quot;&amp;[.D$1]&amp;&quot;&quot;&quot;:&quot;&amp;[.D14]&amp;REPT(&quot; &quot;;3-LEN([.D14]))&#10;&amp;&quot;,&quot;&quot;&quot;&amp;[.E$1]&amp;&quot;&quot;&quot;:&quot;&quot;&quot;&amp;[.E14]&amp;&quot;&quot;&quot;&quot;&amp;REPT(&quot; &quot;;6-LEN([.E14]))&#10;&amp;&quot;,&quot;&quot;&quot;&amp;[.F$1]&amp;&quot;&quot;&quot;:&quot;&quot;&quot;&amp;[.F14]&amp;&quot;&quot;&quot;&quot;&amp;REPT(&quot; &quot;;7-LEN([.F14]))&#10;&amp;&quot;,&quot;&quot;&quot;&amp;[.G$1]&amp;&quot;&quot;&quot;:&quot;&amp;IF([.G14]&lt;&gt;&quot;&quot;;&quot;&quot;&quot;&quot;&amp;[.G14]&amp;&quot;&quot;&quot;&quot;&amp;REPT(&quot; &quot;;5-LEN([.G14]));&quot;null&quot;&amp;REPT(&quot; &quot;;5-4+2))&#10;&amp;&quot;,&quot;&quot;&quot;&amp;[.H$1]&amp;&quot;&quot;&quot;:&quot;&amp;IF([.H14]&lt;&gt;&quot;&quot;;&quot;&quot;&quot;&quot;&amp;[.H14]&amp;&quot;&quot;&quot;&quot;&amp;REPT(&quot; &quot;;19-LEN([.H14]));&quot;null&quot;&amp;REPT(&quot; &quot;;19-4+2))&#10;&amp;&quot;,&quot;&quot;&quot;&amp;[.I$1]&amp;&quot;&quot;&quot;:&quot;&amp;IF([.I14]&lt;&gt;&quot;&quot;;&quot;&quot;&quot;&quot;&amp;[.I14]&amp;&quot;&quot;&quot;&quot;&amp;REPT(&quot; &quot;;8-LEN([.I14]));&quot;null&quot;&amp;REPT(&quot; &quot;;8-4+2))&#10;&amp;&quot;,&quot;&quot;&quot;&amp;[.J$1]&amp;&quot;&quot;&quot;:&quot;&amp;IF([.J14]&lt;&gt;&quot;&quot;;[.J14]&amp;REPT(&quot; &quot;;4-LEN([.J14]));&quot;null&quot;)&#10;&amp;&quot;,&quot;&quot;&quot;&amp;[.K$1]&amp;&quot;&quot;&quot;:&quot;&amp;IF([.K14]&lt;&gt;&quot;&quot;;[.K14]&amp;REPT(&quot; &quot;;4-LEN([.K14]));&quot;null&quot;)&#10;&amp;&quot;,&quot;&quot;&quot;&amp;[.L$1]&amp;&quot;&quot;&quot;:&quot;&amp;IF([.L14]&lt;&gt;&quot;&quot;;[.L14]&amp;REPT(&quot; &quot;;5-LEN([.L14]));&quot;null &quot;)&#10;&amp;&quot;,&quot;&quot;&quot;&amp;[.M$1]&amp;&quot;&quot;&quot;:&quot;&amp;IF([.M14]&lt;&gt;&quot;&quot;;&quot;&quot;&quot;&quot;&amp;[.M14]&amp;&quot;&quot;&quot;&quot;&amp;REPT(&quot; &quot;;20-LEN([.M14]));&quot;null&quot;&amp;REPT(&quot; &quot;;20-4+2))&#10;&amp;&quot;,&quot;&quot;&quot;&amp;[.N$1]&amp;&quot;&quot;&quot;:&quot;&amp;IF([.N14]&lt;&gt;&quot;&quot;;&quot;&quot;&quot;&quot;&amp;[.N14]&amp;&quot;&quot;&quot;&quot;&amp;REPT(&quot; &quot;;30-LEN([.N14]));&quot;null&quot;&amp;REPT(&quot; &quot;;30-4+2))&#10;&amp;&quot;,&quot;&quot;&quot;&amp;[.O$1]&amp;&quot;&quot;&quot;:&quot;&amp;[.O14]&#10;&amp;&quot;,&quot;&quot;&quot;&amp;[.P$1]&amp;&quot;&quot;&quot;:&quot;&amp;[.P14]&#10;&amp;&quot;}}&quot;" office:value-type="string" office:string-value=",&quot;attrs&quot;:{&quot;LogicalId&quot;:&quot;EtatConsigne&quot;        ,&quot;Name&quot;:&quot;Etat Consigne&quot;                      ,&quot;Order&quot;:20 ,&quot;Type&quot;:&quot;info&quot;  ,&quot;SubType&quot;:&quot;numeric&quot;,&quot;Unite&quot;:null   ,&quot;Config_infoName&quot;:null      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EtatConsigne" <text:s text:c="7"/>,"Name":"Etat Consigne" <text:s text:c="21"/>,"Order":20 ,"Type":"info" <text:s/>,"SubType":"numeric","Unite":null <text:s text:c="2"/>,"Config_infoName":null <text:s text:c="16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ode</text:p>
          </table:table-cell>
          <table:table-cell office:value-type="string" calcext:value-type="string">
            <text:p>Mode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string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N15])" office:value-type="float" office:value="0" calcext:value-type="float">
            <text:p>0</text:p>
          </table:table-cell>
          <table:table-cell/>
          <table:table-cell table:style-name="ce17" table:formula="of:=&quot;&quot;&amp;IF([.T14]=&quot;&quot;;&quot; &quot;;IF([.A15]&lt;&gt;&quot;&quot;;&quot;,&quot;;&quot;}&quot;)) &amp;IF([.A15]&lt;&gt;&quot;&quot;;&quot;&quot;&quot;&quot;&amp;[.A15]&amp;&quot;&quot;&quot;&quot;&amp;REPT(&quot; &quot;;20-LEN([.A15]));&quot;&quot;)" office:value-type="string" office:string-value=",&quot;mode&quot;                " calcext:value-type="string">
            <text:p>,"mode" <text:s text:c="15"/></text:p>
          </table:table-cell>
          <table:table-cell table:style-name="ce17" table:formula="of:=&quot;:&quot; &amp;&quot;{&quot;&quot;&quot;&amp;[.B$1]&amp;&quot;&quot;&quot;:&quot;&quot;&quot;&amp;[.B15]&amp;&quot;&quot;&quot;&quot;&amp;REPT(&quot; &quot;;20-LEN([.B15])) &amp;&quot;,&quot;&quot;&quot;&amp;[.C$1]&amp;&quot;&quot;&quot;:&quot;&quot;&quot;&amp;[.C15]&amp;&quot;&quot;&quot;&quot;&amp;REPT(&quot; &quot;;35-LEN([.C15])) &amp;&quot;,&quot;&quot;&quot;&amp;[.D$1]&amp;&quot;&quot;&quot;:&quot;&amp;[.D15]&amp;REPT(&quot; &quot;;3-LEN([.D15])) &amp;&quot;,&quot;&quot;&quot;&amp;[.E$1]&amp;&quot;&quot;&quot;:&quot;&quot;&quot;&amp;[.E15]&amp;&quot;&quot;&quot;&quot;&amp;REPT(&quot; &quot;;6-LEN([.E15])) &amp;&quot;,&quot;&quot;&quot;&amp;[.F$1]&amp;&quot;&quot;&quot;:&quot;&quot;&quot;&amp;[.F15]&amp;&quot;&quot;&quot;&quot;&amp;REPT(&quot; &quot;;7-LEN([.F15])) &amp;&quot;,&quot;&quot;&quot;&amp;[.G$1]&amp;&quot;&quot;&quot;:&quot;&amp;IF([.G15]&lt;&gt;&quot;&quot;;&quot;&quot;&quot;&quot;&amp;[.G15]&amp;&quot;&quot;&quot;&quot;&amp;REPT(&quot; &quot;;5-LEN([.G15]));&quot;null&quot;&amp;REPT(&quot; &quot;;5-4+2)) &amp;&quot;,&quot;&quot;&quot;&amp;[.H$1]&amp;&quot;&quot;&quot;:&quot;&amp;IF([.H15]&lt;&gt;&quot;&quot;;&quot;&quot;&quot;&quot;&amp;[.H15]&amp;&quot;&quot;&quot;&quot;&amp;REPT(&quot; &quot;;19-LEN([.H15]));&quot;null&quot;&amp;REPT(&quot; &quot;;19-4+2)) &amp;&quot;,&quot;&quot;&quot;&amp;[.I$1]&amp;&quot;&quot;&quot;:&quot;&amp;IF([.I15]&lt;&gt;&quot;&quot;;&quot;&quot;&quot;&quot;&amp;[.I15]&amp;&quot;&quot;&quot;&quot;&amp;REPT(&quot; &quot;;8-LEN([.I15]));&quot;null&quot;&amp;REPT(&quot; &quot;;8-4+2)) &amp;&quot;,&quot;&quot;&quot;&amp;[.J$1]&amp;&quot;&quot;&quot;:&quot;&amp;IF([.J15]&lt;&gt;&quot;&quot;;[.J15]&amp;REPT(&quot; &quot;;4-LEN([.J15]));&quot;null&quot;) &amp;&quot;,&quot;&quot;&quot;&amp;[.K$1]&amp;&quot;&quot;&quot;:&quot;&amp;IF([.K15]&lt;&gt;&quot;&quot;;[.K15]&amp;REPT(&quot; &quot;;4-LEN([.K15]));&quot;null&quot;) &amp;&quot;,&quot;&quot;&quot;&amp;[.L$1]&amp;&quot;&quot;&quot;:&quot;&amp;IF([.L15]&lt;&gt;&quot;&quot;;[.L15]&amp;REPT(&quot; &quot;;5-LEN([.L15]));&quot;null &quot;) &amp;&quot;,&quot;&quot;&quot;&amp;[.M$1]&amp;&quot;&quot;&quot;:&quot;&amp;IF([.M15]&lt;&gt;&quot;&quot;;&quot;&quot;&quot;&quot;&amp;[.M15]&amp;&quot;&quot;&quot;&quot;&amp;REPT(&quot; &quot;;20-LEN([.M15]));&quot;null&quot;&amp;REPT(&quot; &quot;;20-4+2)) &amp;&quot;,&quot;&quot;&quot;&amp;[.N$1]&amp;&quot;&quot;&quot;:&quot;&amp;IF([.N15]&lt;&gt;&quot;&quot;;&quot;&quot;&amp;[.N15]&amp;&quot;&quot;&amp;REPT(&quot; &quot;;5-LEN([.N15]));&quot;null&quot;&amp;REPT(&quot; &quot;;5-4+2)) &amp;&quot;,&quot;&quot;&quot;&amp;[.O$1]&amp;&quot;&quot;&quot;:&quot;&amp;[.O15] &amp;&quot;,&quot;&quot;&quot;&amp;[.P$1]&amp;&quot;&quot;&quot;:&quot;&amp;[.P15] &amp;&quot;}&quot;" office:value-type="string" office:string-value=":{&quot;LogicalId&quot;:&quot;mode&quot;                ,&quot;Name&quot;:&quot;Mode&quot;                               ,&quot;Order&quot;:21 ,&quot;Type&quot;:&quot;info&quot;  ,&quot;SubType&quot;:&quot;string&quot; ,&quot;Unite&quot;:null   ,&quot;Config_infoName&quot;:null                 ,&quot;Config_value&quot;:null      ,&quot;Config_minValue&quot;:null,&quot;Config_maxValue&quot;:null,&quot;Config_tempHL&quot;:null ,&quot;setValue&quot;:null                  ,&quot;Display_param_step&quot;:null   ,&quot;IsHistorized&quot;:0,&quot;IsVisible&quot;:1}" calcext:value-type="string">
            <text:p>:{"LogicalId":"mode" <text:s text:c="15"/>,"Name":"Mode" <text:s text:c="30"/>,"Order":21 ,"Type":"info" <text:s/>,"SubType":"string" ,"Unite":null <text:s text:c="2"/>,"Config_infoName":null <text:s text:c="16"/>,"Config_value":null <text:s text:c="5"/>,"Config_minValue":null,"Config_maxValue":null,"Config_tempHL":null ,"setValue":null <text:s text:c="17"/>,"Display_param_step":null <text:s text:c="2"/>,"IsHistorized":0,"IsVisible":1}</text:p>
          </table:table-cell>
          <table:table-cell table:style-name="ce15" office:value-type="string" calcext:value-type="string">
            <text:p>.</text:p>
          </table:table-cell>
          <table:table-cell table:style-name="ce14"/>
          <table:table-cell table:style-name="ce17" table:formula="of:=IF([.W14]=&quot;&quot;;&quot; &quot;;IF([.B15]&lt;&gt;&quot;&quot;;&quot;,&quot;;&quot;]&quot;))&#10;&amp;IF([.B15]&lt;&gt;&quot;&quot;;&quot;{&quot;&quot;cmd&quot;&quot;:&quot;&quot;&quot;&amp;[.B15]&amp;&quot;&quot;&quot;&quot;&amp;REPT(&quot; &quot;;20-LEN([.B15]));&quot;&quot;)" office:value-type="string" office:string-value=",{&quot;cmd&quot;:&quot;mode&quot;                " calcext:value-type="string">
            <text:p>,{"cmd":"mode" <text:s text:c="15"/></text:p>
          </table:table-cell>
          <table:table-cell table:style-name="ce17" table:formula="of:=&quot;,&quot;&quot;attrs&quot;&quot;:&quot;&#10;&amp;&quot;{&quot;&quot;&quot;&amp;[.B$1]&amp;&quot;&quot;&quot;:&quot;&quot;&quot;&amp;[.B15]&amp;&quot;&quot;&quot;&quot;&amp;REPT(&quot; &quot;;20-LEN([.B15]))&#10;&amp;&quot;,&quot;&quot;&quot;&amp;[.C$1]&amp;&quot;&quot;&quot;:&quot;&quot;&quot;&amp;[.C15]&amp;&quot;&quot;&quot;&quot;&amp;REPT(&quot; &quot;;35-LEN([.C15]))&#10;&amp;&quot;,&quot;&quot;&quot;&amp;[.D$1]&amp;&quot;&quot;&quot;:&quot;&amp;[.D15]&amp;REPT(&quot; &quot;;3-LEN([.D15]))&#10;&amp;&quot;,&quot;&quot;&quot;&amp;[.E$1]&amp;&quot;&quot;&quot;:&quot;&quot;&quot;&amp;[.E15]&amp;&quot;&quot;&quot;&quot;&amp;REPT(&quot; &quot;;6-LEN([.E15]))&#10;&amp;&quot;,&quot;&quot;&quot;&amp;[.F$1]&amp;&quot;&quot;&quot;:&quot;&quot;&quot;&amp;[.F15]&amp;&quot;&quot;&quot;&quot;&amp;REPT(&quot; &quot;;7-LEN([.F15]))&#10;&amp;&quot;,&quot;&quot;&quot;&amp;[.G$1]&amp;&quot;&quot;&quot;:&quot;&amp;IF([.G15]&lt;&gt;&quot;&quot;;&quot;&quot;&quot;&quot;&amp;[.G15]&amp;&quot;&quot;&quot;&quot;&amp;REPT(&quot; &quot;;5-LEN([.G15]));&quot;null&quot;&amp;REPT(&quot; &quot;;5-4+2))&#10;&amp;&quot;,&quot;&quot;&quot;&amp;[.H$1]&amp;&quot;&quot;&quot;:&quot;&amp;IF([.H15]&lt;&gt;&quot;&quot;;&quot;&quot;&quot;&quot;&amp;[.H15]&amp;&quot;&quot;&quot;&quot;&amp;REPT(&quot; &quot;;19-LEN([.H15]));&quot;null&quot;&amp;REPT(&quot; &quot;;19-4+2))&#10;&amp;&quot;,&quot;&quot;&quot;&amp;[.I$1]&amp;&quot;&quot;&quot;:&quot;&amp;IF([.I15]&lt;&gt;&quot;&quot;;&quot;&quot;&quot;&quot;&amp;[.I15]&amp;&quot;&quot;&quot;&quot;&amp;REPT(&quot; &quot;;8-LEN([.I15]));&quot;null&quot;&amp;REPT(&quot; &quot;;8-4+2))&#10;&amp;&quot;,&quot;&quot;&quot;&amp;[.J$1]&amp;&quot;&quot;&quot;:&quot;&amp;IF([.J15]&lt;&gt;&quot;&quot;;[.J15]&amp;REPT(&quot; &quot;;4-LEN([.J15]));&quot;null&quot;)&#10;&amp;&quot;,&quot;&quot;&quot;&amp;[.K$1]&amp;&quot;&quot;&quot;:&quot;&amp;IF([.K15]&lt;&gt;&quot;&quot;;[.K15]&amp;REPT(&quot; &quot;;4-LEN([.K15]));&quot;null&quot;)&#10;&amp;&quot;,&quot;&quot;&quot;&amp;[.L$1]&amp;&quot;&quot;&quot;:&quot;&amp;IF([.L15]&lt;&gt;&quot;&quot;;[.L15]&amp;REPT(&quot; &quot;;5-LEN([.L15]));&quot;null &quot;)&#10;&amp;&quot;,&quot;&quot;&quot;&amp;[.M$1]&amp;&quot;&quot;&quot;:&quot;&amp;IF([.M15]&lt;&gt;&quot;&quot;;&quot;&quot;&quot;&quot;&amp;[.M15]&amp;&quot;&quot;&quot;&quot;&amp;REPT(&quot; &quot;;20-LEN([.M15]));&quot;null&quot;&amp;REPT(&quot; &quot;;20-4+2))&#10;&amp;&quot;,&quot;&quot;&quot;&amp;[.N$1]&amp;&quot;&quot;&quot;:&quot;&amp;IF([.N15]&lt;&gt;&quot;&quot;;&quot;&quot;&quot;&quot;&amp;[.N15]&amp;&quot;&quot;&quot;&quot;&amp;REPT(&quot; &quot;;30-LEN([.N15]));&quot;null&quot;&amp;REPT(&quot; &quot;;30-4+2))&#10;&amp;&quot;,&quot;&quot;&quot;&amp;[.O$1]&amp;&quot;&quot;&quot;:&quot;&amp;[.O15]&#10;&amp;&quot;,&quot;&quot;&quot;&amp;[.P$1]&amp;&quot;&quot;&quot;:&quot;&amp;[.P15]&#10;&amp;&quot;}}&quot;" office:value-type="string" office:string-value=",&quot;attrs&quot;:{&quot;LogicalId&quot;:&quot;mode&quot;                ,&quot;Name&quot;:&quot;Mode&quot;                               ,&quot;Order&quot;:21 ,&quot;Type&quot;:&quot;info&quot;  ,&quot;SubType&quot;:&quot;string&quot; ,&quot;Unite&quot;:null   ,&quot;Config_infoName&quot;:null      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mode" <text:s text:c="15"/>,"Name":"Mode" <text:s text:c="30"/>,"Order":21 ,"Type":"info" <text:s/>,"SubType":"string" ,"Unite":null <text:s text:c="2"/>,"Config_infoName":null <text:s text:c="16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onfort</text:p>
          </table:table-cell>
          <table:table-cell office:value-type="string" calcext:value-type="string">
            <text:p>Mode Confort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ther</text:p>
          </table:table-cell>
          <table:table-cell/>
          <table:table-cell office:value-type="string" calcext:value-type="string">
            <text:p>EtatConsigne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N16])" office:value-type="float" office:value="0" calcext:value-type="float">
            <text:p>0</text:p>
          </table:table-cell>
          <table:table-cell/>
          <table:table-cell table:style-name="ce17" table:formula="of:=&quot;&quot;&amp;IF([.T15]=&quot;&quot;;&quot; &quot;;IF([.A16]&lt;&gt;&quot;&quot;;&quot;,&quot;;&quot;}&quot;)) &amp;IF([.A16]&lt;&gt;&quot;&quot;;&quot;&quot;&quot;&quot;&amp;[.A16]&amp;&quot;&quot;&quot;&quot;&amp;REPT(&quot; &quot;;20-LEN([.A16]));&quot;&quot;)" office:value-type="string" office:string-value=",&quot;Confort&quot;             " calcext:value-type="string">
            <text:p>,"Confort" <text:s text:c="12"/></text:p>
          </table:table-cell>
          <table:table-cell table:style-name="ce17" table:formula="of:=&quot;:&quot; &amp;&quot;{&quot;&quot;&quot;&amp;[.B$1]&amp;&quot;&quot;&quot;:&quot;&quot;&quot;&amp;[.B16]&amp;&quot;&quot;&quot;&quot;&amp;REPT(&quot; &quot;;20-LEN([.B16])) &amp;&quot;,&quot;&quot;&quot;&amp;[.C$1]&amp;&quot;&quot;&quot;:&quot;&quot;&quot;&amp;[.C16]&amp;&quot;&quot;&quot;&quot;&amp;REPT(&quot; &quot;;35-LEN([.C16])) &amp;&quot;,&quot;&quot;&quot;&amp;[.D$1]&amp;&quot;&quot;&quot;:&quot;&amp;[.D16]&amp;REPT(&quot; &quot;;3-LEN([.D16])) &amp;&quot;,&quot;&quot;&quot;&amp;[.E$1]&amp;&quot;&quot;&quot;:&quot;&quot;&quot;&amp;[.E16]&amp;&quot;&quot;&quot;&quot;&amp;REPT(&quot; &quot;;6-LEN([.E16])) &amp;&quot;,&quot;&quot;&quot;&amp;[.F$1]&amp;&quot;&quot;&quot;:&quot;&quot;&quot;&amp;[.F16]&amp;&quot;&quot;&quot;&quot;&amp;REPT(&quot; &quot;;7-LEN([.F16])) &amp;&quot;,&quot;&quot;&quot;&amp;[.G$1]&amp;&quot;&quot;&quot;:&quot;&amp;IF([.G16]&lt;&gt;&quot;&quot;;&quot;&quot;&quot;&quot;&amp;[.G16]&amp;&quot;&quot;&quot;&quot;&amp;REPT(&quot; &quot;;5-LEN([.G16]));&quot;null&quot;&amp;REPT(&quot; &quot;;5-4+2)) &amp;&quot;,&quot;&quot;&quot;&amp;[.H$1]&amp;&quot;&quot;&quot;:&quot;&amp;IF([.H16]&lt;&gt;&quot;&quot;;&quot;&quot;&quot;&quot;&amp;[.H16]&amp;&quot;&quot;&quot;&quot;&amp;REPT(&quot; &quot;;19-LEN([.H16]));&quot;null&quot;&amp;REPT(&quot; &quot;;19-4+2)) &amp;&quot;,&quot;&quot;&quot;&amp;[.I$1]&amp;&quot;&quot;&quot;:&quot;&amp;IF([.I16]&lt;&gt;&quot;&quot;;&quot;&quot;&quot;&quot;&amp;[.I16]&amp;&quot;&quot;&quot;&quot;&amp;REPT(&quot; &quot;;8-LEN([.I16]));&quot;null&quot;&amp;REPT(&quot; &quot;;8-4+2)) &amp;&quot;,&quot;&quot;&quot;&amp;[.J$1]&amp;&quot;&quot;&quot;:&quot;&amp;IF([.J16]&lt;&gt;&quot;&quot;;[.J16]&amp;REPT(&quot; &quot;;4-LEN([.J16]));&quot;null&quot;) &amp;&quot;,&quot;&quot;&quot;&amp;[.K$1]&amp;&quot;&quot;&quot;:&quot;&amp;IF([.K16]&lt;&gt;&quot;&quot;;[.K16]&amp;REPT(&quot; &quot;;4-LEN([.K16]));&quot;null&quot;) &amp;&quot;,&quot;&quot;&quot;&amp;[.L$1]&amp;&quot;&quot;&quot;:&quot;&amp;IF([.L16]&lt;&gt;&quot;&quot;;[.L16]&amp;REPT(&quot; &quot;;5-LEN([.L16]));&quot;null &quot;) &amp;&quot;,&quot;&quot;&quot;&amp;[.M$1]&amp;&quot;&quot;&quot;:&quot;&amp;IF([.M16]&lt;&gt;&quot;&quot;;&quot;&quot;&quot;&quot;&amp;[.M16]&amp;&quot;&quot;&quot;&quot;&amp;REPT(&quot; &quot;;20-LEN([.M16]));&quot;null&quot;&amp;REPT(&quot; &quot;;20-4+2)) &amp;&quot;,&quot;&quot;&quot;&amp;[.N$1]&amp;&quot;&quot;&quot;:&quot;&amp;IF([.N16]&lt;&gt;&quot;&quot;;&quot;&quot;&amp;[.N16]&amp;&quot;&quot;&amp;REPT(&quot; &quot;;5-LEN([.N16]));&quot;null&quot;&amp;REPT(&quot; &quot;;5-4+2)) &amp;&quot;,&quot;&quot;&quot;&amp;[.O$1]&amp;&quot;&quot;&quot;:&quot;&amp;[.O16] &amp;&quot;,&quot;&quot;&quot;&amp;[.P$1]&amp;&quot;&quot;&quot;:&quot;&amp;[.P16] &amp;&quot;}&quot;" office:value-type="string" office:string-value=":{&quot;LogicalId&quot;:&quot;Confort&quot;             ,&quot;Name&quot;:&quot;Mode Confort&quot;                       ,&quot;Order&quot;:22 ,&quot;Type&quot;:&quot;action&quot;,&quot;SubType&quot;:&quot;other&quot;  ,&quot;Unite&quot;:null   ,&quot;Config_infoName&quot;:&quot;EtatConsigne&quot;       ,&quot;Config_value&quot;:null      ,&quot;Config_minValue&quot;:null,&quot;Config_maxValue&quot;:null,&quot;Config_tempHL&quot;:null ,&quot;setValue&quot;:null                  ,&quot;Display_param_step&quot;:null   ,&quot;IsHistorized&quot;:0,&quot;IsVisible&quot;:1}" calcext:value-type="string">
            <text:p>:{"LogicalId":"Confort" <text:s text:c="12"/>,"Name":"Mode Confort" <text:s text:c="22"/>,"Order":22 ,"Type":"action","SubType":"other" <text:s/>,"Unite":null <text:s text:c="2"/>,"Config_infoName":"EtatConsigne" <text:s text:c="6"/>,"Config_value":null <text:s text:c="5"/>,"Config_minValue":null,"Config_maxValue":null,"Config_tempHL":null ,"setValue":null <text:s text:c="17"/>,"Display_param_step":null <text:s text:c="2"/>,"IsHistorized":0,"IsVisible":1}</text:p>
          </table:table-cell>
          <table:table-cell table:style-name="ce15" office:value-type="string" calcext:value-type="string">
            <text:p>.</text:p>
          </table:table-cell>
          <table:table-cell table:style-name="ce14"/>
          <table:table-cell table:style-name="ce17" table:formula="of:=IF([.W15]=&quot;&quot;;&quot; &quot;;IF([.B16]&lt;&gt;&quot;&quot;;&quot;,&quot;;&quot;]&quot;))&#10;&amp;IF([.B16]&lt;&gt;&quot;&quot;;&quot;{&quot;&quot;cmd&quot;&quot;:&quot;&quot;&quot;&amp;[.B16]&amp;&quot;&quot;&quot;&quot;&amp;REPT(&quot; &quot;;20-LEN([.B16]));&quot;&quot;)" office:value-type="string" office:string-value=",{&quot;cmd&quot;:&quot;Confort&quot;             " calcext:value-type="string">
            <text:p>,{"cmd":"Confort" <text:s text:c="12"/></text:p>
          </table:table-cell>
          <table:table-cell table:style-name="ce17" table:formula="of:=&quot;,&quot;&quot;attrs&quot;&quot;:&quot;&#10;&amp;&quot;{&quot;&quot;&quot;&amp;[.B$1]&amp;&quot;&quot;&quot;:&quot;&quot;&quot;&amp;[.B16]&amp;&quot;&quot;&quot;&quot;&amp;REPT(&quot; &quot;;20-LEN([.B16]))&#10;&amp;&quot;,&quot;&quot;&quot;&amp;[.C$1]&amp;&quot;&quot;&quot;:&quot;&quot;&quot;&amp;[.C16]&amp;&quot;&quot;&quot;&quot;&amp;REPT(&quot; &quot;;35-LEN([.C16]))&#10;&amp;&quot;,&quot;&quot;&quot;&amp;[.D$1]&amp;&quot;&quot;&quot;:&quot;&amp;[.D16]&amp;REPT(&quot; &quot;;3-LEN([.D16]))&#10;&amp;&quot;,&quot;&quot;&quot;&amp;[.E$1]&amp;&quot;&quot;&quot;:&quot;&quot;&quot;&amp;[.E16]&amp;&quot;&quot;&quot;&quot;&amp;REPT(&quot; &quot;;6-LEN([.E16]))&#10;&amp;&quot;,&quot;&quot;&quot;&amp;[.F$1]&amp;&quot;&quot;&quot;:&quot;&quot;&quot;&amp;[.F16]&amp;&quot;&quot;&quot;&quot;&amp;REPT(&quot; &quot;;7-LEN([.F16]))&#10;&amp;&quot;,&quot;&quot;&quot;&amp;[.G$1]&amp;&quot;&quot;&quot;:&quot;&amp;IF([.G16]&lt;&gt;&quot;&quot;;&quot;&quot;&quot;&quot;&amp;[.G16]&amp;&quot;&quot;&quot;&quot;&amp;REPT(&quot; &quot;;5-LEN([.G16]));&quot;null&quot;&amp;REPT(&quot; &quot;;5-4+2))&#10;&amp;&quot;,&quot;&quot;&quot;&amp;[.H$1]&amp;&quot;&quot;&quot;:&quot;&amp;IF([.H16]&lt;&gt;&quot;&quot;;&quot;&quot;&quot;&quot;&amp;[.H16]&amp;&quot;&quot;&quot;&quot;&amp;REPT(&quot; &quot;;19-LEN([.H16]));&quot;null&quot;&amp;REPT(&quot; &quot;;19-4+2))&#10;&amp;&quot;,&quot;&quot;&quot;&amp;[.I$1]&amp;&quot;&quot;&quot;:&quot;&amp;IF([.I16]&lt;&gt;&quot;&quot;;&quot;&quot;&quot;&quot;&amp;[.I16]&amp;&quot;&quot;&quot;&quot;&amp;REPT(&quot; &quot;;8-LEN([.I16]));&quot;null&quot;&amp;REPT(&quot; &quot;;8-4+2))&#10;&amp;&quot;,&quot;&quot;&quot;&amp;[.J$1]&amp;&quot;&quot;&quot;:&quot;&amp;IF([.J16]&lt;&gt;&quot;&quot;;[.J16]&amp;REPT(&quot; &quot;;4-LEN([.J16]));&quot;null&quot;)&#10;&amp;&quot;,&quot;&quot;&quot;&amp;[.K$1]&amp;&quot;&quot;&quot;:&quot;&amp;IF([.K16]&lt;&gt;&quot;&quot;;[.K16]&amp;REPT(&quot; &quot;;4-LEN([.K16]));&quot;null&quot;)&#10;&amp;&quot;,&quot;&quot;&quot;&amp;[.L$1]&amp;&quot;&quot;&quot;:&quot;&amp;IF([.L16]&lt;&gt;&quot;&quot;;[.L16]&amp;REPT(&quot; &quot;;5-LEN([.L16]));&quot;null &quot;)&#10;&amp;&quot;,&quot;&quot;&quot;&amp;[.M$1]&amp;&quot;&quot;&quot;:&quot;&amp;IF([.M16]&lt;&gt;&quot;&quot;;&quot;&quot;&quot;&quot;&amp;[.M16]&amp;&quot;&quot;&quot;&quot;&amp;REPT(&quot; &quot;;20-LEN([.M16]));&quot;null&quot;&amp;REPT(&quot; &quot;;20-4+2))&#10;&amp;&quot;,&quot;&quot;&quot;&amp;[.N$1]&amp;&quot;&quot;&quot;:&quot;&amp;IF([.N16]&lt;&gt;&quot;&quot;;&quot;&quot;&quot;&quot;&amp;[.N16]&amp;&quot;&quot;&quot;&quot;&amp;REPT(&quot; &quot;;30-LEN([.N16]));&quot;null&quot;&amp;REPT(&quot; &quot;;30-4+2))&#10;&amp;&quot;,&quot;&quot;&quot;&amp;[.O$1]&amp;&quot;&quot;&quot;:&quot;&amp;[.O16]&#10;&amp;&quot;,&quot;&quot;&quot;&amp;[.P$1]&amp;&quot;&quot;&quot;:&quot;&amp;[.P16]&#10;&amp;&quot;}}&quot;" office:value-type="string" office:string-value=",&quot;attrs&quot;:{&quot;LogicalId&quot;:&quot;Confort&quot;             ,&quot;Name&quot;:&quot;Mode Confort&quot;                       ,&quot;Order&quot;:22 ,&quot;Type&quot;:&quot;action&quot;,&quot;SubType&quot;:&quot;other&quot;  ,&quot;Unite&quot;:null   ,&quot;Config_infoName&quot;:&quot;EtatConsigne&quot;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Confort" <text:s text:c="12"/>,"Name":"Mode Confort" <text:s text:c="22"/>,"Order":22 ,"Type":"action","SubType":"other" <text:s/>,"Unite":null <text:s text:c="2"/>,"Config_infoName":"EtatConsigne" <text:s text:c="6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co</text:p>
          </table:table-cell>
          <table:table-cell office:value-type="string" calcext:value-type="string">
            <text:p>Mode Eco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ther</text:p>
          </table:table-cell>
          <table:table-cell/>
          <table:table-cell office:value-type="string" calcext:value-type="string">
            <text:p>EtatConsigne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N17])" office:value-type="float" office:value="0" calcext:value-type="float">
            <text:p>0</text:p>
          </table:table-cell>
          <table:table-cell/>
          <table:table-cell table:style-name="ce17" table:formula="of:=&quot;&quot;&amp;IF([.T16]=&quot;&quot;;&quot; &quot;;IF([.A17]&lt;&gt;&quot;&quot;;&quot;,&quot;;&quot;}&quot;)) &amp;IF([.A17]&lt;&gt;&quot;&quot;;&quot;&quot;&quot;&quot;&amp;[.A17]&amp;&quot;&quot;&quot;&quot;&amp;REPT(&quot; &quot;;20-LEN([.A17]));&quot;&quot;)" office:value-type="string" office:string-value=",&quot;Eco&quot;                 " calcext:value-type="string">
            <text:p>,"Eco" <text:s text:c="16"/></text:p>
          </table:table-cell>
          <table:table-cell table:style-name="ce17" table:formula="of:=&quot;:&quot; &amp;&quot;{&quot;&quot;&quot;&amp;[.B$1]&amp;&quot;&quot;&quot;:&quot;&quot;&quot;&amp;[.B17]&amp;&quot;&quot;&quot;&quot;&amp;REPT(&quot; &quot;;20-LEN([.B17])) &amp;&quot;,&quot;&quot;&quot;&amp;[.C$1]&amp;&quot;&quot;&quot;:&quot;&quot;&quot;&amp;[.C17]&amp;&quot;&quot;&quot;&quot;&amp;REPT(&quot; &quot;;35-LEN([.C17])) &amp;&quot;,&quot;&quot;&quot;&amp;[.D$1]&amp;&quot;&quot;&quot;:&quot;&amp;[.D17]&amp;REPT(&quot; &quot;;3-LEN([.D17])) &amp;&quot;,&quot;&quot;&quot;&amp;[.E$1]&amp;&quot;&quot;&quot;:&quot;&quot;&quot;&amp;[.E17]&amp;&quot;&quot;&quot;&quot;&amp;REPT(&quot; &quot;;6-LEN([.E17])) &amp;&quot;,&quot;&quot;&quot;&amp;[.F$1]&amp;&quot;&quot;&quot;:&quot;&quot;&quot;&amp;[.F17]&amp;&quot;&quot;&quot;&quot;&amp;REPT(&quot; &quot;;7-LEN([.F17])) &amp;&quot;,&quot;&quot;&quot;&amp;[.G$1]&amp;&quot;&quot;&quot;:&quot;&amp;IF([.G17]&lt;&gt;&quot;&quot;;&quot;&quot;&quot;&quot;&amp;[.G17]&amp;&quot;&quot;&quot;&quot;&amp;REPT(&quot; &quot;;5-LEN([.G17]));&quot;null&quot;&amp;REPT(&quot; &quot;;5-4+2)) &amp;&quot;,&quot;&quot;&quot;&amp;[.H$1]&amp;&quot;&quot;&quot;:&quot;&amp;IF([.H17]&lt;&gt;&quot;&quot;;&quot;&quot;&quot;&quot;&amp;[.H17]&amp;&quot;&quot;&quot;&quot;&amp;REPT(&quot; &quot;;19-LEN([.H17]));&quot;null&quot;&amp;REPT(&quot; &quot;;19-4+2)) &amp;&quot;,&quot;&quot;&quot;&amp;[.I$1]&amp;&quot;&quot;&quot;:&quot;&amp;IF([.I17]&lt;&gt;&quot;&quot;;&quot;&quot;&quot;&quot;&amp;[.I17]&amp;&quot;&quot;&quot;&quot;&amp;REPT(&quot; &quot;;8-LEN([.I17]));&quot;null&quot;&amp;REPT(&quot; &quot;;8-4+2)) &amp;&quot;,&quot;&quot;&quot;&amp;[.J$1]&amp;&quot;&quot;&quot;:&quot;&amp;IF([.J17]&lt;&gt;&quot;&quot;;[.J17]&amp;REPT(&quot; &quot;;4-LEN([.J17]));&quot;null&quot;) &amp;&quot;,&quot;&quot;&quot;&amp;[.K$1]&amp;&quot;&quot;&quot;:&quot;&amp;IF([.K17]&lt;&gt;&quot;&quot;;[.K17]&amp;REPT(&quot; &quot;;4-LEN([.K17]));&quot;null&quot;) &amp;&quot;,&quot;&quot;&quot;&amp;[.L$1]&amp;&quot;&quot;&quot;:&quot;&amp;IF([.L17]&lt;&gt;&quot;&quot;;[.L17]&amp;REPT(&quot; &quot;;5-LEN([.L17]));&quot;null &quot;) &amp;&quot;,&quot;&quot;&quot;&amp;[.M$1]&amp;&quot;&quot;&quot;:&quot;&amp;IF([.M17]&lt;&gt;&quot;&quot;;&quot;&quot;&quot;&quot;&amp;[.M17]&amp;&quot;&quot;&quot;&quot;&amp;REPT(&quot; &quot;;20-LEN([.M17]));&quot;null&quot;&amp;REPT(&quot; &quot;;20-4+2)) &amp;&quot;,&quot;&quot;&quot;&amp;[.N$1]&amp;&quot;&quot;&quot;:&quot;&amp;IF([.N17]&lt;&gt;&quot;&quot;;&quot;&quot;&amp;[.N17]&amp;&quot;&quot;&amp;REPT(&quot; &quot;;5-LEN([.N17]));&quot;null&quot;&amp;REPT(&quot; &quot;;5-4+2)) &amp;&quot;,&quot;&quot;&quot;&amp;[.O$1]&amp;&quot;&quot;&quot;:&quot;&amp;[.O17] &amp;&quot;,&quot;&quot;&quot;&amp;[.P$1]&amp;&quot;&quot;&quot;:&quot;&amp;[.P17] &amp;&quot;}&quot;" office:value-type="string" office:string-value=":{&quot;LogicalId&quot;:&quot;Eco&quot;                 ,&quot;Name&quot;:&quot;Mode Eco&quot;                           ,&quot;Order&quot;:23 ,&quot;Type&quot;:&quot;action&quot;,&quot;SubType&quot;:&quot;other&quot;  ,&quot;Unite&quot;:null   ,&quot;Config_infoName&quot;:&quot;EtatConsigne&quot;       ,&quot;Config_value&quot;:null      ,&quot;Config_minValue&quot;:null,&quot;Config_maxValue&quot;:null,&quot;Config_tempHL&quot;:null ,&quot;setValue&quot;:null                  ,&quot;Display_param_step&quot;:null   ,&quot;IsHistorized&quot;:0,&quot;IsVisible&quot;:1}" calcext:value-type="string">
            <text:p>:{"LogicalId":"Eco" <text:s text:c="16"/>,"Name":"Mode Eco" <text:s text:c="26"/>,"Order":23 ,"Type":"action","SubType":"other" <text:s/>,"Unite":null <text:s text:c="2"/>,"Config_infoName":"EtatConsigne" <text:s text:c="6"/>,"Config_value":null <text:s text:c="5"/>,"Config_minValue":null,"Config_maxValue":null,"Config_tempHL":null ,"setValue":null <text:s text:c="17"/>,"Display_param_step":null <text:s text:c="2"/>,"IsHistorized":0,"IsVisible":1}</text:p>
          </table:table-cell>
          <table:table-cell table:style-name="ce15" office:value-type="string" calcext:value-type="string">
            <text:p>.</text:p>
          </table:table-cell>
          <table:table-cell table:style-name="ce14"/>
          <table:table-cell table:style-name="ce17" table:formula="of:=IF([.W16]=&quot;&quot;;&quot; &quot;;IF([.B17]&lt;&gt;&quot;&quot;;&quot;,&quot;;&quot;]&quot;))&#10;&amp;IF([.B17]&lt;&gt;&quot;&quot;;&quot;{&quot;&quot;cmd&quot;&quot;:&quot;&quot;&quot;&amp;[.B17]&amp;&quot;&quot;&quot;&quot;&amp;REPT(&quot; &quot;;20-LEN([.B17]));&quot;&quot;)" office:value-type="string" office:string-value=",{&quot;cmd&quot;:&quot;Eco&quot;                 " calcext:value-type="string">
            <text:p>,{"cmd":"Eco" <text:s text:c="16"/></text:p>
          </table:table-cell>
          <table:table-cell table:style-name="ce17" table:formula="of:=&quot;,&quot;&quot;attrs&quot;&quot;:&quot;&#10;&amp;&quot;{&quot;&quot;&quot;&amp;[.B$1]&amp;&quot;&quot;&quot;:&quot;&quot;&quot;&amp;[.B17]&amp;&quot;&quot;&quot;&quot;&amp;REPT(&quot; &quot;;20-LEN([.B17]))&#10;&amp;&quot;,&quot;&quot;&quot;&amp;[.C$1]&amp;&quot;&quot;&quot;:&quot;&quot;&quot;&amp;[.C17]&amp;&quot;&quot;&quot;&quot;&amp;REPT(&quot; &quot;;35-LEN([.C17]))&#10;&amp;&quot;,&quot;&quot;&quot;&amp;[.D$1]&amp;&quot;&quot;&quot;:&quot;&amp;[.D17]&amp;REPT(&quot; &quot;;3-LEN([.D17]))&#10;&amp;&quot;,&quot;&quot;&quot;&amp;[.E$1]&amp;&quot;&quot;&quot;:&quot;&quot;&quot;&amp;[.E17]&amp;&quot;&quot;&quot;&quot;&amp;REPT(&quot; &quot;;6-LEN([.E17]))&#10;&amp;&quot;,&quot;&quot;&quot;&amp;[.F$1]&amp;&quot;&quot;&quot;:&quot;&quot;&quot;&amp;[.F17]&amp;&quot;&quot;&quot;&quot;&amp;REPT(&quot; &quot;;7-LEN([.F17]))&#10;&amp;&quot;,&quot;&quot;&quot;&amp;[.G$1]&amp;&quot;&quot;&quot;:&quot;&amp;IF([.G17]&lt;&gt;&quot;&quot;;&quot;&quot;&quot;&quot;&amp;[.G17]&amp;&quot;&quot;&quot;&quot;&amp;REPT(&quot; &quot;;5-LEN([.G17]));&quot;null&quot;&amp;REPT(&quot; &quot;;5-4+2))&#10;&amp;&quot;,&quot;&quot;&quot;&amp;[.H$1]&amp;&quot;&quot;&quot;:&quot;&amp;IF([.H17]&lt;&gt;&quot;&quot;;&quot;&quot;&quot;&quot;&amp;[.H17]&amp;&quot;&quot;&quot;&quot;&amp;REPT(&quot; &quot;;19-LEN([.H17]));&quot;null&quot;&amp;REPT(&quot; &quot;;19-4+2))&#10;&amp;&quot;,&quot;&quot;&quot;&amp;[.I$1]&amp;&quot;&quot;&quot;:&quot;&amp;IF([.I17]&lt;&gt;&quot;&quot;;&quot;&quot;&quot;&quot;&amp;[.I17]&amp;&quot;&quot;&quot;&quot;&amp;REPT(&quot; &quot;;8-LEN([.I17]));&quot;null&quot;&amp;REPT(&quot; &quot;;8-4+2))&#10;&amp;&quot;,&quot;&quot;&quot;&amp;[.J$1]&amp;&quot;&quot;&quot;:&quot;&amp;IF([.J17]&lt;&gt;&quot;&quot;;[.J17]&amp;REPT(&quot; &quot;;4-LEN([.J17]));&quot;null&quot;)&#10;&amp;&quot;,&quot;&quot;&quot;&amp;[.K$1]&amp;&quot;&quot;&quot;:&quot;&amp;IF([.K17]&lt;&gt;&quot;&quot;;[.K17]&amp;REPT(&quot; &quot;;4-LEN([.K17]));&quot;null&quot;)&#10;&amp;&quot;,&quot;&quot;&quot;&amp;[.L$1]&amp;&quot;&quot;&quot;:&quot;&amp;IF([.L17]&lt;&gt;&quot;&quot;;[.L17]&amp;REPT(&quot; &quot;;5-LEN([.L17]));&quot;null &quot;)&#10;&amp;&quot;,&quot;&quot;&quot;&amp;[.M$1]&amp;&quot;&quot;&quot;:&quot;&amp;IF([.M17]&lt;&gt;&quot;&quot;;&quot;&quot;&quot;&quot;&amp;[.M17]&amp;&quot;&quot;&quot;&quot;&amp;REPT(&quot; &quot;;20-LEN([.M17]));&quot;null&quot;&amp;REPT(&quot; &quot;;20-4+2))&#10;&amp;&quot;,&quot;&quot;&quot;&amp;[.N$1]&amp;&quot;&quot;&quot;:&quot;&amp;IF([.N17]&lt;&gt;&quot;&quot;;&quot;&quot;&quot;&quot;&amp;[.N17]&amp;&quot;&quot;&quot;&quot;&amp;REPT(&quot; &quot;;30-LEN([.N17]));&quot;null&quot;&amp;REPT(&quot; &quot;;30-4+2))&#10;&amp;&quot;,&quot;&quot;&quot;&amp;[.O$1]&amp;&quot;&quot;&quot;:&quot;&amp;[.O17]&#10;&amp;&quot;,&quot;&quot;&quot;&amp;[.P$1]&amp;&quot;&quot;&quot;:&quot;&amp;[.P17]&#10;&amp;&quot;}}&quot;" office:value-type="string" office:string-value=",&quot;attrs&quot;:{&quot;LogicalId&quot;:&quot;Eco&quot;                 ,&quot;Name&quot;:&quot;Mode Eco&quot;                           ,&quot;Order&quot;:23 ,&quot;Type&quot;:&quot;action&quot;,&quot;SubType&quot;:&quot;other&quot;  ,&quot;Unite&quot;:null   ,&quot;Config_infoName&quot;:&quot;EtatConsigne&quot;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Eco" <text:s text:c="16"/>,"Name":"Mode Eco" <text:s text:c="26"/>,"Order":23 ,"Type":"action","SubType":"other" <text:s/>,"Unite":null <text:s text:c="2"/>,"Config_infoName":"EtatConsigne" <text:s text:c="6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HorsGel</text:p>
          </table:table-cell>
          <table:table-cell office:value-type="string" calcext:value-type="string">
            <text:p>Mode HorsGel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ther</text:p>
          </table:table-cell>
          <table:table-cell/>
          <table:table-cell office:value-type="string" calcext:value-type="string">
            <text:p>EtatConsigne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N18])" office:value-type="float" office:value="0" calcext:value-type="float">
            <text:p>0</text:p>
          </table:table-cell>
          <table:table-cell/>
          <table:table-cell table:style-name="ce17" table:formula="of:=&quot;&quot;&amp;IF([.T17]=&quot;&quot;;&quot; &quot;;IF([.A18]&lt;&gt;&quot;&quot;;&quot;,&quot;;&quot;}&quot;)) &amp;IF([.A18]&lt;&gt;&quot;&quot;;&quot;&quot;&quot;&quot;&amp;[.A18]&amp;&quot;&quot;&quot;&quot;&amp;REPT(&quot; &quot;;20-LEN([.A18]));&quot;&quot;)" office:value-type="string" office:string-value=",&quot;HorsGel&quot;             " calcext:value-type="string">
            <text:p>,"HorsGel" <text:s text:c="12"/></text:p>
          </table:table-cell>
          <table:table-cell table:style-name="ce17" table:formula="of:=&quot;:&quot; &amp;&quot;{&quot;&quot;&quot;&amp;[.B$1]&amp;&quot;&quot;&quot;:&quot;&quot;&quot;&amp;[.B18]&amp;&quot;&quot;&quot;&quot;&amp;REPT(&quot; &quot;;20-LEN([.B18])) &amp;&quot;,&quot;&quot;&quot;&amp;[.C$1]&amp;&quot;&quot;&quot;:&quot;&quot;&quot;&amp;[.C18]&amp;&quot;&quot;&quot;&quot;&amp;REPT(&quot; &quot;;35-LEN([.C18])) &amp;&quot;,&quot;&quot;&quot;&amp;[.D$1]&amp;&quot;&quot;&quot;:&quot;&amp;[.D18]&amp;REPT(&quot; &quot;;3-LEN([.D18])) &amp;&quot;,&quot;&quot;&quot;&amp;[.E$1]&amp;&quot;&quot;&quot;:&quot;&quot;&quot;&amp;[.E18]&amp;&quot;&quot;&quot;&quot;&amp;REPT(&quot; &quot;;6-LEN([.E18])) &amp;&quot;,&quot;&quot;&quot;&amp;[.F$1]&amp;&quot;&quot;&quot;:&quot;&quot;&quot;&amp;[.F18]&amp;&quot;&quot;&quot;&quot;&amp;REPT(&quot; &quot;;7-LEN([.F18])) &amp;&quot;,&quot;&quot;&quot;&amp;[.G$1]&amp;&quot;&quot;&quot;:&quot;&amp;IF([.G18]&lt;&gt;&quot;&quot;;&quot;&quot;&quot;&quot;&amp;[.G18]&amp;&quot;&quot;&quot;&quot;&amp;REPT(&quot; &quot;;5-LEN([.G18]));&quot;null&quot;&amp;REPT(&quot; &quot;;5-4+2)) &amp;&quot;,&quot;&quot;&quot;&amp;[.H$1]&amp;&quot;&quot;&quot;:&quot;&amp;IF([.H18]&lt;&gt;&quot;&quot;;&quot;&quot;&quot;&quot;&amp;[.H18]&amp;&quot;&quot;&quot;&quot;&amp;REPT(&quot; &quot;;19-LEN([.H18]));&quot;null&quot;&amp;REPT(&quot; &quot;;19-4+2)) &amp;&quot;,&quot;&quot;&quot;&amp;[.I$1]&amp;&quot;&quot;&quot;:&quot;&amp;IF([.I18]&lt;&gt;&quot;&quot;;&quot;&quot;&quot;&quot;&amp;[.I18]&amp;&quot;&quot;&quot;&quot;&amp;REPT(&quot; &quot;;8-LEN([.I18]));&quot;null&quot;&amp;REPT(&quot; &quot;;8-4+2)) &amp;&quot;,&quot;&quot;&quot;&amp;[.J$1]&amp;&quot;&quot;&quot;:&quot;&amp;IF([.J18]&lt;&gt;&quot;&quot;;[.J18]&amp;REPT(&quot; &quot;;4-LEN([.J18]));&quot;null&quot;) &amp;&quot;,&quot;&quot;&quot;&amp;[.K$1]&amp;&quot;&quot;&quot;:&quot;&amp;IF([.K18]&lt;&gt;&quot;&quot;;[.K18]&amp;REPT(&quot; &quot;;4-LEN([.K18]));&quot;null&quot;) &amp;&quot;,&quot;&quot;&quot;&amp;[.L$1]&amp;&quot;&quot;&quot;:&quot;&amp;IF([.L18]&lt;&gt;&quot;&quot;;[.L18]&amp;REPT(&quot; &quot;;5-LEN([.L18]));&quot;null &quot;) &amp;&quot;,&quot;&quot;&quot;&amp;[.M$1]&amp;&quot;&quot;&quot;:&quot;&amp;IF([.M18]&lt;&gt;&quot;&quot;;&quot;&quot;&quot;&quot;&amp;[.M18]&amp;&quot;&quot;&quot;&quot;&amp;REPT(&quot; &quot;;20-LEN([.M18]));&quot;null&quot;&amp;REPT(&quot; &quot;;20-4+2)) &amp;&quot;,&quot;&quot;&quot;&amp;[.N$1]&amp;&quot;&quot;&quot;:&quot;&amp;IF([.N18]&lt;&gt;&quot;&quot;;&quot;&quot;&amp;[.N18]&amp;&quot;&quot;&amp;REPT(&quot; &quot;;5-LEN([.N18]));&quot;null&quot;&amp;REPT(&quot; &quot;;5-4+2)) &amp;&quot;,&quot;&quot;&quot;&amp;[.O$1]&amp;&quot;&quot;&quot;:&quot;&amp;[.O18] &amp;&quot;,&quot;&quot;&quot;&amp;[.P$1]&amp;&quot;&quot;&quot;:&quot;&amp;[.P18] &amp;&quot;}&quot;" office:value-type="string" office:string-value=":{&quot;LogicalId&quot;:&quot;HorsGel&quot;             ,&quot;Name&quot;:&quot;Mode HorsGel&quot;                       ,&quot;Order&quot;:24 ,&quot;Type&quot;:&quot;action&quot;,&quot;SubType&quot;:&quot;other&quot;  ,&quot;Unite&quot;:null   ,&quot;Config_infoName&quot;:&quot;EtatConsigne&quot;       ,&quot;Config_value&quot;:null      ,&quot;Config_minValue&quot;:null,&quot;Config_maxValue&quot;:null,&quot;Config_tempHL&quot;:null ,&quot;setValue&quot;:null                  ,&quot;Display_param_step&quot;:null   ,&quot;IsHistorized&quot;:0,&quot;IsVisible&quot;:1}" calcext:value-type="string">
            <text:p>:{"LogicalId":"HorsGel" <text:s text:c="12"/>,"Name":"Mode HorsGel" <text:s text:c="22"/>,"Order":24 ,"Type":"action","SubType":"other" <text:s/>,"Unite":null <text:s text:c="2"/>,"Config_infoName":"EtatConsigne" <text:s text:c="6"/>,"Config_value":null <text:s text:c="5"/>,"Config_minValue":null,"Config_maxValue":null,"Config_tempHL":null ,"setValue":null <text:s text:c="17"/>,"Display_param_step":null <text:s text:c="2"/>,"IsHistorized":0,"IsVisible":1}</text:p>
          </table:table-cell>
          <table:table-cell table:style-name="ce15" office:value-type="string" calcext:value-type="string">
            <text:p>.</text:p>
          </table:table-cell>
          <table:table-cell table:style-name="ce14"/>
          <table:table-cell table:style-name="ce17" table:formula="of:=IF([.W17]=&quot;&quot;;&quot; &quot;;IF([.B18]&lt;&gt;&quot;&quot;;&quot;,&quot;;&quot;]&quot;))&#10;&amp;IF([.B18]&lt;&gt;&quot;&quot;;&quot;{&quot;&quot;cmd&quot;&quot;:&quot;&quot;&quot;&amp;[.B18]&amp;&quot;&quot;&quot;&quot;&amp;REPT(&quot; &quot;;20-LEN([.B18]));&quot;&quot;)" office:value-type="string" office:string-value=",{&quot;cmd&quot;:&quot;HorsGel&quot;             " calcext:value-type="string">
            <text:p>,{"cmd":"HorsGel" <text:s text:c="12"/></text:p>
          </table:table-cell>
          <table:table-cell table:style-name="ce17" table:formula="of:=&quot;,&quot;&quot;attrs&quot;&quot;:&quot;&#10;&amp;&quot;{&quot;&quot;&quot;&amp;[.B$1]&amp;&quot;&quot;&quot;:&quot;&quot;&quot;&amp;[.B18]&amp;&quot;&quot;&quot;&quot;&amp;REPT(&quot; &quot;;20-LEN([.B18]))&#10;&amp;&quot;,&quot;&quot;&quot;&amp;[.C$1]&amp;&quot;&quot;&quot;:&quot;&quot;&quot;&amp;[.C18]&amp;&quot;&quot;&quot;&quot;&amp;REPT(&quot; &quot;;35-LEN([.C18]))&#10;&amp;&quot;,&quot;&quot;&quot;&amp;[.D$1]&amp;&quot;&quot;&quot;:&quot;&amp;[.D18]&amp;REPT(&quot; &quot;;3-LEN([.D18]))&#10;&amp;&quot;,&quot;&quot;&quot;&amp;[.E$1]&amp;&quot;&quot;&quot;:&quot;&quot;&quot;&amp;[.E18]&amp;&quot;&quot;&quot;&quot;&amp;REPT(&quot; &quot;;6-LEN([.E18]))&#10;&amp;&quot;,&quot;&quot;&quot;&amp;[.F$1]&amp;&quot;&quot;&quot;:&quot;&quot;&quot;&amp;[.F18]&amp;&quot;&quot;&quot;&quot;&amp;REPT(&quot; &quot;;7-LEN([.F18]))&#10;&amp;&quot;,&quot;&quot;&quot;&amp;[.G$1]&amp;&quot;&quot;&quot;:&quot;&amp;IF([.G18]&lt;&gt;&quot;&quot;;&quot;&quot;&quot;&quot;&amp;[.G18]&amp;&quot;&quot;&quot;&quot;&amp;REPT(&quot; &quot;;5-LEN([.G18]));&quot;null&quot;&amp;REPT(&quot; &quot;;5-4+2))&#10;&amp;&quot;,&quot;&quot;&quot;&amp;[.H$1]&amp;&quot;&quot;&quot;:&quot;&amp;IF([.H18]&lt;&gt;&quot;&quot;;&quot;&quot;&quot;&quot;&amp;[.H18]&amp;&quot;&quot;&quot;&quot;&amp;REPT(&quot; &quot;;19-LEN([.H18]));&quot;null&quot;&amp;REPT(&quot; &quot;;19-4+2))&#10;&amp;&quot;,&quot;&quot;&quot;&amp;[.I$1]&amp;&quot;&quot;&quot;:&quot;&amp;IF([.I18]&lt;&gt;&quot;&quot;;&quot;&quot;&quot;&quot;&amp;[.I18]&amp;&quot;&quot;&quot;&quot;&amp;REPT(&quot; &quot;;8-LEN([.I18]));&quot;null&quot;&amp;REPT(&quot; &quot;;8-4+2))&#10;&amp;&quot;,&quot;&quot;&quot;&amp;[.J$1]&amp;&quot;&quot;&quot;:&quot;&amp;IF([.J18]&lt;&gt;&quot;&quot;;[.J18]&amp;REPT(&quot; &quot;;4-LEN([.J18]));&quot;null&quot;)&#10;&amp;&quot;,&quot;&quot;&quot;&amp;[.K$1]&amp;&quot;&quot;&quot;:&quot;&amp;IF([.K18]&lt;&gt;&quot;&quot;;[.K18]&amp;REPT(&quot; &quot;;4-LEN([.K18]));&quot;null&quot;)&#10;&amp;&quot;,&quot;&quot;&quot;&amp;[.L$1]&amp;&quot;&quot;&quot;:&quot;&amp;IF([.L18]&lt;&gt;&quot;&quot;;[.L18]&amp;REPT(&quot; &quot;;5-LEN([.L18]));&quot;null &quot;)&#10;&amp;&quot;,&quot;&quot;&quot;&amp;[.M$1]&amp;&quot;&quot;&quot;:&quot;&amp;IF([.M18]&lt;&gt;&quot;&quot;;&quot;&quot;&quot;&quot;&amp;[.M18]&amp;&quot;&quot;&quot;&quot;&amp;REPT(&quot; &quot;;20-LEN([.M18]));&quot;null&quot;&amp;REPT(&quot; &quot;;20-4+2))&#10;&amp;&quot;,&quot;&quot;&quot;&amp;[.N$1]&amp;&quot;&quot;&quot;:&quot;&amp;IF([.N18]&lt;&gt;&quot;&quot;;&quot;&quot;&quot;&quot;&amp;[.N18]&amp;&quot;&quot;&quot;&quot;&amp;REPT(&quot; &quot;;30-LEN([.N18]));&quot;null&quot;&amp;REPT(&quot; &quot;;30-4+2))&#10;&amp;&quot;,&quot;&quot;&quot;&amp;[.O$1]&amp;&quot;&quot;&quot;:&quot;&amp;[.O18]&#10;&amp;&quot;,&quot;&quot;&quot;&amp;[.P$1]&amp;&quot;&quot;&quot;:&quot;&amp;[.P18]&#10;&amp;&quot;}}&quot;" office:value-type="string" office:string-value=",&quot;attrs&quot;:{&quot;LogicalId&quot;:&quot;HorsGel&quot;             ,&quot;Name&quot;:&quot;Mode HorsGel&quot;                       ,&quot;Order&quot;:24 ,&quot;Type&quot;:&quot;action&quot;,&quot;SubType&quot;:&quot;other&quot;  ,&quot;Unite&quot;:null   ,&quot;Config_infoName&quot;:&quot;EtatConsigne&quot;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HorsGel" <text:s text:c="12"/>,"Name":"Mode HorsGel" <text:s text:c="22"/>,"Order":24 ,"Type":"action","SubType":"other" <text:s/>,"Unite":null <text:s text:c="2"/>,"Config_infoName":"EtatConsigne" <text:s text:c="6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Off</text:p>
          </table:table-cell>
          <table:table-cell office:value-type="string" calcext:value-type="string">
            <text:p>Mode Off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ther</text:p>
          </table:table-cell>
          <table:table-cell/>
          <table:table-cell office:value-type="string" calcext:value-type="string">
            <text:p>EtatConsigne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N19])" office:value-type="float" office:value="0" calcext:value-type="float">
            <text:p>0</text:p>
          </table:table-cell>
          <table:table-cell/>
          <table:table-cell table:style-name="ce17" table:formula="of:=&quot;&quot;&amp;IF([.T18]=&quot;&quot;;&quot; &quot;;IF([.A19]&lt;&gt;&quot;&quot;;&quot;,&quot;;&quot;}&quot;)) &amp;IF([.A19]&lt;&gt;&quot;&quot;;&quot;&quot;&quot;&quot;&amp;[.A19]&amp;&quot;&quot;&quot;&quot;&amp;REPT(&quot; &quot;;20-LEN([.A19]));&quot;&quot;)" office:value-type="string" office:string-value=",&quot;Off&quot;                 " calcext:value-type="string">
            <text:p>,"Off" <text:s text:c="16"/></text:p>
          </table:table-cell>
          <table:table-cell table:style-name="ce17" table:formula="of:=&quot;:&quot; &amp;&quot;{&quot;&quot;&quot;&amp;[.B$1]&amp;&quot;&quot;&quot;:&quot;&quot;&quot;&amp;[.B19]&amp;&quot;&quot;&quot;&quot;&amp;REPT(&quot; &quot;;20-LEN([.B19])) &amp;&quot;,&quot;&quot;&quot;&amp;[.C$1]&amp;&quot;&quot;&quot;:&quot;&quot;&quot;&amp;[.C19]&amp;&quot;&quot;&quot;&quot;&amp;REPT(&quot; &quot;;35-LEN([.C19])) &amp;&quot;,&quot;&quot;&quot;&amp;[.D$1]&amp;&quot;&quot;&quot;:&quot;&amp;[.D19]&amp;REPT(&quot; &quot;;3-LEN([.D19])) &amp;&quot;,&quot;&quot;&quot;&amp;[.E$1]&amp;&quot;&quot;&quot;:&quot;&quot;&quot;&amp;[.E19]&amp;&quot;&quot;&quot;&quot;&amp;REPT(&quot; &quot;;6-LEN([.E19])) &amp;&quot;,&quot;&quot;&quot;&amp;[.F$1]&amp;&quot;&quot;&quot;:&quot;&quot;&quot;&amp;[.F19]&amp;&quot;&quot;&quot;&quot;&amp;REPT(&quot; &quot;;7-LEN([.F19])) &amp;&quot;,&quot;&quot;&quot;&amp;[.G$1]&amp;&quot;&quot;&quot;:&quot;&amp;IF([.G19]&lt;&gt;&quot;&quot;;&quot;&quot;&quot;&quot;&amp;[.G19]&amp;&quot;&quot;&quot;&quot;&amp;REPT(&quot; &quot;;5-LEN([.G19]));&quot;null&quot;&amp;REPT(&quot; &quot;;5-4+2)) &amp;&quot;,&quot;&quot;&quot;&amp;[.H$1]&amp;&quot;&quot;&quot;:&quot;&amp;IF([.H19]&lt;&gt;&quot;&quot;;&quot;&quot;&quot;&quot;&amp;[.H19]&amp;&quot;&quot;&quot;&quot;&amp;REPT(&quot; &quot;;19-LEN([.H19]));&quot;null&quot;&amp;REPT(&quot; &quot;;19-4+2)) &amp;&quot;,&quot;&quot;&quot;&amp;[.I$1]&amp;&quot;&quot;&quot;:&quot;&amp;IF([.I19]&lt;&gt;&quot;&quot;;&quot;&quot;&quot;&quot;&amp;[.I19]&amp;&quot;&quot;&quot;&quot;&amp;REPT(&quot; &quot;;8-LEN([.I19]));&quot;null&quot;&amp;REPT(&quot; &quot;;8-4+2)) &amp;&quot;,&quot;&quot;&quot;&amp;[.J$1]&amp;&quot;&quot;&quot;:&quot;&amp;IF([.J19]&lt;&gt;&quot;&quot;;[.J19]&amp;REPT(&quot; &quot;;4-LEN([.J19]));&quot;null&quot;) &amp;&quot;,&quot;&quot;&quot;&amp;[.K$1]&amp;&quot;&quot;&quot;:&quot;&amp;IF([.K19]&lt;&gt;&quot;&quot;;[.K19]&amp;REPT(&quot; &quot;;4-LEN([.K19]));&quot;null&quot;) &amp;&quot;,&quot;&quot;&quot;&amp;[.L$1]&amp;&quot;&quot;&quot;:&quot;&amp;IF([.L19]&lt;&gt;&quot;&quot;;[.L19]&amp;REPT(&quot; &quot;;5-LEN([.L19]));&quot;null &quot;) &amp;&quot;,&quot;&quot;&quot;&amp;[.M$1]&amp;&quot;&quot;&quot;:&quot;&amp;IF([.M19]&lt;&gt;&quot;&quot;;&quot;&quot;&quot;&quot;&amp;[.M19]&amp;&quot;&quot;&quot;&quot;&amp;REPT(&quot; &quot;;20-LEN([.M19]));&quot;null&quot;&amp;REPT(&quot; &quot;;20-4+2)) &amp;&quot;,&quot;&quot;&quot;&amp;[.N$1]&amp;&quot;&quot;&quot;:&quot;&amp;IF([.N19]&lt;&gt;&quot;&quot;;&quot;&quot;&amp;[.N19]&amp;&quot;&quot;&amp;REPT(&quot; &quot;;5-LEN([.N19]));&quot;null&quot;&amp;REPT(&quot; &quot;;5-4+2)) &amp;&quot;,&quot;&quot;&quot;&amp;[.O$1]&amp;&quot;&quot;&quot;:&quot;&amp;[.O19] &amp;&quot;,&quot;&quot;&quot;&amp;[.P$1]&amp;&quot;&quot;&quot;:&quot;&amp;[.P19] &amp;&quot;}&quot;" office:value-type="string" office:string-value=":{&quot;LogicalId&quot;:&quot;Off&quot;                 ,&quot;Name&quot;:&quot;Mode Off&quot;                           ,&quot;Order&quot;:25 ,&quot;Type&quot;:&quot;action&quot;,&quot;SubType&quot;:&quot;other&quot;  ,&quot;Unite&quot;:null   ,&quot;Config_infoName&quot;:&quot;EtatConsigne&quot;       ,&quot;Config_value&quot;:null      ,&quot;Config_minValue&quot;:null,&quot;Config_maxValue&quot;:null,&quot;Config_tempHL&quot;:null ,&quot;setValue&quot;:null                  ,&quot;Display_param_step&quot;:null   ,&quot;IsHistorized&quot;:0,&quot;IsVisible&quot;:1}" calcext:value-type="string">
            <text:p>:{"LogicalId":"Off" <text:s text:c="16"/>,"Name":"Mode Off" <text:s text:c="26"/>,"Order":25 ,"Type":"action","SubType":"other" <text:s/>,"Unite":null <text:s text:c="2"/>,"Config_infoName":"EtatConsigne" <text:s text:c="6"/>,"Config_value":null <text:s text:c="5"/>,"Config_minValue":null,"Config_maxValue":null,"Config_tempHL":null ,"setValue":null <text:s text:c="17"/>,"Display_param_step":null <text:s text:c="2"/>,"IsHistorized":0,"IsVisible":1}</text:p>
          </table:table-cell>
          <table:table-cell table:style-name="ce15" office:value-type="string" calcext:value-type="string">
            <text:p>.</text:p>
          </table:table-cell>
          <table:table-cell table:style-name="ce14"/>
          <table:table-cell table:style-name="ce17" table:formula="of:=IF([.W18]=&quot;&quot;;&quot; &quot;;IF([.B19]&lt;&gt;&quot;&quot;;&quot;,&quot;;&quot;]&quot;))&#10;&amp;IF([.B19]&lt;&gt;&quot;&quot;;&quot;{&quot;&quot;cmd&quot;&quot;:&quot;&quot;&quot;&amp;[.B19]&amp;&quot;&quot;&quot;&quot;&amp;REPT(&quot; &quot;;20-LEN([.B19]));&quot;&quot;)" office:value-type="string" office:string-value=",{&quot;cmd&quot;:&quot;Off&quot;                 " calcext:value-type="string">
            <text:p>,{"cmd":"Off" <text:s text:c="16"/></text:p>
          </table:table-cell>
          <table:table-cell table:style-name="ce17" table:formula="of:=&quot;,&quot;&quot;attrs&quot;&quot;:&quot;&#10;&amp;&quot;{&quot;&quot;&quot;&amp;[.B$1]&amp;&quot;&quot;&quot;:&quot;&quot;&quot;&amp;[.B19]&amp;&quot;&quot;&quot;&quot;&amp;REPT(&quot; &quot;;20-LEN([.B19]))&#10;&amp;&quot;,&quot;&quot;&quot;&amp;[.C$1]&amp;&quot;&quot;&quot;:&quot;&quot;&quot;&amp;[.C19]&amp;&quot;&quot;&quot;&quot;&amp;REPT(&quot; &quot;;35-LEN([.C19]))&#10;&amp;&quot;,&quot;&quot;&quot;&amp;[.D$1]&amp;&quot;&quot;&quot;:&quot;&amp;[.D19]&amp;REPT(&quot; &quot;;3-LEN([.D19]))&#10;&amp;&quot;,&quot;&quot;&quot;&amp;[.E$1]&amp;&quot;&quot;&quot;:&quot;&quot;&quot;&amp;[.E19]&amp;&quot;&quot;&quot;&quot;&amp;REPT(&quot; &quot;;6-LEN([.E19]))&#10;&amp;&quot;,&quot;&quot;&quot;&amp;[.F$1]&amp;&quot;&quot;&quot;:&quot;&quot;&quot;&amp;[.F19]&amp;&quot;&quot;&quot;&quot;&amp;REPT(&quot; &quot;;7-LEN([.F19]))&#10;&amp;&quot;,&quot;&quot;&quot;&amp;[.G$1]&amp;&quot;&quot;&quot;:&quot;&amp;IF([.G19]&lt;&gt;&quot;&quot;;&quot;&quot;&quot;&quot;&amp;[.G19]&amp;&quot;&quot;&quot;&quot;&amp;REPT(&quot; &quot;;5-LEN([.G19]));&quot;null&quot;&amp;REPT(&quot; &quot;;5-4+2))&#10;&amp;&quot;,&quot;&quot;&quot;&amp;[.H$1]&amp;&quot;&quot;&quot;:&quot;&amp;IF([.H19]&lt;&gt;&quot;&quot;;&quot;&quot;&quot;&quot;&amp;[.H19]&amp;&quot;&quot;&quot;&quot;&amp;REPT(&quot; &quot;;19-LEN([.H19]));&quot;null&quot;&amp;REPT(&quot; &quot;;19-4+2))&#10;&amp;&quot;,&quot;&quot;&quot;&amp;[.I$1]&amp;&quot;&quot;&quot;:&quot;&amp;IF([.I19]&lt;&gt;&quot;&quot;;&quot;&quot;&quot;&quot;&amp;[.I19]&amp;&quot;&quot;&quot;&quot;&amp;REPT(&quot; &quot;;8-LEN([.I19]));&quot;null&quot;&amp;REPT(&quot; &quot;;8-4+2))&#10;&amp;&quot;,&quot;&quot;&quot;&amp;[.J$1]&amp;&quot;&quot;&quot;:&quot;&amp;IF([.J19]&lt;&gt;&quot;&quot;;[.J19]&amp;REPT(&quot; &quot;;4-LEN([.J19]));&quot;null&quot;)&#10;&amp;&quot;,&quot;&quot;&quot;&amp;[.K$1]&amp;&quot;&quot;&quot;:&quot;&amp;IF([.K19]&lt;&gt;&quot;&quot;;[.K19]&amp;REPT(&quot; &quot;;4-LEN([.K19]));&quot;null&quot;)&#10;&amp;&quot;,&quot;&quot;&quot;&amp;[.L$1]&amp;&quot;&quot;&quot;:&quot;&amp;IF([.L19]&lt;&gt;&quot;&quot;;[.L19]&amp;REPT(&quot; &quot;;5-LEN([.L19]));&quot;null &quot;)&#10;&amp;&quot;,&quot;&quot;&quot;&amp;[.M$1]&amp;&quot;&quot;&quot;:&quot;&amp;IF([.M19]&lt;&gt;&quot;&quot;;&quot;&quot;&quot;&quot;&amp;[.M19]&amp;&quot;&quot;&quot;&quot;&amp;REPT(&quot; &quot;;20-LEN([.M19]));&quot;null&quot;&amp;REPT(&quot; &quot;;20-4+2))&#10;&amp;&quot;,&quot;&quot;&quot;&amp;[.N$1]&amp;&quot;&quot;&quot;:&quot;&amp;IF([.N19]&lt;&gt;&quot;&quot;;&quot;&quot;&quot;&quot;&amp;[.N19]&amp;&quot;&quot;&quot;&quot;&amp;REPT(&quot; &quot;;30-LEN([.N19]));&quot;null&quot;&amp;REPT(&quot; &quot;;30-4+2))&#10;&amp;&quot;,&quot;&quot;&quot;&amp;[.O$1]&amp;&quot;&quot;&quot;:&quot;&amp;[.O19]&#10;&amp;&quot;,&quot;&quot;&quot;&amp;[.P$1]&amp;&quot;&quot;&quot;:&quot;&amp;[.P19]&#10;&amp;&quot;}}&quot;" office:value-type="string" office:string-value=",&quot;attrs&quot;:{&quot;LogicalId&quot;:&quot;Off&quot;                 ,&quot;Name&quot;:&quot;Mode Off&quot;                           ,&quot;Order&quot;:25 ,&quot;Type&quot;:&quot;action&quot;,&quot;SubType&quot;:&quot;other&quot;  ,&quot;Unite&quot;:null   ,&quot;Config_infoName&quot;:&quot;EtatConsigne&quot;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Off" <text:s text:c="16"/>,"Name":"Mode Off" <text:s text:c="26"/>,"Order":25 ,"Type":"action","SubType":"other" <text:s/>,"Unite":null <text:s text:c="2"/>,"Config_infoName":"EtatConsigne" <text:s text:c="6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onfort-1</text:p>
          </table:table-cell>
          <table:table-cell office:value-type="string" calcext:value-type="string">
            <text:p>Mode Confort-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ther</text:p>
          </table:table-cell>
          <table:table-cell/>
          <table:table-cell office:value-type="string" calcext:value-type="string">
            <text:p>EtatConsigne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N20])" office:value-type="float" office:value="0" calcext:value-type="float">
            <text:p>0</text:p>
          </table:table-cell>
          <table:table-cell/>
          <table:table-cell table:style-name="ce17" table:formula="of:=&quot;&quot;&amp;IF([.T19]=&quot;&quot;;&quot; &quot;;IF([.A20]&lt;&gt;&quot;&quot;;&quot;,&quot;;&quot;}&quot;)) &amp;IF([.A20]&lt;&gt;&quot;&quot;;&quot;&quot;&quot;&quot;&amp;[.A20]&amp;&quot;&quot;&quot;&quot;&amp;REPT(&quot; &quot;;20-LEN([.A20]));&quot;&quot;)" office:value-type="string" office:string-value=",&quot;Confort-1&quot;           " calcext:value-type="string">
            <text:p>,"Confort-1" <text:s text:c="10"/></text:p>
          </table:table-cell>
          <table:table-cell table:style-name="ce17" table:formula="of:=&quot;:&quot; &amp;&quot;{&quot;&quot;&quot;&amp;[.B$1]&amp;&quot;&quot;&quot;:&quot;&quot;&quot;&amp;[.B20]&amp;&quot;&quot;&quot;&quot;&amp;REPT(&quot; &quot;;20-LEN([.B20])) &amp;&quot;,&quot;&quot;&quot;&amp;[.C$1]&amp;&quot;&quot;&quot;:&quot;&quot;&quot;&amp;[.C20]&amp;&quot;&quot;&quot;&quot;&amp;REPT(&quot; &quot;;35-LEN([.C20])) &amp;&quot;,&quot;&quot;&quot;&amp;[.D$1]&amp;&quot;&quot;&quot;:&quot;&amp;[.D20]&amp;REPT(&quot; &quot;;3-LEN([.D20])) &amp;&quot;,&quot;&quot;&quot;&amp;[.E$1]&amp;&quot;&quot;&quot;:&quot;&quot;&quot;&amp;[.E20]&amp;&quot;&quot;&quot;&quot;&amp;REPT(&quot; &quot;;6-LEN([.E20])) &amp;&quot;,&quot;&quot;&quot;&amp;[.F$1]&amp;&quot;&quot;&quot;:&quot;&quot;&quot;&amp;[.F20]&amp;&quot;&quot;&quot;&quot;&amp;REPT(&quot; &quot;;7-LEN([.F20])) &amp;&quot;,&quot;&quot;&quot;&amp;[.G$1]&amp;&quot;&quot;&quot;:&quot;&amp;IF([.G20]&lt;&gt;&quot;&quot;;&quot;&quot;&quot;&quot;&amp;[.G20]&amp;&quot;&quot;&quot;&quot;&amp;REPT(&quot; &quot;;5-LEN([.G20]));&quot;null&quot;&amp;REPT(&quot; &quot;;5-4+2)) &amp;&quot;,&quot;&quot;&quot;&amp;[.H$1]&amp;&quot;&quot;&quot;:&quot;&amp;IF([.H20]&lt;&gt;&quot;&quot;;&quot;&quot;&quot;&quot;&amp;[.H20]&amp;&quot;&quot;&quot;&quot;&amp;REPT(&quot; &quot;;19-LEN([.H20]));&quot;null&quot;&amp;REPT(&quot; &quot;;19-4+2)) &amp;&quot;,&quot;&quot;&quot;&amp;[.I$1]&amp;&quot;&quot;&quot;:&quot;&amp;IF([.I20]&lt;&gt;&quot;&quot;;&quot;&quot;&quot;&quot;&amp;[.I20]&amp;&quot;&quot;&quot;&quot;&amp;REPT(&quot; &quot;;8-LEN([.I20]));&quot;null&quot;&amp;REPT(&quot; &quot;;8-4+2)) &amp;&quot;,&quot;&quot;&quot;&amp;[.J$1]&amp;&quot;&quot;&quot;:&quot;&amp;IF([.J20]&lt;&gt;&quot;&quot;;[.J20]&amp;REPT(&quot; &quot;;4-LEN([.J20]));&quot;null&quot;) &amp;&quot;,&quot;&quot;&quot;&amp;[.K$1]&amp;&quot;&quot;&quot;:&quot;&amp;IF([.K20]&lt;&gt;&quot;&quot;;[.K20]&amp;REPT(&quot; &quot;;4-LEN([.K20]));&quot;null&quot;) &amp;&quot;,&quot;&quot;&quot;&amp;[.L$1]&amp;&quot;&quot;&quot;:&quot;&amp;IF([.L20]&lt;&gt;&quot;&quot;;[.L20]&amp;REPT(&quot; &quot;;5-LEN([.L20]));&quot;null &quot;) &amp;&quot;,&quot;&quot;&quot;&amp;[.M$1]&amp;&quot;&quot;&quot;:&quot;&amp;IF([.M20]&lt;&gt;&quot;&quot;;&quot;&quot;&quot;&quot;&amp;[.M20]&amp;&quot;&quot;&quot;&quot;&amp;REPT(&quot; &quot;;20-LEN([.M20]));&quot;null&quot;&amp;REPT(&quot; &quot;;20-4+2)) &amp;&quot;,&quot;&quot;&quot;&amp;[.N$1]&amp;&quot;&quot;&quot;:&quot;&amp;IF([.N20]&lt;&gt;&quot;&quot;;&quot;&quot;&amp;[.N20]&amp;&quot;&quot;&amp;REPT(&quot; &quot;;5-LEN([.N20]));&quot;null&quot;&amp;REPT(&quot; &quot;;5-4+2)) &amp;&quot;,&quot;&quot;&quot;&amp;[.O$1]&amp;&quot;&quot;&quot;:&quot;&amp;[.O20] &amp;&quot;,&quot;&quot;&quot;&amp;[.P$1]&amp;&quot;&quot;&quot;:&quot;&amp;[.P20] &amp;&quot;}&quot;" office:value-type="string" office:string-value=":{&quot;LogicalId&quot;:&quot;Confort-1&quot;           ,&quot;Name&quot;:&quot;Mode Confort-1&quot;                     ,&quot;Order&quot;:26 ,&quot;Type&quot;:&quot;action&quot;,&quot;SubType&quot;:&quot;other&quot;  ,&quot;Unite&quot;:null   ,&quot;Config_infoName&quot;:&quot;EtatConsigne&quot;       ,&quot;Config_value&quot;:null      ,&quot;Config_minValue&quot;:null,&quot;Config_maxValue&quot;:null,&quot;Config_tempHL&quot;:null ,&quot;setValue&quot;:null                  ,&quot;Display_param_step&quot;:null   ,&quot;IsHistorized&quot;:0,&quot;IsVisible&quot;:1}" calcext:value-type="string">
            <text:p>:{"LogicalId":"Confort-1" <text:s text:c="10"/>,"Name":"Mode Confort-1" <text:s text:c="20"/>,"Order":26 ,"Type":"action","SubType":"other" <text:s/>,"Unite":null <text:s text:c="2"/>,"Config_infoName":"EtatConsigne" <text:s text:c="6"/>,"Config_value":null <text:s text:c="5"/>,"Config_minValue":null,"Config_maxValue":null,"Config_tempHL":null ,"setValue":null <text:s text:c="17"/>,"Display_param_step":null <text:s text:c="2"/>,"IsHistorized":0,"IsVisible":1}</text:p>
          </table:table-cell>
          <table:table-cell table:style-name="ce15" office:value-type="string" calcext:value-type="string">
            <text:p>.</text:p>
          </table:table-cell>
          <table:table-cell table:style-name="ce14"/>
          <table:table-cell table:style-name="ce17" table:formula="of:=IF([.W19]=&quot;&quot;;&quot; &quot;;IF([.B20]&lt;&gt;&quot;&quot;;&quot;,&quot;;&quot;]&quot;))&#10;&amp;IF([.B20]&lt;&gt;&quot;&quot;;&quot;{&quot;&quot;cmd&quot;&quot;:&quot;&quot;&quot;&amp;[.B20]&amp;&quot;&quot;&quot;&quot;&amp;REPT(&quot; &quot;;20-LEN([.B20]));&quot;&quot;)" office:value-type="string" office:string-value=",{&quot;cmd&quot;:&quot;Confort-1&quot;           " calcext:value-type="string">
            <text:p>,{"cmd":"Confort-1" <text:s text:c="10"/></text:p>
          </table:table-cell>
          <table:table-cell table:style-name="ce17" table:formula="of:=&quot;,&quot;&quot;attrs&quot;&quot;:&quot;&#10;&amp;&quot;{&quot;&quot;&quot;&amp;[.B$1]&amp;&quot;&quot;&quot;:&quot;&quot;&quot;&amp;[.B20]&amp;&quot;&quot;&quot;&quot;&amp;REPT(&quot; &quot;;20-LEN([.B20]))&#10;&amp;&quot;,&quot;&quot;&quot;&amp;[.C$1]&amp;&quot;&quot;&quot;:&quot;&quot;&quot;&amp;[.C20]&amp;&quot;&quot;&quot;&quot;&amp;REPT(&quot; &quot;;35-LEN([.C20]))&#10;&amp;&quot;,&quot;&quot;&quot;&amp;[.D$1]&amp;&quot;&quot;&quot;:&quot;&amp;[.D20]&amp;REPT(&quot; &quot;;3-LEN([.D20]))&#10;&amp;&quot;,&quot;&quot;&quot;&amp;[.E$1]&amp;&quot;&quot;&quot;:&quot;&quot;&quot;&amp;[.E20]&amp;&quot;&quot;&quot;&quot;&amp;REPT(&quot; &quot;;6-LEN([.E20]))&#10;&amp;&quot;,&quot;&quot;&quot;&amp;[.F$1]&amp;&quot;&quot;&quot;:&quot;&quot;&quot;&amp;[.F20]&amp;&quot;&quot;&quot;&quot;&amp;REPT(&quot; &quot;;7-LEN([.F20]))&#10;&amp;&quot;,&quot;&quot;&quot;&amp;[.G$1]&amp;&quot;&quot;&quot;:&quot;&amp;IF([.G20]&lt;&gt;&quot;&quot;;&quot;&quot;&quot;&quot;&amp;[.G20]&amp;&quot;&quot;&quot;&quot;&amp;REPT(&quot; &quot;;5-LEN([.G20]));&quot;null&quot;&amp;REPT(&quot; &quot;;5-4+2))&#10;&amp;&quot;,&quot;&quot;&quot;&amp;[.H$1]&amp;&quot;&quot;&quot;:&quot;&amp;IF([.H20]&lt;&gt;&quot;&quot;;&quot;&quot;&quot;&quot;&amp;[.H20]&amp;&quot;&quot;&quot;&quot;&amp;REPT(&quot; &quot;;19-LEN([.H20]));&quot;null&quot;&amp;REPT(&quot; &quot;;19-4+2))&#10;&amp;&quot;,&quot;&quot;&quot;&amp;[.I$1]&amp;&quot;&quot;&quot;:&quot;&amp;IF([.I20]&lt;&gt;&quot;&quot;;&quot;&quot;&quot;&quot;&amp;[.I20]&amp;&quot;&quot;&quot;&quot;&amp;REPT(&quot; &quot;;8-LEN([.I20]));&quot;null&quot;&amp;REPT(&quot; &quot;;8-4+2))&#10;&amp;&quot;,&quot;&quot;&quot;&amp;[.J$1]&amp;&quot;&quot;&quot;:&quot;&amp;IF([.J20]&lt;&gt;&quot;&quot;;[.J20]&amp;REPT(&quot; &quot;;4-LEN([.J20]));&quot;null&quot;)&#10;&amp;&quot;,&quot;&quot;&quot;&amp;[.K$1]&amp;&quot;&quot;&quot;:&quot;&amp;IF([.K20]&lt;&gt;&quot;&quot;;[.K20]&amp;REPT(&quot; &quot;;4-LEN([.K20]));&quot;null&quot;)&#10;&amp;&quot;,&quot;&quot;&quot;&amp;[.L$1]&amp;&quot;&quot;&quot;:&quot;&amp;IF([.L20]&lt;&gt;&quot;&quot;;[.L20]&amp;REPT(&quot; &quot;;5-LEN([.L20]));&quot;null &quot;)&#10;&amp;&quot;,&quot;&quot;&quot;&amp;[.M$1]&amp;&quot;&quot;&quot;:&quot;&amp;IF([.M20]&lt;&gt;&quot;&quot;;&quot;&quot;&quot;&quot;&amp;[.M20]&amp;&quot;&quot;&quot;&quot;&amp;REPT(&quot; &quot;;20-LEN([.M20]));&quot;null&quot;&amp;REPT(&quot; &quot;;20-4+2))&#10;&amp;&quot;,&quot;&quot;&quot;&amp;[.N$1]&amp;&quot;&quot;&quot;:&quot;&amp;IF([.N20]&lt;&gt;&quot;&quot;;&quot;&quot;&quot;&quot;&amp;[.N20]&amp;&quot;&quot;&quot;&quot;&amp;REPT(&quot; &quot;;30-LEN([.N20]));&quot;null&quot;&amp;REPT(&quot; &quot;;30-4+2))&#10;&amp;&quot;,&quot;&quot;&quot;&amp;[.O$1]&amp;&quot;&quot;&quot;:&quot;&amp;[.O20]&#10;&amp;&quot;,&quot;&quot;&quot;&amp;[.P$1]&amp;&quot;&quot;&quot;:&quot;&amp;[.P20]&#10;&amp;&quot;}}&quot;" office:value-type="string" office:string-value=",&quot;attrs&quot;:{&quot;LogicalId&quot;:&quot;Confort-1&quot;           ,&quot;Name&quot;:&quot;Mode Confort-1&quot;                     ,&quot;Order&quot;:26 ,&quot;Type&quot;:&quot;action&quot;,&quot;SubType&quot;:&quot;other&quot;  ,&quot;Unite&quot;:null   ,&quot;Config_infoName&quot;:&quot;EtatConsigne&quot;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Confort-1" <text:s text:c="10"/>,"Name":"Mode Confort-1" <text:s text:c="20"/>,"Order":26 ,"Type":"action","SubType":"other" <text:s/>,"Unite":null <text:s text:c="2"/>,"Config_infoName":"EtatConsigne" <text:s text:c="6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onfort-2</text:p>
          </table:table-cell>
          <table:table-cell office:value-type="string" calcext:value-type="string">
            <text:p>Mode Confort-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ther</text:p>
          </table:table-cell>
          <table:table-cell/>
          <table:table-cell office:value-type="string" calcext:value-type="string">
            <text:p>EtatConsigne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N21])" office:value-type="float" office:value="0" calcext:value-type="float">
            <text:p>0</text:p>
          </table:table-cell>
          <table:table-cell/>
          <table:table-cell table:style-name="ce17" table:formula="of:=&quot;&quot;&amp;IF([.T20]=&quot;&quot;;&quot; &quot;;IF([.A21]&lt;&gt;&quot;&quot;;&quot;,&quot;;&quot;}&quot;)) &amp;IF([.A21]&lt;&gt;&quot;&quot;;&quot;&quot;&quot;&quot;&amp;[.A21]&amp;&quot;&quot;&quot;&quot;&amp;REPT(&quot; &quot;;20-LEN([.A21]));&quot;&quot;)" office:value-type="string" office:string-value=",&quot;Confort-2&quot;           " calcext:value-type="string">
            <text:p>,"Confort-2" <text:s text:c="10"/></text:p>
          </table:table-cell>
          <table:table-cell table:style-name="ce17" table:formula="of:=&quot;:&quot; &amp;&quot;{&quot;&quot;&quot;&amp;[.B$1]&amp;&quot;&quot;&quot;:&quot;&quot;&quot;&amp;[.B21]&amp;&quot;&quot;&quot;&quot;&amp;REPT(&quot; &quot;;20-LEN([.B21])) &amp;&quot;,&quot;&quot;&quot;&amp;[.C$1]&amp;&quot;&quot;&quot;:&quot;&quot;&quot;&amp;[.C21]&amp;&quot;&quot;&quot;&quot;&amp;REPT(&quot; &quot;;35-LEN([.C21])) &amp;&quot;,&quot;&quot;&quot;&amp;[.D$1]&amp;&quot;&quot;&quot;:&quot;&amp;[.D21]&amp;REPT(&quot; &quot;;3-LEN([.D21])) &amp;&quot;,&quot;&quot;&quot;&amp;[.E$1]&amp;&quot;&quot;&quot;:&quot;&quot;&quot;&amp;[.E21]&amp;&quot;&quot;&quot;&quot;&amp;REPT(&quot; &quot;;6-LEN([.E21])) &amp;&quot;,&quot;&quot;&quot;&amp;[.F$1]&amp;&quot;&quot;&quot;:&quot;&quot;&quot;&amp;[.F21]&amp;&quot;&quot;&quot;&quot;&amp;REPT(&quot; &quot;;7-LEN([.F21])) &amp;&quot;,&quot;&quot;&quot;&amp;[.G$1]&amp;&quot;&quot;&quot;:&quot;&amp;IF([.G21]&lt;&gt;&quot;&quot;;&quot;&quot;&quot;&quot;&amp;[.G21]&amp;&quot;&quot;&quot;&quot;&amp;REPT(&quot; &quot;;5-LEN([.G21]));&quot;null&quot;&amp;REPT(&quot; &quot;;5-4+2)) &amp;&quot;,&quot;&quot;&quot;&amp;[.H$1]&amp;&quot;&quot;&quot;:&quot;&amp;IF([.H21]&lt;&gt;&quot;&quot;;&quot;&quot;&quot;&quot;&amp;[.H21]&amp;&quot;&quot;&quot;&quot;&amp;REPT(&quot; &quot;;19-LEN([.H21]));&quot;null&quot;&amp;REPT(&quot; &quot;;19-4+2)) &amp;&quot;,&quot;&quot;&quot;&amp;[.I$1]&amp;&quot;&quot;&quot;:&quot;&amp;IF([.I21]&lt;&gt;&quot;&quot;;&quot;&quot;&quot;&quot;&amp;[.I21]&amp;&quot;&quot;&quot;&quot;&amp;REPT(&quot; &quot;;8-LEN([.I21]));&quot;null&quot;&amp;REPT(&quot; &quot;;8-4+2)) &amp;&quot;,&quot;&quot;&quot;&amp;[.J$1]&amp;&quot;&quot;&quot;:&quot;&amp;IF([.J21]&lt;&gt;&quot;&quot;;[.J21]&amp;REPT(&quot; &quot;;4-LEN([.J21]));&quot;null&quot;) &amp;&quot;,&quot;&quot;&quot;&amp;[.K$1]&amp;&quot;&quot;&quot;:&quot;&amp;IF([.K21]&lt;&gt;&quot;&quot;;[.K21]&amp;REPT(&quot; &quot;;4-LEN([.K21]));&quot;null&quot;) &amp;&quot;,&quot;&quot;&quot;&amp;[.L$1]&amp;&quot;&quot;&quot;:&quot;&amp;IF([.L21]&lt;&gt;&quot;&quot;;[.L21]&amp;REPT(&quot; &quot;;5-LEN([.L21]));&quot;null &quot;) &amp;&quot;,&quot;&quot;&quot;&amp;[.M$1]&amp;&quot;&quot;&quot;:&quot;&amp;IF([.M21]&lt;&gt;&quot;&quot;;&quot;&quot;&quot;&quot;&amp;[.M21]&amp;&quot;&quot;&quot;&quot;&amp;REPT(&quot; &quot;;20-LEN([.M21]));&quot;null&quot;&amp;REPT(&quot; &quot;;20-4+2)) &amp;&quot;,&quot;&quot;&quot;&amp;[.N$1]&amp;&quot;&quot;&quot;:&quot;&amp;IF([.N21]&lt;&gt;&quot;&quot;;&quot;&quot;&amp;[.N21]&amp;&quot;&quot;&amp;REPT(&quot; &quot;;5-LEN([.N21]));&quot;null&quot;&amp;REPT(&quot; &quot;;5-4+2)) &amp;&quot;,&quot;&quot;&quot;&amp;[.O$1]&amp;&quot;&quot;&quot;:&quot;&amp;[.O21] &amp;&quot;,&quot;&quot;&quot;&amp;[.P$1]&amp;&quot;&quot;&quot;:&quot;&amp;[.P21] &amp;&quot;}&quot;" office:value-type="string" office:string-value=":{&quot;LogicalId&quot;:&quot;Confort-2&quot;           ,&quot;Name&quot;:&quot;Mode Confort-2&quot;                     ,&quot;Order&quot;:27 ,&quot;Type&quot;:&quot;action&quot;,&quot;SubType&quot;:&quot;other&quot;  ,&quot;Unite&quot;:null   ,&quot;Config_infoName&quot;:&quot;EtatConsigne&quot;       ,&quot;Config_value&quot;:null      ,&quot;Config_minValue&quot;:null,&quot;Config_maxValue&quot;:null,&quot;Config_tempHL&quot;:null ,&quot;setValue&quot;:null                  ,&quot;Display_param_step&quot;:null   ,&quot;IsHistorized&quot;:0,&quot;IsVisible&quot;:1}" calcext:value-type="string">
            <text:p>:{"LogicalId":"Confort-2" <text:s text:c="10"/>,"Name":"Mode Confort-2" <text:s text:c="20"/>,"Order":27 ,"Type":"action","SubType":"other" <text:s/>,"Unite":null <text:s text:c="2"/>,"Config_infoName":"EtatConsigne" <text:s text:c="6"/>,"Config_value":null <text:s text:c="5"/>,"Config_minValue":null,"Config_maxValue":null,"Config_tempHL":null ,"setValue":null <text:s text:c="17"/>,"Display_param_step":null <text:s text:c="2"/>,"IsHistorized":0,"IsVisible":1}</text:p>
          </table:table-cell>
          <table:table-cell table:style-name="ce15" office:value-type="string" calcext:value-type="string">
            <text:p>.</text:p>
          </table:table-cell>
          <table:table-cell table:style-name="ce14"/>
          <table:table-cell table:style-name="ce17" table:formula="of:=IF([.W20]=&quot;&quot;;&quot; &quot;;IF([.B21]&lt;&gt;&quot;&quot;;&quot;,&quot;;&quot;]&quot;))&#10;&amp;IF([.B21]&lt;&gt;&quot;&quot;;&quot;{&quot;&quot;cmd&quot;&quot;:&quot;&quot;&quot;&amp;[.B21]&amp;&quot;&quot;&quot;&quot;&amp;REPT(&quot; &quot;;20-LEN([.B21]));&quot;&quot;)" office:value-type="string" office:string-value=",{&quot;cmd&quot;:&quot;Confort-2&quot;           " calcext:value-type="string">
            <text:p>,{"cmd":"Confort-2" <text:s text:c="10"/></text:p>
          </table:table-cell>
          <table:table-cell table:style-name="ce17" table:formula="of:=&quot;,&quot;&quot;attrs&quot;&quot;:&quot;&#10;&amp;&quot;{&quot;&quot;&quot;&amp;[.B$1]&amp;&quot;&quot;&quot;:&quot;&quot;&quot;&amp;[.B21]&amp;&quot;&quot;&quot;&quot;&amp;REPT(&quot; &quot;;20-LEN([.B21]))&#10;&amp;&quot;,&quot;&quot;&quot;&amp;[.C$1]&amp;&quot;&quot;&quot;:&quot;&quot;&quot;&amp;[.C21]&amp;&quot;&quot;&quot;&quot;&amp;REPT(&quot; &quot;;35-LEN([.C21]))&#10;&amp;&quot;,&quot;&quot;&quot;&amp;[.D$1]&amp;&quot;&quot;&quot;:&quot;&amp;[.D21]&amp;REPT(&quot; &quot;;3-LEN([.D21]))&#10;&amp;&quot;,&quot;&quot;&quot;&amp;[.E$1]&amp;&quot;&quot;&quot;:&quot;&quot;&quot;&amp;[.E21]&amp;&quot;&quot;&quot;&quot;&amp;REPT(&quot; &quot;;6-LEN([.E21]))&#10;&amp;&quot;,&quot;&quot;&quot;&amp;[.F$1]&amp;&quot;&quot;&quot;:&quot;&quot;&quot;&amp;[.F21]&amp;&quot;&quot;&quot;&quot;&amp;REPT(&quot; &quot;;7-LEN([.F21]))&#10;&amp;&quot;,&quot;&quot;&quot;&amp;[.G$1]&amp;&quot;&quot;&quot;:&quot;&amp;IF([.G21]&lt;&gt;&quot;&quot;;&quot;&quot;&quot;&quot;&amp;[.G21]&amp;&quot;&quot;&quot;&quot;&amp;REPT(&quot; &quot;;5-LEN([.G21]));&quot;null&quot;&amp;REPT(&quot; &quot;;5-4+2))&#10;&amp;&quot;,&quot;&quot;&quot;&amp;[.H$1]&amp;&quot;&quot;&quot;:&quot;&amp;IF([.H21]&lt;&gt;&quot;&quot;;&quot;&quot;&quot;&quot;&amp;[.H21]&amp;&quot;&quot;&quot;&quot;&amp;REPT(&quot; &quot;;19-LEN([.H21]));&quot;null&quot;&amp;REPT(&quot; &quot;;19-4+2))&#10;&amp;&quot;,&quot;&quot;&quot;&amp;[.I$1]&amp;&quot;&quot;&quot;:&quot;&amp;IF([.I21]&lt;&gt;&quot;&quot;;&quot;&quot;&quot;&quot;&amp;[.I21]&amp;&quot;&quot;&quot;&quot;&amp;REPT(&quot; &quot;;8-LEN([.I21]));&quot;null&quot;&amp;REPT(&quot; &quot;;8-4+2))&#10;&amp;&quot;,&quot;&quot;&quot;&amp;[.J$1]&amp;&quot;&quot;&quot;:&quot;&amp;IF([.J21]&lt;&gt;&quot;&quot;;[.J21]&amp;REPT(&quot; &quot;;4-LEN([.J21]));&quot;null&quot;)&#10;&amp;&quot;,&quot;&quot;&quot;&amp;[.K$1]&amp;&quot;&quot;&quot;:&quot;&amp;IF([.K21]&lt;&gt;&quot;&quot;;[.K21]&amp;REPT(&quot; &quot;;4-LEN([.K21]));&quot;null&quot;)&#10;&amp;&quot;,&quot;&quot;&quot;&amp;[.L$1]&amp;&quot;&quot;&quot;:&quot;&amp;IF([.L21]&lt;&gt;&quot;&quot;;[.L21]&amp;REPT(&quot; &quot;;5-LEN([.L21]));&quot;null &quot;)&#10;&amp;&quot;,&quot;&quot;&quot;&amp;[.M$1]&amp;&quot;&quot;&quot;:&quot;&amp;IF([.M21]&lt;&gt;&quot;&quot;;&quot;&quot;&quot;&quot;&amp;[.M21]&amp;&quot;&quot;&quot;&quot;&amp;REPT(&quot; &quot;;20-LEN([.M21]));&quot;null&quot;&amp;REPT(&quot; &quot;;20-4+2))&#10;&amp;&quot;,&quot;&quot;&quot;&amp;[.N$1]&amp;&quot;&quot;&quot;:&quot;&amp;IF([.N21]&lt;&gt;&quot;&quot;;&quot;&quot;&quot;&quot;&amp;[.N21]&amp;&quot;&quot;&quot;&quot;&amp;REPT(&quot; &quot;;30-LEN([.N21]));&quot;null&quot;&amp;REPT(&quot; &quot;;30-4+2))&#10;&amp;&quot;,&quot;&quot;&quot;&amp;[.O$1]&amp;&quot;&quot;&quot;:&quot;&amp;[.O21]&#10;&amp;&quot;,&quot;&quot;&quot;&amp;[.P$1]&amp;&quot;&quot;&quot;:&quot;&amp;[.P21]&#10;&amp;&quot;}}&quot;" office:value-type="string" office:string-value=",&quot;attrs&quot;:{&quot;LogicalId&quot;:&quot;Confort-2&quot;           ,&quot;Name&quot;:&quot;Mode Confort-2&quot;                     ,&quot;Order&quot;:27 ,&quot;Type&quot;:&quot;action&quot;,&quot;SubType&quot;:&quot;other&quot;  ,&quot;Unite&quot;:null   ,&quot;Config_infoName&quot;:&quot;EtatConsigne&quot;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Confort-2" <text:s text:c="10"/>,"Name":"Mode Confort-2" <text:s text:c="20"/>,"Order":27 ,"Type":"action","SubType":"other" <text:s/>,"Unite":null <text:s text:c="2"/>,"Config_infoName":"EtatConsigne" <text:s text:c="6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tatprog</text:p>
          </table:table-cell>
          <table:table-cell office:value-type="string" calcext:value-type="string">
            <text:p>Etat programmation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binary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N22])" office:value-type="float" office:value="0" calcext:value-type="float">
            <text:p>0</text:p>
          </table:table-cell>
          <table:table-cell/>
          <table:table-cell table:style-name="ce17" table:formula="of:=&quot;&quot;&amp;IF([.T21]=&quot;&quot;;&quot; &quot;;IF([.A22]&lt;&gt;&quot;&quot;;&quot;,&quot;;&quot;}&quot;)) &amp;IF([.A22]&lt;&gt;&quot;&quot;;&quot;&quot;&quot;&quot;&amp;[.A22]&amp;&quot;&quot;&quot;&quot;&amp;REPT(&quot; &quot;;20-LEN([.A22]));&quot;&quot;)" office:value-type="string" office:string-value=",&quot;etatprog&quot;            " calcext:value-type="string">
            <text:p>,"etatprog" <text:s text:c="11"/></text:p>
          </table:table-cell>
          <table:table-cell table:style-name="ce17" table:formula="of:=&quot;:&quot; &amp;&quot;{&quot;&quot;&quot;&amp;[.B$1]&amp;&quot;&quot;&quot;:&quot;&quot;&quot;&amp;[.B22]&amp;&quot;&quot;&quot;&quot;&amp;REPT(&quot; &quot;;20-LEN([.B22])) &amp;&quot;,&quot;&quot;&quot;&amp;[.C$1]&amp;&quot;&quot;&quot;:&quot;&quot;&quot;&amp;[.C22]&amp;&quot;&quot;&quot;&quot;&amp;REPT(&quot; &quot;;35-LEN([.C22])) &amp;&quot;,&quot;&quot;&quot;&amp;[.D$1]&amp;&quot;&quot;&quot;:&quot;&amp;[.D22]&amp;REPT(&quot; &quot;;3-LEN([.D22])) &amp;&quot;,&quot;&quot;&quot;&amp;[.E$1]&amp;&quot;&quot;&quot;:&quot;&quot;&quot;&amp;[.E22]&amp;&quot;&quot;&quot;&quot;&amp;REPT(&quot; &quot;;6-LEN([.E22])) &amp;&quot;,&quot;&quot;&quot;&amp;[.F$1]&amp;&quot;&quot;&quot;:&quot;&quot;&quot;&amp;[.F22]&amp;&quot;&quot;&quot;&quot;&amp;REPT(&quot; &quot;;7-LEN([.F22])) &amp;&quot;,&quot;&quot;&quot;&amp;[.G$1]&amp;&quot;&quot;&quot;:&quot;&amp;IF([.G22]&lt;&gt;&quot;&quot;;&quot;&quot;&quot;&quot;&amp;[.G22]&amp;&quot;&quot;&quot;&quot;&amp;REPT(&quot; &quot;;5-LEN([.G22]));&quot;null&quot;&amp;REPT(&quot; &quot;;5-4+2)) &amp;&quot;,&quot;&quot;&quot;&amp;[.H$1]&amp;&quot;&quot;&quot;:&quot;&amp;IF([.H22]&lt;&gt;&quot;&quot;;&quot;&quot;&quot;&quot;&amp;[.H22]&amp;&quot;&quot;&quot;&quot;&amp;REPT(&quot; &quot;;19-LEN([.H22]));&quot;null&quot;&amp;REPT(&quot; &quot;;19-4+2)) &amp;&quot;,&quot;&quot;&quot;&amp;[.I$1]&amp;&quot;&quot;&quot;:&quot;&amp;IF([.I22]&lt;&gt;&quot;&quot;;&quot;&quot;&quot;&quot;&amp;[.I22]&amp;&quot;&quot;&quot;&quot;&amp;REPT(&quot; &quot;;8-LEN([.I22]));&quot;null&quot;&amp;REPT(&quot; &quot;;8-4+2)) &amp;&quot;,&quot;&quot;&quot;&amp;[.J$1]&amp;&quot;&quot;&quot;:&quot;&amp;IF([.J22]&lt;&gt;&quot;&quot;;[.J22]&amp;REPT(&quot; &quot;;4-LEN([.J22]));&quot;null&quot;) &amp;&quot;,&quot;&quot;&quot;&amp;[.K$1]&amp;&quot;&quot;&quot;:&quot;&amp;IF([.K22]&lt;&gt;&quot;&quot;;[.K22]&amp;REPT(&quot; &quot;;4-LEN([.K22]));&quot;null&quot;) &amp;&quot;,&quot;&quot;&quot;&amp;[.L$1]&amp;&quot;&quot;&quot;:&quot;&amp;IF([.L22]&lt;&gt;&quot;&quot;;[.L22]&amp;REPT(&quot; &quot;;5-LEN([.L22]));&quot;null &quot;) &amp;&quot;,&quot;&quot;&quot;&amp;[.M$1]&amp;&quot;&quot;&quot;:&quot;&amp;IF([.M22]&lt;&gt;&quot;&quot;;&quot;&quot;&quot;&quot;&amp;[.M22]&amp;&quot;&quot;&quot;&quot;&amp;REPT(&quot; &quot;;20-LEN([.M22]));&quot;null&quot;&amp;REPT(&quot; &quot;;20-4+2)) &amp;&quot;,&quot;&quot;&quot;&amp;[.N$1]&amp;&quot;&quot;&quot;:&quot;&amp;IF([.N22]&lt;&gt;&quot;&quot;;&quot;&quot;&amp;[.N22]&amp;&quot;&quot;&amp;REPT(&quot; &quot;;5-LEN([.N22]));&quot;null&quot;&amp;REPT(&quot; &quot;;5-4+2)) &amp;&quot;,&quot;&quot;&quot;&amp;[.O$1]&amp;&quot;&quot;&quot;:&quot;&amp;[.O22] &amp;&quot;,&quot;&quot;&quot;&amp;[.P$1]&amp;&quot;&quot;&quot;:&quot;&amp;[.P22] &amp;&quot;}&quot;" office:value-type="string" office:string-value=":{&quot;LogicalId&quot;:&quot;etatprog&quot;            ,&quot;Name&quot;:&quot;Etat programmation&quot;                 ,&quot;Order&quot;:30 ,&quot;Type&quot;:&quot;info&quot;  ,&quot;SubType&quot;:&quot;binary&quot; ,&quot;Unite&quot;:null   ,&quot;Config_infoName&quot;:null                 ,&quot;Config_value&quot;:null      ,&quot;Config_minValue&quot;:null,&quot;Config_maxValue&quot;:null,&quot;Config_tempHL&quot;:null ,&quot;setValue&quot;:null                  ,&quot;Display_param_step&quot;:null   ,&quot;IsHistorized&quot;:0,&quot;IsVisible&quot;:1}" calcext:value-type="string">
            <text:p>:{"LogicalId":"etatprog" <text:s text:c="11"/>,"Name":"Etat programmation" <text:s text:c="16"/>,"Order":30 ,"Type":"info" <text:s/>,"SubType":"binary" ,"Unite":null <text:s text:c="2"/>,"Config_infoName":null <text:s text:c="16"/>,"Config_value":null <text:s text:c="5"/>,"Config_minValue":null,"Config_maxValue":null,"Config_tempHL":null ,"setValue":null <text:s text:c="17"/>,"Display_param_step":null <text:s text:c="2"/>,"IsHistorized":0,"IsVisible":1}</text:p>
          </table:table-cell>
          <table:table-cell table:style-name="ce15" office:value-type="string" calcext:value-type="string">
            <text:p>.</text:p>
          </table:table-cell>
          <table:table-cell table:style-name="ce14"/>
          <table:table-cell table:style-name="ce17" table:formula="of:=IF([.W21]=&quot;&quot;;&quot; &quot;;IF([.B22]&lt;&gt;&quot;&quot;;&quot;,&quot;;&quot;]&quot;))&#10;&amp;IF([.B22]&lt;&gt;&quot;&quot;;&quot;{&quot;&quot;cmd&quot;&quot;:&quot;&quot;&quot;&amp;[.B22]&amp;&quot;&quot;&quot;&quot;&amp;REPT(&quot; &quot;;20-LEN([.B22]));&quot;&quot;)" office:value-type="string" office:string-value=",{&quot;cmd&quot;:&quot;etatprog&quot;            " calcext:value-type="string">
            <text:p>,{"cmd":"etatprog" <text:s text:c="11"/></text:p>
          </table:table-cell>
          <table:table-cell table:style-name="ce17" table:formula="of:=&quot;,&quot;&quot;attrs&quot;&quot;:&quot;&#10;&amp;&quot;{&quot;&quot;&quot;&amp;[.B$1]&amp;&quot;&quot;&quot;:&quot;&quot;&quot;&amp;[.B22]&amp;&quot;&quot;&quot;&quot;&amp;REPT(&quot; &quot;;20-LEN([.B22]))&#10;&amp;&quot;,&quot;&quot;&quot;&amp;[.C$1]&amp;&quot;&quot;&quot;:&quot;&quot;&quot;&amp;[.C22]&amp;&quot;&quot;&quot;&quot;&amp;REPT(&quot; &quot;;35-LEN([.C22]))&#10;&amp;&quot;,&quot;&quot;&quot;&amp;[.D$1]&amp;&quot;&quot;&quot;:&quot;&amp;[.D22]&amp;REPT(&quot; &quot;;3-LEN([.D22]))&#10;&amp;&quot;,&quot;&quot;&quot;&amp;[.E$1]&amp;&quot;&quot;&quot;:&quot;&quot;&quot;&amp;[.E22]&amp;&quot;&quot;&quot;&quot;&amp;REPT(&quot; &quot;;6-LEN([.E22]))&#10;&amp;&quot;,&quot;&quot;&quot;&amp;[.F$1]&amp;&quot;&quot;&quot;:&quot;&quot;&quot;&amp;[.F22]&amp;&quot;&quot;&quot;&quot;&amp;REPT(&quot; &quot;;7-LEN([.F22]))&#10;&amp;&quot;,&quot;&quot;&quot;&amp;[.G$1]&amp;&quot;&quot;&quot;:&quot;&amp;IF([.G22]&lt;&gt;&quot;&quot;;&quot;&quot;&quot;&quot;&amp;[.G22]&amp;&quot;&quot;&quot;&quot;&amp;REPT(&quot; &quot;;5-LEN([.G22]));&quot;null&quot;&amp;REPT(&quot; &quot;;5-4+2))&#10;&amp;&quot;,&quot;&quot;&quot;&amp;[.H$1]&amp;&quot;&quot;&quot;:&quot;&amp;IF([.H22]&lt;&gt;&quot;&quot;;&quot;&quot;&quot;&quot;&amp;[.H22]&amp;&quot;&quot;&quot;&quot;&amp;REPT(&quot; &quot;;19-LEN([.H22]));&quot;null&quot;&amp;REPT(&quot; &quot;;19-4+2))&#10;&amp;&quot;,&quot;&quot;&quot;&amp;[.I$1]&amp;&quot;&quot;&quot;:&quot;&amp;IF([.I22]&lt;&gt;&quot;&quot;;&quot;&quot;&quot;&quot;&amp;[.I22]&amp;&quot;&quot;&quot;&quot;&amp;REPT(&quot; &quot;;8-LEN([.I22]));&quot;null&quot;&amp;REPT(&quot; &quot;;8-4+2))&#10;&amp;&quot;,&quot;&quot;&quot;&amp;[.J$1]&amp;&quot;&quot;&quot;:&quot;&amp;IF([.J22]&lt;&gt;&quot;&quot;;[.J22]&amp;REPT(&quot; &quot;;4-LEN([.J22]));&quot;null&quot;)&#10;&amp;&quot;,&quot;&quot;&quot;&amp;[.K$1]&amp;&quot;&quot;&quot;:&quot;&amp;IF([.K22]&lt;&gt;&quot;&quot;;[.K22]&amp;REPT(&quot; &quot;;4-LEN([.K22]));&quot;null&quot;)&#10;&amp;&quot;,&quot;&quot;&quot;&amp;[.L$1]&amp;&quot;&quot;&quot;:&quot;&amp;IF([.L22]&lt;&gt;&quot;&quot;;[.L22]&amp;REPT(&quot; &quot;;5-LEN([.L22]));&quot;null &quot;)&#10;&amp;&quot;,&quot;&quot;&quot;&amp;[.M$1]&amp;&quot;&quot;&quot;:&quot;&amp;IF([.M22]&lt;&gt;&quot;&quot;;&quot;&quot;&quot;&quot;&amp;[.M22]&amp;&quot;&quot;&quot;&quot;&amp;REPT(&quot; &quot;;20-LEN([.M22]));&quot;null&quot;&amp;REPT(&quot; &quot;;20-4+2))&#10;&amp;&quot;,&quot;&quot;&quot;&amp;[.N$1]&amp;&quot;&quot;&quot;:&quot;&amp;IF([.N22]&lt;&gt;&quot;&quot;;&quot;&quot;&quot;&quot;&amp;[.N22]&amp;&quot;&quot;&quot;&quot;&amp;REPT(&quot; &quot;;30-LEN([.N22]));&quot;null&quot;&amp;REPT(&quot; &quot;;30-4+2))&#10;&amp;&quot;,&quot;&quot;&quot;&amp;[.O$1]&amp;&quot;&quot;&quot;:&quot;&amp;[.O22]&#10;&amp;&quot;,&quot;&quot;&quot;&amp;[.P$1]&amp;&quot;&quot;&quot;:&quot;&amp;[.P22]&#10;&amp;&quot;}}&quot;" office:value-type="string" office:string-value=",&quot;attrs&quot;:{&quot;LogicalId&quot;:&quot;etatprog&quot;            ,&quot;Name&quot;:&quot;Etat programmation&quot;                 ,&quot;Order&quot;:30 ,&quot;Type&quot;:&quot;info&quot;  ,&quot;SubType&quot;:&quot;binary&quot; ,&quot;Unite&quot;:null   ,&quot;Config_infoName&quot;:null      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etatprog" <text:s text:c="11"/>,"Name":"Etat programmation" <text:s text:c="16"/>,"Order":30 ,"Type":"info" <text:s/>,"SubType":"binary" ,"Unite":null <text:s text:c="2"/>,"Config_infoName":null <text:s text:c="16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ProgOn</text:p>
          </table:table-cell>
          <table:table-cell office:value-type="string" calcext:value-type="string">
            <text:p>Activer Programmation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ther</text:p>
          </table:table-cell>
          <table:table-cell/>
          <table:table-cell office:value-type="string" calcext:value-type="string">
            <text:p>etatprog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N23])" office:value-type="float" office:value="0" calcext:value-type="float">
            <text:p>0</text:p>
          </table:table-cell>
          <table:table-cell/>
          <table:table-cell table:style-name="ce17" table:formula="of:=&quot;&quot;&amp;IF([.T22]=&quot;&quot;;&quot; &quot;;IF([.A23]&lt;&gt;&quot;&quot;;&quot;,&quot;;&quot;}&quot;)) &amp;IF([.A23]&lt;&gt;&quot;&quot;;&quot;&quot;&quot;&quot;&amp;[.A23]&amp;&quot;&quot;&quot;&quot;&amp;REPT(&quot; &quot;;20-LEN([.A23]));&quot;&quot;)" office:value-type="string" office:string-value=",&quot;ProgOn&quot;              " calcext:value-type="string">
            <text:p>,"ProgOn" <text:s text:c="13"/></text:p>
          </table:table-cell>
          <table:table-cell table:style-name="ce17" table:formula="of:=&quot;:&quot; &amp;&quot;{&quot;&quot;&quot;&amp;[.B$1]&amp;&quot;&quot;&quot;:&quot;&quot;&quot;&amp;[.B23]&amp;&quot;&quot;&quot;&quot;&amp;REPT(&quot; &quot;;20-LEN([.B23])) &amp;&quot;,&quot;&quot;&quot;&amp;[.C$1]&amp;&quot;&quot;&quot;:&quot;&quot;&quot;&amp;[.C23]&amp;&quot;&quot;&quot;&quot;&amp;REPT(&quot; &quot;;35-LEN([.C23])) &amp;&quot;,&quot;&quot;&quot;&amp;[.D$1]&amp;&quot;&quot;&quot;:&quot;&amp;[.D23]&amp;REPT(&quot; &quot;;3-LEN([.D23])) &amp;&quot;,&quot;&quot;&quot;&amp;[.E$1]&amp;&quot;&quot;&quot;:&quot;&quot;&quot;&amp;[.E23]&amp;&quot;&quot;&quot;&quot;&amp;REPT(&quot; &quot;;6-LEN([.E23])) &amp;&quot;,&quot;&quot;&quot;&amp;[.F$1]&amp;&quot;&quot;&quot;:&quot;&quot;&quot;&amp;[.F23]&amp;&quot;&quot;&quot;&quot;&amp;REPT(&quot; &quot;;7-LEN([.F23])) &amp;&quot;,&quot;&quot;&quot;&amp;[.G$1]&amp;&quot;&quot;&quot;:&quot;&amp;IF([.G23]&lt;&gt;&quot;&quot;;&quot;&quot;&quot;&quot;&amp;[.G23]&amp;&quot;&quot;&quot;&quot;&amp;REPT(&quot; &quot;;5-LEN([.G23]));&quot;null&quot;&amp;REPT(&quot; &quot;;5-4+2)) &amp;&quot;,&quot;&quot;&quot;&amp;[.H$1]&amp;&quot;&quot;&quot;:&quot;&amp;IF([.H23]&lt;&gt;&quot;&quot;;&quot;&quot;&quot;&quot;&amp;[.H23]&amp;&quot;&quot;&quot;&quot;&amp;REPT(&quot; &quot;;19-LEN([.H23]));&quot;null&quot;&amp;REPT(&quot; &quot;;19-4+2)) &amp;&quot;,&quot;&quot;&quot;&amp;[.I$1]&amp;&quot;&quot;&quot;:&quot;&amp;IF([.I23]&lt;&gt;&quot;&quot;;&quot;&quot;&quot;&quot;&amp;[.I23]&amp;&quot;&quot;&quot;&quot;&amp;REPT(&quot; &quot;;8-LEN([.I23]));&quot;null&quot;&amp;REPT(&quot; &quot;;8-4+2)) &amp;&quot;,&quot;&quot;&quot;&amp;[.J$1]&amp;&quot;&quot;&quot;:&quot;&amp;IF([.J23]&lt;&gt;&quot;&quot;;[.J23]&amp;REPT(&quot; &quot;;4-LEN([.J23]));&quot;null&quot;) &amp;&quot;,&quot;&quot;&quot;&amp;[.K$1]&amp;&quot;&quot;&quot;:&quot;&amp;IF([.K23]&lt;&gt;&quot;&quot;;[.K23]&amp;REPT(&quot; &quot;;4-LEN([.K23]));&quot;null&quot;) &amp;&quot;,&quot;&quot;&quot;&amp;[.L$1]&amp;&quot;&quot;&quot;:&quot;&amp;IF([.L23]&lt;&gt;&quot;&quot;;[.L23]&amp;REPT(&quot; &quot;;5-LEN([.L23]));&quot;null &quot;) &amp;&quot;,&quot;&quot;&quot;&amp;[.M$1]&amp;&quot;&quot;&quot;:&quot;&amp;IF([.M23]&lt;&gt;&quot;&quot;;&quot;&quot;&quot;&quot;&amp;[.M23]&amp;&quot;&quot;&quot;&quot;&amp;REPT(&quot; &quot;;20-LEN([.M23]));&quot;null&quot;&amp;REPT(&quot; &quot;;20-4+2)) &amp;&quot;,&quot;&quot;&quot;&amp;[.N$1]&amp;&quot;&quot;&quot;:&quot;&amp;IF([.N23]&lt;&gt;&quot;&quot;;&quot;&quot;&amp;[.N23]&amp;&quot;&quot;&amp;REPT(&quot; &quot;;5-LEN([.N23]));&quot;null&quot;&amp;REPT(&quot; &quot;;5-4+2)) &amp;&quot;,&quot;&quot;&quot;&amp;[.O$1]&amp;&quot;&quot;&quot;:&quot;&amp;[.O23] &amp;&quot;,&quot;&quot;&quot;&amp;[.P$1]&amp;&quot;&quot;&quot;:&quot;&amp;[.P23] &amp;&quot;}&quot;" office:value-type="string" office:string-value=":{&quot;LogicalId&quot;:&quot;ProgOn&quot;              ,&quot;Name&quot;:&quot;Activer Programmation&quot;              ,&quot;Order&quot;:31 ,&quot;Type&quot;:&quot;action&quot;,&quot;SubType&quot;:&quot;other&quot;  ,&quot;Unite&quot;:null   ,&quot;Config_infoName&quot;:&quot;etatprog&quot;           ,&quot;Config_value&quot;:null      ,&quot;Config_minValue&quot;:null,&quot;Config_maxValue&quot;:null,&quot;Config_tempHL&quot;:null ,&quot;setValue&quot;:null                  ,&quot;Display_param_step&quot;:null   ,&quot;IsHistorized&quot;:0,&quot;IsVisible&quot;:1}" calcext:value-type="string">
            <text:p>:{"LogicalId":"ProgOn" <text:s text:c="13"/>,"Name":"Activer Programmation" <text:s text:c="13"/>,"Order":31 ,"Type":"action","SubType":"other" <text:s/>,"Unite":null <text:s text:c="2"/>,"Config_infoName":"etatprog" <text:s text:c="10"/>,"Config_value":null <text:s text:c="5"/>,"Config_minValue":null,"Config_maxValue":null,"Config_tempHL":null ,"setValue":null <text:s text:c="17"/>,"Display_param_step":null <text:s text:c="2"/>,"IsHistorized":0,"IsVisible":1}</text:p>
          </table:table-cell>
          <table:table-cell table:style-name="ce15" office:value-type="string" calcext:value-type="string">
            <text:p>.</text:p>
          </table:table-cell>
          <table:table-cell table:style-name="ce14"/>
          <table:table-cell table:style-name="ce17" table:formula="of:=IF([.W22]=&quot;&quot;;&quot; &quot;;IF([.B23]&lt;&gt;&quot;&quot;;&quot;,&quot;;&quot;]&quot;))&#10;&amp;IF([.B23]&lt;&gt;&quot;&quot;;&quot;{&quot;&quot;cmd&quot;&quot;:&quot;&quot;&quot;&amp;[.B23]&amp;&quot;&quot;&quot;&quot;&amp;REPT(&quot; &quot;;20-LEN([.B23]));&quot;&quot;)" office:value-type="string" office:string-value=",{&quot;cmd&quot;:&quot;ProgOn&quot;              " calcext:value-type="string">
            <text:p>,{"cmd":"ProgOn" <text:s text:c="13"/></text:p>
          </table:table-cell>
          <table:table-cell table:style-name="ce17" table:formula="of:=&quot;,&quot;&quot;attrs&quot;&quot;:&quot;&#10;&amp;&quot;{&quot;&quot;&quot;&amp;[.B$1]&amp;&quot;&quot;&quot;:&quot;&quot;&quot;&amp;[.B23]&amp;&quot;&quot;&quot;&quot;&amp;REPT(&quot; &quot;;20-LEN([.B23]))&#10;&amp;&quot;,&quot;&quot;&quot;&amp;[.C$1]&amp;&quot;&quot;&quot;:&quot;&quot;&quot;&amp;[.C23]&amp;&quot;&quot;&quot;&quot;&amp;REPT(&quot; &quot;;35-LEN([.C23]))&#10;&amp;&quot;,&quot;&quot;&quot;&amp;[.D$1]&amp;&quot;&quot;&quot;:&quot;&amp;[.D23]&amp;REPT(&quot; &quot;;3-LEN([.D23]))&#10;&amp;&quot;,&quot;&quot;&quot;&amp;[.E$1]&amp;&quot;&quot;&quot;:&quot;&quot;&quot;&amp;[.E23]&amp;&quot;&quot;&quot;&quot;&amp;REPT(&quot; &quot;;6-LEN([.E23]))&#10;&amp;&quot;,&quot;&quot;&quot;&amp;[.F$1]&amp;&quot;&quot;&quot;:&quot;&quot;&quot;&amp;[.F23]&amp;&quot;&quot;&quot;&quot;&amp;REPT(&quot; &quot;;7-LEN([.F23]))&#10;&amp;&quot;,&quot;&quot;&quot;&amp;[.G$1]&amp;&quot;&quot;&quot;:&quot;&amp;IF([.G23]&lt;&gt;&quot;&quot;;&quot;&quot;&quot;&quot;&amp;[.G23]&amp;&quot;&quot;&quot;&quot;&amp;REPT(&quot; &quot;;5-LEN([.G23]));&quot;null&quot;&amp;REPT(&quot; &quot;;5-4+2))&#10;&amp;&quot;,&quot;&quot;&quot;&amp;[.H$1]&amp;&quot;&quot;&quot;:&quot;&amp;IF([.H23]&lt;&gt;&quot;&quot;;&quot;&quot;&quot;&quot;&amp;[.H23]&amp;&quot;&quot;&quot;&quot;&amp;REPT(&quot; &quot;;19-LEN([.H23]));&quot;null&quot;&amp;REPT(&quot; &quot;;19-4+2))&#10;&amp;&quot;,&quot;&quot;&quot;&amp;[.I$1]&amp;&quot;&quot;&quot;:&quot;&amp;IF([.I23]&lt;&gt;&quot;&quot;;&quot;&quot;&quot;&quot;&amp;[.I23]&amp;&quot;&quot;&quot;&quot;&amp;REPT(&quot; &quot;;8-LEN([.I23]));&quot;null&quot;&amp;REPT(&quot; &quot;;8-4+2))&#10;&amp;&quot;,&quot;&quot;&quot;&amp;[.J$1]&amp;&quot;&quot;&quot;:&quot;&amp;IF([.J23]&lt;&gt;&quot;&quot;;[.J23]&amp;REPT(&quot; &quot;;4-LEN([.J23]));&quot;null&quot;)&#10;&amp;&quot;,&quot;&quot;&quot;&amp;[.K$1]&amp;&quot;&quot;&quot;:&quot;&amp;IF([.K23]&lt;&gt;&quot;&quot;;[.K23]&amp;REPT(&quot; &quot;;4-LEN([.K23]));&quot;null&quot;)&#10;&amp;&quot;,&quot;&quot;&quot;&amp;[.L$1]&amp;&quot;&quot;&quot;:&quot;&amp;IF([.L23]&lt;&gt;&quot;&quot;;[.L23]&amp;REPT(&quot; &quot;;5-LEN([.L23]));&quot;null &quot;)&#10;&amp;&quot;,&quot;&quot;&quot;&amp;[.M$1]&amp;&quot;&quot;&quot;:&quot;&amp;IF([.M23]&lt;&gt;&quot;&quot;;&quot;&quot;&quot;&quot;&amp;[.M23]&amp;&quot;&quot;&quot;&quot;&amp;REPT(&quot; &quot;;20-LEN([.M23]));&quot;null&quot;&amp;REPT(&quot; &quot;;20-4+2))&#10;&amp;&quot;,&quot;&quot;&quot;&amp;[.N$1]&amp;&quot;&quot;&quot;:&quot;&amp;IF([.N23]&lt;&gt;&quot;&quot;;&quot;&quot;&quot;&quot;&amp;[.N23]&amp;&quot;&quot;&quot;&quot;&amp;REPT(&quot; &quot;;30-LEN([.N23]));&quot;null&quot;&amp;REPT(&quot; &quot;;30-4+2))&#10;&amp;&quot;,&quot;&quot;&quot;&amp;[.O$1]&amp;&quot;&quot;&quot;:&quot;&amp;[.O23]&#10;&amp;&quot;,&quot;&quot;&quot;&amp;[.P$1]&amp;&quot;&quot;&quot;:&quot;&amp;[.P23]&#10;&amp;&quot;}}&quot;" office:value-type="string" office:string-value=",&quot;attrs&quot;:{&quot;LogicalId&quot;:&quot;ProgOn&quot;              ,&quot;Name&quot;:&quot;Activer Programmation&quot;              ,&quot;Order&quot;:31 ,&quot;Type&quot;:&quot;action&quot;,&quot;SubType&quot;:&quot;other&quot;  ,&quot;Unite&quot;:null   ,&quot;Config_infoName&quot;:&quot;etatprog&quot;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ProgOn" <text:s text:c="13"/>,"Name":"Activer Programmation" <text:s text:c="13"/>,"Order":31 ,"Type":"action","SubType":"other" <text:s/>,"Unite":null <text:s text:c="2"/>,"Config_infoName":"etatprog" <text:s text:c="10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ProgOff</text:p>
          </table:table-cell>
          <table:table-cell office:value-type="string" calcext:value-type="string">
            <text:p>Désactiver Programmation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ther</text:p>
          </table:table-cell>
          <table:table-cell/>
          <table:table-cell office:value-type="string" calcext:value-type="string">
            <text:p>etatprog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N24])" office:value-type="float" office:value="0" calcext:value-type="float">
            <text:p>0</text:p>
          </table:table-cell>
          <table:table-cell/>
          <table:table-cell table:style-name="ce17" table:formula="of:=&quot;&quot;&amp;IF([.T23]=&quot;&quot;;&quot; &quot;;IF([.A24]&lt;&gt;&quot;&quot;;&quot;,&quot;;&quot;}&quot;)) &amp;IF([.A24]&lt;&gt;&quot;&quot;;&quot;&quot;&quot;&quot;&amp;[.A24]&amp;&quot;&quot;&quot;&quot;&amp;REPT(&quot; &quot;;20-LEN([.A24]));&quot;&quot;)" office:value-type="string" office:string-value=",&quot;ProgOff&quot;             " calcext:value-type="string">
            <text:p>,"ProgOff" <text:s text:c="12"/></text:p>
          </table:table-cell>
          <table:table-cell table:style-name="ce17" table:formula="of:=&quot;:&quot; &amp;&quot;{&quot;&quot;&quot;&amp;[.B$1]&amp;&quot;&quot;&quot;:&quot;&quot;&quot;&amp;[.B24]&amp;&quot;&quot;&quot;&quot;&amp;REPT(&quot; &quot;;20-LEN([.B24])) &amp;&quot;,&quot;&quot;&quot;&amp;[.C$1]&amp;&quot;&quot;&quot;:&quot;&quot;&quot;&amp;[.C24]&amp;&quot;&quot;&quot;&quot;&amp;REPT(&quot; &quot;;35-LEN([.C24])) &amp;&quot;,&quot;&quot;&quot;&amp;[.D$1]&amp;&quot;&quot;&quot;:&quot;&amp;[.D24]&amp;REPT(&quot; &quot;;3-LEN([.D24])) &amp;&quot;,&quot;&quot;&quot;&amp;[.E$1]&amp;&quot;&quot;&quot;:&quot;&quot;&quot;&amp;[.E24]&amp;&quot;&quot;&quot;&quot;&amp;REPT(&quot; &quot;;6-LEN([.E24])) &amp;&quot;,&quot;&quot;&quot;&amp;[.F$1]&amp;&quot;&quot;&quot;:&quot;&quot;&quot;&amp;[.F24]&amp;&quot;&quot;&quot;&quot;&amp;REPT(&quot; &quot;;7-LEN([.F24])) &amp;&quot;,&quot;&quot;&quot;&amp;[.G$1]&amp;&quot;&quot;&quot;:&quot;&amp;IF([.G24]&lt;&gt;&quot;&quot;;&quot;&quot;&quot;&quot;&amp;[.G24]&amp;&quot;&quot;&quot;&quot;&amp;REPT(&quot; &quot;;5-LEN([.G24]));&quot;null&quot;&amp;REPT(&quot; &quot;;5-4+2)) &amp;&quot;,&quot;&quot;&quot;&amp;[.H$1]&amp;&quot;&quot;&quot;:&quot;&amp;IF([.H24]&lt;&gt;&quot;&quot;;&quot;&quot;&quot;&quot;&amp;[.H24]&amp;&quot;&quot;&quot;&quot;&amp;REPT(&quot; &quot;;19-LEN([.H24]));&quot;null&quot;&amp;REPT(&quot; &quot;;19-4+2)) &amp;&quot;,&quot;&quot;&quot;&amp;[.I$1]&amp;&quot;&quot;&quot;:&quot;&amp;IF([.I24]&lt;&gt;&quot;&quot;;&quot;&quot;&quot;&quot;&amp;[.I24]&amp;&quot;&quot;&quot;&quot;&amp;REPT(&quot; &quot;;8-LEN([.I24]));&quot;null&quot;&amp;REPT(&quot; &quot;;8-4+2)) &amp;&quot;,&quot;&quot;&quot;&amp;[.J$1]&amp;&quot;&quot;&quot;:&quot;&amp;IF([.J24]&lt;&gt;&quot;&quot;;[.J24]&amp;REPT(&quot; &quot;;4-LEN([.J24]));&quot;null&quot;) &amp;&quot;,&quot;&quot;&quot;&amp;[.K$1]&amp;&quot;&quot;&quot;:&quot;&amp;IF([.K24]&lt;&gt;&quot;&quot;;[.K24]&amp;REPT(&quot; &quot;;4-LEN([.K24]));&quot;null&quot;) &amp;&quot;,&quot;&quot;&quot;&amp;[.L$1]&amp;&quot;&quot;&quot;:&quot;&amp;IF([.L24]&lt;&gt;&quot;&quot;;[.L24]&amp;REPT(&quot; &quot;;5-LEN([.L24]));&quot;null &quot;) &amp;&quot;,&quot;&quot;&quot;&amp;[.M$1]&amp;&quot;&quot;&quot;:&quot;&amp;IF([.M24]&lt;&gt;&quot;&quot;;&quot;&quot;&quot;&quot;&amp;[.M24]&amp;&quot;&quot;&quot;&quot;&amp;REPT(&quot; &quot;;20-LEN([.M24]));&quot;null&quot;&amp;REPT(&quot; &quot;;20-4+2)) &amp;&quot;,&quot;&quot;&quot;&amp;[.N$1]&amp;&quot;&quot;&quot;:&quot;&amp;IF([.N24]&lt;&gt;&quot;&quot;;&quot;&quot;&amp;[.N24]&amp;&quot;&quot;&amp;REPT(&quot; &quot;;5-LEN([.N24]));&quot;null&quot;&amp;REPT(&quot; &quot;;5-4+2)) &amp;&quot;,&quot;&quot;&quot;&amp;[.O$1]&amp;&quot;&quot;&quot;:&quot;&amp;[.O24] &amp;&quot;,&quot;&quot;&quot;&amp;[.P$1]&amp;&quot;&quot;&quot;:&quot;&amp;[.P24] &amp;&quot;}&quot;" office:value-type="string" office:string-value=":{&quot;LogicalId&quot;:&quot;ProgOff&quot;             ,&quot;Name&quot;:&quot;Désactiver Programmation&quot;           ,&quot;Order&quot;:32 ,&quot;Type&quot;:&quot;action&quot;,&quot;SubType&quot;:&quot;other&quot;  ,&quot;Unite&quot;:null   ,&quot;Config_infoName&quot;:&quot;etatprog&quot;           ,&quot;Config_value&quot;:null      ,&quot;Config_minValue&quot;:null,&quot;Config_maxValue&quot;:null,&quot;Config_tempHL&quot;:null ,&quot;setValue&quot;:null                  ,&quot;Display_param_step&quot;:null   ,&quot;IsHistorized&quot;:0,&quot;IsVisible&quot;:1}" calcext:value-type="string">
            <text:p>:{"LogicalId":"ProgOff" <text:s text:c="12"/>,"Name":"Désactiver Programmation" <text:s text:c="10"/>,"Order":32 ,"Type":"action","SubType":"other" <text:s/>,"Unite":null <text:s text:c="2"/>,"Config_infoName":"etatprog" <text:s text:c="10"/>,"Config_value":null <text:s text:c="5"/>,"Config_minValue":null,"Config_maxValue":null,"Config_tempHL":null ,"setValue":null <text:s text:c="17"/>,"Display_param_step":null <text:s text:c="2"/>,"IsHistorized":0,"IsVisible":1}</text:p>
          </table:table-cell>
          <table:table-cell table:style-name="ce15" office:value-type="string" calcext:value-type="string">
            <text:p>.</text:p>
          </table:table-cell>
          <table:table-cell table:style-name="ce14"/>
          <table:table-cell table:style-name="ce17" table:formula="of:=IF([.W23]=&quot;&quot;;&quot; &quot;;IF([.B24]&lt;&gt;&quot;&quot;;&quot;,&quot;;&quot;]&quot;))&#10;&amp;IF([.B24]&lt;&gt;&quot;&quot;;&quot;{&quot;&quot;cmd&quot;&quot;:&quot;&quot;&quot;&amp;[.B24]&amp;&quot;&quot;&quot;&quot;&amp;REPT(&quot; &quot;;20-LEN([.B24]));&quot;&quot;)" office:value-type="string" office:string-value=",{&quot;cmd&quot;:&quot;ProgOff&quot;             " calcext:value-type="string">
            <text:p>,{"cmd":"ProgOff" <text:s text:c="12"/></text:p>
          </table:table-cell>
          <table:table-cell table:style-name="ce17" table:formula="of:=&quot;,&quot;&quot;attrs&quot;&quot;:&quot;&#10;&amp;&quot;{&quot;&quot;&quot;&amp;[.B$1]&amp;&quot;&quot;&quot;:&quot;&quot;&quot;&amp;[.B24]&amp;&quot;&quot;&quot;&quot;&amp;REPT(&quot; &quot;;20-LEN([.B24]))&#10;&amp;&quot;,&quot;&quot;&quot;&amp;[.C$1]&amp;&quot;&quot;&quot;:&quot;&quot;&quot;&amp;[.C24]&amp;&quot;&quot;&quot;&quot;&amp;REPT(&quot; &quot;;35-LEN([.C24]))&#10;&amp;&quot;,&quot;&quot;&quot;&amp;[.D$1]&amp;&quot;&quot;&quot;:&quot;&amp;[.D24]&amp;REPT(&quot; &quot;;3-LEN([.D24]))&#10;&amp;&quot;,&quot;&quot;&quot;&amp;[.E$1]&amp;&quot;&quot;&quot;:&quot;&quot;&quot;&amp;[.E24]&amp;&quot;&quot;&quot;&quot;&amp;REPT(&quot; &quot;;6-LEN([.E24]))&#10;&amp;&quot;,&quot;&quot;&quot;&amp;[.F$1]&amp;&quot;&quot;&quot;:&quot;&quot;&quot;&amp;[.F24]&amp;&quot;&quot;&quot;&quot;&amp;REPT(&quot; &quot;;7-LEN([.F24]))&#10;&amp;&quot;,&quot;&quot;&quot;&amp;[.G$1]&amp;&quot;&quot;&quot;:&quot;&amp;IF([.G24]&lt;&gt;&quot;&quot;;&quot;&quot;&quot;&quot;&amp;[.G24]&amp;&quot;&quot;&quot;&quot;&amp;REPT(&quot; &quot;;5-LEN([.G24]));&quot;null&quot;&amp;REPT(&quot; &quot;;5-4+2))&#10;&amp;&quot;,&quot;&quot;&quot;&amp;[.H$1]&amp;&quot;&quot;&quot;:&quot;&amp;IF([.H24]&lt;&gt;&quot;&quot;;&quot;&quot;&quot;&quot;&amp;[.H24]&amp;&quot;&quot;&quot;&quot;&amp;REPT(&quot; &quot;;19-LEN([.H24]));&quot;null&quot;&amp;REPT(&quot; &quot;;19-4+2))&#10;&amp;&quot;,&quot;&quot;&quot;&amp;[.I$1]&amp;&quot;&quot;&quot;:&quot;&amp;IF([.I24]&lt;&gt;&quot;&quot;;&quot;&quot;&quot;&quot;&amp;[.I24]&amp;&quot;&quot;&quot;&quot;&amp;REPT(&quot; &quot;;8-LEN([.I24]));&quot;null&quot;&amp;REPT(&quot; &quot;;8-4+2))&#10;&amp;&quot;,&quot;&quot;&quot;&amp;[.J$1]&amp;&quot;&quot;&quot;:&quot;&amp;IF([.J24]&lt;&gt;&quot;&quot;;[.J24]&amp;REPT(&quot; &quot;;4-LEN([.J24]));&quot;null&quot;)&#10;&amp;&quot;,&quot;&quot;&quot;&amp;[.K$1]&amp;&quot;&quot;&quot;:&quot;&amp;IF([.K24]&lt;&gt;&quot;&quot;;[.K24]&amp;REPT(&quot; &quot;;4-LEN([.K24]));&quot;null&quot;)&#10;&amp;&quot;,&quot;&quot;&quot;&amp;[.L$1]&amp;&quot;&quot;&quot;:&quot;&amp;IF([.L24]&lt;&gt;&quot;&quot;;[.L24]&amp;REPT(&quot; &quot;;5-LEN([.L24]));&quot;null &quot;)&#10;&amp;&quot;,&quot;&quot;&quot;&amp;[.M$1]&amp;&quot;&quot;&quot;:&quot;&amp;IF([.M24]&lt;&gt;&quot;&quot;;&quot;&quot;&quot;&quot;&amp;[.M24]&amp;&quot;&quot;&quot;&quot;&amp;REPT(&quot; &quot;;20-LEN([.M24]));&quot;null&quot;&amp;REPT(&quot; &quot;;20-4+2))&#10;&amp;&quot;,&quot;&quot;&quot;&amp;[.N$1]&amp;&quot;&quot;&quot;:&quot;&amp;IF([.N24]&lt;&gt;&quot;&quot;;&quot;&quot;&quot;&quot;&amp;[.N24]&amp;&quot;&quot;&quot;&quot;&amp;REPT(&quot; &quot;;30-LEN([.N24]));&quot;null&quot;&amp;REPT(&quot; &quot;;30-4+2))&#10;&amp;&quot;,&quot;&quot;&quot;&amp;[.O$1]&amp;&quot;&quot;&quot;:&quot;&amp;[.O24]&#10;&amp;&quot;,&quot;&quot;&quot;&amp;[.P$1]&amp;&quot;&quot;&quot;:&quot;&amp;[.P24]&#10;&amp;&quot;}}&quot;" office:value-type="string" office:string-value=",&quot;attrs&quot;:{&quot;LogicalId&quot;:&quot;ProgOff&quot;             ,&quot;Name&quot;:&quot;Désactiver Programmation&quot;           ,&quot;Order&quot;:32 ,&quot;Type&quot;:&quot;action&quot;,&quot;SubType&quot;:&quot;other&quot;  ,&quot;Unite&quot;:null   ,&quot;Config_infoName&quot;:&quot;etatprog&quot;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ProgOff" <text:s text:c="12"/>,"Name":"Désactiver Programmation" <text:s text:c="10"/>,"Order":32 ,"Type":"action","SubType":"other" <text:s/>,"Unite":null <text:s text:c="2"/>,"Config_infoName":"etatprog" <text:s text:c="10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tatlock</text:p>
          </table:table-cell>
          <table:table-cell office:value-type="string" calcext:value-type="string">
            <text:p>Etat Verrouillag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binary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N25])" office:value-type="float" office:value="0" calcext:value-type="float">
            <text:p>0</text:p>
          </table:table-cell>
          <table:table-cell/>
          <table:table-cell table:style-name="ce17" table:formula="of:=&quot;&quot;&amp;IF([.T24]=&quot;&quot;;&quot; &quot;;IF([.A25]&lt;&gt;&quot;&quot;;&quot;,&quot;;&quot;}&quot;)) &amp;IF([.A25]&lt;&gt;&quot;&quot;;&quot;&quot;&quot;&quot;&amp;[.A25]&amp;&quot;&quot;&quot;&quot;&amp;REPT(&quot; &quot;;20-LEN([.A25]));&quot;&quot;)" office:value-type="string" office:string-value=",&quot;etatlock&quot;            " calcext:value-type="string">
            <text:p>,"etatlock" <text:s text:c="11"/></text:p>
          </table:table-cell>
          <table:table-cell table:style-name="ce17" table:formula="of:=&quot;:&quot; &amp;&quot;{&quot;&quot;&quot;&amp;[.B$1]&amp;&quot;&quot;&quot;:&quot;&quot;&quot;&amp;[.B25]&amp;&quot;&quot;&quot;&quot;&amp;REPT(&quot; &quot;;20-LEN([.B25])) &amp;&quot;,&quot;&quot;&quot;&amp;[.C$1]&amp;&quot;&quot;&quot;:&quot;&quot;&quot;&amp;[.C25]&amp;&quot;&quot;&quot;&quot;&amp;REPT(&quot; &quot;;35-LEN([.C25])) &amp;&quot;,&quot;&quot;&quot;&amp;[.D$1]&amp;&quot;&quot;&quot;:&quot;&amp;[.D25]&amp;REPT(&quot; &quot;;3-LEN([.D25])) &amp;&quot;,&quot;&quot;&quot;&amp;[.E$1]&amp;&quot;&quot;&quot;:&quot;&quot;&quot;&amp;[.E25]&amp;&quot;&quot;&quot;&quot;&amp;REPT(&quot; &quot;;6-LEN([.E25])) &amp;&quot;,&quot;&quot;&quot;&amp;[.F$1]&amp;&quot;&quot;&quot;:&quot;&quot;&quot;&amp;[.F25]&amp;&quot;&quot;&quot;&quot;&amp;REPT(&quot; &quot;;7-LEN([.F25])) &amp;&quot;,&quot;&quot;&quot;&amp;[.G$1]&amp;&quot;&quot;&quot;:&quot;&amp;IF([.G25]&lt;&gt;&quot;&quot;;&quot;&quot;&quot;&quot;&amp;[.G25]&amp;&quot;&quot;&quot;&quot;&amp;REPT(&quot; &quot;;5-LEN([.G25]));&quot;null&quot;&amp;REPT(&quot; &quot;;5-4+2)) &amp;&quot;,&quot;&quot;&quot;&amp;[.H$1]&amp;&quot;&quot;&quot;:&quot;&amp;IF([.H25]&lt;&gt;&quot;&quot;;&quot;&quot;&quot;&quot;&amp;[.H25]&amp;&quot;&quot;&quot;&quot;&amp;REPT(&quot; &quot;;19-LEN([.H25]));&quot;null&quot;&amp;REPT(&quot; &quot;;19-4+2)) &amp;&quot;,&quot;&quot;&quot;&amp;[.I$1]&amp;&quot;&quot;&quot;:&quot;&amp;IF([.I25]&lt;&gt;&quot;&quot;;&quot;&quot;&quot;&quot;&amp;[.I25]&amp;&quot;&quot;&quot;&quot;&amp;REPT(&quot; &quot;;8-LEN([.I25]));&quot;null&quot;&amp;REPT(&quot; &quot;;8-4+2)) &amp;&quot;,&quot;&quot;&quot;&amp;[.J$1]&amp;&quot;&quot;&quot;:&quot;&amp;IF([.J25]&lt;&gt;&quot;&quot;;[.J25]&amp;REPT(&quot; &quot;;4-LEN([.J25]));&quot;null&quot;) &amp;&quot;,&quot;&quot;&quot;&amp;[.K$1]&amp;&quot;&quot;&quot;:&quot;&amp;IF([.K25]&lt;&gt;&quot;&quot;;[.K25]&amp;REPT(&quot; &quot;;4-LEN([.K25]));&quot;null&quot;) &amp;&quot;,&quot;&quot;&quot;&amp;[.L$1]&amp;&quot;&quot;&quot;:&quot;&amp;IF([.L25]&lt;&gt;&quot;&quot;;[.L25]&amp;REPT(&quot; &quot;;5-LEN([.L25]));&quot;null &quot;) &amp;&quot;,&quot;&quot;&quot;&amp;[.M$1]&amp;&quot;&quot;&quot;:&quot;&amp;IF([.M25]&lt;&gt;&quot;&quot;;&quot;&quot;&quot;&quot;&amp;[.M25]&amp;&quot;&quot;&quot;&quot;&amp;REPT(&quot; &quot;;20-LEN([.M25]));&quot;null&quot;&amp;REPT(&quot; &quot;;20-4+2)) &amp;&quot;,&quot;&quot;&quot;&amp;[.N$1]&amp;&quot;&quot;&quot;:&quot;&amp;IF([.N25]&lt;&gt;&quot;&quot;;&quot;&quot;&amp;[.N25]&amp;&quot;&quot;&amp;REPT(&quot; &quot;;5-LEN([.N25]));&quot;null&quot;&amp;REPT(&quot; &quot;;5-4+2)) &amp;&quot;,&quot;&quot;&quot;&amp;[.O$1]&amp;&quot;&quot;&quot;:&quot;&amp;[.O25] &amp;&quot;,&quot;&quot;&quot;&amp;[.P$1]&amp;&quot;&quot;&quot;:&quot;&amp;[.P25] &amp;&quot;}&quot;" office:value-type="string" office:string-value=":{&quot;LogicalId&quot;:&quot;etatlock&quot;            ,&quot;Name&quot;:&quot;Etat Verrouillage&quot;                  ,&quot;Order&quot;:33 ,&quot;Type&quot;:&quot;info&quot;  ,&quot;SubType&quot;:&quot;binary&quot; ,&quot;Unite&quot;:null   ,&quot;Config_infoName&quot;:null                 ,&quot;Config_value&quot;:null      ,&quot;Config_minValue&quot;:null,&quot;Config_maxValue&quot;:null,&quot;Config_tempHL&quot;:null ,&quot;setValue&quot;:null                  ,&quot;Display_param_step&quot;:null   ,&quot;IsHistorized&quot;:0,&quot;IsVisible&quot;:1}" calcext:value-type="string">
            <text:p>:{"LogicalId":"etatlock" <text:s text:c="11"/>,"Name":"Etat Verrouillage" <text:s text:c="17"/>,"Order":33 ,"Type":"info" <text:s/>,"SubType":"binary" ,"Unite":null <text:s text:c="2"/>,"Config_infoName":null <text:s text:c="16"/>,"Config_value":null <text:s text:c="5"/>,"Config_minValue":null,"Config_maxValue":null,"Config_tempHL":null ,"setValue":null <text:s text:c="17"/>,"Display_param_step":null <text:s text:c="2"/>,"IsHistorized":0,"IsVisible":1}</text:p>
          </table:table-cell>
          <table:table-cell table:style-name="ce15" office:value-type="string" calcext:value-type="string">
            <text:p>.</text:p>
          </table:table-cell>
          <table:table-cell table:style-name="ce14"/>
          <table:table-cell table:style-name="ce17" table:formula="of:=IF([.W24]=&quot;&quot;;&quot; &quot;;IF([.B25]&lt;&gt;&quot;&quot;;&quot;,&quot;;&quot;]&quot;))&#10;&amp;IF([.B25]&lt;&gt;&quot;&quot;;&quot;{&quot;&quot;cmd&quot;&quot;:&quot;&quot;&quot;&amp;[.B25]&amp;&quot;&quot;&quot;&quot;&amp;REPT(&quot; &quot;;20-LEN([.B25]));&quot;&quot;)" office:value-type="string" office:string-value=",{&quot;cmd&quot;:&quot;etatlock&quot;            " calcext:value-type="string">
            <text:p>,{"cmd":"etatlock" <text:s text:c="11"/></text:p>
          </table:table-cell>
          <table:table-cell table:style-name="ce17" table:formula="of:=&quot;,&quot;&quot;attrs&quot;&quot;:&quot;&#10;&amp;&quot;{&quot;&quot;&quot;&amp;[.B$1]&amp;&quot;&quot;&quot;:&quot;&quot;&quot;&amp;[.B25]&amp;&quot;&quot;&quot;&quot;&amp;REPT(&quot; &quot;;20-LEN([.B25]))&#10;&amp;&quot;,&quot;&quot;&quot;&amp;[.C$1]&amp;&quot;&quot;&quot;:&quot;&quot;&quot;&amp;[.C25]&amp;&quot;&quot;&quot;&quot;&amp;REPT(&quot; &quot;;35-LEN([.C25]))&#10;&amp;&quot;,&quot;&quot;&quot;&amp;[.D$1]&amp;&quot;&quot;&quot;:&quot;&amp;[.D25]&amp;REPT(&quot; &quot;;3-LEN([.D25]))&#10;&amp;&quot;,&quot;&quot;&quot;&amp;[.E$1]&amp;&quot;&quot;&quot;:&quot;&quot;&quot;&amp;[.E25]&amp;&quot;&quot;&quot;&quot;&amp;REPT(&quot; &quot;;6-LEN([.E25]))&#10;&amp;&quot;,&quot;&quot;&quot;&amp;[.F$1]&amp;&quot;&quot;&quot;:&quot;&quot;&quot;&amp;[.F25]&amp;&quot;&quot;&quot;&quot;&amp;REPT(&quot; &quot;;7-LEN([.F25]))&#10;&amp;&quot;,&quot;&quot;&quot;&amp;[.G$1]&amp;&quot;&quot;&quot;:&quot;&amp;IF([.G25]&lt;&gt;&quot;&quot;;&quot;&quot;&quot;&quot;&amp;[.G25]&amp;&quot;&quot;&quot;&quot;&amp;REPT(&quot; &quot;;5-LEN([.G25]));&quot;null&quot;&amp;REPT(&quot; &quot;;5-4+2))&#10;&amp;&quot;,&quot;&quot;&quot;&amp;[.H$1]&amp;&quot;&quot;&quot;:&quot;&amp;IF([.H25]&lt;&gt;&quot;&quot;;&quot;&quot;&quot;&quot;&amp;[.H25]&amp;&quot;&quot;&quot;&quot;&amp;REPT(&quot; &quot;;19-LEN([.H25]));&quot;null&quot;&amp;REPT(&quot; &quot;;19-4+2))&#10;&amp;&quot;,&quot;&quot;&quot;&amp;[.I$1]&amp;&quot;&quot;&quot;:&quot;&amp;IF([.I25]&lt;&gt;&quot;&quot;;&quot;&quot;&quot;&quot;&amp;[.I25]&amp;&quot;&quot;&quot;&quot;&amp;REPT(&quot; &quot;;8-LEN([.I25]));&quot;null&quot;&amp;REPT(&quot; &quot;;8-4+2))&#10;&amp;&quot;,&quot;&quot;&quot;&amp;[.J$1]&amp;&quot;&quot;&quot;:&quot;&amp;IF([.J25]&lt;&gt;&quot;&quot;;[.J25]&amp;REPT(&quot; &quot;;4-LEN([.J25]));&quot;null&quot;)&#10;&amp;&quot;,&quot;&quot;&quot;&amp;[.K$1]&amp;&quot;&quot;&quot;:&quot;&amp;IF([.K25]&lt;&gt;&quot;&quot;;[.K25]&amp;REPT(&quot; &quot;;4-LEN([.K25]));&quot;null&quot;)&#10;&amp;&quot;,&quot;&quot;&quot;&amp;[.L$1]&amp;&quot;&quot;&quot;:&quot;&amp;IF([.L25]&lt;&gt;&quot;&quot;;[.L25]&amp;REPT(&quot; &quot;;5-LEN([.L25]));&quot;null &quot;)&#10;&amp;&quot;,&quot;&quot;&quot;&amp;[.M$1]&amp;&quot;&quot;&quot;:&quot;&amp;IF([.M25]&lt;&gt;&quot;&quot;;&quot;&quot;&quot;&quot;&amp;[.M25]&amp;&quot;&quot;&quot;&quot;&amp;REPT(&quot; &quot;;20-LEN([.M25]));&quot;null&quot;&amp;REPT(&quot; &quot;;20-4+2))&#10;&amp;&quot;,&quot;&quot;&quot;&amp;[.N$1]&amp;&quot;&quot;&quot;:&quot;&amp;IF([.N25]&lt;&gt;&quot;&quot;;&quot;&quot;&quot;&quot;&amp;[.N25]&amp;&quot;&quot;&quot;&quot;&amp;REPT(&quot; &quot;;30-LEN([.N25]));&quot;null&quot;&amp;REPT(&quot; &quot;;30-4+2))&#10;&amp;&quot;,&quot;&quot;&quot;&amp;[.O$1]&amp;&quot;&quot;&quot;:&quot;&amp;[.O25]&#10;&amp;&quot;,&quot;&quot;&quot;&amp;[.P$1]&amp;&quot;&quot;&quot;:&quot;&amp;[.P25]&#10;&amp;&quot;}}&quot;" office:value-type="string" office:string-value=",&quot;attrs&quot;:{&quot;LogicalId&quot;:&quot;etatlock&quot;            ,&quot;Name&quot;:&quot;Etat Verrouillage&quot;                  ,&quot;Order&quot;:33 ,&quot;Type&quot;:&quot;info&quot;  ,&quot;SubType&quot;:&quot;binary&quot; ,&quot;Unite&quot;:null   ,&quot;Config_infoName&quot;:null      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etatlock" <text:s text:c="11"/>,"Name":"Etat Verrouillage" <text:s text:c="17"/>,"Order":33 ,"Type":"info" <text:s/>,"SubType":"binary" ,"Unite":null <text:s text:c="2"/>,"Config_infoName":null <text:s text:c="16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LockOn</text:p>
          </table:table-cell>
          <table:table-cell office:value-type="string" calcext:value-type="string">
            <text:p>Activer Verrouillage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ther</text:p>
          </table:table-cell>
          <table:table-cell/>
          <table:table-cell office:value-type="string" calcext:value-type="string">
            <text:p>etatlock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N26])" office:value-type="float" office:value="0" calcext:value-type="float">
            <text:p>0</text:p>
          </table:table-cell>
          <table:table-cell/>
          <table:table-cell table:style-name="ce17" table:formula="of:=&quot;&quot;&amp;IF([.T25]=&quot;&quot;;&quot; &quot;;IF([.A26]&lt;&gt;&quot;&quot;;&quot;,&quot;;&quot;}&quot;)) &amp;IF([.A26]&lt;&gt;&quot;&quot;;&quot;&quot;&quot;&quot;&amp;[.A26]&amp;&quot;&quot;&quot;&quot;&amp;REPT(&quot; &quot;;20-LEN([.A26]));&quot;&quot;)" office:value-type="string" office:string-value=",&quot;LockOn&quot;              " calcext:value-type="string">
            <text:p>,"LockOn" <text:s text:c="13"/></text:p>
          </table:table-cell>
          <table:table-cell table:style-name="ce17" table:formula="of:=&quot;:&quot; &amp;&quot;{&quot;&quot;&quot;&amp;[.B$1]&amp;&quot;&quot;&quot;:&quot;&quot;&quot;&amp;[.B26]&amp;&quot;&quot;&quot;&quot;&amp;REPT(&quot; &quot;;20-LEN([.B26])) &amp;&quot;,&quot;&quot;&quot;&amp;[.C$1]&amp;&quot;&quot;&quot;:&quot;&quot;&quot;&amp;[.C26]&amp;&quot;&quot;&quot;&quot;&amp;REPT(&quot; &quot;;35-LEN([.C26])) &amp;&quot;,&quot;&quot;&quot;&amp;[.D$1]&amp;&quot;&quot;&quot;:&quot;&amp;[.D26]&amp;REPT(&quot; &quot;;3-LEN([.D26])) &amp;&quot;,&quot;&quot;&quot;&amp;[.E$1]&amp;&quot;&quot;&quot;:&quot;&quot;&quot;&amp;[.E26]&amp;&quot;&quot;&quot;&quot;&amp;REPT(&quot; &quot;;6-LEN([.E26])) &amp;&quot;,&quot;&quot;&quot;&amp;[.F$1]&amp;&quot;&quot;&quot;:&quot;&quot;&quot;&amp;[.F26]&amp;&quot;&quot;&quot;&quot;&amp;REPT(&quot; &quot;;7-LEN([.F26])) &amp;&quot;,&quot;&quot;&quot;&amp;[.G$1]&amp;&quot;&quot;&quot;:&quot;&amp;IF([.G26]&lt;&gt;&quot;&quot;;&quot;&quot;&quot;&quot;&amp;[.G26]&amp;&quot;&quot;&quot;&quot;&amp;REPT(&quot; &quot;;5-LEN([.G26]));&quot;null&quot;&amp;REPT(&quot; &quot;;5-4+2)) &amp;&quot;,&quot;&quot;&quot;&amp;[.H$1]&amp;&quot;&quot;&quot;:&quot;&amp;IF([.H26]&lt;&gt;&quot;&quot;;&quot;&quot;&quot;&quot;&amp;[.H26]&amp;&quot;&quot;&quot;&quot;&amp;REPT(&quot; &quot;;19-LEN([.H26]));&quot;null&quot;&amp;REPT(&quot; &quot;;19-4+2)) &amp;&quot;,&quot;&quot;&quot;&amp;[.I$1]&amp;&quot;&quot;&quot;:&quot;&amp;IF([.I26]&lt;&gt;&quot;&quot;;&quot;&quot;&quot;&quot;&amp;[.I26]&amp;&quot;&quot;&quot;&quot;&amp;REPT(&quot; &quot;;8-LEN([.I26]));&quot;null&quot;&amp;REPT(&quot; &quot;;8-4+2)) &amp;&quot;,&quot;&quot;&quot;&amp;[.J$1]&amp;&quot;&quot;&quot;:&quot;&amp;IF([.J26]&lt;&gt;&quot;&quot;;[.J26]&amp;REPT(&quot; &quot;;4-LEN([.J26]));&quot;null&quot;) &amp;&quot;,&quot;&quot;&quot;&amp;[.K$1]&amp;&quot;&quot;&quot;:&quot;&amp;IF([.K26]&lt;&gt;&quot;&quot;;[.K26]&amp;REPT(&quot; &quot;;4-LEN([.K26]));&quot;null&quot;) &amp;&quot;,&quot;&quot;&quot;&amp;[.L$1]&amp;&quot;&quot;&quot;:&quot;&amp;IF([.L26]&lt;&gt;&quot;&quot;;[.L26]&amp;REPT(&quot; &quot;;5-LEN([.L26]));&quot;null &quot;) &amp;&quot;,&quot;&quot;&quot;&amp;[.M$1]&amp;&quot;&quot;&quot;:&quot;&amp;IF([.M26]&lt;&gt;&quot;&quot;;&quot;&quot;&quot;&quot;&amp;[.M26]&amp;&quot;&quot;&quot;&quot;&amp;REPT(&quot; &quot;;20-LEN([.M26]));&quot;null&quot;&amp;REPT(&quot; &quot;;20-4+2)) &amp;&quot;,&quot;&quot;&quot;&amp;[.N$1]&amp;&quot;&quot;&quot;:&quot;&amp;IF([.N26]&lt;&gt;&quot;&quot;;&quot;&quot;&amp;[.N26]&amp;&quot;&quot;&amp;REPT(&quot; &quot;;5-LEN([.N26]));&quot;null&quot;&amp;REPT(&quot; &quot;;5-4+2)) &amp;&quot;,&quot;&quot;&quot;&amp;[.O$1]&amp;&quot;&quot;&quot;:&quot;&amp;[.O26] &amp;&quot;,&quot;&quot;&quot;&amp;[.P$1]&amp;&quot;&quot;&quot;:&quot;&amp;[.P26] &amp;&quot;}&quot;" office:value-type="string" office:string-value=":{&quot;LogicalId&quot;:&quot;LockOn&quot;              ,&quot;Name&quot;:&quot;Activer Verrouillage&quot;               ,&quot;Order&quot;:34 ,&quot;Type&quot;:&quot;action&quot;,&quot;SubType&quot;:&quot;other&quot;  ,&quot;Unite&quot;:null   ,&quot;Config_infoName&quot;:&quot;etatlock&quot;           ,&quot;Config_value&quot;:null      ,&quot;Config_minValue&quot;:null,&quot;Config_maxValue&quot;:null,&quot;Config_tempHL&quot;:null ,&quot;setValue&quot;:null                  ,&quot;Display_param_step&quot;:null   ,&quot;IsHistorized&quot;:0,&quot;IsVisible&quot;:1}" calcext:value-type="string">
            <text:p>:{"LogicalId":"LockOn" <text:s text:c="13"/>,"Name":"Activer Verrouillage" <text:s text:c="14"/>,"Order":34 ,"Type":"action","SubType":"other" <text:s/>,"Unite":null <text:s text:c="2"/>,"Config_infoName":"etatlock" <text:s text:c="10"/>,"Config_value":null <text:s text:c="5"/>,"Config_minValue":null,"Config_maxValue":null,"Config_tempHL":null ,"setValue":null <text:s text:c="17"/>,"Display_param_step":null <text:s text:c="2"/>,"IsHistorized":0,"IsVisible":1}</text:p>
          </table:table-cell>
          <table:table-cell table:style-name="ce15" office:value-type="string" calcext:value-type="string">
            <text:p>.</text:p>
          </table:table-cell>
          <table:table-cell table:style-name="ce14"/>
          <table:table-cell table:style-name="ce17" table:formula="of:=IF([.W25]=&quot;&quot;;&quot; &quot;;IF([.B26]&lt;&gt;&quot;&quot;;&quot;,&quot;;&quot;]&quot;))&#10;&amp;IF([.B26]&lt;&gt;&quot;&quot;;&quot;{&quot;&quot;cmd&quot;&quot;:&quot;&quot;&quot;&amp;[.B26]&amp;&quot;&quot;&quot;&quot;&amp;REPT(&quot; &quot;;20-LEN([.B26]));&quot;&quot;)" office:value-type="string" office:string-value=",{&quot;cmd&quot;:&quot;LockOn&quot;              " calcext:value-type="string">
            <text:p>,{"cmd":"LockOn" <text:s text:c="13"/></text:p>
          </table:table-cell>
          <table:table-cell table:style-name="ce17" table:formula="of:=&quot;,&quot;&quot;attrs&quot;&quot;:&quot;&#10;&amp;&quot;{&quot;&quot;&quot;&amp;[.B$1]&amp;&quot;&quot;&quot;:&quot;&quot;&quot;&amp;[.B26]&amp;&quot;&quot;&quot;&quot;&amp;REPT(&quot; &quot;;20-LEN([.B26]))&#10;&amp;&quot;,&quot;&quot;&quot;&amp;[.C$1]&amp;&quot;&quot;&quot;:&quot;&quot;&quot;&amp;[.C26]&amp;&quot;&quot;&quot;&quot;&amp;REPT(&quot; &quot;;35-LEN([.C26]))&#10;&amp;&quot;,&quot;&quot;&quot;&amp;[.D$1]&amp;&quot;&quot;&quot;:&quot;&amp;[.D26]&amp;REPT(&quot; &quot;;3-LEN([.D26]))&#10;&amp;&quot;,&quot;&quot;&quot;&amp;[.E$1]&amp;&quot;&quot;&quot;:&quot;&quot;&quot;&amp;[.E26]&amp;&quot;&quot;&quot;&quot;&amp;REPT(&quot; &quot;;6-LEN([.E26]))&#10;&amp;&quot;,&quot;&quot;&quot;&amp;[.F$1]&amp;&quot;&quot;&quot;:&quot;&quot;&quot;&amp;[.F26]&amp;&quot;&quot;&quot;&quot;&amp;REPT(&quot; &quot;;7-LEN([.F26]))&#10;&amp;&quot;,&quot;&quot;&quot;&amp;[.G$1]&amp;&quot;&quot;&quot;:&quot;&amp;IF([.G26]&lt;&gt;&quot;&quot;;&quot;&quot;&quot;&quot;&amp;[.G26]&amp;&quot;&quot;&quot;&quot;&amp;REPT(&quot; &quot;;5-LEN([.G26]));&quot;null&quot;&amp;REPT(&quot; &quot;;5-4+2))&#10;&amp;&quot;,&quot;&quot;&quot;&amp;[.H$1]&amp;&quot;&quot;&quot;:&quot;&amp;IF([.H26]&lt;&gt;&quot;&quot;;&quot;&quot;&quot;&quot;&amp;[.H26]&amp;&quot;&quot;&quot;&quot;&amp;REPT(&quot; &quot;;19-LEN([.H26]));&quot;null&quot;&amp;REPT(&quot; &quot;;19-4+2))&#10;&amp;&quot;,&quot;&quot;&quot;&amp;[.I$1]&amp;&quot;&quot;&quot;:&quot;&amp;IF([.I26]&lt;&gt;&quot;&quot;;&quot;&quot;&quot;&quot;&amp;[.I26]&amp;&quot;&quot;&quot;&quot;&amp;REPT(&quot; &quot;;8-LEN([.I26]));&quot;null&quot;&amp;REPT(&quot; &quot;;8-4+2))&#10;&amp;&quot;,&quot;&quot;&quot;&amp;[.J$1]&amp;&quot;&quot;&quot;:&quot;&amp;IF([.J26]&lt;&gt;&quot;&quot;;[.J26]&amp;REPT(&quot; &quot;;4-LEN([.J26]));&quot;null&quot;)&#10;&amp;&quot;,&quot;&quot;&quot;&amp;[.K$1]&amp;&quot;&quot;&quot;:&quot;&amp;IF([.K26]&lt;&gt;&quot;&quot;;[.K26]&amp;REPT(&quot; &quot;;4-LEN([.K26]));&quot;null&quot;)&#10;&amp;&quot;,&quot;&quot;&quot;&amp;[.L$1]&amp;&quot;&quot;&quot;:&quot;&amp;IF([.L26]&lt;&gt;&quot;&quot;;[.L26]&amp;REPT(&quot; &quot;;5-LEN([.L26]));&quot;null &quot;)&#10;&amp;&quot;,&quot;&quot;&quot;&amp;[.M$1]&amp;&quot;&quot;&quot;:&quot;&amp;IF([.M26]&lt;&gt;&quot;&quot;;&quot;&quot;&quot;&quot;&amp;[.M26]&amp;&quot;&quot;&quot;&quot;&amp;REPT(&quot; &quot;;20-LEN([.M26]));&quot;null&quot;&amp;REPT(&quot; &quot;;20-4+2))&#10;&amp;&quot;,&quot;&quot;&quot;&amp;[.N$1]&amp;&quot;&quot;&quot;:&quot;&amp;IF([.N26]&lt;&gt;&quot;&quot;;&quot;&quot;&quot;&quot;&amp;[.N26]&amp;&quot;&quot;&quot;&quot;&amp;REPT(&quot; &quot;;30-LEN([.N26]));&quot;null&quot;&amp;REPT(&quot; &quot;;30-4+2))&#10;&amp;&quot;,&quot;&quot;&quot;&amp;[.O$1]&amp;&quot;&quot;&quot;:&quot;&amp;[.O26]&#10;&amp;&quot;,&quot;&quot;&quot;&amp;[.P$1]&amp;&quot;&quot;&quot;:&quot;&amp;[.P26]&#10;&amp;&quot;}}&quot;" office:value-type="string" office:string-value=",&quot;attrs&quot;:{&quot;LogicalId&quot;:&quot;LockOn&quot;              ,&quot;Name&quot;:&quot;Activer Verrouillage&quot;               ,&quot;Order&quot;:34 ,&quot;Type&quot;:&quot;action&quot;,&quot;SubType&quot;:&quot;other&quot;  ,&quot;Unite&quot;:null   ,&quot;Config_infoName&quot;:&quot;etatlock&quot;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LockOn" <text:s text:c="13"/>,"Name":"Activer Verrouillage" <text:s text:c="14"/>,"Order":34 ,"Type":"action","SubType":"other" <text:s/>,"Unite":null <text:s text:c="2"/>,"Config_infoName":"etatlock" <text:s text:c="10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LockOff</text:p>
          </table:table-cell>
          <table:table-cell office:value-type="string" calcext:value-type="string">
            <text:p>Désactiver Verrouillag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ther</text:p>
          </table:table-cell>
          <table:table-cell/>
          <table:table-cell office:value-type="string" calcext:value-type="string">
            <text:p>etatlock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N27])" office:value-type="float" office:value="0" calcext:value-type="float">
            <text:p>0</text:p>
          </table:table-cell>
          <table:table-cell/>
          <table:table-cell table:style-name="ce17" table:formula="of:=&quot;&quot;&amp;IF([.T26]=&quot;&quot;;&quot; &quot;;IF([.A27]&lt;&gt;&quot;&quot;;&quot;,&quot;;&quot;}&quot;)) &amp;IF([.A27]&lt;&gt;&quot;&quot;;&quot;&quot;&quot;&quot;&amp;[.A27]&amp;&quot;&quot;&quot;&quot;&amp;REPT(&quot; &quot;;20-LEN([.A27]));&quot;&quot;)" office:value-type="string" office:string-value=",&quot;LockOff&quot;             " calcext:value-type="string">
            <text:p>,"LockOff" <text:s text:c="12"/></text:p>
          </table:table-cell>
          <table:table-cell table:style-name="ce17" table:formula="of:=&quot;:&quot; &amp;&quot;{&quot;&quot;&quot;&amp;[.B$1]&amp;&quot;&quot;&quot;:&quot;&quot;&quot;&amp;[.B27]&amp;&quot;&quot;&quot;&quot;&amp;REPT(&quot; &quot;;20-LEN([.B27])) &amp;&quot;,&quot;&quot;&quot;&amp;[.C$1]&amp;&quot;&quot;&quot;:&quot;&quot;&quot;&amp;[.C27]&amp;&quot;&quot;&quot;&quot;&amp;REPT(&quot; &quot;;35-LEN([.C27])) &amp;&quot;,&quot;&quot;&quot;&amp;[.D$1]&amp;&quot;&quot;&quot;:&quot;&amp;[.D27]&amp;REPT(&quot; &quot;;3-LEN([.D27])) &amp;&quot;,&quot;&quot;&quot;&amp;[.E$1]&amp;&quot;&quot;&quot;:&quot;&quot;&quot;&amp;[.E27]&amp;&quot;&quot;&quot;&quot;&amp;REPT(&quot; &quot;;6-LEN([.E27])) &amp;&quot;,&quot;&quot;&quot;&amp;[.F$1]&amp;&quot;&quot;&quot;:&quot;&quot;&quot;&amp;[.F27]&amp;&quot;&quot;&quot;&quot;&amp;REPT(&quot; &quot;;7-LEN([.F27])) &amp;&quot;,&quot;&quot;&quot;&amp;[.G$1]&amp;&quot;&quot;&quot;:&quot;&amp;IF([.G27]&lt;&gt;&quot;&quot;;&quot;&quot;&quot;&quot;&amp;[.G27]&amp;&quot;&quot;&quot;&quot;&amp;REPT(&quot; &quot;;5-LEN([.G27]));&quot;null&quot;&amp;REPT(&quot; &quot;;5-4+2)) &amp;&quot;,&quot;&quot;&quot;&amp;[.H$1]&amp;&quot;&quot;&quot;:&quot;&amp;IF([.H27]&lt;&gt;&quot;&quot;;&quot;&quot;&quot;&quot;&amp;[.H27]&amp;&quot;&quot;&quot;&quot;&amp;REPT(&quot; &quot;;19-LEN([.H27]));&quot;null&quot;&amp;REPT(&quot; &quot;;19-4+2)) &amp;&quot;,&quot;&quot;&quot;&amp;[.I$1]&amp;&quot;&quot;&quot;:&quot;&amp;IF([.I27]&lt;&gt;&quot;&quot;;&quot;&quot;&quot;&quot;&amp;[.I27]&amp;&quot;&quot;&quot;&quot;&amp;REPT(&quot; &quot;;8-LEN([.I27]));&quot;null&quot;&amp;REPT(&quot; &quot;;8-4+2)) &amp;&quot;,&quot;&quot;&quot;&amp;[.J$1]&amp;&quot;&quot;&quot;:&quot;&amp;IF([.J27]&lt;&gt;&quot;&quot;;[.J27]&amp;REPT(&quot; &quot;;4-LEN([.J27]));&quot;null&quot;) &amp;&quot;,&quot;&quot;&quot;&amp;[.K$1]&amp;&quot;&quot;&quot;:&quot;&amp;IF([.K27]&lt;&gt;&quot;&quot;;[.K27]&amp;REPT(&quot; &quot;;4-LEN([.K27]));&quot;null&quot;) &amp;&quot;,&quot;&quot;&quot;&amp;[.L$1]&amp;&quot;&quot;&quot;:&quot;&amp;IF([.L27]&lt;&gt;&quot;&quot;;[.L27]&amp;REPT(&quot; &quot;;5-LEN([.L27]));&quot;null &quot;) &amp;&quot;,&quot;&quot;&quot;&amp;[.M$1]&amp;&quot;&quot;&quot;:&quot;&amp;IF([.M27]&lt;&gt;&quot;&quot;;&quot;&quot;&quot;&quot;&amp;[.M27]&amp;&quot;&quot;&quot;&quot;&amp;REPT(&quot; &quot;;20-LEN([.M27]));&quot;null&quot;&amp;REPT(&quot; &quot;;20-4+2)) &amp;&quot;,&quot;&quot;&quot;&amp;[.N$1]&amp;&quot;&quot;&quot;:&quot;&amp;IF([.N27]&lt;&gt;&quot;&quot;;&quot;&quot;&amp;[.N27]&amp;&quot;&quot;&amp;REPT(&quot; &quot;;5-LEN([.N27]));&quot;null&quot;&amp;REPT(&quot; &quot;;5-4+2)) &amp;&quot;,&quot;&quot;&quot;&amp;[.O$1]&amp;&quot;&quot;&quot;:&quot;&amp;[.O27] &amp;&quot;,&quot;&quot;&quot;&amp;[.P$1]&amp;&quot;&quot;&quot;:&quot;&amp;[.P27] &amp;&quot;}&quot;" office:value-type="string" office:string-value=":{&quot;LogicalId&quot;:&quot;LockOff&quot;             ,&quot;Name&quot;:&quot;Désactiver Verrouillage&quot;            ,&quot;Order&quot;:35 ,&quot;Type&quot;:&quot;action&quot;,&quot;SubType&quot;:&quot;other&quot;  ,&quot;Unite&quot;:null   ,&quot;Config_infoName&quot;:&quot;etatlock&quot;           ,&quot;Config_value&quot;:null      ,&quot;Config_minValue&quot;:null,&quot;Config_maxValue&quot;:null,&quot;Config_tempHL&quot;:null ,&quot;setValue&quot;:null                  ,&quot;Display_param_step&quot;:null   ,&quot;IsHistorized&quot;:0,&quot;IsVisible&quot;:1}" calcext:value-type="string">
            <text:p>:{"LogicalId":"LockOff" <text:s text:c="12"/>,"Name":"Désactiver Verrouillage" <text:s text:c="11"/>,"Order":35 ,"Type":"action","SubType":"other" <text:s/>,"Unite":null <text:s text:c="2"/>,"Config_infoName":"etatlock" <text:s text:c="10"/>,"Config_value":null <text:s text:c="5"/>,"Config_minValue":null,"Config_maxValue":null,"Config_tempHL":null ,"setValue":null <text:s text:c="17"/>,"Display_param_step":null <text:s text:c="2"/>,"IsHistorized":0,"IsVisible":1}</text:p>
          </table:table-cell>
          <table:table-cell table:style-name="ce15" office:value-type="string" calcext:value-type="string">
            <text:p>.</text:p>
          </table:table-cell>
          <table:table-cell table:style-name="ce14"/>
          <table:table-cell table:style-name="ce17" table:formula="of:=IF([.W26]=&quot;&quot;;&quot; &quot;;IF([.B27]&lt;&gt;&quot;&quot;;&quot;,&quot;;&quot;]&quot;))&#10;&amp;IF([.B27]&lt;&gt;&quot;&quot;;&quot;{&quot;&quot;cmd&quot;&quot;:&quot;&quot;&quot;&amp;[.B27]&amp;&quot;&quot;&quot;&quot;&amp;REPT(&quot; &quot;;20-LEN([.B27]));&quot;&quot;)" office:value-type="string" office:string-value=",{&quot;cmd&quot;:&quot;LockOff&quot;             " calcext:value-type="string">
            <text:p>,{"cmd":"LockOff" <text:s text:c="12"/></text:p>
          </table:table-cell>
          <table:table-cell table:style-name="ce17" table:formula="of:=&quot;,&quot;&quot;attrs&quot;&quot;:&quot;&#10;&amp;&quot;{&quot;&quot;&quot;&amp;[.B$1]&amp;&quot;&quot;&quot;:&quot;&quot;&quot;&amp;[.B27]&amp;&quot;&quot;&quot;&quot;&amp;REPT(&quot; &quot;;20-LEN([.B27]))&#10;&amp;&quot;,&quot;&quot;&quot;&amp;[.C$1]&amp;&quot;&quot;&quot;:&quot;&quot;&quot;&amp;[.C27]&amp;&quot;&quot;&quot;&quot;&amp;REPT(&quot; &quot;;35-LEN([.C27]))&#10;&amp;&quot;,&quot;&quot;&quot;&amp;[.D$1]&amp;&quot;&quot;&quot;:&quot;&amp;[.D27]&amp;REPT(&quot; &quot;;3-LEN([.D27]))&#10;&amp;&quot;,&quot;&quot;&quot;&amp;[.E$1]&amp;&quot;&quot;&quot;:&quot;&quot;&quot;&amp;[.E27]&amp;&quot;&quot;&quot;&quot;&amp;REPT(&quot; &quot;;6-LEN([.E27]))&#10;&amp;&quot;,&quot;&quot;&quot;&amp;[.F$1]&amp;&quot;&quot;&quot;:&quot;&quot;&quot;&amp;[.F27]&amp;&quot;&quot;&quot;&quot;&amp;REPT(&quot; &quot;;7-LEN([.F27]))&#10;&amp;&quot;,&quot;&quot;&quot;&amp;[.G$1]&amp;&quot;&quot;&quot;:&quot;&amp;IF([.G27]&lt;&gt;&quot;&quot;;&quot;&quot;&quot;&quot;&amp;[.G27]&amp;&quot;&quot;&quot;&quot;&amp;REPT(&quot; &quot;;5-LEN([.G27]));&quot;null&quot;&amp;REPT(&quot; &quot;;5-4+2))&#10;&amp;&quot;,&quot;&quot;&quot;&amp;[.H$1]&amp;&quot;&quot;&quot;:&quot;&amp;IF([.H27]&lt;&gt;&quot;&quot;;&quot;&quot;&quot;&quot;&amp;[.H27]&amp;&quot;&quot;&quot;&quot;&amp;REPT(&quot; &quot;;19-LEN([.H27]));&quot;null&quot;&amp;REPT(&quot; &quot;;19-4+2))&#10;&amp;&quot;,&quot;&quot;&quot;&amp;[.I$1]&amp;&quot;&quot;&quot;:&quot;&amp;IF([.I27]&lt;&gt;&quot;&quot;;&quot;&quot;&quot;&quot;&amp;[.I27]&amp;&quot;&quot;&quot;&quot;&amp;REPT(&quot; &quot;;8-LEN([.I27]));&quot;null&quot;&amp;REPT(&quot; &quot;;8-4+2))&#10;&amp;&quot;,&quot;&quot;&quot;&amp;[.J$1]&amp;&quot;&quot;&quot;:&quot;&amp;IF([.J27]&lt;&gt;&quot;&quot;;[.J27]&amp;REPT(&quot; &quot;;4-LEN([.J27]));&quot;null&quot;)&#10;&amp;&quot;,&quot;&quot;&quot;&amp;[.K$1]&amp;&quot;&quot;&quot;:&quot;&amp;IF([.K27]&lt;&gt;&quot;&quot;;[.K27]&amp;REPT(&quot; &quot;;4-LEN([.K27]));&quot;null&quot;)&#10;&amp;&quot;,&quot;&quot;&quot;&amp;[.L$1]&amp;&quot;&quot;&quot;:&quot;&amp;IF([.L27]&lt;&gt;&quot;&quot;;[.L27]&amp;REPT(&quot; &quot;;5-LEN([.L27]));&quot;null &quot;)&#10;&amp;&quot;,&quot;&quot;&quot;&amp;[.M$1]&amp;&quot;&quot;&quot;:&quot;&amp;IF([.M27]&lt;&gt;&quot;&quot;;&quot;&quot;&quot;&quot;&amp;[.M27]&amp;&quot;&quot;&quot;&quot;&amp;REPT(&quot; &quot;;20-LEN([.M27]));&quot;null&quot;&amp;REPT(&quot; &quot;;20-4+2))&#10;&amp;&quot;,&quot;&quot;&quot;&amp;[.N$1]&amp;&quot;&quot;&quot;:&quot;&amp;IF([.N27]&lt;&gt;&quot;&quot;;&quot;&quot;&quot;&quot;&amp;[.N27]&amp;&quot;&quot;&quot;&quot;&amp;REPT(&quot; &quot;;30-LEN([.N27]));&quot;null&quot;&amp;REPT(&quot; &quot;;30-4+2))&#10;&amp;&quot;,&quot;&quot;&quot;&amp;[.O$1]&amp;&quot;&quot;&quot;:&quot;&amp;[.O27]&#10;&amp;&quot;,&quot;&quot;&quot;&amp;[.P$1]&amp;&quot;&quot;&quot;:&quot;&amp;[.P27]&#10;&amp;&quot;}}&quot;" office:value-type="string" office:string-value=",&quot;attrs&quot;:{&quot;LogicalId&quot;:&quot;LockOff&quot;             ,&quot;Name&quot;:&quot;Désactiver Verrouillage&quot;            ,&quot;Order&quot;:35 ,&quot;Type&quot;:&quot;action&quot;,&quot;SubType&quot;:&quot;other&quot;  ,&quot;Unite&quot;:null   ,&quot;Config_infoName&quot;:&quot;etatlock&quot;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LockOff" <text:s text:c="12"/>,"Name":"Désactiver Verrouillage" <text:s text:c="11"/>,"Order":35 ,"Type":"action","SubType":"other" <text:s/>,"Unite":null <text:s text:c="2"/>,"Config_infoName":"etatlock" <text:s text:c="10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Lock_C_State</text:p>
          </table:table-cell>
          <table:table-cell office:value-type="string" calcext:value-type="string">
            <text:p>Etat Verrouillag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binary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N28])" office:value-type="float" office:value="0" calcext:value-type="float">
            <text:p>0</text:p>
          </table:table-cell>
          <table:table-cell/>
          <table:table-cell table:style-name="ce17" table:formula="of:=&quot;&quot;&amp;IF([.T27]=&quot;&quot;;&quot; &quot;;IF([.A28]&lt;&gt;&quot;&quot;;&quot;,&quot;;&quot;}&quot;)) &amp;IF([.A28]&lt;&gt;&quot;&quot;;&quot;&quot;&quot;&quot;&amp;[.A28]&amp;&quot;&quot;&quot;&quot;&amp;REPT(&quot; &quot;;20-LEN([.A28]));&quot;&quot;)" office:value-type="string" office:string-value=",&quot;Lock_C_State&quot;        " calcext:value-type="string">
            <text:p>,"Lock_C_State" <text:s text:c="7"/></text:p>
          </table:table-cell>
          <table:table-cell table:style-name="ce17" table:formula="of:=&quot;:&quot; &amp;&quot;{&quot;&quot;&quot;&amp;[.B$1]&amp;&quot;&quot;&quot;:&quot;&quot;&quot;&amp;[.B28]&amp;&quot;&quot;&quot;&quot;&amp;REPT(&quot; &quot;;20-LEN([.B28])) &amp;&quot;,&quot;&quot;&quot;&amp;[.C$1]&amp;&quot;&quot;&quot;:&quot;&quot;&quot;&amp;[.C28]&amp;&quot;&quot;&quot;&quot;&amp;REPT(&quot; &quot;;35-LEN([.C28])) &amp;&quot;,&quot;&quot;&quot;&amp;[.D$1]&amp;&quot;&quot;&quot;:&quot;&amp;[.D28]&amp;REPT(&quot; &quot;;3-LEN([.D28])) &amp;&quot;,&quot;&quot;&quot;&amp;[.E$1]&amp;&quot;&quot;&quot;:&quot;&quot;&quot;&amp;[.E28]&amp;&quot;&quot;&quot;&quot;&amp;REPT(&quot; &quot;;6-LEN([.E28])) &amp;&quot;,&quot;&quot;&quot;&amp;[.F$1]&amp;&quot;&quot;&quot;:&quot;&quot;&quot;&amp;[.F28]&amp;&quot;&quot;&quot;&quot;&amp;REPT(&quot; &quot;;7-LEN([.F28])) &amp;&quot;,&quot;&quot;&quot;&amp;[.G$1]&amp;&quot;&quot;&quot;:&quot;&amp;IF([.G28]&lt;&gt;&quot;&quot;;&quot;&quot;&quot;&quot;&amp;[.G28]&amp;&quot;&quot;&quot;&quot;&amp;REPT(&quot; &quot;;5-LEN([.G28]));&quot;null&quot;&amp;REPT(&quot; &quot;;5-4+2)) &amp;&quot;,&quot;&quot;&quot;&amp;[.H$1]&amp;&quot;&quot;&quot;:&quot;&amp;IF([.H28]&lt;&gt;&quot;&quot;;&quot;&quot;&quot;&quot;&amp;[.H28]&amp;&quot;&quot;&quot;&quot;&amp;REPT(&quot; &quot;;19-LEN([.H28]));&quot;null&quot;&amp;REPT(&quot; &quot;;19-4+2)) &amp;&quot;,&quot;&quot;&quot;&amp;[.I$1]&amp;&quot;&quot;&quot;:&quot;&amp;IF([.I28]&lt;&gt;&quot;&quot;;&quot;&quot;&quot;&quot;&amp;[.I28]&amp;&quot;&quot;&quot;&quot;&amp;REPT(&quot; &quot;;8-LEN([.I28]));&quot;null&quot;&amp;REPT(&quot; &quot;;8-4+2)) &amp;&quot;,&quot;&quot;&quot;&amp;[.J$1]&amp;&quot;&quot;&quot;:&quot;&amp;IF([.J28]&lt;&gt;&quot;&quot;;[.J28]&amp;REPT(&quot; &quot;;4-LEN([.J28]));&quot;null&quot;) &amp;&quot;,&quot;&quot;&quot;&amp;[.K$1]&amp;&quot;&quot;&quot;:&quot;&amp;IF([.K28]&lt;&gt;&quot;&quot;;[.K28]&amp;REPT(&quot; &quot;;4-LEN([.K28]));&quot;null&quot;) &amp;&quot;,&quot;&quot;&quot;&amp;[.L$1]&amp;&quot;&quot;&quot;:&quot;&amp;IF([.L28]&lt;&gt;&quot;&quot;;[.L28]&amp;REPT(&quot; &quot;;5-LEN([.L28]));&quot;null &quot;) &amp;&quot;,&quot;&quot;&quot;&amp;[.M$1]&amp;&quot;&quot;&quot;:&quot;&amp;IF([.M28]&lt;&gt;&quot;&quot;;&quot;&quot;&quot;&quot;&amp;[.M28]&amp;&quot;&quot;&quot;&quot;&amp;REPT(&quot; &quot;;20-LEN([.M28]));&quot;null&quot;&amp;REPT(&quot; &quot;;20-4+2)) &amp;&quot;,&quot;&quot;&quot;&amp;[.N$1]&amp;&quot;&quot;&quot;:&quot;&amp;IF([.N28]&lt;&gt;&quot;&quot;;&quot;&quot;&amp;[.N28]&amp;&quot;&quot;&amp;REPT(&quot; &quot;;5-LEN([.N28]));&quot;null&quot;&amp;REPT(&quot; &quot;;5-4+2)) &amp;&quot;,&quot;&quot;&quot;&amp;[.O$1]&amp;&quot;&quot;&quot;:&quot;&amp;[.O28] &amp;&quot;,&quot;&quot;&quot;&amp;[.P$1]&amp;&quot;&quot;&quot;:&quot;&amp;[.P28] &amp;&quot;}&quot;" office:value-type="string" office:string-value=":{&quot;LogicalId&quot;:&quot;Lock_C_State&quot;        ,&quot;Name&quot;:&quot;Etat Verrouillage&quot;                  ,&quot;Order&quot;:36 ,&quot;Type&quot;:&quot;info&quot;  ,&quot;SubType&quot;:&quot;binary&quot; ,&quot;Unite&quot;:null   ,&quot;Config_infoName&quot;:null                 ,&quot;Config_value&quot;:null      ,&quot;Config_minValue&quot;:null,&quot;Config_maxValue&quot;:null,&quot;Config_tempHL&quot;:null ,&quot;setValue&quot;:null                  ,&quot;Display_param_step&quot;:null   ,&quot;IsHistorized&quot;:0,&quot;IsVisible&quot;:1}" calcext:value-type="string">
            <text:p>:{"LogicalId":"Lock_C_State" <text:s text:c="7"/>,"Name":"Etat Verrouillage" <text:s text:c="17"/>,"Order":36 ,"Type":"info" <text:s/>,"SubType":"binary" ,"Unite":null <text:s text:c="2"/>,"Config_infoName":null <text:s text:c="16"/>,"Config_value":null <text:s text:c="5"/>,"Config_minValue":null,"Config_maxValue":null,"Config_tempHL":null ,"setValue":null <text:s text:c="17"/>,"Display_param_step":null <text:s text:c="2"/>,"IsHistorized":0,"IsVisible":1}</text:p>
          </table:table-cell>
          <table:table-cell table:style-name="ce15" office:value-type="string" calcext:value-type="string">
            <text:p>.</text:p>
          </table:table-cell>
          <table:table-cell table:style-name="ce14"/>
          <table:table-cell table:style-name="ce17" table:formula="of:=IF([.W27]=&quot;&quot;;&quot; &quot;;IF([.B28]&lt;&gt;&quot;&quot;;&quot;,&quot;;&quot;]&quot;))&#10;&amp;IF([.B28]&lt;&gt;&quot;&quot;;&quot;{&quot;&quot;cmd&quot;&quot;:&quot;&quot;&quot;&amp;[.B28]&amp;&quot;&quot;&quot;&quot;&amp;REPT(&quot; &quot;;20-LEN([.B28]));&quot;&quot;)" office:value-type="string" office:string-value=",{&quot;cmd&quot;:&quot;Lock_C_State&quot;        " calcext:value-type="string">
            <text:p>,{"cmd":"Lock_C_State" <text:s text:c="7"/></text:p>
          </table:table-cell>
          <table:table-cell table:style-name="ce17" table:formula="of:=&quot;,&quot;&quot;attrs&quot;&quot;:&quot;&#10;&amp;&quot;{&quot;&quot;&quot;&amp;[.B$1]&amp;&quot;&quot;&quot;:&quot;&quot;&quot;&amp;[.B28]&amp;&quot;&quot;&quot;&quot;&amp;REPT(&quot; &quot;;20-LEN([.B28]))&#10;&amp;&quot;,&quot;&quot;&quot;&amp;[.C$1]&amp;&quot;&quot;&quot;:&quot;&quot;&quot;&amp;[.C28]&amp;&quot;&quot;&quot;&quot;&amp;REPT(&quot; &quot;;35-LEN([.C28]))&#10;&amp;&quot;,&quot;&quot;&quot;&amp;[.D$1]&amp;&quot;&quot;&quot;:&quot;&amp;[.D28]&amp;REPT(&quot; &quot;;3-LEN([.D28]))&#10;&amp;&quot;,&quot;&quot;&quot;&amp;[.E$1]&amp;&quot;&quot;&quot;:&quot;&quot;&quot;&amp;[.E28]&amp;&quot;&quot;&quot;&quot;&amp;REPT(&quot; &quot;;6-LEN([.E28]))&#10;&amp;&quot;,&quot;&quot;&quot;&amp;[.F$1]&amp;&quot;&quot;&quot;:&quot;&quot;&quot;&amp;[.F28]&amp;&quot;&quot;&quot;&quot;&amp;REPT(&quot; &quot;;7-LEN([.F28]))&#10;&amp;&quot;,&quot;&quot;&quot;&amp;[.G$1]&amp;&quot;&quot;&quot;:&quot;&amp;IF([.G28]&lt;&gt;&quot;&quot;;&quot;&quot;&quot;&quot;&amp;[.G28]&amp;&quot;&quot;&quot;&quot;&amp;REPT(&quot; &quot;;5-LEN([.G28]));&quot;null&quot;&amp;REPT(&quot; &quot;;5-4+2))&#10;&amp;&quot;,&quot;&quot;&quot;&amp;[.H$1]&amp;&quot;&quot;&quot;:&quot;&amp;IF([.H28]&lt;&gt;&quot;&quot;;&quot;&quot;&quot;&quot;&amp;[.H28]&amp;&quot;&quot;&quot;&quot;&amp;REPT(&quot; &quot;;19-LEN([.H28]));&quot;null&quot;&amp;REPT(&quot; &quot;;19-4+2))&#10;&amp;&quot;,&quot;&quot;&quot;&amp;[.I$1]&amp;&quot;&quot;&quot;:&quot;&amp;IF([.I28]&lt;&gt;&quot;&quot;;&quot;&quot;&quot;&quot;&amp;[.I28]&amp;&quot;&quot;&quot;&quot;&amp;REPT(&quot; &quot;;8-LEN([.I28]));&quot;null&quot;&amp;REPT(&quot; &quot;;8-4+2))&#10;&amp;&quot;,&quot;&quot;&quot;&amp;[.J$1]&amp;&quot;&quot;&quot;:&quot;&amp;IF([.J28]&lt;&gt;&quot;&quot;;[.J28]&amp;REPT(&quot; &quot;;4-LEN([.J28]));&quot;null&quot;)&#10;&amp;&quot;,&quot;&quot;&quot;&amp;[.K$1]&amp;&quot;&quot;&quot;:&quot;&amp;IF([.K28]&lt;&gt;&quot;&quot;;[.K28]&amp;REPT(&quot; &quot;;4-LEN([.K28]));&quot;null&quot;)&#10;&amp;&quot;,&quot;&quot;&quot;&amp;[.L$1]&amp;&quot;&quot;&quot;:&quot;&amp;IF([.L28]&lt;&gt;&quot;&quot;;[.L28]&amp;REPT(&quot; &quot;;5-LEN([.L28]));&quot;null &quot;)&#10;&amp;&quot;,&quot;&quot;&quot;&amp;[.M$1]&amp;&quot;&quot;&quot;:&quot;&amp;IF([.M28]&lt;&gt;&quot;&quot;;&quot;&quot;&quot;&quot;&amp;[.M28]&amp;&quot;&quot;&quot;&quot;&amp;REPT(&quot; &quot;;20-LEN([.M28]));&quot;null&quot;&amp;REPT(&quot; &quot;;20-4+2))&#10;&amp;&quot;,&quot;&quot;&quot;&amp;[.N$1]&amp;&quot;&quot;&quot;:&quot;&amp;IF([.N28]&lt;&gt;&quot;&quot;;&quot;&quot;&quot;&quot;&amp;[.N28]&amp;&quot;&quot;&quot;&quot;&amp;REPT(&quot; &quot;;30-LEN([.N28]));&quot;null&quot;&amp;REPT(&quot; &quot;;30-4+2))&#10;&amp;&quot;,&quot;&quot;&quot;&amp;[.O$1]&amp;&quot;&quot;&quot;:&quot;&amp;[.O28]&#10;&amp;&quot;,&quot;&quot;&quot;&amp;[.P$1]&amp;&quot;&quot;&quot;:&quot;&amp;[.P28]&#10;&amp;&quot;}}&quot;" office:value-type="string" office:string-value=",&quot;attrs&quot;:{&quot;LogicalId&quot;:&quot;Lock_C_State&quot;        ,&quot;Name&quot;:&quot;Etat Verrouillage&quot;                  ,&quot;Order&quot;:36 ,&quot;Type&quot;:&quot;info&quot;  ,&quot;SubType&quot;:&quot;binary&quot; ,&quot;Unite&quot;:null   ,&quot;Config_infoName&quot;:null      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Lock_C_State" <text:s text:c="7"/>,"Name":"Etat Verrouillage" <text:s text:c="17"/>,"Order":36 ,"Type":"info" <text:s/>,"SubType":"binary" ,"Unite":null <text:s text:c="2"/>,"Config_infoName":null <text:s text:c="16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Lock_C_On</text:p>
          </table:table-cell>
          <table:table-cell office:value-type="string" calcext:value-type="string">
            <text:p>Activer Verrouillage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ther</text:p>
          </table:table-cell>
          <table:table-cell/>
          <table:table-cell office:value-type="string" calcext:value-type="string">
            <text:p>Lock_C_State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N29])" office:value-type="float" office:value="0" calcext:value-type="float">
            <text:p>0</text:p>
          </table:table-cell>
          <table:table-cell/>
          <table:table-cell table:style-name="ce17" table:formula="of:=&quot;&quot;&amp;IF([.T28]=&quot;&quot;;&quot; &quot;;IF([.A29]&lt;&gt;&quot;&quot;;&quot;,&quot;;&quot;}&quot;)) &amp;IF([.A29]&lt;&gt;&quot;&quot;;&quot;&quot;&quot;&quot;&amp;[.A29]&amp;&quot;&quot;&quot;&quot;&amp;REPT(&quot; &quot;;20-LEN([.A29]));&quot;&quot;)" office:value-type="string" office:string-value=",&quot;Lock_C_On&quot;           " calcext:value-type="string">
            <text:p>,"Lock_C_On" <text:s text:c="10"/></text:p>
          </table:table-cell>
          <table:table-cell table:style-name="ce17" table:formula="of:=&quot;:&quot; &amp;&quot;{&quot;&quot;&quot;&amp;[.B$1]&amp;&quot;&quot;&quot;:&quot;&quot;&quot;&amp;[.B29]&amp;&quot;&quot;&quot;&quot;&amp;REPT(&quot; &quot;;20-LEN([.B29])) &amp;&quot;,&quot;&quot;&quot;&amp;[.C$1]&amp;&quot;&quot;&quot;:&quot;&quot;&quot;&amp;[.C29]&amp;&quot;&quot;&quot;&quot;&amp;REPT(&quot; &quot;;35-LEN([.C29])) &amp;&quot;,&quot;&quot;&quot;&amp;[.D$1]&amp;&quot;&quot;&quot;:&quot;&amp;[.D29]&amp;REPT(&quot; &quot;;3-LEN([.D29])) &amp;&quot;,&quot;&quot;&quot;&amp;[.E$1]&amp;&quot;&quot;&quot;:&quot;&quot;&quot;&amp;[.E29]&amp;&quot;&quot;&quot;&quot;&amp;REPT(&quot; &quot;;6-LEN([.E29])) &amp;&quot;,&quot;&quot;&quot;&amp;[.F$1]&amp;&quot;&quot;&quot;:&quot;&quot;&quot;&amp;[.F29]&amp;&quot;&quot;&quot;&quot;&amp;REPT(&quot; &quot;;7-LEN([.F29])) &amp;&quot;,&quot;&quot;&quot;&amp;[.G$1]&amp;&quot;&quot;&quot;:&quot;&amp;IF([.G29]&lt;&gt;&quot;&quot;;&quot;&quot;&quot;&quot;&amp;[.G29]&amp;&quot;&quot;&quot;&quot;&amp;REPT(&quot; &quot;;5-LEN([.G29]));&quot;null&quot;&amp;REPT(&quot; &quot;;5-4+2)) &amp;&quot;,&quot;&quot;&quot;&amp;[.H$1]&amp;&quot;&quot;&quot;:&quot;&amp;IF([.H29]&lt;&gt;&quot;&quot;;&quot;&quot;&quot;&quot;&amp;[.H29]&amp;&quot;&quot;&quot;&quot;&amp;REPT(&quot; &quot;;19-LEN([.H29]));&quot;null&quot;&amp;REPT(&quot; &quot;;19-4+2)) &amp;&quot;,&quot;&quot;&quot;&amp;[.I$1]&amp;&quot;&quot;&quot;:&quot;&amp;IF([.I29]&lt;&gt;&quot;&quot;;&quot;&quot;&quot;&quot;&amp;[.I29]&amp;&quot;&quot;&quot;&quot;&amp;REPT(&quot; &quot;;8-LEN([.I29]));&quot;null&quot;&amp;REPT(&quot; &quot;;8-4+2)) &amp;&quot;,&quot;&quot;&quot;&amp;[.J$1]&amp;&quot;&quot;&quot;:&quot;&amp;IF([.J29]&lt;&gt;&quot;&quot;;[.J29]&amp;REPT(&quot; &quot;;4-LEN([.J29]));&quot;null&quot;) &amp;&quot;,&quot;&quot;&quot;&amp;[.K$1]&amp;&quot;&quot;&quot;:&quot;&amp;IF([.K29]&lt;&gt;&quot;&quot;;[.K29]&amp;REPT(&quot; &quot;;4-LEN([.K29]));&quot;null&quot;) &amp;&quot;,&quot;&quot;&quot;&amp;[.L$1]&amp;&quot;&quot;&quot;:&quot;&amp;IF([.L29]&lt;&gt;&quot;&quot;;[.L29]&amp;REPT(&quot; &quot;;5-LEN([.L29]));&quot;null &quot;) &amp;&quot;,&quot;&quot;&quot;&amp;[.M$1]&amp;&quot;&quot;&quot;:&quot;&amp;IF([.M29]&lt;&gt;&quot;&quot;;&quot;&quot;&quot;&quot;&amp;[.M29]&amp;&quot;&quot;&quot;&quot;&amp;REPT(&quot; &quot;;20-LEN([.M29]));&quot;null&quot;&amp;REPT(&quot; &quot;;20-4+2)) &amp;&quot;,&quot;&quot;&quot;&amp;[.N$1]&amp;&quot;&quot;&quot;:&quot;&amp;IF([.N29]&lt;&gt;&quot;&quot;;&quot;&quot;&amp;[.N29]&amp;&quot;&quot;&amp;REPT(&quot; &quot;;5-LEN([.N29]));&quot;null&quot;&amp;REPT(&quot; &quot;;5-4+2)) &amp;&quot;,&quot;&quot;&quot;&amp;[.O$1]&amp;&quot;&quot;&quot;:&quot;&amp;[.O29] &amp;&quot;,&quot;&quot;&quot;&amp;[.P$1]&amp;&quot;&quot;&quot;:&quot;&amp;[.P29] &amp;&quot;}&quot;" office:value-type="string" office:string-value=":{&quot;LogicalId&quot;:&quot;Lock_C_On&quot;           ,&quot;Name&quot;:&quot;Activer Verrouillage&quot;               ,&quot;Order&quot;:37 ,&quot;Type&quot;:&quot;action&quot;,&quot;SubType&quot;:&quot;other&quot;  ,&quot;Unite&quot;:null   ,&quot;Config_infoName&quot;:&quot;Lock_C_State&quot;       ,&quot;Config_value&quot;:null      ,&quot;Config_minValue&quot;:null,&quot;Config_maxValue&quot;:null,&quot;Config_tempHL&quot;:null ,&quot;setValue&quot;:null                  ,&quot;Display_param_step&quot;:null   ,&quot;IsHistorized&quot;:0,&quot;IsVisible&quot;:1}" calcext:value-type="string">
            <text:p>:{"LogicalId":"Lock_C_On" <text:s text:c="10"/>,"Name":"Activer Verrouillage" <text:s text:c="14"/>,"Order":37 ,"Type":"action","SubType":"other" <text:s/>,"Unite":null <text:s text:c="2"/>,"Config_infoName":"Lock_C_State" <text:s text:c="6"/>,"Config_value":null <text:s text:c="5"/>,"Config_minValue":null,"Config_maxValue":null,"Config_tempHL":null ,"setValue":null <text:s text:c="17"/>,"Display_param_step":null <text:s text:c="2"/>,"IsHistorized":0,"IsVisible":1}</text:p>
          </table:table-cell>
          <table:table-cell table:style-name="ce15" office:value-type="string" calcext:value-type="string">
            <text:p>.</text:p>
          </table:table-cell>
          <table:table-cell table:style-name="ce14"/>
          <table:table-cell table:style-name="ce17" table:formula="of:=IF([.W28]=&quot;&quot;;&quot; &quot;;IF([.B29]&lt;&gt;&quot;&quot;;&quot;,&quot;;&quot;]&quot;))&#10;&amp;IF([.B29]&lt;&gt;&quot;&quot;;&quot;{&quot;&quot;cmd&quot;&quot;:&quot;&quot;&quot;&amp;[.B29]&amp;&quot;&quot;&quot;&quot;&amp;REPT(&quot; &quot;;20-LEN([.B29]));&quot;&quot;)" office:value-type="string" office:string-value=",{&quot;cmd&quot;:&quot;Lock_C_On&quot;           " calcext:value-type="string">
            <text:p>,{"cmd":"Lock_C_On" <text:s text:c="10"/></text:p>
          </table:table-cell>
          <table:table-cell table:style-name="ce17" table:formula="of:=&quot;,&quot;&quot;attrs&quot;&quot;:&quot;&#10;&amp;&quot;{&quot;&quot;&quot;&amp;[.B$1]&amp;&quot;&quot;&quot;:&quot;&quot;&quot;&amp;[.B29]&amp;&quot;&quot;&quot;&quot;&amp;REPT(&quot; &quot;;20-LEN([.B29]))&#10;&amp;&quot;,&quot;&quot;&quot;&amp;[.C$1]&amp;&quot;&quot;&quot;:&quot;&quot;&quot;&amp;[.C29]&amp;&quot;&quot;&quot;&quot;&amp;REPT(&quot; &quot;;35-LEN([.C29]))&#10;&amp;&quot;,&quot;&quot;&quot;&amp;[.D$1]&amp;&quot;&quot;&quot;:&quot;&amp;[.D29]&amp;REPT(&quot; &quot;;3-LEN([.D29]))&#10;&amp;&quot;,&quot;&quot;&quot;&amp;[.E$1]&amp;&quot;&quot;&quot;:&quot;&quot;&quot;&amp;[.E29]&amp;&quot;&quot;&quot;&quot;&amp;REPT(&quot; &quot;;6-LEN([.E29]))&#10;&amp;&quot;,&quot;&quot;&quot;&amp;[.F$1]&amp;&quot;&quot;&quot;:&quot;&quot;&quot;&amp;[.F29]&amp;&quot;&quot;&quot;&quot;&amp;REPT(&quot; &quot;;7-LEN([.F29]))&#10;&amp;&quot;,&quot;&quot;&quot;&amp;[.G$1]&amp;&quot;&quot;&quot;:&quot;&amp;IF([.G29]&lt;&gt;&quot;&quot;;&quot;&quot;&quot;&quot;&amp;[.G29]&amp;&quot;&quot;&quot;&quot;&amp;REPT(&quot; &quot;;5-LEN([.G29]));&quot;null&quot;&amp;REPT(&quot; &quot;;5-4+2))&#10;&amp;&quot;,&quot;&quot;&quot;&amp;[.H$1]&amp;&quot;&quot;&quot;:&quot;&amp;IF([.H29]&lt;&gt;&quot;&quot;;&quot;&quot;&quot;&quot;&amp;[.H29]&amp;&quot;&quot;&quot;&quot;&amp;REPT(&quot; &quot;;19-LEN([.H29]));&quot;null&quot;&amp;REPT(&quot; &quot;;19-4+2))&#10;&amp;&quot;,&quot;&quot;&quot;&amp;[.I$1]&amp;&quot;&quot;&quot;:&quot;&amp;IF([.I29]&lt;&gt;&quot;&quot;;&quot;&quot;&quot;&quot;&amp;[.I29]&amp;&quot;&quot;&quot;&quot;&amp;REPT(&quot; &quot;;8-LEN([.I29]));&quot;null&quot;&amp;REPT(&quot; &quot;;8-4+2))&#10;&amp;&quot;,&quot;&quot;&quot;&amp;[.J$1]&amp;&quot;&quot;&quot;:&quot;&amp;IF([.J29]&lt;&gt;&quot;&quot;;[.J29]&amp;REPT(&quot; &quot;;4-LEN([.J29]));&quot;null&quot;)&#10;&amp;&quot;,&quot;&quot;&quot;&amp;[.K$1]&amp;&quot;&quot;&quot;:&quot;&amp;IF([.K29]&lt;&gt;&quot;&quot;;[.K29]&amp;REPT(&quot; &quot;;4-LEN([.K29]));&quot;null&quot;)&#10;&amp;&quot;,&quot;&quot;&quot;&amp;[.L$1]&amp;&quot;&quot;&quot;:&quot;&amp;IF([.L29]&lt;&gt;&quot;&quot;;[.L29]&amp;REPT(&quot; &quot;;5-LEN([.L29]));&quot;null &quot;)&#10;&amp;&quot;,&quot;&quot;&quot;&amp;[.M$1]&amp;&quot;&quot;&quot;:&quot;&amp;IF([.M29]&lt;&gt;&quot;&quot;;&quot;&quot;&quot;&quot;&amp;[.M29]&amp;&quot;&quot;&quot;&quot;&amp;REPT(&quot; &quot;;20-LEN([.M29]));&quot;null&quot;&amp;REPT(&quot; &quot;;20-4+2))&#10;&amp;&quot;,&quot;&quot;&quot;&amp;[.N$1]&amp;&quot;&quot;&quot;:&quot;&amp;IF([.N29]&lt;&gt;&quot;&quot;;&quot;&quot;&quot;&quot;&amp;[.N29]&amp;&quot;&quot;&quot;&quot;&amp;REPT(&quot; &quot;;30-LEN([.N29]));&quot;null&quot;&amp;REPT(&quot; &quot;;30-4+2))&#10;&amp;&quot;,&quot;&quot;&quot;&amp;[.O$1]&amp;&quot;&quot;&quot;:&quot;&amp;[.O29]&#10;&amp;&quot;,&quot;&quot;&quot;&amp;[.P$1]&amp;&quot;&quot;&quot;:&quot;&amp;[.P29]&#10;&amp;&quot;}}&quot;" office:value-type="string" office:string-value=",&quot;attrs&quot;:{&quot;LogicalId&quot;:&quot;Lock_C_On&quot;           ,&quot;Name&quot;:&quot;Activer Verrouillage&quot;               ,&quot;Order&quot;:37 ,&quot;Type&quot;:&quot;action&quot;,&quot;SubType&quot;:&quot;other&quot;  ,&quot;Unite&quot;:null   ,&quot;Config_infoName&quot;:&quot;Lock_C_State&quot;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Lock_C_On" <text:s text:c="10"/>,"Name":"Activer Verrouillage" <text:s text:c="14"/>,"Order":37 ,"Type":"action","SubType":"other" <text:s/>,"Unite":null <text:s text:c="2"/>,"Config_infoName":"Lock_C_State" <text:s text:c="6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Lock_C_Off</text:p>
          </table:table-cell>
          <table:table-cell office:value-type="string" calcext:value-type="string">
            <text:p>Désactiver Verrouillage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ther</text:p>
          </table:table-cell>
          <table:table-cell/>
          <table:table-cell office:value-type="string" calcext:value-type="string">
            <text:p>Lock_C_State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N30])" office:value-type="float" office:value="0" calcext:value-type="float">
            <text:p>0</text:p>
          </table:table-cell>
          <table:table-cell/>
          <table:table-cell table:style-name="ce17" table:formula="of:=&quot;&quot;&amp;IF([.T29]=&quot;&quot;;&quot; &quot;;IF([.A30]&lt;&gt;&quot;&quot;;&quot;,&quot;;&quot;}&quot;)) &amp;IF([.A30]&lt;&gt;&quot;&quot;;&quot;&quot;&quot;&quot;&amp;[.A30]&amp;&quot;&quot;&quot;&quot;&amp;REPT(&quot; &quot;;20-LEN([.A30]));&quot;&quot;)" office:value-type="string" office:string-value=",&quot;Lock_C_Off&quot;          " calcext:value-type="string">
            <text:p>,"Lock_C_Off" <text:s text:c="9"/></text:p>
          </table:table-cell>
          <table:table-cell table:style-name="ce17" table:formula="of:=&quot;:&quot; &amp;&quot;{&quot;&quot;&quot;&amp;[.B$1]&amp;&quot;&quot;&quot;:&quot;&quot;&quot;&amp;[.B30]&amp;&quot;&quot;&quot;&quot;&amp;REPT(&quot; &quot;;20-LEN([.B30])) &amp;&quot;,&quot;&quot;&quot;&amp;[.C$1]&amp;&quot;&quot;&quot;:&quot;&quot;&quot;&amp;[.C30]&amp;&quot;&quot;&quot;&quot;&amp;REPT(&quot; &quot;;35-LEN([.C30])) &amp;&quot;,&quot;&quot;&quot;&amp;[.D$1]&amp;&quot;&quot;&quot;:&quot;&amp;[.D30]&amp;REPT(&quot; &quot;;3-LEN([.D30])) &amp;&quot;,&quot;&quot;&quot;&amp;[.E$1]&amp;&quot;&quot;&quot;:&quot;&quot;&quot;&amp;[.E30]&amp;&quot;&quot;&quot;&quot;&amp;REPT(&quot; &quot;;6-LEN([.E30])) &amp;&quot;,&quot;&quot;&quot;&amp;[.F$1]&amp;&quot;&quot;&quot;:&quot;&quot;&quot;&amp;[.F30]&amp;&quot;&quot;&quot;&quot;&amp;REPT(&quot; &quot;;7-LEN([.F30])) &amp;&quot;,&quot;&quot;&quot;&amp;[.G$1]&amp;&quot;&quot;&quot;:&quot;&amp;IF([.G30]&lt;&gt;&quot;&quot;;&quot;&quot;&quot;&quot;&amp;[.G30]&amp;&quot;&quot;&quot;&quot;&amp;REPT(&quot; &quot;;5-LEN([.G30]));&quot;null&quot;&amp;REPT(&quot; &quot;;5-4+2)) &amp;&quot;,&quot;&quot;&quot;&amp;[.H$1]&amp;&quot;&quot;&quot;:&quot;&amp;IF([.H30]&lt;&gt;&quot;&quot;;&quot;&quot;&quot;&quot;&amp;[.H30]&amp;&quot;&quot;&quot;&quot;&amp;REPT(&quot; &quot;;19-LEN([.H30]));&quot;null&quot;&amp;REPT(&quot; &quot;;19-4+2)) &amp;&quot;,&quot;&quot;&quot;&amp;[.I$1]&amp;&quot;&quot;&quot;:&quot;&amp;IF([.I30]&lt;&gt;&quot;&quot;;&quot;&quot;&quot;&quot;&amp;[.I30]&amp;&quot;&quot;&quot;&quot;&amp;REPT(&quot; &quot;;8-LEN([.I30]));&quot;null&quot;&amp;REPT(&quot; &quot;;8-4+2)) &amp;&quot;,&quot;&quot;&quot;&amp;[.J$1]&amp;&quot;&quot;&quot;:&quot;&amp;IF([.J30]&lt;&gt;&quot;&quot;;[.J30]&amp;REPT(&quot; &quot;;4-LEN([.J30]));&quot;null&quot;) &amp;&quot;,&quot;&quot;&quot;&amp;[.K$1]&amp;&quot;&quot;&quot;:&quot;&amp;IF([.K30]&lt;&gt;&quot;&quot;;[.K30]&amp;REPT(&quot; &quot;;4-LEN([.K30]));&quot;null&quot;) &amp;&quot;,&quot;&quot;&quot;&amp;[.L$1]&amp;&quot;&quot;&quot;:&quot;&amp;IF([.L30]&lt;&gt;&quot;&quot;;[.L30]&amp;REPT(&quot; &quot;;5-LEN([.L30]));&quot;null &quot;) &amp;&quot;,&quot;&quot;&quot;&amp;[.M$1]&amp;&quot;&quot;&quot;:&quot;&amp;IF([.M30]&lt;&gt;&quot;&quot;;&quot;&quot;&quot;&quot;&amp;[.M30]&amp;&quot;&quot;&quot;&quot;&amp;REPT(&quot; &quot;;20-LEN([.M30]));&quot;null&quot;&amp;REPT(&quot; &quot;;20-4+2)) &amp;&quot;,&quot;&quot;&quot;&amp;[.N$1]&amp;&quot;&quot;&quot;:&quot;&amp;IF([.N30]&lt;&gt;&quot;&quot;;&quot;&quot;&amp;[.N30]&amp;&quot;&quot;&amp;REPT(&quot; &quot;;5-LEN([.N30]));&quot;null&quot;&amp;REPT(&quot; &quot;;5-4+2)) &amp;&quot;,&quot;&quot;&quot;&amp;[.O$1]&amp;&quot;&quot;&quot;:&quot;&amp;[.O30] &amp;&quot;,&quot;&quot;&quot;&amp;[.P$1]&amp;&quot;&quot;&quot;:&quot;&amp;[.P30] &amp;&quot;}&quot;" office:value-type="string" office:string-value=":{&quot;LogicalId&quot;:&quot;Lock_C_Off&quot;          ,&quot;Name&quot;:&quot;Désactiver Verrouillage&quot;            ,&quot;Order&quot;:38 ,&quot;Type&quot;:&quot;action&quot;,&quot;SubType&quot;:&quot;other&quot;  ,&quot;Unite&quot;:null   ,&quot;Config_infoName&quot;:&quot;Lock_C_State&quot;       ,&quot;Config_value&quot;:null      ,&quot;Config_minValue&quot;:null,&quot;Config_maxValue&quot;:null,&quot;Config_tempHL&quot;:null ,&quot;setValue&quot;:null                  ,&quot;Display_param_step&quot;:null   ,&quot;IsHistorized&quot;:0,&quot;IsVisible&quot;:1}" calcext:value-type="string">
            <text:p>:{"LogicalId":"Lock_C_Off" <text:s text:c="9"/>,"Name":"Désactiver Verrouillage" <text:s text:c="11"/>,"Order":38 ,"Type":"action","SubType":"other" <text:s/>,"Unite":null <text:s text:c="2"/>,"Config_infoName":"Lock_C_State" <text:s text:c="6"/>,"Config_value":null <text:s text:c="5"/>,"Config_minValue":null,"Config_maxValue":null,"Config_tempHL":null ,"setValue":null <text:s text:c="17"/>,"Display_param_step":null <text:s text:c="2"/>,"IsHistorized":0,"IsVisible":1}</text:p>
          </table:table-cell>
          <table:table-cell table:style-name="ce15" office:value-type="string" calcext:value-type="string">
            <text:p>.</text:p>
          </table:table-cell>
          <table:table-cell table:style-name="ce14"/>
          <table:table-cell table:style-name="ce17" table:formula="of:=IF([.W29]=&quot;&quot;;&quot; &quot;;IF([.B30]&lt;&gt;&quot;&quot;;&quot;,&quot;;&quot;]&quot;))&#10;&amp;IF([.B30]&lt;&gt;&quot;&quot;;&quot;{&quot;&quot;cmd&quot;&quot;:&quot;&quot;&quot;&amp;[.B30]&amp;&quot;&quot;&quot;&quot;&amp;REPT(&quot; &quot;;20-LEN([.B30]));&quot;&quot;)" office:value-type="string" office:string-value=",{&quot;cmd&quot;:&quot;Lock_C_Off&quot;          " calcext:value-type="string">
            <text:p>,{"cmd":"Lock_C_Off" <text:s text:c="9"/></text:p>
          </table:table-cell>
          <table:table-cell table:style-name="ce17" table:formula="of:=&quot;,&quot;&quot;attrs&quot;&quot;:&quot;&#10;&amp;&quot;{&quot;&quot;&quot;&amp;[.B$1]&amp;&quot;&quot;&quot;:&quot;&quot;&quot;&amp;[.B30]&amp;&quot;&quot;&quot;&quot;&amp;REPT(&quot; &quot;;20-LEN([.B30]))&#10;&amp;&quot;,&quot;&quot;&quot;&amp;[.C$1]&amp;&quot;&quot;&quot;:&quot;&quot;&quot;&amp;[.C30]&amp;&quot;&quot;&quot;&quot;&amp;REPT(&quot; &quot;;35-LEN([.C30]))&#10;&amp;&quot;,&quot;&quot;&quot;&amp;[.D$1]&amp;&quot;&quot;&quot;:&quot;&amp;[.D30]&amp;REPT(&quot; &quot;;3-LEN([.D30]))&#10;&amp;&quot;,&quot;&quot;&quot;&amp;[.E$1]&amp;&quot;&quot;&quot;:&quot;&quot;&quot;&amp;[.E30]&amp;&quot;&quot;&quot;&quot;&amp;REPT(&quot; &quot;;6-LEN([.E30]))&#10;&amp;&quot;,&quot;&quot;&quot;&amp;[.F$1]&amp;&quot;&quot;&quot;:&quot;&quot;&quot;&amp;[.F30]&amp;&quot;&quot;&quot;&quot;&amp;REPT(&quot; &quot;;7-LEN([.F30]))&#10;&amp;&quot;,&quot;&quot;&quot;&amp;[.G$1]&amp;&quot;&quot;&quot;:&quot;&amp;IF([.G30]&lt;&gt;&quot;&quot;;&quot;&quot;&quot;&quot;&amp;[.G30]&amp;&quot;&quot;&quot;&quot;&amp;REPT(&quot; &quot;;5-LEN([.G30]));&quot;null&quot;&amp;REPT(&quot; &quot;;5-4+2))&#10;&amp;&quot;,&quot;&quot;&quot;&amp;[.H$1]&amp;&quot;&quot;&quot;:&quot;&amp;IF([.H30]&lt;&gt;&quot;&quot;;&quot;&quot;&quot;&quot;&amp;[.H30]&amp;&quot;&quot;&quot;&quot;&amp;REPT(&quot; &quot;;19-LEN([.H30]));&quot;null&quot;&amp;REPT(&quot; &quot;;19-4+2))&#10;&amp;&quot;,&quot;&quot;&quot;&amp;[.I$1]&amp;&quot;&quot;&quot;:&quot;&amp;IF([.I30]&lt;&gt;&quot;&quot;;&quot;&quot;&quot;&quot;&amp;[.I30]&amp;&quot;&quot;&quot;&quot;&amp;REPT(&quot; &quot;;8-LEN([.I30]));&quot;null&quot;&amp;REPT(&quot; &quot;;8-4+2))&#10;&amp;&quot;,&quot;&quot;&quot;&amp;[.J$1]&amp;&quot;&quot;&quot;:&quot;&amp;IF([.J30]&lt;&gt;&quot;&quot;;[.J30]&amp;REPT(&quot; &quot;;4-LEN([.J30]));&quot;null&quot;)&#10;&amp;&quot;,&quot;&quot;&quot;&amp;[.K$1]&amp;&quot;&quot;&quot;:&quot;&amp;IF([.K30]&lt;&gt;&quot;&quot;;[.K30]&amp;REPT(&quot; &quot;;4-LEN([.K30]));&quot;null&quot;)&#10;&amp;&quot;,&quot;&quot;&quot;&amp;[.L$1]&amp;&quot;&quot;&quot;:&quot;&amp;IF([.L30]&lt;&gt;&quot;&quot;;[.L30]&amp;REPT(&quot; &quot;;5-LEN([.L30]));&quot;null &quot;)&#10;&amp;&quot;,&quot;&quot;&quot;&amp;[.M$1]&amp;&quot;&quot;&quot;:&quot;&amp;IF([.M30]&lt;&gt;&quot;&quot;;&quot;&quot;&quot;&quot;&amp;[.M30]&amp;&quot;&quot;&quot;&quot;&amp;REPT(&quot; &quot;;20-LEN([.M30]));&quot;null&quot;&amp;REPT(&quot; &quot;;20-4+2))&#10;&amp;&quot;,&quot;&quot;&quot;&amp;[.N$1]&amp;&quot;&quot;&quot;:&quot;&amp;IF([.N30]&lt;&gt;&quot;&quot;;&quot;&quot;&quot;&quot;&amp;[.N30]&amp;&quot;&quot;&quot;&quot;&amp;REPT(&quot; &quot;;30-LEN([.N30]));&quot;null&quot;&amp;REPT(&quot; &quot;;30-4+2))&#10;&amp;&quot;,&quot;&quot;&quot;&amp;[.O$1]&amp;&quot;&quot;&quot;:&quot;&amp;[.O30]&#10;&amp;&quot;,&quot;&quot;&quot;&amp;[.P$1]&amp;&quot;&quot;&quot;:&quot;&amp;[.P30]&#10;&amp;&quot;}}&quot;" office:value-type="string" office:string-value=",&quot;attrs&quot;:{&quot;LogicalId&quot;:&quot;Lock_C_Off&quot;          ,&quot;Name&quot;:&quot;Désactiver Verrouillage&quot;            ,&quot;Order&quot;:38 ,&quot;Type&quot;:&quot;action&quot;,&quot;SubType&quot;:&quot;other&quot;  ,&quot;Unite&quot;:null   ,&quot;Config_infoName&quot;:&quot;Lock_C_State&quot;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Lock_C_Off" <text:s text:c="9"/>,"Name":"Désactiver Verrouillage" <text:s text:c="11"/>,"Order":38 ,"Type":"action","SubType":"other" <text:s/>,"Unite":null <text:s text:c="2"/>,"Config_infoName":"Lock_C_State" <text:s text:c="6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WindowSwitch</text:p>
          </table:table-cell>
          <table:table-cell office:value-type="string" calcext:value-type="string">
            <text:p>Etat Activation fenêtre ouverte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binary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N31])" office:value-type="float" office:value="0" calcext:value-type="float">
            <text:p>0</text:p>
          </table:table-cell>
          <table:table-cell/>
          <table:table-cell table:style-name="ce17" table:formula="of:=&quot;&quot;&amp;IF([.T30]=&quot;&quot;;&quot; &quot;;IF([.A31]&lt;&gt;&quot;&quot;;&quot;,&quot;;&quot;}&quot;)) &amp;IF([.A31]&lt;&gt;&quot;&quot;;&quot;&quot;&quot;&quot;&amp;[.A31]&amp;&quot;&quot;&quot;&quot;&amp;REPT(&quot; &quot;;20-LEN([.A31]));&quot;&quot;)" office:value-type="string" office:string-value=",&quot;WindowSwitch&quot;        " calcext:value-type="string">
            <text:p>,"WindowSwitch" <text:s text:c="7"/></text:p>
          </table:table-cell>
          <table:table-cell table:style-name="ce17" table:formula="of:=&quot;:&quot; &amp;&quot;{&quot;&quot;&quot;&amp;[.B$1]&amp;&quot;&quot;&quot;:&quot;&quot;&quot;&amp;[.B31]&amp;&quot;&quot;&quot;&quot;&amp;REPT(&quot; &quot;;20-LEN([.B31])) &amp;&quot;,&quot;&quot;&quot;&amp;[.C$1]&amp;&quot;&quot;&quot;:&quot;&quot;&quot;&amp;[.C31]&amp;&quot;&quot;&quot;&quot;&amp;REPT(&quot; &quot;;35-LEN([.C31])) &amp;&quot;,&quot;&quot;&quot;&amp;[.D$1]&amp;&quot;&quot;&quot;:&quot;&amp;[.D31]&amp;REPT(&quot; &quot;;3-LEN([.D31])) &amp;&quot;,&quot;&quot;&quot;&amp;[.E$1]&amp;&quot;&quot;&quot;:&quot;&quot;&quot;&amp;[.E31]&amp;&quot;&quot;&quot;&quot;&amp;REPT(&quot; &quot;;6-LEN([.E31])) &amp;&quot;,&quot;&quot;&quot;&amp;[.F$1]&amp;&quot;&quot;&quot;:&quot;&quot;&quot;&amp;[.F31]&amp;&quot;&quot;&quot;&quot;&amp;REPT(&quot; &quot;;7-LEN([.F31])) &amp;&quot;,&quot;&quot;&quot;&amp;[.G$1]&amp;&quot;&quot;&quot;:&quot;&amp;IF([.G31]&lt;&gt;&quot;&quot;;&quot;&quot;&quot;&quot;&amp;[.G31]&amp;&quot;&quot;&quot;&quot;&amp;REPT(&quot; &quot;;5-LEN([.G31]));&quot;null&quot;&amp;REPT(&quot; &quot;;5-4+2)) &amp;&quot;,&quot;&quot;&quot;&amp;[.H$1]&amp;&quot;&quot;&quot;:&quot;&amp;IF([.H31]&lt;&gt;&quot;&quot;;&quot;&quot;&quot;&quot;&amp;[.H31]&amp;&quot;&quot;&quot;&quot;&amp;REPT(&quot; &quot;;19-LEN([.H31]));&quot;null&quot;&amp;REPT(&quot; &quot;;19-4+2)) &amp;&quot;,&quot;&quot;&quot;&amp;[.I$1]&amp;&quot;&quot;&quot;:&quot;&amp;IF([.I31]&lt;&gt;&quot;&quot;;&quot;&quot;&quot;&quot;&amp;[.I31]&amp;&quot;&quot;&quot;&quot;&amp;REPT(&quot; &quot;;8-LEN([.I31]));&quot;null&quot;&amp;REPT(&quot; &quot;;8-4+2)) &amp;&quot;,&quot;&quot;&quot;&amp;[.J$1]&amp;&quot;&quot;&quot;:&quot;&amp;IF([.J31]&lt;&gt;&quot;&quot;;[.J31]&amp;REPT(&quot; &quot;;4-LEN([.J31]));&quot;null&quot;) &amp;&quot;,&quot;&quot;&quot;&amp;[.K$1]&amp;&quot;&quot;&quot;:&quot;&amp;IF([.K31]&lt;&gt;&quot;&quot;;[.K31]&amp;REPT(&quot; &quot;;4-LEN([.K31]));&quot;null&quot;) &amp;&quot;,&quot;&quot;&quot;&amp;[.L$1]&amp;&quot;&quot;&quot;:&quot;&amp;IF([.L31]&lt;&gt;&quot;&quot;;[.L31]&amp;REPT(&quot; &quot;;5-LEN([.L31]));&quot;null &quot;) &amp;&quot;,&quot;&quot;&quot;&amp;[.M$1]&amp;&quot;&quot;&quot;:&quot;&amp;IF([.M31]&lt;&gt;&quot;&quot;;&quot;&quot;&quot;&quot;&amp;[.M31]&amp;&quot;&quot;&quot;&quot;&amp;REPT(&quot; &quot;;20-LEN([.M31]));&quot;null&quot;&amp;REPT(&quot; &quot;;20-4+2)) &amp;&quot;,&quot;&quot;&quot;&amp;[.N$1]&amp;&quot;&quot;&quot;:&quot;&amp;IF([.N31]&lt;&gt;&quot;&quot;;&quot;&quot;&amp;[.N31]&amp;&quot;&quot;&amp;REPT(&quot; &quot;;5-LEN([.N31]));&quot;null&quot;&amp;REPT(&quot; &quot;;5-4+2)) &amp;&quot;,&quot;&quot;&quot;&amp;[.O$1]&amp;&quot;&quot;&quot;:&quot;&amp;[.O31] &amp;&quot;,&quot;&quot;&quot;&amp;[.P$1]&amp;&quot;&quot;&quot;:&quot;&amp;[.P31] &amp;&quot;}&quot;" office:value-type="string" office:string-value=":{&quot;LogicalId&quot;:&quot;WindowSwitch&quot;        ,&quot;Name&quot;:&quot;Etat Activation fenêtre ouverte&quot;    ,&quot;Order&quot;:39 ,&quot;Type&quot;:&quot;info&quot;  ,&quot;SubType&quot;:&quot;binary&quot; ,&quot;Unite&quot;:null   ,&quot;Config_infoName&quot;:null                 ,&quot;Config_value&quot;:null      ,&quot;Config_minValue&quot;:null,&quot;Config_maxValue&quot;:null,&quot;Config_tempHL&quot;:null ,&quot;setValue&quot;:null                  ,&quot;Display_param_step&quot;:null   ,&quot;IsHistorized&quot;:0,&quot;IsVisible&quot;:1}" calcext:value-type="string">
            <text:p>:{"LogicalId":"WindowSwitch" <text:s text:c="7"/>,"Name":"Etat Activation fenêtre ouverte" <text:s text:c="3"/>,"Order":39 ,"Type":"info" <text:s/>,"SubType":"binary" ,"Unite":null <text:s text:c="2"/>,"Config_infoName":null <text:s text:c="16"/>,"Config_value":null <text:s text:c="5"/>,"Config_minValue":null,"Config_maxValue":null,"Config_tempHL":null ,"setValue":null <text:s text:c="17"/>,"Display_param_step":null <text:s text:c="2"/>,"IsHistorized":0,"IsVisible":1}</text:p>
          </table:table-cell>
          <table:table-cell table:style-name="ce15" office:value-type="string" calcext:value-type="string">
            <text:p>.</text:p>
          </table:table-cell>
          <table:table-cell table:style-name="ce14"/>
          <table:table-cell table:style-name="ce17" table:formula="of:=IF([.W30]=&quot;&quot;;&quot; &quot;;IF([.B31]&lt;&gt;&quot;&quot;;&quot;,&quot;;&quot;]&quot;))&#10;&amp;IF([.B31]&lt;&gt;&quot;&quot;;&quot;{&quot;&quot;cmd&quot;&quot;:&quot;&quot;&quot;&amp;[.B31]&amp;&quot;&quot;&quot;&quot;&amp;REPT(&quot; &quot;;20-LEN([.B31]));&quot;&quot;)" office:value-type="string" office:string-value=",{&quot;cmd&quot;:&quot;WindowSwitch&quot;        " calcext:value-type="string">
            <text:p>,{"cmd":"WindowSwitch" <text:s text:c="7"/></text:p>
          </table:table-cell>
          <table:table-cell table:style-name="ce17" table:formula="of:=&quot;,&quot;&quot;attrs&quot;&quot;:&quot;&#10;&amp;&quot;{&quot;&quot;&quot;&amp;[.B$1]&amp;&quot;&quot;&quot;:&quot;&quot;&quot;&amp;[.B31]&amp;&quot;&quot;&quot;&quot;&amp;REPT(&quot; &quot;;20-LEN([.B31]))&#10;&amp;&quot;,&quot;&quot;&quot;&amp;[.C$1]&amp;&quot;&quot;&quot;:&quot;&quot;&quot;&amp;[.C31]&amp;&quot;&quot;&quot;&quot;&amp;REPT(&quot; &quot;;35-LEN([.C31]))&#10;&amp;&quot;,&quot;&quot;&quot;&amp;[.D$1]&amp;&quot;&quot;&quot;:&quot;&amp;[.D31]&amp;REPT(&quot; &quot;;3-LEN([.D31]))&#10;&amp;&quot;,&quot;&quot;&quot;&amp;[.E$1]&amp;&quot;&quot;&quot;:&quot;&quot;&quot;&amp;[.E31]&amp;&quot;&quot;&quot;&quot;&amp;REPT(&quot; &quot;;6-LEN([.E31]))&#10;&amp;&quot;,&quot;&quot;&quot;&amp;[.F$1]&amp;&quot;&quot;&quot;:&quot;&quot;&quot;&amp;[.F31]&amp;&quot;&quot;&quot;&quot;&amp;REPT(&quot; &quot;;7-LEN([.F31]))&#10;&amp;&quot;,&quot;&quot;&quot;&amp;[.G$1]&amp;&quot;&quot;&quot;:&quot;&amp;IF([.G31]&lt;&gt;&quot;&quot;;&quot;&quot;&quot;&quot;&amp;[.G31]&amp;&quot;&quot;&quot;&quot;&amp;REPT(&quot; &quot;;5-LEN([.G31]));&quot;null&quot;&amp;REPT(&quot; &quot;;5-4+2))&#10;&amp;&quot;,&quot;&quot;&quot;&amp;[.H$1]&amp;&quot;&quot;&quot;:&quot;&amp;IF([.H31]&lt;&gt;&quot;&quot;;&quot;&quot;&quot;&quot;&amp;[.H31]&amp;&quot;&quot;&quot;&quot;&amp;REPT(&quot; &quot;;19-LEN([.H31]));&quot;null&quot;&amp;REPT(&quot; &quot;;19-4+2))&#10;&amp;&quot;,&quot;&quot;&quot;&amp;[.I$1]&amp;&quot;&quot;&quot;:&quot;&amp;IF([.I31]&lt;&gt;&quot;&quot;;&quot;&quot;&quot;&quot;&amp;[.I31]&amp;&quot;&quot;&quot;&quot;&amp;REPT(&quot; &quot;;8-LEN([.I31]));&quot;null&quot;&amp;REPT(&quot; &quot;;8-4+2))&#10;&amp;&quot;,&quot;&quot;&quot;&amp;[.J$1]&amp;&quot;&quot;&quot;:&quot;&amp;IF([.J31]&lt;&gt;&quot;&quot;;[.J31]&amp;REPT(&quot; &quot;;4-LEN([.J31]));&quot;null&quot;)&#10;&amp;&quot;,&quot;&quot;&quot;&amp;[.K$1]&amp;&quot;&quot;&quot;:&quot;&amp;IF([.K31]&lt;&gt;&quot;&quot;;[.K31]&amp;REPT(&quot; &quot;;4-LEN([.K31]));&quot;null&quot;)&#10;&amp;&quot;,&quot;&quot;&quot;&amp;[.L$1]&amp;&quot;&quot;&quot;:&quot;&amp;IF([.L31]&lt;&gt;&quot;&quot;;[.L31]&amp;REPT(&quot; &quot;;5-LEN([.L31]));&quot;null &quot;)&#10;&amp;&quot;,&quot;&quot;&quot;&amp;[.M$1]&amp;&quot;&quot;&quot;:&quot;&amp;IF([.M31]&lt;&gt;&quot;&quot;;&quot;&quot;&quot;&quot;&amp;[.M31]&amp;&quot;&quot;&quot;&quot;&amp;REPT(&quot; &quot;;20-LEN([.M31]));&quot;null&quot;&amp;REPT(&quot; &quot;;20-4+2))&#10;&amp;&quot;,&quot;&quot;&quot;&amp;[.N$1]&amp;&quot;&quot;&quot;:&quot;&amp;IF([.N31]&lt;&gt;&quot;&quot;;&quot;&quot;&quot;&quot;&amp;[.N31]&amp;&quot;&quot;&quot;&quot;&amp;REPT(&quot; &quot;;30-LEN([.N31]));&quot;null&quot;&amp;REPT(&quot; &quot;;30-4+2))&#10;&amp;&quot;,&quot;&quot;&quot;&amp;[.O$1]&amp;&quot;&quot;&quot;:&quot;&amp;[.O31]&#10;&amp;&quot;,&quot;&quot;&quot;&amp;[.P$1]&amp;&quot;&quot;&quot;:&quot;&amp;[.P31]&#10;&amp;&quot;}}&quot;" office:value-type="string" office:string-value=",&quot;attrs&quot;:{&quot;LogicalId&quot;:&quot;WindowSwitch&quot;        ,&quot;Name&quot;:&quot;Etat Activation fenêtre ouverte&quot;    ,&quot;Order&quot;:39 ,&quot;Type&quot;:&quot;info&quot;  ,&quot;SubType&quot;:&quot;binary&quot; ,&quot;Unite&quot;:null   ,&quot;Config_infoName&quot;:null      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WindowSwitch" <text:s text:c="7"/>,"Name":"Etat Activation fenêtre ouverte" <text:s text:c="3"/>,"Order":39 ,"Type":"info" <text:s/>,"SubType":"binary" ,"Unite":null <text:s text:c="2"/>,"Config_infoName":null <text:s text:c="16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WindowSwitchOn</text:p>
          </table:table-cell>
          <table:table-cell office:value-type="string" calcext:value-type="string">
            <text:p>Activer Fenetre Ouvert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ther</text:p>
          </table:table-cell>
          <table:table-cell/>
          <table:table-cell office:value-type="string" calcext:value-type="string">
            <text:p>WindowSwitch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N32])" office:value-type="float" office:value="0" calcext:value-type="float">
            <text:p>0</text:p>
          </table:table-cell>
          <table:table-cell/>
          <table:table-cell table:style-name="ce17" table:formula="of:=&quot;&quot;&amp;IF([.T31]=&quot;&quot;;&quot; &quot;;IF([.A32]&lt;&gt;&quot;&quot;;&quot;,&quot;;&quot;}&quot;)) &amp;IF([.A32]&lt;&gt;&quot;&quot;;&quot;&quot;&quot;&quot;&amp;[.A32]&amp;&quot;&quot;&quot;&quot;&amp;REPT(&quot; &quot;;20-LEN([.A32]));&quot;&quot;)" office:value-type="string" office:string-value=",&quot;WindowSwitchOn&quot;      " calcext:value-type="string">
            <text:p>,"WindowSwitchOn" <text:s text:c="5"/></text:p>
          </table:table-cell>
          <table:table-cell table:style-name="ce17" table:formula="of:=&quot;:&quot; &amp;&quot;{&quot;&quot;&quot;&amp;[.B$1]&amp;&quot;&quot;&quot;:&quot;&quot;&quot;&amp;[.B32]&amp;&quot;&quot;&quot;&quot;&amp;REPT(&quot; &quot;;20-LEN([.B32])) &amp;&quot;,&quot;&quot;&quot;&amp;[.C$1]&amp;&quot;&quot;&quot;:&quot;&quot;&quot;&amp;[.C32]&amp;&quot;&quot;&quot;&quot;&amp;REPT(&quot; &quot;;35-LEN([.C32])) &amp;&quot;,&quot;&quot;&quot;&amp;[.D$1]&amp;&quot;&quot;&quot;:&quot;&amp;[.D32]&amp;REPT(&quot; &quot;;3-LEN([.D32])) &amp;&quot;,&quot;&quot;&quot;&amp;[.E$1]&amp;&quot;&quot;&quot;:&quot;&quot;&quot;&amp;[.E32]&amp;&quot;&quot;&quot;&quot;&amp;REPT(&quot; &quot;;6-LEN([.E32])) &amp;&quot;,&quot;&quot;&quot;&amp;[.F$1]&amp;&quot;&quot;&quot;:&quot;&quot;&quot;&amp;[.F32]&amp;&quot;&quot;&quot;&quot;&amp;REPT(&quot; &quot;;7-LEN([.F32])) &amp;&quot;,&quot;&quot;&quot;&amp;[.G$1]&amp;&quot;&quot;&quot;:&quot;&amp;IF([.G32]&lt;&gt;&quot;&quot;;&quot;&quot;&quot;&quot;&amp;[.G32]&amp;&quot;&quot;&quot;&quot;&amp;REPT(&quot; &quot;;5-LEN([.G32]));&quot;null&quot;&amp;REPT(&quot; &quot;;5-4+2)) &amp;&quot;,&quot;&quot;&quot;&amp;[.H$1]&amp;&quot;&quot;&quot;:&quot;&amp;IF([.H32]&lt;&gt;&quot;&quot;;&quot;&quot;&quot;&quot;&amp;[.H32]&amp;&quot;&quot;&quot;&quot;&amp;REPT(&quot; &quot;;19-LEN([.H32]));&quot;null&quot;&amp;REPT(&quot; &quot;;19-4+2)) &amp;&quot;,&quot;&quot;&quot;&amp;[.I$1]&amp;&quot;&quot;&quot;:&quot;&amp;IF([.I32]&lt;&gt;&quot;&quot;;&quot;&quot;&quot;&quot;&amp;[.I32]&amp;&quot;&quot;&quot;&quot;&amp;REPT(&quot; &quot;;8-LEN([.I32]));&quot;null&quot;&amp;REPT(&quot; &quot;;8-4+2)) &amp;&quot;,&quot;&quot;&quot;&amp;[.J$1]&amp;&quot;&quot;&quot;:&quot;&amp;IF([.J32]&lt;&gt;&quot;&quot;;[.J32]&amp;REPT(&quot; &quot;;4-LEN([.J32]));&quot;null&quot;) &amp;&quot;,&quot;&quot;&quot;&amp;[.K$1]&amp;&quot;&quot;&quot;:&quot;&amp;IF([.K32]&lt;&gt;&quot;&quot;;[.K32]&amp;REPT(&quot; &quot;;4-LEN([.K32]));&quot;null&quot;) &amp;&quot;,&quot;&quot;&quot;&amp;[.L$1]&amp;&quot;&quot;&quot;:&quot;&amp;IF([.L32]&lt;&gt;&quot;&quot;;[.L32]&amp;REPT(&quot; &quot;;5-LEN([.L32]));&quot;null &quot;) &amp;&quot;,&quot;&quot;&quot;&amp;[.M$1]&amp;&quot;&quot;&quot;:&quot;&amp;IF([.M32]&lt;&gt;&quot;&quot;;&quot;&quot;&quot;&quot;&amp;[.M32]&amp;&quot;&quot;&quot;&quot;&amp;REPT(&quot; &quot;;20-LEN([.M32]));&quot;null&quot;&amp;REPT(&quot; &quot;;20-4+2)) &amp;&quot;,&quot;&quot;&quot;&amp;[.N$1]&amp;&quot;&quot;&quot;:&quot;&amp;IF([.N32]&lt;&gt;&quot;&quot;;&quot;&quot;&amp;[.N32]&amp;&quot;&quot;&amp;REPT(&quot; &quot;;5-LEN([.N32]));&quot;null&quot;&amp;REPT(&quot; &quot;;5-4+2)) &amp;&quot;,&quot;&quot;&quot;&amp;[.O$1]&amp;&quot;&quot;&quot;:&quot;&amp;[.O32] &amp;&quot;,&quot;&quot;&quot;&amp;[.P$1]&amp;&quot;&quot;&quot;:&quot;&amp;[.P32] &amp;&quot;}&quot;" office:value-type="string" office:string-value=":{&quot;LogicalId&quot;:&quot;WindowSwitchOn&quot;      ,&quot;Name&quot;:&quot;Activer Fenetre Ouverte&quot;            ,&quot;Order&quot;:40 ,&quot;Type&quot;:&quot;action&quot;,&quot;SubType&quot;:&quot;other&quot;  ,&quot;Unite&quot;:null   ,&quot;Config_infoName&quot;:&quot;WindowSwitch&quot;       ,&quot;Config_value&quot;:null      ,&quot;Config_minValue&quot;:null,&quot;Config_maxValue&quot;:null,&quot;Config_tempHL&quot;:null ,&quot;setValue&quot;:null                  ,&quot;Display_param_step&quot;:null   ,&quot;IsHistorized&quot;:0,&quot;IsVisible&quot;:1}" calcext:value-type="string">
            <text:p>:{"LogicalId":"WindowSwitchOn" <text:s text:c="5"/>,"Name":"Activer Fenetre Ouverte" <text:s text:c="11"/>,"Order":40 ,"Type":"action","SubType":"other" <text:s/>,"Unite":null <text:s text:c="2"/>,"Config_infoName":"WindowSwitch" <text:s text:c="6"/>,"Config_value":null <text:s text:c="5"/>,"Config_minValue":null,"Config_maxValue":null,"Config_tempHL":null ,"setValue":null <text:s text:c="17"/>,"Display_param_step":null <text:s text:c="2"/>,"IsHistorized":0,"IsVisible":1}</text:p>
          </table:table-cell>
          <table:table-cell table:style-name="ce15" office:value-type="string" calcext:value-type="string">
            <text:p>.</text:p>
          </table:table-cell>
          <table:table-cell table:style-name="ce14"/>
          <table:table-cell table:style-name="ce17" table:formula="of:=IF([.W31]=&quot;&quot;;&quot; &quot;;IF([.B32]&lt;&gt;&quot;&quot;;&quot;,&quot;;&quot;]&quot;))&#10;&amp;IF([.B32]&lt;&gt;&quot;&quot;;&quot;{&quot;&quot;cmd&quot;&quot;:&quot;&quot;&quot;&amp;[.B32]&amp;&quot;&quot;&quot;&quot;&amp;REPT(&quot; &quot;;20-LEN([.B32]));&quot;&quot;)" office:value-type="string" office:string-value=",{&quot;cmd&quot;:&quot;WindowSwitchOn&quot;      " calcext:value-type="string">
            <text:p>,{"cmd":"WindowSwitchOn" <text:s text:c="5"/></text:p>
          </table:table-cell>
          <table:table-cell table:style-name="ce17" table:formula="of:=&quot;,&quot;&quot;attrs&quot;&quot;:&quot;&#10;&amp;&quot;{&quot;&quot;&quot;&amp;[.B$1]&amp;&quot;&quot;&quot;:&quot;&quot;&quot;&amp;[.B32]&amp;&quot;&quot;&quot;&quot;&amp;REPT(&quot; &quot;;20-LEN([.B32]))&#10;&amp;&quot;,&quot;&quot;&quot;&amp;[.C$1]&amp;&quot;&quot;&quot;:&quot;&quot;&quot;&amp;[.C32]&amp;&quot;&quot;&quot;&quot;&amp;REPT(&quot; &quot;;35-LEN([.C32]))&#10;&amp;&quot;,&quot;&quot;&quot;&amp;[.D$1]&amp;&quot;&quot;&quot;:&quot;&amp;[.D32]&amp;REPT(&quot; &quot;;3-LEN([.D32]))&#10;&amp;&quot;,&quot;&quot;&quot;&amp;[.E$1]&amp;&quot;&quot;&quot;:&quot;&quot;&quot;&amp;[.E32]&amp;&quot;&quot;&quot;&quot;&amp;REPT(&quot; &quot;;6-LEN([.E32]))&#10;&amp;&quot;,&quot;&quot;&quot;&amp;[.F$1]&amp;&quot;&quot;&quot;:&quot;&quot;&quot;&amp;[.F32]&amp;&quot;&quot;&quot;&quot;&amp;REPT(&quot; &quot;;7-LEN([.F32]))&#10;&amp;&quot;,&quot;&quot;&quot;&amp;[.G$1]&amp;&quot;&quot;&quot;:&quot;&amp;IF([.G32]&lt;&gt;&quot;&quot;;&quot;&quot;&quot;&quot;&amp;[.G32]&amp;&quot;&quot;&quot;&quot;&amp;REPT(&quot; &quot;;5-LEN([.G32]));&quot;null&quot;&amp;REPT(&quot; &quot;;5-4+2))&#10;&amp;&quot;,&quot;&quot;&quot;&amp;[.H$1]&amp;&quot;&quot;&quot;:&quot;&amp;IF([.H32]&lt;&gt;&quot;&quot;;&quot;&quot;&quot;&quot;&amp;[.H32]&amp;&quot;&quot;&quot;&quot;&amp;REPT(&quot; &quot;;19-LEN([.H32]));&quot;null&quot;&amp;REPT(&quot; &quot;;19-4+2))&#10;&amp;&quot;,&quot;&quot;&quot;&amp;[.I$1]&amp;&quot;&quot;&quot;:&quot;&amp;IF([.I32]&lt;&gt;&quot;&quot;;&quot;&quot;&quot;&quot;&amp;[.I32]&amp;&quot;&quot;&quot;&quot;&amp;REPT(&quot; &quot;;8-LEN([.I32]));&quot;null&quot;&amp;REPT(&quot; &quot;;8-4+2))&#10;&amp;&quot;,&quot;&quot;&quot;&amp;[.J$1]&amp;&quot;&quot;&quot;:&quot;&amp;IF([.J32]&lt;&gt;&quot;&quot;;[.J32]&amp;REPT(&quot; &quot;;4-LEN([.J32]));&quot;null&quot;)&#10;&amp;&quot;,&quot;&quot;&quot;&amp;[.K$1]&amp;&quot;&quot;&quot;:&quot;&amp;IF([.K32]&lt;&gt;&quot;&quot;;[.K32]&amp;REPT(&quot; &quot;;4-LEN([.K32]));&quot;null&quot;)&#10;&amp;&quot;,&quot;&quot;&quot;&amp;[.L$1]&amp;&quot;&quot;&quot;:&quot;&amp;IF([.L32]&lt;&gt;&quot;&quot;;[.L32]&amp;REPT(&quot; &quot;;5-LEN([.L32]));&quot;null &quot;)&#10;&amp;&quot;,&quot;&quot;&quot;&amp;[.M$1]&amp;&quot;&quot;&quot;:&quot;&amp;IF([.M32]&lt;&gt;&quot;&quot;;&quot;&quot;&quot;&quot;&amp;[.M32]&amp;&quot;&quot;&quot;&quot;&amp;REPT(&quot; &quot;;20-LEN([.M32]));&quot;null&quot;&amp;REPT(&quot; &quot;;20-4+2))&#10;&amp;&quot;,&quot;&quot;&quot;&amp;[.N$1]&amp;&quot;&quot;&quot;:&quot;&amp;IF([.N32]&lt;&gt;&quot;&quot;;&quot;&quot;&quot;&quot;&amp;[.N32]&amp;&quot;&quot;&quot;&quot;&amp;REPT(&quot; &quot;;30-LEN([.N32]));&quot;null&quot;&amp;REPT(&quot; &quot;;30-4+2))&#10;&amp;&quot;,&quot;&quot;&quot;&amp;[.O$1]&amp;&quot;&quot;&quot;:&quot;&amp;[.O32]&#10;&amp;&quot;,&quot;&quot;&quot;&amp;[.P$1]&amp;&quot;&quot;&quot;:&quot;&amp;[.P32]&#10;&amp;&quot;}}&quot;" office:value-type="string" office:string-value=",&quot;attrs&quot;:{&quot;LogicalId&quot;:&quot;WindowSwitchOn&quot;      ,&quot;Name&quot;:&quot;Activer Fenetre Ouverte&quot;            ,&quot;Order&quot;:40 ,&quot;Type&quot;:&quot;action&quot;,&quot;SubType&quot;:&quot;other&quot;  ,&quot;Unite&quot;:null   ,&quot;Config_infoName&quot;:&quot;WindowSwitch&quot;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WindowSwitchOn" <text:s text:c="5"/>,"Name":"Activer Fenetre Ouverte" <text:s text:c="11"/>,"Order":40 ,"Type":"action","SubType":"other" <text:s/>,"Unite":null <text:s text:c="2"/>,"Config_infoName":"WindowSwitch" <text:s text:c="6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WindowSwitchOff</text:p>
          </table:table-cell>
          <table:table-cell office:value-type="string" calcext:value-type="string">
            <text:p>Désactiver Fenetre Ouverte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ther</text:p>
          </table:table-cell>
          <table:table-cell/>
          <table:table-cell office:value-type="string" calcext:value-type="string">
            <text:p>WindowSwitch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N33])" office:value-type="float" office:value="0" calcext:value-type="float">
            <text:p>0</text:p>
          </table:table-cell>
          <table:table-cell/>
          <table:table-cell table:style-name="ce17" table:formula="of:=&quot;&quot;&amp;IF([.T32]=&quot;&quot;;&quot; &quot;;IF([.A33]&lt;&gt;&quot;&quot;;&quot;,&quot;;&quot;}&quot;)) &amp;IF([.A33]&lt;&gt;&quot;&quot;;&quot;&quot;&quot;&quot;&amp;[.A33]&amp;&quot;&quot;&quot;&quot;&amp;REPT(&quot; &quot;;20-LEN([.A33]));&quot;&quot;)" office:value-type="string" office:string-value=",&quot;WindowSwitchOff&quot;     " calcext:value-type="string">
            <text:p>,"WindowSwitchOff" <text:s text:c="4"/></text:p>
          </table:table-cell>
          <table:table-cell table:style-name="ce17" table:formula="of:=&quot;:&quot; &amp;&quot;{&quot;&quot;&quot;&amp;[.B$1]&amp;&quot;&quot;&quot;:&quot;&quot;&quot;&amp;[.B33]&amp;&quot;&quot;&quot;&quot;&amp;REPT(&quot; &quot;;20-LEN([.B33])) &amp;&quot;,&quot;&quot;&quot;&amp;[.C$1]&amp;&quot;&quot;&quot;:&quot;&quot;&quot;&amp;[.C33]&amp;&quot;&quot;&quot;&quot;&amp;REPT(&quot; &quot;;35-LEN([.C33])) &amp;&quot;,&quot;&quot;&quot;&amp;[.D$1]&amp;&quot;&quot;&quot;:&quot;&amp;[.D33]&amp;REPT(&quot; &quot;;3-LEN([.D33])) &amp;&quot;,&quot;&quot;&quot;&amp;[.E$1]&amp;&quot;&quot;&quot;:&quot;&quot;&quot;&amp;[.E33]&amp;&quot;&quot;&quot;&quot;&amp;REPT(&quot; &quot;;6-LEN([.E33])) &amp;&quot;,&quot;&quot;&quot;&amp;[.F$1]&amp;&quot;&quot;&quot;:&quot;&quot;&quot;&amp;[.F33]&amp;&quot;&quot;&quot;&quot;&amp;REPT(&quot; &quot;;7-LEN([.F33])) &amp;&quot;,&quot;&quot;&quot;&amp;[.G$1]&amp;&quot;&quot;&quot;:&quot;&amp;IF([.G33]&lt;&gt;&quot;&quot;;&quot;&quot;&quot;&quot;&amp;[.G33]&amp;&quot;&quot;&quot;&quot;&amp;REPT(&quot; &quot;;5-LEN([.G33]));&quot;null&quot;&amp;REPT(&quot; &quot;;5-4+2)) &amp;&quot;,&quot;&quot;&quot;&amp;[.H$1]&amp;&quot;&quot;&quot;:&quot;&amp;IF([.H33]&lt;&gt;&quot;&quot;;&quot;&quot;&quot;&quot;&amp;[.H33]&amp;&quot;&quot;&quot;&quot;&amp;REPT(&quot; &quot;;19-LEN([.H33]));&quot;null&quot;&amp;REPT(&quot; &quot;;19-4+2)) &amp;&quot;,&quot;&quot;&quot;&amp;[.I$1]&amp;&quot;&quot;&quot;:&quot;&amp;IF([.I33]&lt;&gt;&quot;&quot;;&quot;&quot;&quot;&quot;&amp;[.I33]&amp;&quot;&quot;&quot;&quot;&amp;REPT(&quot; &quot;;8-LEN([.I33]));&quot;null&quot;&amp;REPT(&quot; &quot;;8-4+2)) &amp;&quot;,&quot;&quot;&quot;&amp;[.J$1]&amp;&quot;&quot;&quot;:&quot;&amp;IF([.J33]&lt;&gt;&quot;&quot;;[.J33]&amp;REPT(&quot; &quot;;4-LEN([.J33]));&quot;null&quot;) &amp;&quot;,&quot;&quot;&quot;&amp;[.K$1]&amp;&quot;&quot;&quot;:&quot;&amp;IF([.K33]&lt;&gt;&quot;&quot;;[.K33]&amp;REPT(&quot; &quot;;4-LEN([.K33]));&quot;null&quot;) &amp;&quot;,&quot;&quot;&quot;&amp;[.L$1]&amp;&quot;&quot;&quot;:&quot;&amp;IF([.L33]&lt;&gt;&quot;&quot;;[.L33]&amp;REPT(&quot; &quot;;5-LEN([.L33]));&quot;null &quot;) &amp;&quot;,&quot;&quot;&quot;&amp;[.M$1]&amp;&quot;&quot;&quot;:&quot;&amp;IF([.M33]&lt;&gt;&quot;&quot;;&quot;&quot;&quot;&quot;&amp;[.M33]&amp;&quot;&quot;&quot;&quot;&amp;REPT(&quot; &quot;;20-LEN([.M33]));&quot;null&quot;&amp;REPT(&quot; &quot;;20-4+2)) &amp;&quot;,&quot;&quot;&quot;&amp;[.N$1]&amp;&quot;&quot;&quot;:&quot;&amp;IF([.N33]&lt;&gt;&quot;&quot;;&quot;&quot;&amp;[.N33]&amp;&quot;&quot;&amp;REPT(&quot; &quot;;5-LEN([.N33]));&quot;null&quot;&amp;REPT(&quot; &quot;;5-4+2)) &amp;&quot;,&quot;&quot;&quot;&amp;[.O$1]&amp;&quot;&quot;&quot;:&quot;&amp;[.O33] &amp;&quot;,&quot;&quot;&quot;&amp;[.P$1]&amp;&quot;&quot;&quot;:&quot;&amp;[.P33] &amp;&quot;}&quot;" office:value-type="string" office:string-value=":{&quot;LogicalId&quot;:&quot;WindowSwitchOff&quot;     ,&quot;Name&quot;:&quot;Désactiver Fenetre Ouverte&quot;         ,&quot;Order&quot;:41 ,&quot;Type&quot;:&quot;action&quot;,&quot;SubType&quot;:&quot;other&quot;  ,&quot;Unite&quot;:null   ,&quot;Config_infoName&quot;:&quot;WindowSwitch&quot;       ,&quot;Config_value&quot;:null      ,&quot;Config_minValue&quot;:null,&quot;Config_maxValue&quot;:null,&quot;Config_tempHL&quot;:null ,&quot;setValue&quot;:null                  ,&quot;Display_param_step&quot;:null   ,&quot;IsHistorized&quot;:0,&quot;IsVisible&quot;:1}" calcext:value-type="string">
            <text:p>:{"LogicalId":"WindowSwitchOff" <text:s text:c="4"/>,"Name":"Désactiver Fenetre Ouverte" <text:s text:c="8"/>,"Order":41 ,"Type":"action","SubType":"other" <text:s/>,"Unite":null <text:s text:c="2"/>,"Config_infoName":"WindowSwitch" <text:s text:c="6"/>,"Config_value":null <text:s text:c="5"/>,"Config_minValue":null,"Config_maxValue":null,"Config_tempHL":null ,"setValue":null <text:s text:c="17"/>,"Display_param_step":null <text:s text:c="2"/>,"IsHistorized":0,"IsVisible":1}</text:p>
          </table:table-cell>
          <table:table-cell table:style-name="ce15" office:value-type="string" calcext:value-type="string">
            <text:p>.</text:p>
          </table:table-cell>
          <table:table-cell table:style-name="ce14"/>
          <table:table-cell table:style-name="ce17" table:formula="of:=IF([.W32]=&quot;&quot;;&quot; &quot;;IF([.B33]&lt;&gt;&quot;&quot;;&quot;,&quot;;&quot;]&quot;))&#10;&amp;IF([.B33]&lt;&gt;&quot;&quot;;&quot;{&quot;&quot;cmd&quot;&quot;:&quot;&quot;&quot;&amp;[.B33]&amp;&quot;&quot;&quot;&quot;&amp;REPT(&quot; &quot;;20-LEN([.B33]));&quot;&quot;)" office:value-type="string" office:string-value=",{&quot;cmd&quot;:&quot;WindowSwitchOff&quot;     " calcext:value-type="string">
            <text:p>,{"cmd":"WindowSwitchOff" <text:s text:c="4"/></text:p>
          </table:table-cell>
          <table:table-cell table:style-name="ce17" table:formula="of:=&quot;,&quot;&quot;attrs&quot;&quot;:&quot;&#10;&amp;&quot;{&quot;&quot;&quot;&amp;[.B$1]&amp;&quot;&quot;&quot;:&quot;&quot;&quot;&amp;[.B33]&amp;&quot;&quot;&quot;&quot;&amp;REPT(&quot; &quot;;20-LEN([.B33]))&#10;&amp;&quot;,&quot;&quot;&quot;&amp;[.C$1]&amp;&quot;&quot;&quot;:&quot;&quot;&quot;&amp;[.C33]&amp;&quot;&quot;&quot;&quot;&amp;REPT(&quot; &quot;;35-LEN([.C33]))&#10;&amp;&quot;,&quot;&quot;&quot;&amp;[.D$1]&amp;&quot;&quot;&quot;:&quot;&amp;[.D33]&amp;REPT(&quot; &quot;;3-LEN([.D33]))&#10;&amp;&quot;,&quot;&quot;&quot;&amp;[.E$1]&amp;&quot;&quot;&quot;:&quot;&quot;&quot;&amp;[.E33]&amp;&quot;&quot;&quot;&quot;&amp;REPT(&quot; &quot;;6-LEN([.E33]))&#10;&amp;&quot;,&quot;&quot;&quot;&amp;[.F$1]&amp;&quot;&quot;&quot;:&quot;&quot;&quot;&amp;[.F33]&amp;&quot;&quot;&quot;&quot;&amp;REPT(&quot; &quot;;7-LEN([.F33]))&#10;&amp;&quot;,&quot;&quot;&quot;&amp;[.G$1]&amp;&quot;&quot;&quot;:&quot;&amp;IF([.G33]&lt;&gt;&quot;&quot;;&quot;&quot;&quot;&quot;&amp;[.G33]&amp;&quot;&quot;&quot;&quot;&amp;REPT(&quot; &quot;;5-LEN([.G33]));&quot;null&quot;&amp;REPT(&quot; &quot;;5-4+2))&#10;&amp;&quot;,&quot;&quot;&quot;&amp;[.H$1]&amp;&quot;&quot;&quot;:&quot;&amp;IF([.H33]&lt;&gt;&quot;&quot;;&quot;&quot;&quot;&quot;&amp;[.H33]&amp;&quot;&quot;&quot;&quot;&amp;REPT(&quot; &quot;;19-LEN([.H33]));&quot;null&quot;&amp;REPT(&quot; &quot;;19-4+2))&#10;&amp;&quot;,&quot;&quot;&quot;&amp;[.I$1]&amp;&quot;&quot;&quot;:&quot;&amp;IF([.I33]&lt;&gt;&quot;&quot;;&quot;&quot;&quot;&quot;&amp;[.I33]&amp;&quot;&quot;&quot;&quot;&amp;REPT(&quot; &quot;;8-LEN([.I33]));&quot;null&quot;&amp;REPT(&quot; &quot;;8-4+2))&#10;&amp;&quot;,&quot;&quot;&quot;&amp;[.J$1]&amp;&quot;&quot;&quot;:&quot;&amp;IF([.J33]&lt;&gt;&quot;&quot;;[.J33]&amp;REPT(&quot; &quot;;4-LEN([.J33]));&quot;null&quot;)&#10;&amp;&quot;,&quot;&quot;&quot;&amp;[.K$1]&amp;&quot;&quot;&quot;:&quot;&amp;IF([.K33]&lt;&gt;&quot;&quot;;[.K33]&amp;REPT(&quot; &quot;;4-LEN([.K33]));&quot;null&quot;)&#10;&amp;&quot;,&quot;&quot;&quot;&amp;[.L$1]&amp;&quot;&quot;&quot;:&quot;&amp;IF([.L33]&lt;&gt;&quot;&quot;;[.L33]&amp;REPT(&quot; &quot;;5-LEN([.L33]));&quot;null &quot;)&#10;&amp;&quot;,&quot;&quot;&quot;&amp;[.M$1]&amp;&quot;&quot;&quot;:&quot;&amp;IF([.M33]&lt;&gt;&quot;&quot;;&quot;&quot;&quot;&quot;&amp;[.M33]&amp;&quot;&quot;&quot;&quot;&amp;REPT(&quot; &quot;;20-LEN([.M33]));&quot;null&quot;&amp;REPT(&quot; &quot;;20-4+2))&#10;&amp;&quot;,&quot;&quot;&quot;&amp;[.N$1]&amp;&quot;&quot;&quot;:&quot;&amp;IF([.N33]&lt;&gt;&quot;&quot;;&quot;&quot;&quot;&quot;&amp;[.N33]&amp;&quot;&quot;&quot;&quot;&amp;REPT(&quot; &quot;;30-LEN([.N33]));&quot;null&quot;&amp;REPT(&quot; &quot;;30-4+2))&#10;&amp;&quot;,&quot;&quot;&quot;&amp;[.O$1]&amp;&quot;&quot;&quot;:&quot;&amp;[.O33]&#10;&amp;&quot;,&quot;&quot;&quot;&amp;[.P$1]&amp;&quot;&quot;&quot;:&quot;&amp;[.P33]&#10;&amp;&quot;}}&quot;" office:value-type="string" office:string-value=",&quot;attrs&quot;:{&quot;LogicalId&quot;:&quot;WindowSwitchOff&quot;     ,&quot;Name&quot;:&quot;Désactiver Fenetre Ouverte&quot;         ,&quot;Order&quot;:41 ,&quot;Type&quot;:&quot;action&quot;,&quot;SubType&quot;:&quot;other&quot;  ,&quot;Unite&quot;:null   ,&quot;Config_infoName&quot;:&quot;WindowSwitch&quot;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WindowSwitchOff" <text:s text:c="4"/>,"Name":"Désactiver Fenetre Ouverte" <text:s text:c="8"/>,"Order":41 ,"Type":"action","SubType":"other" <text:s/>,"Unite":null <text:s text:c="2"/>,"Config_infoName":"WindowSwitch" <text:s text:c="6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plugzy</text:p>
          </table:table-cell>
          <table:table-cell office:value-type="string" calcext:value-type="string">
            <text:p>Plugzy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binary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N34])" office:value-type="float" office:value="0" calcext:value-type="float">
            <text:p>0</text:p>
          </table:table-cell>
          <table:table-cell/>
          <table:table-cell table:style-name="ce17" table:formula="of:=&quot;&quot;&amp;IF([.T33]=&quot;&quot;;&quot; &quot;;IF([.A34]&lt;&gt;&quot;&quot;;&quot;,&quot;;&quot;}&quot;)) &amp;IF([.A34]&lt;&gt;&quot;&quot;;&quot;&quot;&quot;&quot;&amp;[.A34]&amp;&quot;&quot;&quot;&quot;&amp;REPT(&quot; &quot;;20-LEN([.A34]));&quot;&quot;)" office:value-type="string" office:string-value=",&quot;plugzy&quot;              " calcext:value-type="string">
            <text:p>,"plugzy" <text:s text:c="13"/></text:p>
          </table:table-cell>
          <table:table-cell table:style-name="ce17" table:formula="of:=&quot;:&quot; &amp;&quot;{&quot;&quot;&quot;&amp;[.B$1]&amp;&quot;&quot;&quot;:&quot;&quot;&quot;&amp;[.B34]&amp;&quot;&quot;&quot;&quot;&amp;REPT(&quot; &quot;;20-LEN([.B34])) &amp;&quot;,&quot;&quot;&quot;&amp;[.C$1]&amp;&quot;&quot;&quot;:&quot;&quot;&quot;&amp;[.C34]&amp;&quot;&quot;&quot;&quot;&amp;REPT(&quot; &quot;;35-LEN([.C34])) &amp;&quot;,&quot;&quot;&quot;&amp;[.D$1]&amp;&quot;&quot;&quot;:&quot;&amp;[.D34]&amp;REPT(&quot; &quot;;3-LEN([.D34])) &amp;&quot;,&quot;&quot;&quot;&amp;[.E$1]&amp;&quot;&quot;&quot;:&quot;&quot;&quot;&amp;[.E34]&amp;&quot;&quot;&quot;&quot;&amp;REPT(&quot; &quot;;6-LEN([.E34])) &amp;&quot;,&quot;&quot;&quot;&amp;[.F$1]&amp;&quot;&quot;&quot;:&quot;&quot;&quot;&amp;[.F34]&amp;&quot;&quot;&quot;&quot;&amp;REPT(&quot; &quot;;7-LEN([.F34])) &amp;&quot;,&quot;&quot;&quot;&amp;[.G$1]&amp;&quot;&quot;&quot;:&quot;&amp;IF([.G34]&lt;&gt;&quot;&quot;;&quot;&quot;&quot;&quot;&amp;[.G34]&amp;&quot;&quot;&quot;&quot;&amp;REPT(&quot; &quot;;5-LEN([.G34]));&quot;null&quot;&amp;REPT(&quot; &quot;;5-4+2)) &amp;&quot;,&quot;&quot;&quot;&amp;[.H$1]&amp;&quot;&quot;&quot;:&quot;&amp;IF([.H34]&lt;&gt;&quot;&quot;;&quot;&quot;&quot;&quot;&amp;[.H34]&amp;&quot;&quot;&quot;&quot;&amp;REPT(&quot; &quot;;19-LEN([.H34]));&quot;null&quot;&amp;REPT(&quot; &quot;;19-4+2)) &amp;&quot;,&quot;&quot;&quot;&amp;[.I$1]&amp;&quot;&quot;&quot;:&quot;&amp;IF([.I34]&lt;&gt;&quot;&quot;;&quot;&quot;&quot;&quot;&amp;[.I34]&amp;&quot;&quot;&quot;&quot;&amp;REPT(&quot; &quot;;8-LEN([.I34]));&quot;null&quot;&amp;REPT(&quot; &quot;;8-4+2)) &amp;&quot;,&quot;&quot;&quot;&amp;[.J$1]&amp;&quot;&quot;&quot;:&quot;&amp;IF([.J34]&lt;&gt;&quot;&quot;;[.J34]&amp;REPT(&quot; &quot;;4-LEN([.J34]));&quot;null&quot;) &amp;&quot;,&quot;&quot;&quot;&amp;[.K$1]&amp;&quot;&quot;&quot;:&quot;&amp;IF([.K34]&lt;&gt;&quot;&quot;;[.K34]&amp;REPT(&quot; &quot;;4-LEN([.K34]));&quot;null&quot;) &amp;&quot;,&quot;&quot;&quot;&amp;[.L$1]&amp;&quot;&quot;&quot;:&quot;&amp;IF([.L34]&lt;&gt;&quot;&quot;;[.L34]&amp;REPT(&quot; &quot;;5-LEN([.L34]));&quot;null &quot;) &amp;&quot;,&quot;&quot;&quot;&amp;[.M$1]&amp;&quot;&quot;&quot;:&quot;&amp;IF([.M34]&lt;&gt;&quot;&quot;;&quot;&quot;&quot;&quot;&amp;[.M34]&amp;&quot;&quot;&quot;&quot;&amp;REPT(&quot; &quot;;20-LEN([.M34]));&quot;null&quot;&amp;REPT(&quot; &quot;;20-4+2)) &amp;&quot;,&quot;&quot;&quot;&amp;[.N$1]&amp;&quot;&quot;&quot;:&quot;&amp;IF([.N34]&lt;&gt;&quot;&quot;;&quot;&quot;&amp;[.N34]&amp;&quot;&quot;&amp;REPT(&quot; &quot;;5-LEN([.N34]));&quot;null&quot;&amp;REPT(&quot; &quot;;5-4+2)) &amp;&quot;,&quot;&quot;&quot;&amp;[.O$1]&amp;&quot;&quot;&quot;:&quot;&amp;[.O34] &amp;&quot;,&quot;&quot;&quot;&amp;[.P$1]&amp;&quot;&quot;&quot;:&quot;&amp;[.P34] &amp;&quot;}&quot;" office:value-type="string" office:string-value=":{&quot;LogicalId&quot;:&quot;plugzy&quot;              ,&quot;Name&quot;:&quot;Plugzy&quot;                             ,&quot;Order&quot;:42 ,&quot;Type&quot;:&quot;info&quot;  ,&quot;SubType&quot;:&quot;binary&quot; ,&quot;Unite&quot;:null   ,&quot;Config_infoName&quot;:null                 ,&quot;Config_value&quot;:null      ,&quot;Config_minValue&quot;:null,&quot;Config_maxValue&quot;:null,&quot;Config_tempHL&quot;:null ,&quot;setValue&quot;:null                  ,&quot;Display_param_step&quot;:null   ,&quot;IsHistorized&quot;:0,&quot;IsVisible&quot;:1}" calcext:value-type="string">
            <text:p>:{"LogicalId":"plugzy" <text:s text:c="13"/>,"Name":"Plugzy" <text:s text:c="28"/>,"Order":42 ,"Type":"info" <text:s/>,"SubType":"binary" ,"Unite":null <text:s text:c="2"/>,"Config_infoName":null <text:s text:c="16"/>,"Config_value":null <text:s text:c="5"/>,"Config_minValue":null,"Config_maxValue":null,"Config_tempHL":null ,"setValue":null <text:s text:c="17"/>,"Display_param_step":null <text:s text:c="2"/>,"IsHistorized":0,"IsVisible":1}</text:p>
          </table:table-cell>
          <table:table-cell table:style-name="ce15" office:value-type="string" calcext:value-type="string">
            <text:p>.</text:p>
          </table:table-cell>
          <table:table-cell table:style-name="ce14"/>
          <table:table-cell table:style-name="ce17" table:formula="of:=IF([.W33]=&quot;&quot;;&quot; &quot;;IF([.B34]&lt;&gt;&quot;&quot;;&quot;,&quot;;&quot;]&quot;))&#10;&amp;IF([.B34]&lt;&gt;&quot;&quot;;&quot;{&quot;&quot;cmd&quot;&quot;:&quot;&quot;&quot;&amp;[.B34]&amp;&quot;&quot;&quot;&quot;&amp;REPT(&quot; &quot;;20-LEN([.B34]));&quot;&quot;)" office:value-type="string" office:string-value=",{&quot;cmd&quot;:&quot;plugzy&quot;              " calcext:value-type="string">
            <text:p>,{"cmd":"plugzy" <text:s text:c="13"/></text:p>
          </table:table-cell>
          <table:table-cell table:style-name="ce17" table:formula="of:=&quot;,&quot;&quot;attrs&quot;&quot;:&quot;&#10;&amp;&quot;{&quot;&quot;&quot;&amp;[.B$1]&amp;&quot;&quot;&quot;:&quot;&quot;&quot;&amp;[.B34]&amp;&quot;&quot;&quot;&quot;&amp;REPT(&quot; &quot;;20-LEN([.B34]))&#10;&amp;&quot;,&quot;&quot;&quot;&amp;[.C$1]&amp;&quot;&quot;&quot;:&quot;&quot;&quot;&amp;[.C34]&amp;&quot;&quot;&quot;&quot;&amp;REPT(&quot; &quot;;35-LEN([.C34]))&#10;&amp;&quot;,&quot;&quot;&quot;&amp;[.D$1]&amp;&quot;&quot;&quot;:&quot;&amp;[.D34]&amp;REPT(&quot; &quot;;3-LEN([.D34]))&#10;&amp;&quot;,&quot;&quot;&quot;&amp;[.E$1]&amp;&quot;&quot;&quot;:&quot;&quot;&quot;&amp;[.E34]&amp;&quot;&quot;&quot;&quot;&amp;REPT(&quot; &quot;;6-LEN([.E34]))&#10;&amp;&quot;,&quot;&quot;&quot;&amp;[.F$1]&amp;&quot;&quot;&quot;:&quot;&quot;&quot;&amp;[.F34]&amp;&quot;&quot;&quot;&quot;&amp;REPT(&quot; &quot;;7-LEN([.F34]))&#10;&amp;&quot;,&quot;&quot;&quot;&amp;[.G$1]&amp;&quot;&quot;&quot;:&quot;&amp;IF([.G34]&lt;&gt;&quot;&quot;;&quot;&quot;&quot;&quot;&amp;[.G34]&amp;&quot;&quot;&quot;&quot;&amp;REPT(&quot; &quot;;5-LEN([.G34]));&quot;null&quot;&amp;REPT(&quot; &quot;;5-4+2))&#10;&amp;&quot;,&quot;&quot;&quot;&amp;[.H$1]&amp;&quot;&quot;&quot;:&quot;&amp;IF([.H34]&lt;&gt;&quot;&quot;;&quot;&quot;&quot;&quot;&amp;[.H34]&amp;&quot;&quot;&quot;&quot;&amp;REPT(&quot; &quot;;19-LEN([.H34]));&quot;null&quot;&amp;REPT(&quot; &quot;;19-4+2))&#10;&amp;&quot;,&quot;&quot;&quot;&amp;[.I$1]&amp;&quot;&quot;&quot;:&quot;&amp;IF([.I34]&lt;&gt;&quot;&quot;;&quot;&quot;&quot;&quot;&amp;[.I34]&amp;&quot;&quot;&quot;&quot;&amp;REPT(&quot; &quot;;8-LEN([.I34]));&quot;null&quot;&amp;REPT(&quot; &quot;;8-4+2))&#10;&amp;&quot;,&quot;&quot;&quot;&amp;[.J$1]&amp;&quot;&quot;&quot;:&quot;&amp;IF([.J34]&lt;&gt;&quot;&quot;;[.J34]&amp;REPT(&quot; &quot;;4-LEN([.J34]));&quot;null&quot;)&#10;&amp;&quot;,&quot;&quot;&quot;&amp;[.K$1]&amp;&quot;&quot;&quot;:&quot;&amp;IF([.K34]&lt;&gt;&quot;&quot;;[.K34]&amp;REPT(&quot; &quot;;4-LEN([.K34]));&quot;null&quot;)&#10;&amp;&quot;,&quot;&quot;&quot;&amp;[.L$1]&amp;&quot;&quot;&quot;:&quot;&amp;IF([.L34]&lt;&gt;&quot;&quot;;[.L34]&amp;REPT(&quot; &quot;;5-LEN([.L34]));&quot;null &quot;)&#10;&amp;&quot;,&quot;&quot;&quot;&amp;[.M$1]&amp;&quot;&quot;&quot;:&quot;&amp;IF([.M34]&lt;&gt;&quot;&quot;;&quot;&quot;&quot;&quot;&amp;[.M34]&amp;&quot;&quot;&quot;&quot;&amp;REPT(&quot; &quot;;20-LEN([.M34]));&quot;null&quot;&amp;REPT(&quot; &quot;;20-4+2))&#10;&amp;&quot;,&quot;&quot;&quot;&amp;[.N$1]&amp;&quot;&quot;&quot;:&quot;&amp;IF([.N34]&lt;&gt;&quot;&quot;;&quot;&quot;&quot;&quot;&amp;[.N34]&amp;&quot;&quot;&quot;&quot;&amp;REPT(&quot; &quot;;30-LEN([.N34]));&quot;null&quot;&amp;REPT(&quot; &quot;;30-4+2))&#10;&amp;&quot;,&quot;&quot;&quot;&amp;[.O$1]&amp;&quot;&quot;&quot;:&quot;&amp;[.O34]&#10;&amp;&quot;,&quot;&quot;&quot;&amp;[.P$1]&amp;&quot;&quot;&quot;:&quot;&amp;[.P34]&#10;&amp;&quot;}}&quot;" office:value-type="string" office:string-value=",&quot;attrs&quot;:{&quot;LogicalId&quot;:&quot;plugzy&quot;              ,&quot;Name&quot;:&quot;Plugzy&quot;                             ,&quot;Order&quot;:42 ,&quot;Type&quot;:&quot;info&quot;  ,&quot;SubType&quot;:&quot;binary&quot; ,&quot;Unite&quot;:null   ,&quot;Config_infoName&quot;:null      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plugzy" <text:s text:c="13"/>,"Name":"Plugzy" <text:s text:c="28"/>,"Order":42 ,"Type":"info" <text:s/>,"SubType":"binary" ,"Unite":null <text:s text:c="2"/>,"Config_infoName":null <text:s text:c="16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plugzyon</text:p>
          </table:table-cell>
          <table:table-cell office:value-type="string" calcext:value-type="string">
            <text:p>Plugzy ON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ther</text:p>
          </table:table-cell>
          <table:table-cell/>
          <table:table-cell office:value-type="string" calcext:value-type="string">
            <text:p>plugzy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N35])" office:value-type="float" office:value="0" calcext:value-type="float">
            <text:p>0</text:p>
          </table:table-cell>
          <table:table-cell/>
          <table:table-cell table:style-name="ce17" table:formula="of:=&quot;&quot;&amp;IF([.T34]=&quot;&quot;;&quot; &quot;;IF([.A35]&lt;&gt;&quot;&quot;;&quot;,&quot;;&quot;}&quot;)) &amp;IF([.A35]&lt;&gt;&quot;&quot;;&quot;&quot;&quot;&quot;&amp;[.A35]&amp;&quot;&quot;&quot;&quot;&amp;REPT(&quot; &quot;;20-LEN([.A35]));&quot;&quot;)" office:value-type="string" office:string-value=",&quot;plugzyon&quot;            " calcext:value-type="string">
            <text:p>,"plugzyon" <text:s text:c="11"/></text:p>
          </table:table-cell>
          <table:table-cell table:style-name="ce17" table:formula="of:=&quot;:&quot; &amp;&quot;{&quot;&quot;&quot;&amp;[.B$1]&amp;&quot;&quot;&quot;:&quot;&quot;&quot;&amp;[.B35]&amp;&quot;&quot;&quot;&quot;&amp;REPT(&quot; &quot;;20-LEN([.B35])) &amp;&quot;,&quot;&quot;&quot;&amp;[.C$1]&amp;&quot;&quot;&quot;:&quot;&quot;&quot;&amp;[.C35]&amp;&quot;&quot;&quot;&quot;&amp;REPT(&quot; &quot;;35-LEN([.C35])) &amp;&quot;,&quot;&quot;&quot;&amp;[.D$1]&amp;&quot;&quot;&quot;:&quot;&amp;[.D35]&amp;REPT(&quot; &quot;;3-LEN([.D35])) &amp;&quot;,&quot;&quot;&quot;&amp;[.E$1]&amp;&quot;&quot;&quot;:&quot;&quot;&quot;&amp;[.E35]&amp;&quot;&quot;&quot;&quot;&amp;REPT(&quot; &quot;;6-LEN([.E35])) &amp;&quot;,&quot;&quot;&quot;&amp;[.F$1]&amp;&quot;&quot;&quot;:&quot;&quot;&quot;&amp;[.F35]&amp;&quot;&quot;&quot;&quot;&amp;REPT(&quot; &quot;;7-LEN([.F35])) &amp;&quot;,&quot;&quot;&quot;&amp;[.G$1]&amp;&quot;&quot;&quot;:&quot;&amp;IF([.G35]&lt;&gt;&quot;&quot;;&quot;&quot;&quot;&quot;&amp;[.G35]&amp;&quot;&quot;&quot;&quot;&amp;REPT(&quot; &quot;;5-LEN([.G35]));&quot;null&quot;&amp;REPT(&quot; &quot;;5-4+2)) &amp;&quot;,&quot;&quot;&quot;&amp;[.H$1]&amp;&quot;&quot;&quot;:&quot;&amp;IF([.H35]&lt;&gt;&quot;&quot;;&quot;&quot;&quot;&quot;&amp;[.H35]&amp;&quot;&quot;&quot;&quot;&amp;REPT(&quot; &quot;;19-LEN([.H35]));&quot;null&quot;&amp;REPT(&quot; &quot;;19-4+2)) &amp;&quot;,&quot;&quot;&quot;&amp;[.I$1]&amp;&quot;&quot;&quot;:&quot;&amp;IF([.I35]&lt;&gt;&quot;&quot;;&quot;&quot;&quot;&quot;&amp;[.I35]&amp;&quot;&quot;&quot;&quot;&amp;REPT(&quot; &quot;;8-LEN([.I35]));&quot;null&quot;&amp;REPT(&quot; &quot;;8-4+2)) &amp;&quot;,&quot;&quot;&quot;&amp;[.J$1]&amp;&quot;&quot;&quot;:&quot;&amp;IF([.J35]&lt;&gt;&quot;&quot;;[.J35]&amp;REPT(&quot; &quot;;4-LEN([.J35]));&quot;null&quot;) &amp;&quot;,&quot;&quot;&quot;&amp;[.K$1]&amp;&quot;&quot;&quot;:&quot;&amp;IF([.K35]&lt;&gt;&quot;&quot;;[.K35]&amp;REPT(&quot; &quot;;4-LEN([.K35]));&quot;null&quot;) &amp;&quot;,&quot;&quot;&quot;&amp;[.L$1]&amp;&quot;&quot;&quot;:&quot;&amp;IF([.L35]&lt;&gt;&quot;&quot;;[.L35]&amp;REPT(&quot; &quot;;5-LEN([.L35]));&quot;null &quot;) &amp;&quot;,&quot;&quot;&quot;&amp;[.M$1]&amp;&quot;&quot;&quot;:&quot;&amp;IF([.M35]&lt;&gt;&quot;&quot;;&quot;&quot;&quot;&quot;&amp;[.M35]&amp;&quot;&quot;&quot;&quot;&amp;REPT(&quot; &quot;;20-LEN([.M35]));&quot;null&quot;&amp;REPT(&quot; &quot;;20-4+2)) &amp;&quot;,&quot;&quot;&quot;&amp;[.N$1]&amp;&quot;&quot;&quot;:&quot;&amp;IF([.N35]&lt;&gt;&quot;&quot;;&quot;&quot;&amp;[.N35]&amp;&quot;&quot;&amp;REPT(&quot; &quot;;5-LEN([.N35]));&quot;null&quot;&amp;REPT(&quot; &quot;;5-4+2)) &amp;&quot;,&quot;&quot;&quot;&amp;[.O$1]&amp;&quot;&quot;&quot;:&quot;&amp;[.O35] &amp;&quot;,&quot;&quot;&quot;&amp;[.P$1]&amp;&quot;&quot;&quot;:&quot;&amp;[.P35] &amp;&quot;}&quot;" office:value-type="string" office:string-value=":{&quot;LogicalId&quot;:&quot;plugzyon&quot;            ,&quot;Name&quot;:&quot;Plugzy ON&quot;                          ,&quot;Order&quot;:43 ,&quot;Type&quot;:&quot;action&quot;,&quot;SubType&quot;:&quot;other&quot;  ,&quot;Unite&quot;:null   ,&quot;Config_infoName&quot;:&quot;plugzy&quot;             ,&quot;Config_value&quot;:null      ,&quot;Config_minValue&quot;:null,&quot;Config_maxValue&quot;:null,&quot;Config_tempHL&quot;:null ,&quot;setValue&quot;:null                  ,&quot;Display_param_step&quot;:null   ,&quot;IsHistorized&quot;:0,&quot;IsVisible&quot;:1}" calcext:value-type="string">
            <text:p>:{"LogicalId":"plugzyon" <text:s text:c="11"/>,"Name":"Plugzy ON" <text:s text:c="25"/>,"Order":43 ,"Type":"action","SubType":"other" <text:s/>,"Unite":null <text:s text:c="2"/>,"Config_infoName":"plugzy" <text:s text:c="12"/>,"Config_value":null <text:s text:c="5"/>,"Config_minValue":null,"Config_maxValue":null,"Config_tempHL":null ,"setValue":null <text:s text:c="17"/>,"Display_param_step":null <text:s text:c="2"/>,"IsHistorized":0,"IsVisible":1}</text:p>
          </table:table-cell>
          <table:table-cell table:style-name="ce15" office:value-type="string" calcext:value-type="string">
            <text:p>.</text:p>
          </table:table-cell>
          <table:table-cell table:style-name="ce14"/>
          <table:table-cell table:style-name="ce17" table:formula="of:=IF([.W34]=&quot;&quot;;&quot; &quot;;IF([.B35]&lt;&gt;&quot;&quot;;&quot;,&quot;;&quot;]&quot;))&#10;&amp;IF([.B35]&lt;&gt;&quot;&quot;;&quot;{&quot;&quot;cmd&quot;&quot;:&quot;&quot;&quot;&amp;[.B35]&amp;&quot;&quot;&quot;&quot;&amp;REPT(&quot; &quot;;20-LEN([.B35]));&quot;&quot;)" office:value-type="string" office:string-value=",{&quot;cmd&quot;:&quot;plugzyon&quot;            " calcext:value-type="string">
            <text:p>,{"cmd":"plugzyon" <text:s text:c="11"/></text:p>
          </table:table-cell>
          <table:table-cell table:style-name="ce17" table:formula="of:=&quot;,&quot;&quot;attrs&quot;&quot;:&quot;&#10;&amp;&quot;{&quot;&quot;&quot;&amp;[.B$1]&amp;&quot;&quot;&quot;:&quot;&quot;&quot;&amp;[.B35]&amp;&quot;&quot;&quot;&quot;&amp;REPT(&quot; &quot;;20-LEN([.B35]))&#10;&amp;&quot;,&quot;&quot;&quot;&amp;[.C$1]&amp;&quot;&quot;&quot;:&quot;&quot;&quot;&amp;[.C35]&amp;&quot;&quot;&quot;&quot;&amp;REPT(&quot; &quot;;35-LEN([.C35]))&#10;&amp;&quot;,&quot;&quot;&quot;&amp;[.D$1]&amp;&quot;&quot;&quot;:&quot;&amp;[.D35]&amp;REPT(&quot; &quot;;3-LEN([.D35]))&#10;&amp;&quot;,&quot;&quot;&quot;&amp;[.E$1]&amp;&quot;&quot;&quot;:&quot;&quot;&quot;&amp;[.E35]&amp;&quot;&quot;&quot;&quot;&amp;REPT(&quot; &quot;;6-LEN([.E35]))&#10;&amp;&quot;,&quot;&quot;&quot;&amp;[.F$1]&amp;&quot;&quot;&quot;:&quot;&quot;&quot;&amp;[.F35]&amp;&quot;&quot;&quot;&quot;&amp;REPT(&quot; &quot;;7-LEN([.F35]))&#10;&amp;&quot;,&quot;&quot;&quot;&amp;[.G$1]&amp;&quot;&quot;&quot;:&quot;&amp;IF([.G35]&lt;&gt;&quot;&quot;;&quot;&quot;&quot;&quot;&amp;[.G35]&amp;&quot;&quot;&quot;&quot;&amp;REPT(&quot; &quot;;5-LEN([.G35]));&quot;null&quot;&amp;REPT(&quot; &quot;;5-4+2))&#10;&amp;&quot;,&quot;&quot;&quot;&amp;[.H$1]&amp;&quot;&quot;&quot;:&quot;&amp;IF([.H35]&lt;&gt;&quot;&quot;;&quot;&quot;&quot;&quot;&amp;[.H35]&amp;&quot;&quot;&quot;&quot;&amp;REPT(&quot; &quot;;19-LEN([.H35]));&quot;null&quot;&amp;REPT(&quot; &quot;;19-4+2))&#10;&amp;&quot;,&quot;&quot;&quot;&amp;[.I$1]&amp;&quot;&quot;&quot;:&quot;&amp;IF([.I35]&lt;&gt;&quot;&quot;;&quot;&quot;&quot;&quot;&amp;[.I35]&amp;&quot;&quot;&quot;&quot;&amp;REPT(&quot; &quot;;8-LEN([.I35]));&quot;null&quot;&amp;REPT(&quot; &quot;;8-4+2))&#10;&amp;&quot;,&quot;&quot;&quot;&amp;[.J$1]&amp;&quot;&quot;&quot;:&quot;&amp;IF([.J35]&lt;&gt;&quot;&quot;;[.J35]&amp;REPT(&quot; &quot;;4-LEN([.J35]));&quot;null&quot;)&#10;&amp;&quot;,&quot;&quot;&quot;&amp;[.K$1]&amp;&quot;&quot;&quot;:&quot;&amp;IF([.K35]&lt;&gt;&quot;&quot;;[.K35]&amp;REPT(&quot; &quot;;4-LEN([.K35]));&quot;null&quot;)&#10;&amp;&quot;,&quot;&quot;&quot;&amp;[.L$1]&amp;&quot;&quot;&quot;:&quot;&amp;IF([.L35]&lt;&gt;&quot;&quot;;[.L35]&amp;REPT(&quot; &quot;;5-LEN([.L35]));&quot;null &quot;)&#10;&amp;&quot;,&quot;&quot;&quot;&amp;[.M$1]&amp;&quot;&quot;&quot;:&quot;&amp;IF([.M35]&lt;&gt;&quot;&quot;;&quot;&quot;&quot;&quot;&amp;[.M35]&amp;&quot;&quot;&quot;&quot;&amp;REPT(&quot; &quot;;20-LEN([.M35]));&quot;null&quot;&amp;REPT(&quot; &quot;;20-4+2))&#10;&amp;&quot;,&quot;&quot;&quot;&amp;[.N$1]&amp;&quot;&quot;&quot;:&quot;&amp;IF([.N35]&lt;&gt;&quot;&quot;;&quot;&quot;&quot;&quot;&amp;[.N35]&amp;&quot;&quot;&quot;&quot;&amp;REPT(&quot; &quot;;30-LEN([.N35]));&quot;null&quot;&amp;REPT(&quot; &quot;;30-4+2))&#10;&amp;&quot;,&quot;&quot;&quot;&amp;[.O$1]&amp;&quot;&quot;&quot;:&quot;&amp;[.O35]&#10;&amp;&quot;,&quot;&quot;&quot;&amp;[.P$1]&amp;&quot;&quot;&quot;:&quot;&amp;[.P35]&#10;&amp;&quot;}}&quot;" office:value-type="string" office:string-value=",&quot;attrs&quot;:{&quot;LogicalId&quot;:&quot;plugzyon&quot;            ,&quot;Name&quot;:&quot;Plugzy ON&quot;                          ,&quot;Order&quot;:43 ,&quot;Type&quot;:&quot;action&quot;,&quot;SubType&quot;:&quot;other&quot;  ,&quot;Unite&quot;:null   ,&quot;Config_infoName&quot;:&quot;plugzy&quot;  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plugzyon" <text:s text:c="11"/>,"Name":"Plugzy ON" <text:s text:c="25"/>,"Order":43 ,"Type":"action","SubType":"other" <text:s/>,"Unite":null <text:s text:c="2"/>,"Config_infoName":"plugzy" <text:s text:c="12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plugzyoff</text:p>
          </table:table-cell>
          <table:table-cell office:value-type="string" calcext:value-type="string">
            <text:p>Plugzy OFF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ther</text:p>
          </table:table-cell>
          <table:table-cell/>
          <table:table-cell office:value-type="string" calcext:value-type="string">
            <text:p>plugzy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N36])" office:value-type="float" office:value="0" calcext:value-type="float">
            <text:p>0</text:p>
          </table:table-cell>
          <table:table-cell/>
          <table:table-cell table:style-name="ce17" table:formula="of:=&quot;&quot;&amp;IF([.T35]=&quot;&quot;;&quot; &quot;;IF([.A36]&lt;&gt;&quot;&quot;;&quot;,&quot;;&quot;}&quot;)) &amp;IF([.A36]&lt;&gt;&quot;&quot;;&quot;&quot;&quot;&quot;&amp;[.A36]&amp;&quot;&quot;&quot;&quot;&amp;REPT(&quot; &quot;;20-LEN([.A36]));&quot;&quot;)" office:value-type="string" office:string-value=",&quot;plugzyoff&quot;           " calcext:value-type="string">
            <text:p>,"plugzyoff" <text:s text:c="10"/></text:p>
          </table:table-cell>
          <table:table-cell table:style-name="ce17" table:formula="of:=&quot;:&quot; &amp;&quot;{&quot;&quot;&quot;&amp;[.B$1]&amp;&quot;&quot;&quot;:&quot;&quot;&quot;&amp;[.B36]&amp;&quot;&quot;&quot;&quot;&amp;REPT(&quot; &quot;;20-LEN([.B36])) &amp;&quot;,&quot;&quot;&quot;&amp;[.C$1]&amp;&quot;&quot;&quot;:&quot;&quot;&quot;&amp;[.C36]&amp;&quot;&quot;&quot;&quot;&amp;REPT(&quot; &quot;;35-LEN([.C36])) &amp;&quot;,&quot;&quot;&quot;&amp;[.D$1]&amp;&quot;&quot;&quot;:&quot;&amp;[.D36]&amp;REPT(&quot; &quot;;3-LEN([.D36])) &amp;&quot;,&quot;&quot;&quot;&amp;[.E$1]&amp;&quot;&quot;&quot;:&quot;&quot;&quot;&amp;[.E36]&amp;&quot;&quot;&quot;&quot;&amp;REPT(&quot; &quot;;6-LEN([.E36])) &amp;&quot;,&quot;&quot;&quot;&amp;[.F$1]&amp;&quot;&quot;&quot;:&quot;&quot;&quot;&amp;[.F36]&amp;&quot;&quot;&quot;&quot;&amp;REPT(&quot; &quot;;7-LEN([.F36])) &amp;&quot;,&quot;&quot;&quot;&amp;[.G$1]&amp;&quot;&quot;&quot;:&quot;&amp;IF([.G36]&lt;&gt;&quot;&quot;;&quot;&quot;&quot;&quot;&amp;[.G36]&amp;&quot;&quot;&quot;&quot;&amp;REPT(&quot; &quot;;5-LEN([.G36]));&quot;null&quot;&amp;REPT(&quot; &quot;;5-4+2)) &amp;&quot;,&quot;&quot;&quot;&amp;[.H$1]&amp;&quot;&quot;&quot;:&quot;&amp;IF([.H36]&lt;&gt;&quot;&quot;;&quot;&quot;&quot;&quot;&amp;[.H36]&amp;&quot;&quot;&quot;&quot;&amp;REPT(&quot; &quot;;19-LEN([.H36]));&quot;null&quot;&amp;REPT(&quot; &quot;;19-4+2)) &amp;&quot;,&quot;&quot;&quot;&amp;[.I$1]&amp;&quot;&quot;&quot;:&quot;&amp;IF([.I36]&lt;&gt;&quot;&quot;;&quot;&quot;&quot;&quot;&amp;[.I36]&amp;&quot;&quot;&quot;&quot;&amp;REPT(&quot; &quot;;8-LEN([.I36]));&quot;null&quot;&amp;REPT(&quot; &quot;;8-4+2)) &amp;&quot;,&quot;&quot;&quot;&amp;[.J$1]&amp;&quot;&quot;&quot;:&quot;&amp;IF([.J36]&lt;&gt;&quot;&quot;;[.J36]&amp;REPT(&quot; &quot;;4-LEN([.J36]));&quot;null&quot;) &amp;&quot;,&quot;&quot;&quot;&amp;[.K$1]&amp;&quot;&quot;&quot;:&quot;&amp;IF([.K36]&lt;&gt;&quot;&quot;;[.K36]&amp;REPT(&quot; &quot;;4-LEN([.K36]));&quot;null&quot;) &amp;&quot;,&quot;&quot;&quot;&amp;[.L$1]&amp;&quot;&quot;&quot;:&quot;&amp;IF([.L36]&lt;&gt;&quot;&quot;;[.L36]&amp;REPT(&quot; &quot;;5-LEN([.L36]));&quot;null &quot;) &amp;&quot;,&quot;&quot;&quot;&amp;[.M$1]&amp;&quot;&quot;&quot;:&quot;&amp;IF([.M36]&lt;&gt;&quot;&quot;;&quot;&quot;&quot;&quot;&amp;[.M36]&amp;&quot;&quot;&quot;&quot;&amp;REPT(&quot; &quot;;20-LEN([.M36]));&quot;null&quot;&amp;REPT(&quot; &quot;;20-4+2)) &amp;&quot;,&quot;&quot;&quot;&amp;[.N$1]&amp;&quot;&quot;&quot;:&quot;&amp;IF([.N36]&lt;&gt;&quot;&quot;;&quot;&quot;&amp;[.N36]&amp;&quot;&quot;&amp;REPT(&quot; &quot;;5-LEN([.N36]));&quot;null&quot;&amp;REPT(&quot; &quot;;5-4+2)) &amp;&quot;,&quot;&quot;&quot;&amp;[.O$1]&amp;&quot;&quot;&quot;:&quot;&amp;[.O36] &amp;&quot;,&quot;&quot;&quot;&amp;[.P$1]&amp;&quot;&quot;&quot;:&quot;&amp;[.P36] &amp;&quot;}&quot;" office:value-type="string" office:string-value=":{&quot;LogicalId&quot;:&quot;plugzyoff&quot;           ,&quot;Name&quot;:&quot;Plugzy OFF&quot;                         ,&quot;Order&quot;:44 ,&quot;Type&quot;:&quot;action&quot;,&quot;SubType&quot;:&quot;other&quot;  ,&quot;Unite&quot;:null   ,&quot;Config_infoName&quot;:&quot;plugzy&quot;             ,&quot;Config_value&quot;:null      ,&quot;Config_minValue&quot;:null,&quot;Config_maxValue&quot;:null,&quot;Config_tempHL&quot;:null ,&quot;setValue&quot;:null                  ,&quot;Display_param_step&quot;:null   ,&quot;IsHistorized&quot;:0,&quot;IsVisible&quot;:1}" calcext:value-type="string">
            <text:p>:{"LogicalId":"plugzyoff" <text:s text:c="10"/>,"Name":"Plugzy OFF" <text:s text:c="24"/>,"Order":44 ,"Type":"action","SubType":"other" <text:s/>,"Unite":null <text:s text:c="2"/>,"Config_infoName":"plugzy" <text:s text:c="12"/>,"Config_value":null <text:s text:c="5"/>,"Config_minValue":null,"Config_maxValue":null,"Config_tempHL":null ,"setValue":null <text:s text:c="17"/>,"Display_param_step":null <text:s text:c="2"/>,"IsHistorized":0,"IsVisible":1}</text:p>
          </table:table-cell>
          <table:table-cell table:style-name="ce15" office:value-type="string" calcext:value-type="string">
            <text:p>.</text:p>
          </table:table-cell>
          <table:table-cell table:style-name="ce14"/>
          <table:table-cell table:style-name="ce17" table:formula="of:=IF([.W35]=&quot;&quot;;&quot; &quot;;IF([.B36]&lt;&gt;&quot;&quot;;&quot;,&quot;;&quot;]&quot;))&#10;&amp;IF([.B36]&lt;&gt;&quot;&quot;;&quot;{&quot;&quot;cmd&quot;&quot;:&quot;&quot;&quot;&amp;[.B36]&amp;&quot;&quot;&quot;&quot;&amp;REPT(&quot; &quot;;20-LEN([.B36]));&quot;&quot;)" office:value-type="string" office:string-value=",{&quot;cmd&quot;:&quot;plugzyoff&quot;           " calcext:value-type="string">
            <text:p>,{"cmd":"plugzyoff" <text:s text:c="10"/></text:p>
          </table:table-cell>
          <table:table-cell table:style-name="ce17" table:formula="of:=&quot;,&quot;&quot;attrs&quot;&quot;:&quot;&#10;&amp;&quot;{&quot;&quot;&quot;&amp;[.B$1]&amp;&quot;&quot;&quot;:&quot;&quot;&quot;&amp;[.B36]&amp;&quot;&quot;&quot;&quot;&amp;REPT(&quot; &quot;;20-LEN([.B36]))&#10;&amp;&quot;,&quot;&quot;&quot;&amp;[.C$1]&amp;&quot;&quot;&quot;:&quot;&quot;&quot;&amp;[.C36]&amp;&quot;&quot;&quot;&quot;&amp;REPT(&quot; &quot;;35-LEN([.C36]))&#10;&amp;&quot;,&quot;&quot;&quot;&amp;[.D$1]&amp;&quot;&quot;&quot;:&quot;&amp;[.D36]&amp;REPT(&quot; &quot;;3-LEN([.D36]))&#10;&amp;&quot;,&quot;&quot;&quot;&amp;[.E$1]&amp;&quot;&quot;&quot;:&quot;&quot;&quot;&amp;[.E36]&amp;&quot;&quot;&quot;&quot;&amp;REPT(&quot; &quot;;6-LEN([.E36]))&#10;&amp;&quot;,&quot;&quot;&quot;&amp;[.F$1]&amp;&quot;&quot;&quot;:&quot;&quot;&quot;&amp;[.F36]&amp;&quot;&quot;&quot;&quot;&amp;REPT(&quot; &quot;;7-LEN([.F36]))&#10;&amp;&quot;,&quot;&quot;&quot;&amp;[.G$1]&amp;&quot;&quot;&quot;:&quot;&amp;IF([.G36]&lt;&gt;&quot;&quot;;&quot;&quot;&quot;&quot;&amp;[.G36]&amp;&quot;&quot;&quot;&quot;&amp;REPT(&quot; &quot;;5-LEN([.G36]));&quot;null&quot;&amp;REPT(&quot; &quot;;5-4+2))&#10;&amp;&quot;,&quot;&quot;&quot;&amp;[.H$1]&amp;&quot;&quot;&quot;:&quot;&amp;IF([.H36]&lt;&gt;&quot;&quot;;&quot;&quot;&quot;&quot;&amp;[.H36]&amp;&quot;&quot;&quot;&quot;&amp;REPT(&quot; &quot;;19-LEN([.H36]));&quot;null&quot;&amp;REPT(&quot; &quot;;19-4+2))&#10;&amp;&quot;,&quot;&quot;&quot;&amp;[.I$1]&amp;&quot;&quot;&quot;:&quot;&amp;IF([.I36]&lt;&gt;&quot;&quot;;&quot;&quot;&quot;&quot;&amp;[.I36]&amp;&quot;&quot;&quot;&quot;&amp;REPT(&quot; &quot;;8-LEN([.I36]));&quot;null&quot;&amp;REPT(&quot; &quot;;8-4+2))&#10;&amp;&quot;,&quot;&quot;&quot;&amp;[.J$1]&amp;&quot;&quot;&quot;:&quot;&amp;IF([.J36]&lt;&gt;&quot;&quot;;[.J36]&amp;REPT(&quot; &quot;;4-LEN([.J36]));&quot;null&quot;)&#10;&amp;&quot;,&quot;&quot;&quot;&amp;[.K$1]&amp;&quot;&quot;&quot;:&quot;&amp;IF([.K36]&lt;&gt;&quot;&quot;;[.K36]&amp;REPT(&quot; &quot;;4-LEN([.K36]));&quot;null&quot;)&#10;&amp;&quot;,&quot;&quot;&quot;&amp;[.L$1]&amp;&quot;&quot;&quot;:&quot;&amp;IF([.L36]&lt;&gt;&quot;&quot;;[.L36]&amp;REPT(&quot; &quot;;5-LEN([.L36]));&quot;null &quot;)&#10;&amp;&quot;,&quot;&quot;&quot;&amp;[.M$1]&amp;&quot;&quot;&quot;:&quot;&amp;IF([.M36]&lt;&gt;&quot;&quot;;&quot;&quot;&quot;&quot;&amp;[.M36]&amp;&quot;&quot;&quot;&quot;&amp;REPT(&quot; &quot;;20-LEN([.M36]));&quot;null&quot;&amp;REPT(&quot; &quot;;20-4+2))&#10;&amp;&quot;,&quot;&quot;&quot;&amp;[.N$1]&amp;&quot;&quot;&quot;:&quot;&amp;IF([.N36]&lt;&gt;&quot;&quot;;&quot;&quot;&quot;&quot;&amp;[.N36]&amp;&quot;&quot;&quot;&quot;&amp;REPT(&quot; &quot;;30-LEN([.N36]));&quot;null&quot;&amp;REPT(&quot; &quot;;30-4+2))&#10;&amp;&quot;,&quot;&quot;&quot;&amp;[.O$1]&amp;&quot;&quot;&quot;:&quot;&amp;[.O36]&#10;&amp;&quot;,&quot;&quot;&quot;&amp;[.P$1]&amp;&quot;&quot;&quot;:&quot;&amp;[.P36]&#10;&amp;&quot;}}&quot;" office:value-type="string" office:string-value=",&quot;attrs&quot;:{&quot;LogicalId&quot;:&quot;plugzyoff&quot;           ,&quot;Name&quot;:&quot;Plugzy OFF&quot;                         ,&quot;Order&quot;:44 ,&quot;Type&quot;:&quot;action&quot;,&quot;SubType&quot;:&quot;other&quot;  ,&quot;Unite&quot;:null   ,&quot;Config_infoName&quot;:&quot;plugzy&quot;  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plugzyoff" <text:s text:c="10"/>,"Name":"Plugzy OFF" <text:s text:c="24"/>,"Order":44 ,"Type":"action","SubType":"other" <text:s/>,"Unite":null <text:s text:c="2"/>,"Config_infoName":"plugzy" <text:s text:c="12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derog_mode</text:p>
          </table:table-cell>
          <table:table-cell office:value-type="string" calcext:value-type="string">
            <text:p>Mode dérogation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numeric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N37])" office:value-type="float" office:value="0" calcext:value-type="float">
            <text:p>0</text:p>
          </table:table-cell>
          <table:table-cell/>
          <table:table-cell table:style-name="ce17" table:formula="of:=&quot;&quot;&amp;IF([.T36]=&quot;&quot;;&quot; &quot;;IF([.A37]&lt;&gt;&quot;&quot;;&quot;,&quot;;&quot;}&quot;)) &amp;IF([.A37]&lt;&gt;&quot;&quot;;&quot;&quot;&quot;&quot;&amp;[.A37]&amp;&quot;&quot;&quot;&quot;&amp;REPT(&quot; &quot;;20-LEN([.A37]));&quot;&quot;)" office:value-type="string" office:string-value=",&quot;derog_mode&quot;          " calcext:value-type="string">
            <text:p>,"derog_mode" <text:s text:c="9"/></text:p>
          </table:table-cell>
          <table:table-cell table:style-name="ce17" table:formula="of:=&quot;:&quot; &amp;&quot;{&quot;&quot;&quot;&amp;[.B$1]&amp;&quot;&quot;&quot;:&quot;&quot;&quot;&amp;[.B37]&amp;&quot;&quot;&quot;&quot;&amp;REPT(&quot; &quot;;20-LEN([.B37])) &amp;&quot;,&quot;&quot;&quot;&amp;[.C$1]&amp;&quot;&quot;&quot;:&quot;&quot;&quot;&amp;[.C37]&amp;&quot;&quot;&quot;&quot;&amp;REPT(&quot; &quot;;35-LEN([.C37])) &amp;&quot;,&quot;&quot;&quot;&amp;[.D$1]&amp;&quot;&quot;&quot;:&quot;&amp;[.D37]&amp;REPT(&quot; &quot;;3-LEN([.D37])) &amp;&quot;,&quot;&quot;&quot;&amp;[.E$1]&amp;&quot;&quot;&quot;:&quot;&quot;&quot;&amp;[.E37]&amp;&quot;&quot;&quot;&quot;&amp;REPT(&quot; &quot;;6-LEN([.E37])) &amp;&quot;,&quot;&quot;&quot;&amp;[.F$1]&amp;&quot;&quot;&quot;:&quot;&quot;&quot;&amp;[.F37]&amp;&quot;&quot;&quot;&quot;&amp;REPT(&quot; &quot;;7-LEN([.F37])) &amp;&quot;,&quot;&quot;&quot;&amp;[.G$1]&amp;&quot;&quot;&quot;:&quot;&amp;IF([.G37]&lt;&gt;&quot;&quot;;&quot;&quot;&quot;&quot;&amp;[.G37]&amp;&quot;&quot;&quot;&quot;&amp;REPT(&quot; &quot;;5-LEN([.G37]));&quot;null&quot;&amp;REPT(&quot; &quot;;5-4+2)) &amp;&quot;,&quot;&quot;&quot;&amp;[.H$1]&amp;&quot;&quot;&quot;:&quot;&amp;IF([.H37]&lt;&gt;&quot;&quot;;&quot;&quot;&quot;&quot;&amp;[.H37]&amp;&quot;&quot;&quot;&quot;&amp;REPT(&quot; &quot;;19-LEN([.H37]));&quot;null&quot;&amp;REPT(&quot; &quot;;19-4+2)) &amp;&quot;,&quot;&quot;&quot;&amp;[.I$1]&amp;&quot;&quot;&quot;:&quot;&amp;IF([.I37]&lt;&gt;&quot;&quot;;&quot;&quot;&quot;&quot;&amp;[.I37]&amp;&quot;&quot;&quot;&quot;&amp;REPT(&quot; &quot;;8-LEN([.I37]));&quot;null&quot;&amp;REPT(&quot; &quot;;8-4+2)) &amp;&quot;,&quot;&quot;&quot;&amp;[.J$1]&amp;&quot;&quot;&quot;:&quot;&amp;IF([.J37]&lt;&gt;&quot;&quot;;[.J37]&amp;REPT(&quot; &quot;;4-LEN([.J37]));&quot;null&quot;) &amp;&quot;,&quot;&quot;&quot;&amp;[.K$1]&amp;&quot;&quot;&quot;:&quot;&amp;IF([.K37]&lt;&gt;&quot;&quot;;[.K37]&amp;REPT(&quot; &quot;;4-LEN([.K37]));&quot;null&quot;) &amp;&quot;,&quot;&quot;&quot;&amp;[.L$1]&amp;&quot;&quot;&quot;:&quot;&amp;IF([.L37]&lt;&gt;&quot;&quot;;[.L37]&amp;REPT(&quot; &quot;;5-LEN([.L37]));&quot;null &quot;) &amp;&quot;,&quot;&quot;&quot;&amp;[.M$1]&amp;&quot;&quot;&quot;:&quot;&amp;IF([.M37]&lt;&gt;&quot;&quot;;&quot;&quot;&quot;&quot;&amp;[.M37]&amp;&quot;&quot;&quot;&quot;&amp;REPT(&quot; &quot;;20-LEN([.M37]));&quot;null&quot;&amp;REPT(&quot; &quot;;20-4+2)) &amp;&quot;,&quot;&quot;&quot;&amp;[.N$1]&amp;&quot;&quot;&quot;:&quot;&amp;IF([.N37]&lt;&gt;&quot;&quot;;&quot;&quot;&amp;[.N37]&amp;&quot;&quot;&amp;REPT(&quot; &quot;;5-LEN([.N37]));&quot;null&quot;&amp;REPT(&quot; &quot;;5-4+2)) &amp;&quot;,&quot;&quot;&quot;&amp;[.O$1]&amp;&quot;&quot;&quot;:&quot;&amp;[.O37] &amp;&quot;,&quot;&quot;&quot;&amp;[.P$1]&amp;&quot;&quot;&quot;:&quot;&amp;[.P37] &amp;&quot;}&quot;" office:value-type="string" office:string-value=":{&quot;LogicalId&quot;:&quot;derog_mode&quot;          ,&quot;Name&quot;:&quot;Mode dérogation&quot;                    ,&quot;Order&quot;:60 ,&quot;Type&quot;:&quot;info&quot;  ,&quot;SubType&quot;:&quot;numeric&quot;,&quot;Unite&quot;:null   ,&quot;Config_infoName&quot;:null                 ,&quot;Config_value&quot;:null      ,&quot;Config_minValue&quot;:null,&quot;Config_maxValue&quot;:null,&quot;Config_tempHL&quot;:null ,&quot;setValue&quot;:null                  ,&quot;Display_param_step&quot;:null   ,&quot;IsHistorized&quot;:0,&quot;IsVisible&quot;:1}" calcext:value-type="string">
            <text:p>:{"LogicalId":"derog_mode" <text:s text:c="9"/>,"Name":"Mode dérogation" <text:s text:c="19"/>,"Order":60 ,"Type":"info" <text:s/>,"SubType":"numeric","Unite":null <text:s text:c="2"/>,"Config_infoName":null <text:s text:c="16"/>,"Config_value":null <text:s text:c="5"/>,"Config_minValue":null,"Config_maxValue":null,"Config_tempHL":null ,"setValue":null <text:s text:c="17"/>,"Display_param_step":null <text:s text:c="2"/>,"IsHistorized":0,"IsVisible":1}</text:p>
          </table:table-cell>
          <table:table-cell table:style-name="ce15" office:value-type="string" calcext:value-type="string">
            <text:p>.</text:p>
          </table:table-cell>
          <table:table-cell table:style-name="ce14"/>
          <table:table-cell table:style-name="ce17" table:formula="of:=IF([.W36]=&quot;&quot;;&quot; &quot;;IF([.B37]&lt;&gt;&quot;&quot;;&quot;,&quot;;&quot;]&quot;))&#10;&amp;IF([.B37]&lt;&gt;&quot;&quot;;&quot;{&quot;&quot;cmd&quot;&quot;:&quot;&quot;&quot;&amp;[.B37]&amp;&quot;&quot;&quot;&quot;&amp;REPT(&quot; &quot;;20-LEN([.B37]));&quot;&quot;)" office:value-type="string" office:string-value=",{&quot;cmd&quot;:&quot;derog_mode&quot;          " calcext:value-type="string">
            <text:p>,{"cmd":"derog_mode" <text:s text:c="9"/></text:p>
          </table:table-cell>
          <table:table-cell table:style-name="ce17" table:formula="of:=&quot;,&quot;&quot;attrs&quot;&quot;:&quot;&#10;&amp;&quot;{&quot;&quot;&quot;&amp;[.B$1]&amp;&quot;&quot;&quot;:&quot;&quot;&quot;&amp;[.B37]&amp;&quot;&quot;&quot;&quot;&amp;REPT(&quot; &quot;;20-LEN([.B37]))&#10;&amp;&quot;,&quot;&quot;&quot;&amp;[.C$1]&amp;&quot;&quot;&quot;:&quot;&quot;&quot;&amp;[.C37]&amp;&quot;&quot;&quot;&quot;&amp;REPT(&quot; &quot;;35-LEN([.C37]))&#10;&amp;&quot;,&quot;&quot;&quot;&amp;[.D$1]&amp;&quot;&quot;&quot;:&quot;&amp;[.D37]&amp;REPT(&quot; &quot;;3-LEN([.D37]))&#10;&amp;&quot;,&quot;&quot;&quot;&amp;[.E$1]&amp;&quot;&quot;&quot;:&quot;&quot;&quot;&amp;[.E37]&amp;&quot;&quot;&quot;&quot;&amp;REPT(&quot; &quot;;6-LEN([.E37]))&#10;&amp;&quot;,&quot;&quot;&quot;&amp;[.F$1]&amp;&quot;&quot;&quot;:&quot;&quot;&quot;&amp;[.F37]&amp;&quot;&quot;&quot;&quot;&amp;REPT(&quot; &quot;;7-LEN([.F37]))&#10;&amp;&quot;,&quot;&quot;&quot;&amp;[.G$1]&amp;&quot;&quot;&quot;:&quot;&amp;IF([.G37]&lt;&gt;&quot;&quot;;&quot;&quot;&quot;&quot;&amp;[.G37]&amp;&quot;&quot;&quot;&quot;&amp;REPT(&quot; &quot;;5-LEN([.G37]));&quot;null&quot;&amp;REPT(&quot; &quot;;5-4+2))&#10;&amp;&quot;,&quot;&quot;&quot;&amp;[.H$1]&amp;&quot;&quot;&quot;:&quot;&amp;IF([.H37]&lt;&gt;&quot;&quot;;&quot;&quot;&quot;&quot;&amp;[.H37]&amp;&quot;&quot;&quot;&quot;&amp;REPT(&quot; &quot;;19-LEN([.H37]));&quot;null&quot;&amp;REPT(&quot; &quot;;19-4+2))&#10;&amp;&quot;,&quot;&quot;&quot;&amp;[.I$1]&amp;&quot;&quot;&quot;:&quot;&amp;IF([.I37]&lt;&gt;&quot;&quot;;&quot;&quot;&quot;&quot;&amp;[.I37]&amp;&quot;&quot;&quot;&quot;&amp;REPT(&quot; &quot;;8-LEN([.I37]));&quot;null&quot;&amp;REPT(&quot; &quot;;8-4+2))&#10;&amp;&quot;,&quot;&quot;&quot;&amp;[.J$1]&amp;&quot;&quot;&quot;:&quot;&amp;IF([.J37]&lt;&gt;&quot;&quot;;[.J37]&amp;REPT(&quot; &quot;;4-LEN([.J37]));&quot;null&quot;)&#10;&amp;&quot;,&quot;&quot;&quot;&amp;[.K$1]&amp;&quot;&quot;&quot;:&quot;&amp;IF([.K37]&lt;&gt;&quot;&quot;;[.K37]&amp;REPT(&quot; &quot;;4-LEN([.K37]));&quot;null&quot;)&#10;&amp;&quot;,&quot;&quot;&quot;&amp;[.L$1]&amp;&quot;&quot;&quot;:&quot;&amp;IF([.L37]&lt;&gt;&quot;&quot;;[.L37]&amp;REPT(&quot; &quot;;5-LEN([.L37]));&quot;null &quot;)&#10;&amp;&quot;,&quot;&quot;&quot;&amp;[.M$1]&amp;&quot;&quot;&quot;:&quot;&amp;IF([.M37]&lt;&gt;&quot;&quot;;&quot;&quot;&quot;&quot;&amp;[.M37]&amp;&quot;&quot;&quot;&quot;&amp;REPT(&quot; &quot;;20-LEN([.M37]));&quot;null&quot;&amp;REPT(&quot; &quot;;20-4+2))&#10;&amp;&quot;,&quot;&quot;&quot;&amp;[.N$1]&amp;&quot;&quot;&quot;:&quot;&amp;IF([.N37]&lt;&gt;&quot;&quot;;&quot;&quot;&quot;&quot;&amp;[.N37]&amp;&quot;&quot;&quot;&quot;&amp;REPT(&quot; &quot;;30-LEN([.N37]));&quot;null&quot;&amp;REPT(&quot; &quot;;30-4+2))&#10;&amp;&quot;,&quot;&quot;&quot;&amp;[.O$1]&amp;&quot;&quot;&quot;:&quot;&amp;[.O37]&#10;&amp;&quot;,&quot;&quot;&quot;&amp;[.P$1]&amp;&quot;&quot;&quot;:&quot;&amp;[.P37]&#10;&amp;&quot;}}&quot;" office:value-type="string" office:string-value=",&quot;attrs&quot;:{&quot;LogicalId&quot;:&quot;derog_mode&quot;          ,&quot;Name&quot;:&quot;Mode dérogation&quot;                    ,&quot;Order&quot;:60 ,&quot;Type&quot;:&quot;info&quot;  ,&quot;SubType&quot;:&quot;numeric&quot;,&quot;Unite&quot;:null   ,&quot;Config_infoName&quot;:null      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derog_mode" <text:s text:c="9"/>,"Name":"Mode dérogation" <text:s text:c="19"/>,"Order":60 ,"Type":"info" <text:s/>,"SubType":"numeric","Unite":null <text:s text:c="2"/>,"Config_infoName":null <text:s text:c="16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derog_time</text:p>
          </table:table-cell>
          <table:table-cell office:value-type="string" calcext:value-type="string">
            <text:p>Délai dérogation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Min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N38])" office:value-type="float" office:value="0" calcext:value-type="float">
            <text:p>0</text:p>
          </table:table-cell>
          <table:table-cell/>
          <table:table-cell table:style-name="ce17" table:formula="of:=&quot;&quot;&amp;IF([.T37]=&quot;&quot;;&quot; &quot;;IF([.A38]&lt;&gt;&quot;&quot;;&quot;,&quot;;&quot;}&quot;)) &amp;IF([.A38]&lt;&gt;&quot;&quot;;&quot;&quot;&quot;&quot;&amp;[.A38]&amp;&quot;&quot;&quot;&quot;&amp;REPT(&quot; &quot;;20-LEN([.A38]));&quot;&quot;)" office:value-type="string" office:string-value=",&quot;derog_time&quot;          " calcext:value-type="string">
            <text:p>,"derog_time" <text:s text:c="9"/></text:p>
          </table:table-cell>
          <table:table-cell table:style-name="ce17" table:formula="of:=&quot;:&quot; &amp;&quot;{&quot;&quot;&quot;&amp;[.B$1]&amp;&quot;&quot;&quot;:&quot;&quot;&quot;&amp;[.B38]&amp;&quot;&quot;&quot;&quot;&amp;REPT(&quot; &quot;;20-LEN([.B38])) &amp;&quot;,&quot;&quot;&quot;&amp;[.C$1]&amp;&quot;&quot;&quot;:&quot;&quot;&quot;&amp;[.C38]&amp;&quot;&quot;&quot;&quot;&amp;REPT(&quot; &quot;;35-LEN([.C38])) &amp;&quot;,&quot;&quot;&quot;&amp;[.D$1]&amp;&quot;&quot;&quot;:&quot;&amp;[.D38]&amp;REPT(&quot; &quot;;3-LEN([.D38])) &amp;&quot;,&quot;&quot;&quot;&amp;[.E$1]&amp;&quot;&quot;&quot;:&quot;&quot;&quot;&amp;[.E38]&amp;&quot;&quot;&quot;&quot;&amp;REPT(&quot; &quot;;6-LEN([.E38])) &amp;&quot;,&quot;&quot;&quot;&amp;[.F$1]&amp;&quot;&quot;&quot;:&quot;&quot;&quot;&amp;[.F38]&amp;&quot;&quot;&quot;&quot;&amp;REPT(&quot; &quot;;7-LEN([.F38])) &amp;&quot;,&quot;&quot;&quot;&amp;[.G$1]&amp;&quot;&quot;&quot;:&quot;&amp;IF([.G38]&lt;&gt;&quot;&quot;;&quot;&quot;&quot;&quot;&amp;[.G38]&amp;&quot;&quot;&quot;&quot;&amp;REPT(&quot; &quot;;5-LEN([.G38]));&quot;null&quot;&amp;REPT(&quot; &quot;;5-4+2)) &amp;&quot;,&quot;&quot;&quot;&amp;[.H$1]&amp;&quot;&quot;&quot;:&quot;&amp;IF([.H38]&lt;&gt;&quot;&quot;;&quot;&quot;&quot;&quot;&amp;[.H38]&amp;&quot;&quot;&quot;&quot;&amp;REPT(&quot; &quot;;19-LEN([.H38]));&quot;null&quot;&amp;REPT(&quot; &quot;;19-4+2)) &amp;&quot;,&quot;&quot;&quot;&amp;[.I$1]&amp;&quot;&quot;&quot;:&quot;&amp;IF([.I38]&lt;&gt;&quot;&quot;;&quot;&quot;&quot;&quot;&amp;[.I38]&amp;&quot;&quot;&quot;&quot;&amp;REPT(&quot; &quot;;8-LEN([.I38]));&quot;null&quot;&amp;REPT(&quot; &quot;;8-4+2)) &amp;&quot;,&quot;&quot;&quot;&amp;[.J$1]&amp;&quot;&quot;&quot;:&quot;&amp;IF([.J38]&lt;&gt;&quot;&quot;;[.J38]&amp;REPT(&quot; &quot;;4-LEN([.J38]));&quot;null&quot;) &amp;&quot;,&quot;&quot;&quot;&amp;[.K$1]&amp;&quot;&quot;&quot;:&quot;&amp;IF([.K38]&lt;&gt;&quot;&quot;;[.K38]&amp;REPT(&quot; &quot;;4-LEN([.K38]));&quot;null&quot;) &amp;&quot;,&quot;&quot;&quot;&amp;[.L$1]&amp;&quot;&quot;&quot;:&quot;&amp;IF([.L38]&lt;&gt;&quot;&quot;;[.L38]&amp;REPT(&quot; &quot;;5-LEN([.L38]));&quot;null &quot;) &amp;&quot;,&quot;&quot;&quot;&amp;[.M$1]&amp;&quot;&quot;&quot;:&quot;&amp;IF([.M38]&lt;&gt;&quot;&quot;;&quot;&quot;&quot;&quot;&amp;[.M38]&amp;&quot;&quot;&quot;&quot;&amp;REPT(&quot; &quot;;20-LEN([.M38]));&quot;null&quot;&amp;REPT(&quot; &quot;;20-4+2)) &amp;&quot;,&quot;&quot;&quot;&amp;[.N$1]&amp;&quot;&quot;&quot;:&quot;&amp;IF([.N38]&lt;&gt;&quot;&quot;;&quot;&quot;&amp;[.N38]&amp;&quot;&quot;&amp;REPT(&quot; &quot;;5-LEN([.N38]));&quot;null&quot;&amp;REPT(&quot; &quot;;5-4+2)) &amp;&quot;,&quot;&quot;&quot;&amp;[.O$1]&amp;&quot;&quot;&quot;:&quot;&amp;[.O38] &amp;&quot;,&quot;&quot;&quot;&amp;[.P$1]&amp;&quot;&quot;&quot;:&quot;&amp;[.P38] &amp;&quot;}&quot;" office:value-type="string" office:string-value=":{&quot;LogicalId&quot;:&quot;derog_time&quot;          ,&quot;Name&quot;:&quot;Délai dérogation&quot;                   ,&quot;Order&quot;:61 ,&quot;Type&quot;:&quot;info&quot;  ,&quot;SubType&quot;:&quot;numeric&quot;,&quot;Unite&quot;:&quot;Min&quot;  ,&quot;Config_infoName&quot;:null                 ,&quot;Config_value&quot;:null      ,&quot;Config_minValue&quot;:null,&quot;Config_maxValue&quot;:null,&quot;Config_tempHL&quot;:null ,&quot;setValue&quot;:null                  ,&quot;Display_param_step&quot;:null   ,&quot;IsHistorized&quot;:0,&quot;IsVisible&quot;:1}" calcext:value-type="string">
            <text:p>:{"LogicalId":"derog_time" <text:s text:c="9"/>,"Name":"Délai dérogation" <text:s text:c="18"/>,"Order":61 ,"Type":"info" <text:s/>,"SubType":"numeric","Unite":"Min" <text:s/>,"Config_infoName":null <text:s text:c="16"/>,"Config_value":null <text:s text:c="5"/>,"Config_minValue":null,"Config_maxValue":null,"Config_tempHL":null ,"setValue":null <text:s text:c="17"/>,"Display_param_step":null <text:s text:c="2"/>,"IsHistorized":0,"IsVisible":1}</text:p>
          </table:table-cell>
          <table:table-cell table:style-name="ce15" office:value-type="string" calcext:value-type="string">
            <text:p>.</text:p>
          </table:table-cell>
          <table:table-cell table:style-name="ce14"/>
          <table:table-cell table:style-name="ce17" table:formula="of:=IF([.W37]=&quot;&quot;;&quot; &quot;;IF([.B38]&lt;&gt;&quot;&quot;;&quot;,&quot;;&quot;]&quot;))&#10;&amp;IF([.B38]&lt;&gt;&quot;&quot;;&quot;{&quot;&quot;cmd&quot;&quot;:&quot;&quot;&quot;&amp;[.B38]&amp;&quot;&quot;&quot;&quot;&amp;REPT(&quot; &quot;;20-LEN([.B38]));&quot;&quot;)" office:value-type="string" office:string-value=",{&quot;cmd&quot;:&quot;derog_time&quot;          " calcext:value-type="string">
            <text:p>,{"cmd":"derog_time" <text:s text:c="9"/></text:p>
          </table:table-cell>
          <table:table-cell table:style-name="ce17" table:formula="of:=&quot;,&quot;&quot;attrs&quot;&quot;:&quot;&#10;&amp;&quot;{&quot;&quot;&quot;&amp;[.B$1]&amp;&quot;&quot;&quot;:&quot;&quot;&quot;&amp;[.B38]&amp;&quot;&quot;&quot;&quot;&amp;REPT(&quot; &quot;;20-LEN([.B38]))&#10;&amp;&quot;,&quot;&quot;&quot;&amp;[.C$1]&amp;&quot;&quot;&quot;:&quot;&quot;&quot;&amp;[.C38]&amp;&quot;&quot;&quot;&quot;&amp;REPT(&quot; &quot;;35-LEN([.C38]))&#10;&amp;&quot;,&quot;&quot;&quot;&amp;[.D$1]&amp;&quot;&quot;&quot;:&quot;&amp;[.D38]&amp;REPT(&quot; &quot;;3-LEN([.D38]))&#10;&amp;&quot;,&quot;&quot;&quot;&amp;[.E$1]&amp;&quot;&quot;&quot;:&quot;&quot;&quot;&amp;[.E38]&amp;&quot;&quot;&quot;&quot;&amp;REPT(&quot; &quot;;6-LEN([.E38]))&#10;&amp;&quot;,&quot;&quot;&quot;&amp;[.F$1]&amp;&quot;&quot;&quot;:&quot;&quot;&quot;&amp;[.F38]&amp;&quot;&quot;&quot;&quot;&amp;REPT(&quot; &quot;;7-LEN([.F38]))&#10;&amp;&quot;,&quot;&quot;&quot;&amp;[.G$1]&amp;&quot;&quot;&quot;:&quot;&amp;IF([.G38]&lt;&gt;&quot;&quot;;&quot;&quot;&quot;&quot;&amp;[.G38]&amp;&quot;&quot;&quot;&quot;&amp;REPT(&quot; &quot;;5-LEN([.G38]));&quot;null&quot;&amp;REPT(&quot; &quot;;5-4+2))&#10;&amp;&quot;,&quot;&quot;&quot;&amp;[.H$1]&amp;&quot;&quot;&quot;:&quot;&amp;IF([.H38]&lt;&gt;&quot;&quot;;&quot;&quot;&quot;&quot;&amp;[.H38]&amp;&quot;&quot;&quot;&quot;&amp;REPT(&quot; &quot;;19-LEN([.H38]));&quot;null&quot;&amp;REPT(&quot; &quot;;19-4+2))&#10;&amp;&quot;,&quot;&quot;&quot;&amp;[.I$1]&amp;&quot;&quot;&quot;:&quot;&amp;IF([.I38]&lt;&gt;&quot;&quot;;&quot;&quot;&quot;&quot;&amp;[.I38]&amp;&quot;&quot;&quot;&quot;&amp;REPT(&quot; &quot;;8-LEN([.I38]));&quot;null&quot;&amp;REPT(&quot; &quot;;8-4+2))&#10;&amp;&quot;,&quot;&quot;&quot;&amp;[.J$1]&amp;&quot;&quot;&quot;:&quot;&amp;IF([.J38]&lt;&gt;&quot;&quot;;[.J38]&amp;REPT(&quot; &quot;;4-LEN([.J38]));&quot;null&quot;)&#10;&amp;&quot;,&quot;&quot;&quot;&amp;[.K$1]&amp;&quot;&quot;&quot;:&quot;&amp;IF([.K38]&lt;&gt;&quot;&quot;;[.K38]&amp;REPT(&quot; &quot;;4-LEN([.K38]));&quot;null&quot;)&#10;&amp;&quot;,&quot;&quot;&quot;&amp;[.L$1]&amp;&quot;&quot;&quot;:&quot;&amp;IF([.L38]&lt;&gt;&quot;&quot;;[.L38]&amp;REPT(&quot; &quot;;5-LEN([.L38]));&quot;null &quot;)&#10;&amp;&quot;,&quot;&quot;&quot;&amp;[.M$1]&amp;&quot;&quot;&quot;:&quot;&amp;IF([.M38]&lt;&gt;&quot;&quot;;&quot;&quot;&quot;&quot;&amp;[.M38]&amp;&quot;&quot;&quot;&quot;&amp;REPT(&quot; &quot;;20-LEN([.M38]));&quot;null&quot;&amp;REPT(&quot; &quot;;20-4+2))&#10;&amp;&quot;,&quot;&quot;&quot;&amp;[.N$1]&amp;&quot;&quot;&quot;:&quot;&amp;IF([.N38]&lt;&gt;&quot;&quot;;&quot;&quot;&quot;&quot;&amp;[.N38]&amp;&quot;&quot;&quot;&quot;&amp;REPT(&quot; &quot;;30-LEN([.N38]));&quot;null&quot;&amp;REPT(&quot; &quot;;30-4+2))&#10;&amp;&quot;,&quot;&quot;&quot;&amp;[.O$1]&amp;&quot;&quot;&quot;:&quot;&amp;[.O38]&#10;&amp;&quot;,&quot;&quot;&quot;&amp;[.P$1]&amp;&quot;&quot;&quot;:&quot;&amp;[.P38]&#10;&amp;&quot;}}&quot;" office:value-type="string" office:string-value=",&quot;attrs&quot;:{&quot;LogicalId&quot;:&quot;derog_time&quot;          ,&quot;Name&quot;:&quot;Délai dérogation&quot;                   ,&quot;Order&quot;:61 ,&quot;Type&quot;:&quot;info&quot;  ,&quot;SubType&quot;:&quot;numeric&quot;,&quot;Unite&quot;:&quot;Min&quot;  ,&quot;Config_infoName&quot;:null      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derog_time" <text:s text:c="9"/>,"Name":"Délai dérogation" <text:s text:c="18"/>,"Order":61 ,"Type":"info" <text:s/>,"SubType":"numeric","Unite":"Min" <text:s/>,"Config_infoName":null <text:s text:c="16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derog_off</text:p>
          </table:table-cell>
          <table:table-cell office:value-type="string" calcext:value-type="string">
            <text:p>Derogation OFF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ther</text:p>
          </table:table-cell>
          <table:table-cell/>
          <table:table-cell office:value-type="string" calcext:value-type="string">
            <text:p>derog_mode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N39])" office:value-type="float" office:value="0" calcext:value-type="float">
            <text:p>0</text:p>
          </table:table-cell>
          <table:table-cell/>
          <table:table-cell table:style-name="ce17" table:formula="of:=&quot;&quot;&amp;IF([.T38]=&quot;&quot;;&quot; &quot;;IF([.A39]&lt;&gt;&quot;&quot;;&quot;,&quot;;&quot;}&quot;)) &amp;IF([.A39]&lt;&gt;&quot;&quot;;&quot;&quot;&quot;&quot;&amp;[.A39]&amp;&quot;&quot;&quot;&quot;&amp;REPT(&quot; &quot;;20-LEN([.A39]));&quot;&quot;)" office:value-type="string" office:string-value=",&quot;derog_off&quot;           " calcext:value-type="string">
            <text:p>,"derog_off" <text:s text:c="10"/></text:p>
          </table:table-cell>
          <table:table-cell table:style-name="ce17" table:formula="of:=&quot;:&quot; &amp;&quot;{&quot;&quot;&quot;&amp;[.B$1]&amp;&quot;&quot;&quot;:&quot;&quot;&quot;&amp;[.B39]&amp;&quot;&quot;&quot;&quot;&amp;REPT(&quot; &quot;;20-LEN([.B39])) &amp;&quot;,&quot;&quot;&quot;&amp;[.C$1]&amp;&quot;&quot;&quot;:&quot;&quot;&quot;&amp;[.C39]&amp;&quot;&quot;&quot;&quot;&amp;REPT(&quot; &quot;;35-LEN([.C39])) &amp;&quot;,&quot;&quot;&quot;&amp;[.D$1]&amp;&quot;&quot;&quot;:&quot;&amp;[.D39]&amp;REPT(&quot; &quot;;3-LEN([.D39])) &amp;&quot;,&quot;&quot;&quot;&amp;[.E$1]&amp;&quot;&quot;&quot;:&quot;&quot;&quot;&amp;[.E39]&amp;&quot;&quot;&quot;&quot;&amp;REPT(&quot; &quot;;6-LEN([.E39])) &amp;&quot;,&quot;&quot;&quot;&amp;[.F$1]&amp;&quot;&quot;&quot;:&quot;&quot;&quot;&amp;[.F39]&amp;&quot;&quot;&quot;&quot;&amp;REPT(&quot; &quot;;7-LEN([.F39])) &amp;&quot;,&quot;&quot;&quot;&amp;[.G$1]&amp;&quot;&quot;&quot;:&quot;&amp;IF([.G39]&lt;&gt;&quot;&quot;;&quot;&quot;&quot;&quot;&amp;[.G39]&amp;&quot;&quot;&quot;&quot;&amp;REPT(&quot; &quot;;5-LEN([.G39]));&quot;null&quot;&amp;REPT(&quot; &quot;;5-4+2)) &amp;&quot;,&quot;&quot;&quot;&amp;[.H$1]&amp;&quot;&quot;&quot;:&quot;&amp;IF([.H39]&lt;&gt;&quot;&quot;;&quot;&quot;&quot;&quot;&amp;[.H39]&amp;&quot;&quot;&quot;&quot;&amp;REPT(&quot; &quot;;19-LEN([.H39]));&quot;null&quot;&amp;REPT(&quot; &quot;;19-4+2)) &amp;&quot;,&quot;&quot;&quot;&amp;[.I$1]&amp;&quot;&quot;&quot;:&quot;&amp;IF([.I39]&lt;&gt;&quot;&quot;;&quot;&quot;&quot;&quot;&amp;[.I39]&amp;&quot;&quot;&quot;&quot;&amp;REPT(&quot; &quot;;8-LEN([.I39]));&quot;null&quot;&amp;REPT(&quot; &quot;;8-4+2)) &amp;&quot;,&quot;&quot;&quot;&amp;[.J$1]&amp;&quot;&quot;&quot;:&quot;&amp;IF([.J39]&lt;&gt;&quot;&quot;;[.J39]&amp;REPT(&quot; &quot;;4-LEN([.J39]));&quot;null&quot;) &amp;&quot;,&quot;&quot;&quot;&amp;[.K$1]&amp;&quot;&quot;&quot;:&quot;&amp;IF([.K39]&lt;&gt;&quot;&quot;;[.K39]&amp;REPT(&quot; &quot;;4-LEN([.K39]));&quot;null&quot;) &amp;&quot;,&quot;&quot;&quot;&amp;[.L$1]&amp;&quot;&quot;&quot;:&quot;&amp;IF([.L39]&lt;&gt;&quot;&quot;;[.L39]&amp;REPT(&quot; &quot;;5-LEN([.L39]));&quot;null &quot;) &amp;&quot;,&quot;&quot;&quot;&amp;[.M$1]&amp;&quot;&quot;&quot;:&quot;&amp;IF([.M39]&lt;&gt;&quot;&quot;;&quot;&quot;&quot;&quot;&amp;[.M39]&amp;&quot;&quot;&quot;&quot;&amp;REPT(&quot; &quot;;20-LEN([.M39]));&quot;null&quot;&amp;REPT(&quot; &quot;;20-4+2)) &amp;&quot;,&quot;&quot;&quot;&amp;[.N$1]&amp;&quot;&quot;&quot;:&quot;&amp;IF([.N39]&lt;&gt;&quot;&quot;;&quot;&quot;&amp;[.N39]&amp;&quot;&quot;&amp;REPT(&quot; &quot;;5-LEN([.N39]));&quot;null&quot;&amp;REPT(&quot; &quot;;5-4+2)) &amp;&quot;,&quot;&quot;&quot;&amp;[.O$1]&amp;&quot;&quot;&quot;:&quot;&amp;[.O39] &amp;&quot;,&quot;&quot;&quot;&amp;[.P$1]&amp;&quot;&quot;&quot;:&quot;&amp;[.P39] &amp;&quot;}&quot;" office:value-type="string" office:string-value=":{&quot;LogicalId&quot;:&quot;derog_off&quot;           ,&quot;Name&quot;:&quot;Derogation OFF&quot;                     ,&quot;Order&quot;:62 ,&quot;Type&quot;:&quot;action&quot;,&quot;SubType&quot;:&quot;other&quot;  ,&quot;Unite&quot;:null   ,&quot;Config_infoName&quot;:&quot;derog_mode&quot;         ,&quot;Config_value&quot;:null      ,&quot;Config_minValue&quot;:null,&quot;Config_maxValue&quot;:null,&quot;Config_tempHL&quot;:null ,&quot;setValue&quot;:null                  ,&quot;Display_param_step&quot;:null   ,&quot;IsHistorized&quot;:0,&quot;IsVisible&quot;:1}" calcext:value-type="string">
            <text:p>:{"LogicalId":"derog_off" <text:s text:c="10"/>,"Name":"Derogation OFF" <text:s text:c="20"/>,"Order":62 ,"Type":"action","SubType":"other" <text:s/>,"Unite":null <text:s text:c="2"/>,"Config_infoName":"derog_mode" <text:s text:c="8"/>,"Config_value":null <text:s text:c="5"/>,"Config_minValue":null,"Config_maxValue":null,"Config_tempHL":null ,"setValue":null <text:s text:c="17"/>,"Display_param_step":null <text:s text:c="2"/>,"IsHistorized":0,"IsVisible":1}</text:p>
          </table:table-cell>
          <table:table-cell table:style-name="ce15" office:value-type="string" calcext:value-type="string">
            <text:p>.</text:p>
          </table:table-cell>
          <table:table-cell table:style-name="ce14"/>
          <table:table-cell table:style-name="ce17" table:formula="of:=IF([.W38]=&quot;&quot;;&quot; &quot;;IF([.B39]&lt;&gt;&quot;&quot;;&quot;,&quot;;&quot;]&quot;))&#10;&amp;IF([.B39]&lt;&gt;&quot;&quot;;&quot;{&quot;&quot;cmd&quot;&quot;:&quot;&quot;&quot;&amp;[.B39]&amp;&quot;&quot;&quot;&quot;&amp;REPT(&quot; &quot;;20-LEN([.B39]));&quot;&quot;)" office:value-type="string" office:string-value=",{&quot;cmd&quot;:&quot;derog_off&quot;           " calcext:value-type="string">
            <text:p>,{"cmd":"derog_off" <text:s text:c="10"/></text:p>
          </table:table-cell>
          <table:table-cell table:style-name="ce17" table:formula="of:=&quot;,&quot;&quot;attrs&quot;&quot;:&quot;&#10;&amp;&quot;{&quot;&quot;&quot;&amp;[.B$1]&amp;&quot;&quot;&quot;:&quot;&quot;&quot;&amp;[.B39]&amp;&quot;&quot;&quot;&quot;&amp;REPT(&quot; &quot;;20-LEN([.B39]))&#10;&amp;&quot;,&quot;&quot;&quot;&amp;[.C$1]&amp;&quot;&quot;&quot;:&quot;&quot;&quot;&amp;[.C39]&amp;&quot;&quot;&quot;&quot;&amp;REPT(&quot; &quot;;35-LEN([.C39]))&#10;&amp;&quot;,&quot;&quot;&quot;&amp;[.D$1]&amp;&quot;&quot;&quot;:&quot;&amp;[.D39]&amp;REPT(&quot; &quot;;3-LEN([.D39]))&#10;&amp;&quot;,&quot;&quot;&quot;&amp;[.E$1]&amp;&quot;&quot;&quot;:&quot;&quot;&quot;&amp;[.E39]&amp;&quot;&quot;&quot;&quot;&amp;REPT(&quot; &quot;;6-LEN([.E39]))&#10;&amp;&quot;,&quot;&quot;&quot;&amp;[.F$1]&amp;&quot;&quot;&quot;:&quot;&quot;&quot;&amp;[.F39]&amp;&quot;&quot;&quot;&quot;&amp;REPT(&quot; &quot;;7-LEN([.F39]))&#10;&amp;&quot;,&quot;&quot;&quot;&amp;[.G$1]&amp;&quot;&quot;&quot;:&quot;&amp;IF([.G39]&lt;&gt;&quot;&quot;;&quot;&quot;&quot;&quot;&amp;[.G39]&amp;&quot;&quot;&quot;&quot;&amp;REPT(&quot; &quot;;5-LEN([.G39]));&quot;null&quot;&amp;REPT(&quot; &quot;;5-4+2))&#10;&amp;&quot;,&quot;&quot;&quot;&amp;[.H$1]&amp;&quot;&quot;&quot;:&quot;&amp;IF([.H39]&lt;&gt;&quot;&quot;;&quot;&quot;&quot;&quot;&amp;[.H39]&amp;&quot;&quot;&quot;&quot;&amp;REPT(&quot; &quot;;19-LEN([.H39]));&quot;null&quot;&amp;REPT(&quot; &quot;;19-4+2))&#10;&amp;&quot;,&quot;&quot;&quot;&amp;[.I$1]&amp;&quot;&quot;&quot;:&quot;&amp;IF([.I39]&lt;&gt;&quot;&quot;;&quot;&quot;&quot;&quot;&amp;[.I39]&amp;&quot;&quot;&quot;&quot;&amp;REPT(&quot; &quot;;8-LEN([.I39]));&quot;null&quot;&amp;REPT(&quot; &quot;;8-4+2))&#10;&amp;&quot;,&quot;&quot;&quot;&amp;[.J$1]&amp;&quot;&quot;&quot;:&quot;&amp;IF([.J39]&lt;&gt;&quot;&quot;;[.J39]&amp;REPT(&quot; &quot;;4-LEN([.J39]));&quot;null&quot;)&#10;&amp;&quot;,&quot;&quot;&quot;&amp;[.K$1]&amp;&quot;&quot;&quot;:&quot;&amp;IF([.K39]&lt;&gt;&quot;&quot;;[.K39]&amp;REPT(&quot; &quot;;4-LEN([.K39]));&quot;null&quot;)&#10;&amp;&quot;,&quot;&quot;&quot;&amp;[.L$1]&amp;&quot;&quot;&quot;:&quot;&amp;IF([.L39]&lt;&gt;&quot;&quot;;[.L39]&amp;REPT(&quot; &quot;;5-LEN([.L39]));&quot;null &quot;)&#10;&amp;&quot;,&quot;&quot;&quot;&amp;[.M$1]&amp;&quot;&quot;&quot;:&quot;&amp;IF([.M39]&lt;&gt;&quot;&quot;;&quot;&quot;&quot;&quot;&amp;[.M39]&amp;&quot;&quot;&quot;&quot;&amp;REPT(&quot; &quot;;20-LEN([.M39]));&quot;null&quot;&amp;REPT(&quot; &quot;;20-4+2))&#10;&amp;&quot;,&quot;&quot;&quot;&amp;[.N$1]&amp;&quot;&quot;&quot;:&quot;&amp;IF([.N39]&lt;&gt;&quot;&quot;;&quot;&quot;&quot;&quot;&amp;[.N39]&amp;&quot;&quot;&quot;&quot;&amp;REPT(&quot; &quot;;30-LEN([.N39]));&quot;null&quot;&amp;REPT(&quot; &quot;;30-4+2))&#10;&amp;&quot;,&quot;&quot;&quot;&amp;[.O$1]&amp;&quot;&quot;&quot;:&quot;&amp;[.O39]&#10;&amp;&quot;,&quot;&quot;&quot;&amp;[.P$1]&amp;&quot;&quot;&quot;:&quot;&amp;[.P39]&#10;&amp;&quot;}}&quot;" office:value-type="string" office:string-value=",&quot;attrs&quot;:{&quot;LogicalId&quot;:&quot;derog_off&quot;           ,&quot;Name&quot;:&quot;Derogation OFF&quot;                     ,&quot;Order&quot;:62 ,&quot;Type&quot;:&quot;action&quot;,&quot;SubType&quot;:&quot;other&quot;  ,&quot;Unite&quot;:null   ,&quot;Config_infoName&quot;:&quot;derog_mode&quot;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derog_off" <text:s text:c="10"/>,"Name":"Derogation OFF" <text:s text:c="20"/>,"Order":62 ,"Type":"action","SubType":"other" <text:s/>,"Unite":null <text:s text:c="2"/>,"Config_infoName":"derog_mode" <text:s text:c="8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derog_time_vacances</text:p>
          </table:table-cell>
          <table:table-cell office:value-type="string" calcext:value-type="string">
            <text:p>Délai dérogation Vacances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Jours</text:p>
          </table:table-cell>
          <table:table-cell table:number-columns-repeated="7"/>
          <table:table-cell table:number-columns-repeated="2" office:value-type="float" office:value="0" calcext:value-type="float">
            <text:p>0</text:p>
          </table:table-cell>
          <table:table-cell table:formula="of:=LEN([.N40])" office:value-type="float" office:value="0" calcext:value-type="float">
            <text:p>0</text:p>
          </table:table-cell>
          <table:table-cell/>
          <table:table-cell table:style-name="ce17" table:formula="of:=&quot;&quot;&amp;IF([.T39]=&quot;&quot;;&quot; &quot;;IF([.A40]&lt;&gt;&quot;&quot;;&quot;,&quot;;&quot;}&quot;)) &amp;IF([.A40]&lt;&gt;&quot;&quot;;&quot;&quot;&quot;&quot;&amp;[.A40]&amp;&quot;&quot;&quot;&quot;&amp;REPT(&quot; &quot;;20-LEN([.A40]));&quot;&quot;)" office:value-type="string" office:string-value=",&quot;derog_time_vacances&quot; " calcext:value-type="string">
            <text:p>,"derog_time_vacances" </text:p>
          </table:table-cell>
          <table:table-cell table:style-name="ce17" table:formula="of:=&quot;:&quot; &amp;&quot;{&quot;&quot;&quot;&amp;[.B$1]&amp;&quot;&quot;&quot;:&quot;&quot;&quot;&amp;[.B40]&amp;&quot;&quot;&quot;&quot;&amp;REPT(&quot; &quot;;20-LEN([.B40])) &amp;&quot;,&quot;&quot;&quot;&amp;[.C$1]&amp;&quot;&quot;&quot;:&quot;&quot;&quot;&amp;[.C40]&amp;&quot;&quot;&quot;&quot;&amp;REPT(&quot; &quot;;35-LEN([.C40])) &amp;&quot;,&quot;&quot;&quot;&amp;[.D$1]&amp;&quot;&quot;&quot;:&quot;&amp;[.D40]&amp;REPT(&quot; &quot;;3-LEN([.D40])) &amp;&quot;,&quot;&quot;&quot;&amp;[.E$1]&amp;&quot;&quot;&quot;:&quot;&quot;&quot;&amp;[.E40]&amp;&quot;&quot;&quot;&quot;&amp;REPT(&quot; &quot;;6-LEN([.E40])) &amp;&quot;,&quot;&quot;&quot;&amp;[.F$1]&amp;&quot;&quot;&quot;:&quot;&quot;&quot;&amp;[.F40]&amp;&quot;&quot;&quot;&quot;&amp;REPT(&quot; &quot;;7-LEN([.F40])) &amp;&quot;,&quot;&quot;&quot;&amp;[.G$1]&amp;&quot;&quot;&quot;:&quot;&amp;IF([.G40]&lt;&gt;&quot;&quot;;&quot;&quot;&quot;&quot;&amp;[.G40]&amp;&quot;&quot;&quot;&quot;&amp;REPT(&quot; &quot;;5-LEN([.G40]));&quot;null&quot;&amp;REPT(&quot; &quot;;5-4+2)) &amp;&quot;,&quot;&quot;&quot;&amp;[.H$1]&amp;&quot;&quot;&quot;:&quot;&amp;IF([.H40]&lt;&gt;&quot;&quot;;&quot;&quot;&quot;&quot;&amp;[.H40]&amp;&quot;&quot;&quot;&quot;&amp;REPT(&quot; &quot;;19-LEN([.H40]));&quot;null&quot;&amp;REPT(&quot; &quot;;19-4+2)) &amp;&quot;,&quot;&quot;&quot;&amp;[.I$1]&amp;&quot;&quot;&quot;:&quot;&amp;IF([.I40]&lt;&gt;&quot;&quot;;&quot;&quot;&quot;&quot;&amp;[.I40]&amp;&quot;&quot;&quot;&quot;&amp;REPT(&quot; &quot;;8-LEN([.I40]));&quot;null&quot;&amp;REPT(&quot; &quot;;8-4+2)) &amp;&quot;,&quot;&quot;&quot;&amp;[.J$1]&amp;&quot;&quot;&quot;:&quot;&amp;IF([.J40]&lt;&gt;&quot;&quot;;[.J40]&amp;REPT(&quot; &quot;;4-LEN([.J40]));&quot;null&quot;) &amp;&quot;,&quot;&quot;&quot;&amp;[.K$1]&amp;&quot;&quot;&quot;:&quot;&amp;IF([.K40]&lt;&gt;&quot;&quot;;[.K40]&amp;REPT(&quot; &quot;;4-LEN([.K40]));&quot;null&quot;) &amp;&quot;,&quot;&quot;&quot;&amp;[.L$1]&amp;&quot;&quot;&quot;:&quot;&amp;IF([.L40]&lt;&gt;&quot;&quot;;[.L40]&amp;REPT(&quot; &quot;;5-LEN([.L40]));&quot;null &quot;) &amp;&quot;,&quot;&quot;&quot;&amp;[.M$1]&amp;&quot;&quot;&quot;:&quot;&amp;IF([.M40]&lt;&gt;&quot;&quot;;&quot;&quot;&quot;&quot;&amp;[.M40]&amp;&quot;&quot;&quot;&quot;&amp;REPT(&quot; &quot;;20-LEN([.M40]));&quot;null&quot;&amp;REPT(&quot; &quot;;20-4+2)) &amp;&quot;,&quot;&quot;&quot;&amp;[.N$1]&amp;&quot;&quot;&quot;:&quot;&amp;IF([.N40]&lt;&gt;&quot;&quot;;&quot;&quot;&amp;[.N40]&amp;&quot;&quot;&amp;REPT(&quot; &quot;;5-LEN([.N40]));&quot;null&quot;&amp;REPT(&quot; &quot;;5-4+2)) &amp;&quot;,&quot;&quot;&quot;&amp;[.O$1]&amp;&quot;&quot;&quot;:&quot;&amp;[.O40] &amp;&quot;,&quot;&quot;&quot;&amp;[.P$1]&amp;&quot;&quot;&quot;:&quot;&amp;[.P40] &amp;&quot;}&quot;" office:value-type="string" office:string-value=":{&quot;LogicalId&quot;:&quot;derog_time_vacances&quot; ,&quot;Name&quot;:&quot;Délai dérogation Vacances&quot;          ,&quot;Order&quot;:63 ,&quot;Type&quot;:&quot;info&quot;  ,&quot;SubType&quot;:&quot;numeric&quot;,&quot;Unite&quot;:&quot;Jours&quot;,&quot;Config_infoName&quot;:null                 ,&quot;Config_value&quot;:null      ,&quot;Config_minValue&quot;:null,&quot;Config_maxValue&quot;:null,&quot;Config_tempHL&quot;:null ,&quot;setValue&quot;:null                  ,&quot;Display_param_step&quot;:null   ,&quot;IsHistorized&quot;:0,&quot;IsVisible&quot;:0}" calcext:value-type="string">
            <text:p>:{"LogicalId":"derog_time_vacances" ,"Name":"Délai dérogation Vacances" <text:s text:c="9"/>,"Order":63 ,"Type":"info" <text:s/>,"SubType":"numeric","Unite":"Jours","Config_infoName":null <text:s text:c="16"/>,"Config_value":null <text:s text:c="5"/>,"Config_minValue":null,"Config_maxValue":null,"Config_tempHL":null ,"setValue":null <text:s text:c="17"/>,"Display_param_step":null <text:s text:c="2"/>,"IsHistorized":0,"IsVisible":0}</text:p>
          </table:table-cell>
          <table:table-cell table:style-name="ce15" office:value-type="string" calcext:value-type="string">
            <text:p>.</text:p>
          </table:table-cell>
          <table:table-cell table:style-name="ce14"/>
          <table:table-cell table:style-name="ce17" table:formula="of:=IF([.W39]=&quot;&quot;;&quot; &quot;;IF([.B40]&lt;&gt;&quot;&quot;;&quot;,&quot;;&quot;]&quot;))&#10;&amp;IF([.B40]&lt;&gt;&quot;&quot;;&quot;{&quot;&quot;cmd&quot;&quot;:&quot;&quot;&quot;&amp;[.B40]&amp;&quot;&quot;&quot;&quot;&amp;REPT(&quot; &quot;;20-LEN([.B40]));&quot;&quot;)" office:value-type="string" office:string-value=",{&quot;cmd&quot;:&quot;derog_time_vacances&quot; " calcext:value-type="string">
            <text:p>,{"cmd":"derog_time_vacances" </text:p>
          </table:table-cell>
          <table:table-cell table:style-name="ce17" table:formula="of:=&quot;,&quot;&quot;attrs&quot;&quot;:&quot;&#10;&amp;&quot;{&quot;&quot;&quot;&amp;[.B$1]&amp;&quot;&quot;&quot;:&quot;&quot;&quot;&amp;[.B40]&amp;&quot;&quot;&quot;&quot;&amp;REPT(&quot; &quot;;20-LEN([.B40]))&#10;&amp;&quot;,&quot;&quot;&quot;&amp;[.C$1]&amp;&quot;&quot;&quot;:&quot;&quot;&quot;&amp;[.C40]&amp;&quot;&quot;&quot;&quot;&amp;REPT(&quot; &quot;;35-LEN([.C40]))&#10;&amp;&quot;,&quot;&quot;&quot;&amp;[.D$1]&amp;&quot;&quot;&quot;:&quot;&amp;[.D40]&amp;REPT(&quot; &quot;;3-LEN([.D40]))&#10;&amp;&quot;,&quot;&quot;&quot;&amp;[.E$1]&amp;&quot;&quot;&quot;:&quot;&quot;&quot;&amp;[.E40]&amp;&quot;&quot;&quot;&quot;&amp;REPT(&quot; &quot;;6-LEN([.E40]))&#10;&amp;&quot;,&quot;&quot;&quot;&amp;[.F$1]&amp;&quot;&quot;&quot;:&quot;&quot;&quot;&amp;[.F40]&amp;&quot;&quot;&quot;&quot;&amp;REPT(&quot; &quot;;7-LEN([.F40]))&#10;&amp;&quot;,&quot;&quot;&quot;&amp;[.G$1]&amp;&quot;&quot;&quot;:&quot;&amp;IF([.G40]&lt;&gt;&quot;&quot;;&quot;&quot;&quot;&quot;&amp;[.G40]&amp;&quot;&quot;&quot;&quot;&amp;REPT(&quot; &quot;;5-LEN([.G40]));&quot;null&quot;&amp;REPT(&quot; &quot;;5-4+2))&#10;&amp;&quot;,&quot;&quot;&quot;&amp;[.H$1]&amp;&quot;&quot;&quot;:&quot;&amp;IF([.H40]&lt;&gt;&quot;&quot;;&quot;&quot;&quot;&quot;&amp;[.H40]&amp;&quot;&quot;&quot;&quot;&amp;REPT(&quot; &quot;;19-LEN([.H40]));&quot;null&quot;&amp;REPT(&quot; &quot;;19-4+2))&#10;&amp;&quot;,&quot;&quot;&quot;&amp;[.I$1]&amp;&quot;&quot;&quot;:&quot;&amp;IF([.I40]&lt;&gt;&quot;&quot;;&quot;&quot;&quot;&quot;&amp;[.I40]&amp;&quot;&quot;&quot;&quot;&amp;REPT(&quot; &quot;;8-LEN([.I40]));&quot;null&quot;&amp;REPT(&quot; &quot;;8-4+2))&#10;&amp;&quot;,&quot;&quot;&quot;&amp;[.J$1]&amp;&quot;&quot;&quot;:&quot;&amp;IF([.J40]&lt;&gt;&quot;&quot;;[.J40]&amp;REPT(&quot; &quot;;4-LEN([.J40]));&quot;null&quot;)&#10;&amp;&quot;,&quot;&quot;&quot;&amp;[.K$1]&amp;&quot;&quot;&quot;:&quot;&amp;IF([.K40]&lt;&gt;&quot;&quot;;[.K40]&amp;REPT(&quot; &quot;;4-LEN([.K40]));&quot;null&quot;)&#10;&amp;&quot;,&quot;&quot;&quot;&amp;[.L$1]&amp;&quot;&quot;&quot;:&quot;&amp;IF([.L40]&lt;&gt;&quot;&quot;;[.L40]&amp;REPT(&quot; &quot;;5-LEN([.L40]));&quot;null &quot;)&#10;&amp;&quot;,&quot;&quot;&quot;&amp;[.M$1]&amp;&quot;&quot;&quot;:&quot;&amp;IF([.M40]&lt;&gt;&quot;&quot;;&quot;&quot;&quot;&quot;&amp;[.M40]&amp;&quot;&quot;&quot;&quot;&amp;REPT(&quot; &quot;;20-LEN([.M40]));&quot;null&quot;&amp;REPT(&quot; &quot;;20-4+2))&#10;&amp;&quot;,&quot;&quot;&quot;&amp;[.N$1]&amp;&quot;&quot;&quot;:&quot;&amp;IF([.N40]&lt;&gt;&quot;&quot;;&quot;&quot;&quot;&quot;&amp;[.N40]&amp;&quot;&quot;&quot;&quot;&amp;REPT(&quot; &quot;;30-LEN([.N40]));&quot;null&quot;&amp;REPT(&quot; &quot;;30-4+2))&#10;&amp;&quot;,&quot;&quot;&quot;&amp;[.O$1]&amp;&quot;&quot;&quot;:&quot;&amp;[.O40]&#10;&amp;&quot;,&quot;&quot;&quot;&amp;[.P$1]&amp;&quot;&quot;&quot;:&quot;&amp;[.P40]&#10;&amp;&quot;}}&quot;" office:value-type="string" office:string-value=",&quot;attrs&quot;:{&quot;LogicalId&quot;:&quot;derog_time_vacances&quot; ,&quot;Name&quot;:&quot;Délai dérogation Vacances&quot;          ,&quot;Order&quot;:63 ,&quot;Type&quot;:&quot;info&quot;  ,&quot;SubType&quot;:&quot;numeric&quot;,&quot;Unite&quot;:&quot;Jours&quot;,&quot;Config_infoName&quot;:null      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0}}" calcext:value-type="string">
            <text:p>,"attrs":{"LogicalId":"derog_time_vacances" ,"Name":"Délai dérogation Vacances" <text:s text:c="9"/>,"Order":63 ,"Type":"info" <text:s/>,"SubType":"numeric","Unite":"Jours","Config_infoName":null <text:s text:c="16"/>,"Config_value":null <text:s text:c="5"/>,"Config_minValue":null,"Config_maxValue":null,"Config_tempHL":null ,"setValue":null <text:s text:c="17"/>,"Display_param_step":null <text:s text:c="27"/>,"IsHistorized":0,"IsVisible":0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derog_vacances</text:p>
          </table:table-cell>
          <table:table-cell office:value-type="string" calcext:value-type="string">
            <text:p>Derogation Vacance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slider</text:p>
          </table:table-cell>
          <table:table-cell/>
          <table:table-cell office:value-type="string" calcext:value-type="string">
            <text:p>derog_time_vacances</text:p>
          </table:table-cell>
          <table:table-cell office:value-type="string" calcext:value-type="string">
            <text:p>#slider#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derog_time_vacanc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N41])" office:value-type="float" office:value="1" calcext:value-type="float">
            <text:p>1</text:p>
          </table:table-cell>
          <table:table-cell/>
          <table:table-cell table:style-name="ce17" table:formula="of:=&quot;&quot;&amp;IF([.T40]=&quot;&quot;;&quot; &quot;;IF([.A41]&lt;&gt;&quot;&quot;;&quot;,&quot;;&quot;}&quot;)) &amp;IF([.A41]&lt;&gt;&quot;&quot;;&quot;&quot;&quot;&quot;&amp;[.A41]&amp;&quot;&quot;&quot;&quot;&amp;REPT(&quot; &quot;;20-LEN([.A41]));&quot;&quot;)" office:value-type="string" office:string-value=",&quot;derog_vacances&quot;      " calcext:value-type="string">
            <text:p>,"derog_vacances" <text:s text:c="5"/></text:p>
          </table:table-cell>
          <table:table-cell table:style-name="ce17" table:formula="of:=&quot;:&quot; &amp;&quot;{&quot;&quot;&quot;&amp;[.B$1]&amp;&quot;&quot;&quot;:&quot;&quot;&quot;&amp;[.B41]&amp;&quot;&quot;&quot;&quot;&amp;REPT(&quot; &quot;;20-LEN([.B41])) &amp;&quot;,&quot;&quot;&quot;&amp;[.C$1]&amp;&quot;&quot;&quot;:&quot;&quot;&quot;&amp;[.C41]&amp;&quot;&quot;&quot;&quot;&amp;REPT(&quot; &quot;;35-LEN([.C41])) &amp;&quot;,&quot;&quot;&quot;&amp;[.D$1]&amp;&quot;&quot;&quot;:&quot;&amp;[.D41]&amp;REPT(&quot; &quot;;3-LEN([.D41])) &amp;&quot;,&quot;&quot;&quot;&amp;[.E$1]&amp;&quot;&quot;&quot;:&quot;&quot;&quot;&amp;[.E41]&amp;&quot;&quot;&quot;&quot;&amp;REPT(&quot; &quot;;6-LEN([.E41])) &amp;&quot;,&quot;&quot;&quot;&amp;[.F$1]&amp;&quot;&quot;&quot;:&quot;&quot;&quot;&amp;[.F41]&amp;&quot;&quot;&quot;&quot;&amp;REPT(&quot; &quot;;7-LEN([.F41])) &amp;&quot;,&quot;&quot;&quot;&amp;[.G$1]&amp;&quot;&quot;&quot;:&quot;&amp;IF([.G41]&lt;&gt;&quot;&quot;;&quot;&quot;&quot;&quot;&amp;[.G41]&amp;&quot;&quot;&quot;&quot;&amp;REPT(&quot; &quot;;5-LEN([.G41]));&quot;null&quot;&amp;REPT(&quot; &quot;;5-4+2)) &amp;&quot;,&quot;&quot;&quot;&amp;[.H$1]&amp;&quot;&quot;&quot;:&quot;&amp;IF([.H41]&lt;&gt;&quot;&quot;;&quot;&quot;&quot;&quot;&amp;[.H41]&amp;&quot;&quot;&quot;&quot;&amp;REPT(&quot; &quot;;19-LEN([.H41]));&quot;null&quot;&amp;REPT(&quot; &quot;;19-4+2)) &amp;&quot;,&quot;&quot;&quot;&amp;[.I$1]&amp;&quot;&quot;&quot;:&quot;&amp;IF([.I41]&lt;&gt;&quot;&quot;;&quot;&quot;&quot;&quot;&amp;[.I41]&amp;&quot;&quot;&quot;&quot;&amp;REPT(&quot; &quot;;8-LEN([.I41]));&quot;null&quot;&amp;REPT(&quot; &quot;;8-4+2)) &amp;&quot;,&quot;&quot;&quot;&amp;[.J$1]&amp;&quot;&quot;&quot;:&quot;&amp;IF([.J41]&lt;&gt;&quot;&quot;;[.J41]&amp;REPT(&quot; &quot;;4-LEN([.J41]));&quot;null&quot;) &amp;&quot;,&quot;&quot;&quot;&amp;[.K$1]&amp;&quot;&quot;&quot;:&quot;&amp;IF([.K41]&lt;&gt;&quot;&quot;;[.K41]&amp;REPT(&quot; &quot;;4-LEN([.K41]));&quot;null&quot;) &amp;&quot;,&quot;&quot;&quot;&amp;[.L$1]&amp;&quot;&quot;&quot;:&quot;&amp;IF([.L41]&lt;&gt;&quot;&quot;;[.L41]&amp;REPT(&quot; &quot;;5-LEN([.L41]));&quot;null &quot;) &amp;&quot;,&quot;&quot;&quot;&amp;[.M$1]&amp;&quot;&quot;&quot;:&quot;&amp;IF([.M41]&lt;&gt;&quot;&quot;;&quot;&quot;&quot;&quot;&amp;[.M41]&amp;&quot;&quot;&quot;&quot;&amp;REPT(&quot; &quot;;20-LEN([.M41]));&quot;null&quot;&amp;REPT(&quot; &quot;;20-4+2)) &amp;&quot;,&quot;&quot;&quot;&amp;[.N$1]&amp;&quot;&quot;&quot;:&quot;&amp;IF([.N41]&lt;&gt;&quot;&quot;;&quot;&quot;&amp;[.N41]&amp;&quot;&quot;&amp;REPT(&quot; &quot;;5-LEN([.N41]));&quot;null&quot;&amp;REPT(&quot; &quot;;5-4+2)) &amp;&quot;,&quot;&quot;&quot;&amp;[.O$1]&amp;&quot;&quot;&quot;:&quot;&amp;[.O41] &amp;&quot;,&quot;&quot;&quot;&amp;[.P$1]&amp;&quot;&quot;&quot;:&quot;&amp;[.P41] &amp;&quot;}&quot;" office:value-type="string" office:string-value=":{&quot;LogicalId&quot;:&quot;derog_vacances&quot;      ,&quot;Name&quot;:&quot;Derogation Vacances&quot;                ,&quot;Order&quot;:64 ,&quot;Type&quot;:&quot;action&quot;,&quot;SubType&quot;:&quot;slider&quot; ,&quot;Unite&quot;:null   ,&quot;Config_infoName&quot;:&quot;derog_time_vacances&quot;,&quot;Config_value&quot;:&quot;#slider#&quot;,&quot;Config_minValue&quot;:0   ,&quot;Config_maxValue&quot;:30  ,&quot;Config_tempHL&quot;:null ,&quot;setValue&quot;:&quot;derog_time_vacances&quot; ,&quot;Display_param_step&quot;:1    ,&quot;IsHistorized&quot;:0,&quot;IsVisible&quot;:1}" calcext:value-type="string">
            <text:p>:{"LogicalId":"derog_vacances" <text:s text:c="5"/>,"Name":"Derogation Vacances" <text:s text:c="15"/>,"Order":64 ,"Type":"action","SubType":"slider" ,"Unite":null <text:s text:c="2"/>,"Config_infoName":"derog_time_vacances","Config_value":"#slider#","Config_minValue":0 <text:s text:c="2"/>,"Config_maxValue":30 <text:s/>,"Config_tempHL":null ,"setValue":"derog_time_vacances" ,"Display_param_step":1 <text:s text:c="3"/>,"IsHistorized":0,"IsVisible":1}</text:p>
          </table:table-cell>
          <table:table-cell table:style-name="ce15" office:value-type="string" calcext:value-type="string">
            <text:p>.</text:p>
          </table:table-cell>
          <table:table-cell table:style-name="ce14"/>
          <table:table-cell table:style-name="ce17" table:formula="of:=IF([.W40]=&quot;&quot;;&quot; &quot;;IF([.B41]&lt;&gt;&quot;&quot;;&quot;,&quot;;&quot;]&quot;))&#10;&amp;IF([.B41]&lt;&gt;&quot;&quot;;&quot;{&quot;&quot;cmd&quot;&quot;:&quot;&quot;&quot;&amp;[.B41]&amp;&quot;&quot;&quot;&quot;&amp;REPT(&quot; &quot;;20-LEN([.B41]));&quot;&quot;)" office:value-type="string" office:string-value=",{&quot;cmd&quot;:&quot;derog_vacances&quot;      " calcext:value-type="string">
            <text:p>,{"cmd":"derog_vacances" <text:s text:c="5"/></text:p>
          </table:table-cell>
          <table:table-cell table:style-name="ce17" table:formula="of:=&quot;,&quot;&quot;attrs&quot;&quot;:&quot;&#10;&amp;&quot;{&quot;&quot;&quot;&amp;[.B$1]&amp;&quot;&quot;&quot;:&quot;&quot;&quot;&amp;[.B41]&amp;&quot;&quot;&quot;&quot;&amp;REPT(&quot; &quot;;20-LEN([.B41]))&#10;&amp;&quot;,&quot;&quot;&quot;&amp;[.C$1]&amp;&quot;&quot;&quot;:&quot;&quot;&quot;&amp;[.C41]&amp;&quot;&quot;&quot;&quot;&amp;REPT(&quot; &quot;;35-LEN([.C41]))&#10;&amp;&quot;,&quot;&quot;&quot;&amp;[.D$1]&amp;&quot;&quot;&quot;:&quot;&amp;[.D41]&amp;REPT(&quot; &quot;;3-LEN([.D41]))&#10;&amp;&quot;,&quot;&quot;&quot;&amp;[.E$1]&amp;&quot;&quot;&quot;:&quot;&quot;&quot;&amp;[.E41]&amp;&quot;&quot;&quot;&quot;&amp;REPT(&quot; &quot;;6-LEN([.E41]))&#10;&amp;&quot;,&quot;&quot;&quot;&amp;[.F$1]&amp;&quot;&quot;&quot;:&quot;&quot;&quot;&amp;[.F41]&amp;&quot;&quot;&quot;&quot;&amp;REPT(&quot; &quot;;7-LEN([.F41]))&#10;&amp;&quot;,&quot;&quot;&quot;&amp;[.G$1]&amp;&quot;&quot;&quot;:&quot;&amp;IF([.G41]&lt;&gt;&quot;&quot;;&quot;&quot;&quot;&quot;&amp;[.G41]&amp;&quot;&quot;&quot;&quot;&amp;REPT(&quot; &quot;;5-LEN([.G41]));&quot;null&quot;&amp;REPT(&quot; &quot;;5-4+2))&#10;&amp;&quot;,&quot;&quot;&quot;&amp;[.H$1]&amp;&quot;&quot;&quot;:&quot;&amp;IF([.H41]&lt;&gt;&quot;&quot;;&quot;&quot;&quot;&quot;&amp;[.H41]&amp;&quot;&quot;&quot;&quot;&amp;REPT(&quot; &quot;;19-LEN([.H41]));&quot;null&quot;&amp;REPT(&quot; &quot;;19-4+2))&#10;&amp;&quot;,&quot;&quot;&quot;&amp;[.I$1]&amp;&quot;&quot;&quot;:&quot;&amp;IF([.I41]&lt;&gt;&quot;&quot;;&quot;&quot;&quot;&quot;&amp;[.I41]&amp;&quot;&quot;&quot;&quot;&amp;REPT(&quot; &quot;;8-LEN([.I41]));&quot;null&quot;&amp;REPT(&quot; &quot;;8-4+2))&#10;&amp;&quot;,&quot;&quot;&quot;&amp;[.J$1]&amp;&quot;&quot;&quot;:&quot;&amp;IF([.J41]&lt;&gt;&quot;&quot;;[.J41]&amp;REPT(&quot; &quot;;4-LEN([.J41]));&quot;null&quot;)&#10;&amp;&quot;,&quot;&quot;&quot;&amp;[.K$1]&amp;&quot;&quot;&quot;:&quot;&amp;IF([.K41]&lt;&gt;&quot;&quot;;[.K41]&amp;REPT(&quot; &quot;;4-LEN([.K41]));&quot;null&quot;)&#10;&amp;&quot;,&quot;&quot;&quot;&amp;[.L$1]&amp;&quot;&quot;&quot;:&quot;&amp;IF([.L41]&lt;&gt;&quot;&quot;;[.L41]&amp;REPT(&quot; &quot;;5-LEN([.L41]));&quot;null &quot;)&#10;&amp;&quot;,&quot;&quot;&quot;&amp;[.M$1]&amp;&quot;&quot;&quot;:&quot;&amp;IF([.M41]&lt;&gt;&quot;&quot;;&quot;&quot;&quot;&quot;&amp;[.M41]&amp;&quot;&quot;&quot;&quot;&amp;REPT(&quot; &quot;;20-LEN([.M41]));&quot;null&quot;&amp;REPT(&quot; &quot;;20-4+2))&#10;&amp;&quot;,&quot;&quot;&quot;&amp;[.N$1]&amp;&quot;&quot;&quot;:&quot;&amp;IF([.N41]&lt;&gt;&quot;&quot;;&quot;&quot;&quot;&quot;&amp;[.N41]&amp;&quot;&quot;&quot;&quot;&amp;REPT(&quot; &quot;;30-LEN([.N41]));&quot;null&quot;&amp;REPT(&quot; &quot;;30-4+2))&#10;&amp;&quot;,&quot;&quot;&quot;&amp;[.O$1]&amp;&quot;&quot;&quot;:&quot;&amp;[.O41]&#10;&amp;&quot;,&quot;&quot;&quot;&amp;[.P$1]&amp;&quot;&quot;&quot;:&quot;&amp;[.P41]&#10;&amp;&quot;}}&quot;" office:value-type="string" office:string-value=",&quot;attrs&quot;:{&quot;LogicalId&quot;:&quot;derog_vacances&quot;      ,&quot;Name&quot;:&quot;Derogation Vacances&quot;                ,&quot;Order&quot;:64 ,&quot;Type&quot;:&quot;action&quot;,&quot;SubType&quot;:&quot;slider&quot; ,&quot;Unite&quot;:null   ,&quot;Config_infoName&quot;:&quot;derog_time_vacances&quot;,&quot;Config_value&quot;:&quot;#slider#&quot;,&quot;Config_minValue&quot;:0   ,&quot;Config_maxValue&quot;:30  ,&quot;Config_tempHL&quot;:null ,&quot;setValue&quot;:&quot;derog_time_vacances&quot; ,&quot;Display_param_step&quot;:&quot;1&quot;                             ,&quot;IsHistorized&quot;:0,&quot;IsVisible&quot;:1}}" calcext:value-type="string">
            <text:p>,"attrs":{"LogicalId":"derog_vacances" <text:s text:c="5"/>,"Name":"Derogation Vacances" <text:s text:c="15"/>,"Order":64 ,"Type":"action","SubType":"slider" ,"Unite":null <text:s text:c="2"/>,"Config_infoName":"derog_time_vacances","Config_value":"#slider#","Config_minValue":0 <text:s text:c="2"/>,"Config_maxValue":30 <text:s/>,"Config_tempHL":null ,"setValue":"derog_time_vacances" ,"Display_param_step":"1" <text:s text:c="28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derog_time_boost</text:p>
          </table:table-cell>
          <table:table-cell office:value-type="string" calcext:value-type="string">
            <text:p>Délai dérogation Boost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Min</text:p>
          </table:table-cell>
          <table:table-cell table:number-columns-repeated="7"/>
          <table:table-cell table:number-columns-repeated="2" office:value-type="float" office:value="0" calcext:value-type="float">
            <text:p>0</text:p>
          </table:table-cell>
          <table:table-cell table:formula="of:=LEN([.N42])" office:value-type="float" office:value="0" calcext:value-type="float">
            <text:p>0</text:p>
          </table:table-cell>
          <table:table-cell/>
          <table:table-cell table:style-name="ce17" table:formula="of:=&quot;&quot;&amp;IF([.T41]=&quot;&quot;;&quot; &quot;;IF([.A42]&lt;&gt;&quot;&quot;;&quot;,&quot;;&quot;}&quot;)) &amp;IF([.A42]&lt;&gt;&quot;&quot;;&quot;&quot;&quot;&quot;&amp;[.A42]&amp;&quot;&quot;&quot;&quot;&amp;REPT(&quot; &quot;;20-LEN([.A42]));&quot;&quot;)" office:value-type="string" office:string-value=",&quot;derog_time_boost&quot;    " calcext:value-type="string">
            <text:p>,"derog_time_boost" <text:s text:c="3"/></text:p>
          </table:table-cell>
          <table:table-cell table:style-name="ce17" table:formula="of:=&quot;:&quot; &amp;&quot;{&quot;&quot;&quot;&amp;[.B$1]&amp;&quot;&quot;&quot;:&quot;&quot;&quot;&amp;[.B42]&amp;&quot;&quot;&quot;&quot;&amp;REPT(&quot; &quot;;20-LEN([.B42])) &amp;&quot;,&quot;&quot;&quot;&amp;[.C$1]&amp;&quot;&quot;&quot;:&quot;&quot;&quot;&amp;[.C42]&amp;&quot;&quot;&quot;&quot;&amp;REPT(&quot; &quot;;35-LEN([.C42])) &amp;&quot;,&quot;&quot;&quot;&amp;[.D$1]&amp;&quot;&quot;&quot;:&quot;&amp;[.D42]&amp;REPT(&quot; &quot;;3-LEN([.D42])) &amp;&quot;,&quot;&quot;&quot;&amp;[.E$1]&amp;&quot;&quot;&quot;:&quot;&quot;&quot;&amp;[.E42]&amp;&quot;&quot;&quot;&quot;&amp;REPT(&quot; &quot;;6-LEN([.E42])) &amp;&quot;,&quot;&quot;&quot;&amp;[.F$1]&amp;&quot;&quot;&quot;:&quot;&quot;&quot;&amp;[.F42]&amp;&quot;&quot;&quot;&quot;&amp;REPT(&quot; &quot;;7-LEN([.F42])) &amp;&quot;,&quot;&quot;&quot;&amp;[.G$1]&amp;&quot;&quot;&quot;:&quot;&amp;IF([.G42]&lt;&gt;&quot;&quot;;&quot;&quot;&quot;&quot;&amp;[.G42]&amp;&quot;&quot;&quot;&quot;&amp;REPT(&quot; &quot;;5-LEN([.G42]));&quot;null&quot;&amp;REPT(&quot; &quot;;5-4+2)) &amp;&quot;,&quot;&quot;&quot;&amp;[.H$1]&amp;&quot;&quot;&quot;:&quot;&amp;IF([.H42]&lt;&gt;&quot;&quot;;&quot;&quot;&quot;&quot;&amp;[.H42]&amp;&quot;&quot;&quot;&quot;&amp;REPT(&quot; &quot;;19-LEN([.H42]));&quot;null&quot;&amp;REPT(&quot; &quot;;19-4+2)) &amp;&quot;,&quot;&quot;&quot;&amp;[.I$1]&amp;&quot;&quot;&quot;:&quot;&amp;IF([.I42]&lt;&gt;&quot;&quot;;&quot;&quot;&quot;&quot;&amp;[.I42]&amp;&quot;&quot;&quot;&quot;&amp;REPT(&quot; &quot;;8-LEN([.I42]));&quot;null&quot;&amp;REPT(&quot; &quot;;8-4+2)) &amp;&quot;,&quot;&quot;&quot;&amp;[.J$1]&amp;&quot;&quot;&quot;:&quot;&amp;IF([.J42]&lt;&gt;&quot;&quot;;[.J42]&amp;REPT(&quot; &quot;;4-LEN([.J42]));&quot;null&quot;) &amp;&quot;,&quot;&quot;&quot;&amp;[.K$1]&amp;&quot;&quot;&quot;:&quot;&amp;IF([.K42]&lt;&gt;&quot;&quot;;[.K42]&amp;REPT(&quot; &quot;;4-LEN([.K42]));&quot;null&quot;) &amp;&quot;,&quot;&quot;&quot;&amp;[.L$1]&amp;&quot;&quot;&quot;:&quot;&amp;IF([.L42]&lt;&gt;&quot;&quot;;[.L42]&amp;REPT(&quot; &quot;;5-LEN([.L42]));&quot;null &quot;) &amp;&quot;,&quot;&quot;&quot;&amp;[.M$1]&amp;&quot;&quot;&quot;:&quot;&amp;IF([.M42]&lt;&gt;&quot;&quot;;&quot;&quot;&quot;&quot;&amp;[.M42]&amp;&quot;&quot;&quot;&quot;&amp;REPT(&quot; &quot;;20-LEN([.M42]));&quot;null&quot;&amp;REPT(&quot; &quot;;20-4+2)) &amp;&quot;,&quot;&quot;&quot;&amp;[.N$1]&amp;&quot;&quot;&quot;:&quot;&amp;IF([.N42]&lt;&gt;&quot;&quot;;&quot;&quot;&amp;[.N42]&amp;&quot;&quot;&amp;REPT(&quot; &quot;;5-LEN([.N42]));&quot;null&quot;&amp;REPT(&quot; &quot;;5-4+2)) &amp;&quot;,&quot;&quot;&quot;&amp;[.O$1]&amp;&quot;&quot;&quot;:&quot;&amp;[.O42] &amp;&quot;,&quot;&quot;&quot;&amp;[.P$1]&amp;&quot;&quot;&quot;:&quot;&amp;[.P42] &amp;&quot;}&quot;" office:value-type="string" office:string-value=":{&quot;LogicalId&quot;:&quot;derog_time_boost&quot;    ,&quot;Name&quot;:&quot;Délai dérogation Boost&quot;             ,&quot;Order&quot;:65 ,&quot;Type&quot;:&quot;info&quot;  ,&quot;SubType&quot;:&quot;numeric&quot;,&quot;Unite&quot;:&quot;Min&quot;  ,&quot;Config_infoName&quot;:null                 ,&quot;Config_value&quot;:null      ,&quot;Config_minValue&quot;:null,&quot;Config_maxValue&quot;:null,&quot;Config_tempHL&quot;:null ,&quot;setValue&quot;:null                  ,&quot;Display_param_step&quot;:null   ,&quot;IsHistorized&quot;:0,&quot;IsVisible&quot;:0}" calcext:value-type="string">
            <text:p>:{"LogicalId":"derog_time_boost" <text:s text:c="3"/>,"Name":"Délai dérogation Boost" <text:s text:c="12"/>,"Order":65 ,"Type":"info" <text:s/>,"SubType":"numeric","Unite":"Min" <text:s/>,"Config_infoName":null <text:s text:c="16"/>,"Config_value":null <text:s text:c="5"/>,"Config_minValue":null,"Config_maxValue":null,"Config_tempHL":null ,"setValue":null <text:s text:c="17"/>,"Display_param_step":null <text:s text:c="2"/>,"IsHistorized":0,"IsVisible":0}</text:p>
          </table:table-cell>
          <table:table-cell table:style-name="ce15" office:value-type="string" calcext:value-type="string">
            <text:p>.</text:p>
          </table:table-cell>
          <table:table-cell table:style-name="ce14"/>
          <table:table-cell table:style-name="ce17" table:formula="of:=IF([.W41]=&quot;&quot;;&quot; &quot;;IF([.B42]&lt;&gt;&quot;&quot;;&quot;,&quot;;&quot;]&quot;))&#10;&amp;IF([.B42]&lt;&gt;&quot;&quot;;&quot;{&quot;&quot;cmd&quot;&quot;:&quot;&quot;&quot;&amp;[.B42]&amp;&quot;&quot;&quot;&quot;&amp;REPT(&quot; &quot;;20-LEN([.B42]));&quot;&quot;)" office:value-type="string" office:string-value=",{&quot;cmd&quot;:&quot;derog_time_boost&quot;    " calcext:value-type="string">
            <text:p>,{"cmd":"derog_time_boost" <text:s text:c="3"/></text:p>
          </table:table-cell>
          <table:table-cell table:style-name="ce17" table:formula="of:=&quot;,&quot;&quot;attrs&quot;&quot;:&quot;&#10;&amp;&quot;{&quot;&quot;&quot;&amp;[.B$1]&amp;&quot;&quot;&quot;:&quot;&quot;&quot;&amp;[.B42]&amp;&quot;&quot;&quot;&quot;&amp;REPT(&quot; &quot;;20-LEN([.B42]))&#10;&amp;&quot;,&quot;&quot;&quot;&amp;[.C$1]&amp;&quot;&quot;&quot;:&quot;&quot;&quot;&amp;[.C42]&amp;&quot;&quot;&quot;&quot;&amp;REPT(&quot; &quot;;35-LEN([.C42]))&#10;&amp;&quot;,&quot;&quot;&quot;&amp;[.D$1]&amp;&quot;&quot;&quot;:&quot;&amp;[.D42]&amp;REPT(&quot; &quot;;3-LEN([.D42]))&#10;&amp;&quot;,&quot;&quot;&quot;&amp;[.E$1]&amp;&quot;&quot;&quot;:&quot;&quot;&quot;&amp;[.E42]&amp;&quot;&quot;&quot;&quot;&amp;REPT(&quot; &quot;;6-LEN([.E42]))&#10;&amp;&quot;,&quot;&quot;&quot;&amp;[.F$1]&amp;&quot;&quot;&quot;:&quot;&quot;&quot;&amp;[.F42]&amp;&quot;&quot;&quot;&quot;&amp;REPT(&quot; &quot;;7-LEN([.F42]))&#10;&amp;&quot;,&quot;&quot;&quot;&amp;[.G$1]&amp;&quot;&quot;&quot;:&quot;&amp;IF([.G42]&lt;&gt;&quot;&quot;;&quot;&quot;&quot;&quot;&amp;[.G42]&amp;&quot;&quot;&quot;&quot;&amp;REPT(&quot; &quot;;5-LEN([.G42]));&quot;null&quot;&amp;REPT(&quot; &quot;;5-4+2))&#10;&amp;&quot;,&quot;&quot;&quot;&amp;[.H$1]&amp;&quot;&quot;&quot;:&quot;&amp;IF([.H42]&lt;&gt;&quot;&quot;;&quot;&quot;&quot;&quot;&amp;[.H42]&amp;&quot;&quot;&quot;&quot;&amp;REPT(&quot; &quot;;19-LEN([.H42]));&quot;null&quot;&amp;REPT(&quot; &quot;;19-4+2))&#10;&amp;&quot;,&quot;&quot;&quot;&amp;[.I$1]&amp;&quot;&quot;&quot;:&quot;&amp;IF([.I42]&lt;&gt;&quot;&quot;;&quot;&quot;&quot;&quot;&amp;[.I42]&amp;&quot;&quot;&quot;&quot;&amp;REPT(&quot; &quot;;8-LEN([.I42]));&quot;null&quot;&amp;REPT(&quot; &quot;;8-4+2))&#10;&amp;&quot;,&quot;&quot;&quot;&amp;[.J$1]&amp;&quot;&quot;&quot;:&quot;&amp;IF([.J42]&lt;&gt;&quot;&quot;;[.J42]&amp;REPT(&quot; &quot;;4-LEN([.J42]));&quot;null&quot;)&#10;&amp;&quot;,&quot;&quot;&quot;&amp;[.K$1]&amp;&quot;&quot;&quot;:&quot;&amp;IF([.K42]&lt;&gt;&quot;&quot;;[.K42]&amp;REPT(&quot; &quot;;4-LEN([.K42]));&quot;null&quot;)&#10;&amp;&quot;,&quot;&quot;&quot;&amp;[.L$1]&amp;&quot;&quot;&quot;:&quot;&amp;IF([.L42]&lt;&gt;&quot;&quot;;[.L42]&amp;REPT(&quot; &quot;;5-LEN([.L42]));&quot;null &quot;)&#10;&amp;&quot;,&quot;&quot;&quot;&amp;[.M$1]&amp;&quot;&quot;&quot;:&quot;&amp;IF([.M42]&lt;&gt;&quot;&quot;;&quot;&quot;&quot;&quot;&amp;[.M42]&amp;&quot;&quot;&quot;&quot;&amp;REPT(&quot; &quot;;20-LEN([.M42]));&quot;null&quot;&amp;REPT(&quot; &quot;;20-4+2))&#10;&amp;&quot;,&quot;&quot;&quot;&amp;[.N$1]&amp;&quot;&quot;&quot;:&quot;&amp;IF([.N42]&lt;&gt;&quot;&quot;;&quot;&quot;&quot;&quot;&amp;[.N42]&amp;&quot;&quot;&quot;&quot;&amp;REPT(&quot; &quot;;30-LEN([.N42]));&quot;null&quot;&amp;REPT(&quot; &quot;;30-4+2))&#10;&amp;&quot;,&quot;&quot;&quot;&amp;[.O$1]&amp;&quot;&quot;&quot;:&quot;&amp;[.O42]&#10;&amp;&quot;,&quot;&quot;&quot;&amp;[.P$1]&amp;&quot;&quot;&quot;:&quot;&amp;[.P42]&#10;&amp;&quot;}}&quot;" office:value-type="string" office:string-value=",&quot;attrs&quot;:{&quot;LogicalId&quot;:&quot;derog_time_boost&quot;    ,&quot;Name&quot;:&quot;Délai dérogation Boost&quot;             ,&quot;Order&quot;:65 ,&quot;Type&quot;:&quot;info&quot;  ,&quot;SubType&quot;:&quot;numeric&quot;,&quot;Unite&quot;:&quot;Min&quot;  ,&quot;Config_infoName&quot;:null      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0}}" calcext:value-type="string">
            <text:p>,"attrs":{"LogicalId":"derog_time_boost" <text:s text:c="3"/>,"Name":"Délai dérogation Boost" <text:s text:c="12"/>,"Order":65 ,"Type":"info" <text:s/>,"SubType":"numeric","Unite":"Min" <text:s/>,"Config_infoName":null <text:s text:c="16"/>,"Config_value":null <text:s text:c="5"/>,"Config_minValue":null,"Config_maxValue":null,"Config_tempHL":null ,"setValue":null <text:s text:c="17"/>,"Display_param_step":null <text:s text:c="27"/>,"IsHistorized":0,"IsVisible":0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derog_boost</text:p>
          </table:table-cell>
          <table:table-cell office:value-type="string" calcext:value-type="string">
            <text:p>Derogation Boost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slider</text:p>
          </table:table-cell>
          <table:table-cell/>
          <table:table-cell office:value-type="string" calcext:value-type="string">
            <text:p>derog_time_boost</text:p>
          </table:table-cell>
          <table:table-cell office:value-type="string" calcext:value-type="string">
            <text:p>#slider#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string" calcext:value-type="string">
            <text:p>derog_time_boost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N43])" office:value-type="float" office:value="2" calcext:value-type="float">
            <text:p>2</text:p>
          </table:table-cell>
          <table:table-cell/>
          <table:table-cell table:style-name="ce17" table:formula="of:=&quot;&quot;&amp;IF([.T42]=&quot;&quot;;&quot; &quot;;IF([.A43]&lt;&gt;&quot;&quot;;&quot;,&quot;;&quot;}&quot;)) &amp;IF([.A43]&lt;&gt;&quot;&quot;;&quot;&quot;&quot;&quot;&amp;[.A43]&amp;&quot;&quot;&quot;&quot;&amp;REPT(&quot; &quot;;20-LEN([.A43]));&quot;&quot;)" office:value-type="string" office:string-value=",&quot;derog_boost&quot;         " calcext:value-type="string">
            <text:p>,"derog_boost" <text:s text:c="8"/></text:p>
          </table:table-cell>
          <table:table-cell table:style-name="ce17" table:formula="of:=&quot;:&quot; &amp;&quot;{&quot;&quot;&quot;&amp;[.B$1]&amp;&quot;&quot;&quot;:&quot;&quot;&quot;&amp;[.B43]&amp;&quot;&quot;&quot;&quot;&amp;REPT(&quot; &quot;;20-LEN([.B43])) &amp;&quot;,&quot;&quot;&quot;&amp;[.C$1]&amp;&quot;&quot;&quot;:&quot;&quot;&quot;&amp;[.C43]&amp;&quot;&quot;&quot;&quot;&amp;REPT(&quot; &quot;;35-LEN([.C43])) &amp;&quot;,&quot;&quot;&quot;&amp;[.D$1]&amp;&quot;&quot;&quot;:&quot;&amp;[.D43]&amp;REPT(&quot; &quot;;3-LEN([.D43])) &amp;&quot;,&quot;&quot;&quot;&amp;[.E$1]&amp;&quot;&quot;&quot;:&quot;&quot;&quot;&amp;[.E43]&amp;&quot;&quot;&quot;&quot;&amp;REPT(&quot; &quot;;6-LEN([.E43])) &amp;&quot;,&quot;&quot;&quot;&amp;[.F$1]&amp;&quot;&quot;&quot;:&quot;&quot;&quot;&amp;[.F43]&amp;&quot;&quot;&quot;&quot;&amp;REPT(&quot; &quot;;7-LEN([.F43])) &amp;&quot;,&quot;&quot;&quot;&amp;[.G$1]&amp;&quot;&quot;&quot;:&quot;&amp;IF([.G43]&lt;&gt;&quot;&quot;;&quot;&quot;&quot;&quot;&amp;[.G43]&amp;&quot;&quot;&quot;&quot;&amp;REPT(&quot; &quot;;5-LEN([.G43]));&quot;null&quot;&amp;REPT(&quot; &quot;;5-4+2)) &amp;&quot;,&quot;&quot;&quot;&amp;[.H$1]&amp;&quot;&quot;&quot;:&quot;&amp;IF([.H43]&lt;&gt;&quot;&quot;;&quot;&quot;&quot;&quot;&amp;[.H43]&amp;&quot;&quot;&quot;&quot;&amp;REPT(&quot; &quot;;19-LEN([.H43]));&quot;null&quot;&amp;REPT(&quot; &quot;;19-4+2)) &amp;&quot;,&quot;&quot;&quot;&amp;[.I$1]&amp;&quot;&quot;&quot;:&quot;&amp;IF([.I43]&lt;&gt;&quot;&quot;;&quot;&quot;&quot;&quot;&amp;[.I43]&amp;&quot;&quot;&quot;&quot;&amp;REPT(&quot; &quot;;8-LEN([.I43]));&quot;null&quot;&amp;REPT(&quot; &quot;;8-4+2)) &amp;&quot;,&quot;&quot;&quot;&amp;[.J$1]&amp;&quot;&quot;&quot;:&quot;&amp;IF([.J43]&lt;&gt;&quot;&quot;;[.J43]&amp;REPT(&quot; &quot;;4-LEN([.J43]));&quot;null&quot;) &amp;&quot;,&quot;&quot;&quot;&amp;[.K$1]&amp;&quot;&quot;&quot;:&quot;&amp;IF([.K43]&lt;&gt;&quot;&quot;;[.K43]&amp;REPT(&quot; &quot;;4-LEN([.K43]));&quot;null&quot;) &amp;&quot;,&quot;&quot;&quot;&amp;[.L$1]&amp;&quot;&quot;&quot;:&quot;&amp;IF([.L43]&lt;&gt;&quot;&quot;;[.L43]&amp;REPT(&quot; &quot;;5-LEN([.L43]));&quot;null &quot;) &amp;&quot;,&quot;&quot;&quot;&amp;[.M$1]&amp;&quot;&quot;&quot;:&quot;&amp;IF([.M43]&lt;&gt;&quot;&quot;;&quot;&quot;&quot;&quot;&amp;[.M43]&amp;&quot;&quot;&quot;&quot;&amp;REPT(&quot; &quot;;20-LEN([.M43]));&quot;null&quot;&amp;REPT(&quot; &quot;;20-4+2)) &amp;&quot;,&quot;&quot;&quot;&amp;[.N$1]&amp;&quot;&quot;&quot;:&quot;&amp;IF([.N43]&lt;&gt;&quot;&quot;;&quot;&quot;&amp;[.N43]&amp;&quot;&quot;&amp;REPT(&quot; &quot;;5-LEN([.N43]));&quot;null&quot;&amp;REPT(&quot; &quot;;5-4+2)) &amp;&quot;,&quot;&quot;&quot;&amp;[.O$1]&amp;&quot;&quot;&quot;:&quot;&amp;[.O43] &amp;&quot;,&quot;&quot;&quot;&amp;[.P$1]&amp;&quot;&quot;&quot;:&quot;&amp;[.P43] &amp;&quot;}&quot;" office:value-type="string" office:string-value=":{&quot;LogicalId&quot;:&quot;derog_boost&quot;         ,&quot;Name&quot;:&quot;Derogation Boost&quot;                   ,&quot;Order&quot;:66 ,&quot;Type&quot;:&quot;action&quot;,&quot;SubType&quot;:&quot;slider&quot; ,&quot;Unite&quot;:null   ,&quot;Config_infoName&quot;:&quot;derog_time_boost&quot;   ,&quot;Config_value&quot;:&quot;#slider#&quot;,&quot;Config_minValue&quot;:0   ,&quot;Config_maxValue&quot;:120 ,&quot;Config_tempHL&quot;:null ,&quot;setValue&quot;:&quot;derog_time_boost&quot;    ,&quot;Display_param_step&quot;:30   ,&quot;IsHistorized&quot;:0,&quot;IsVisible&quot;:1}" calcext:value-type="string">
            <text:p>:{"LogicalId":"derog_boost" <text:s text:c="8"/>,"Name":"Derogation Boost" <text:s text:c="18"/>,"Order":66 ,"Type":"action","SubType":"slider" ,"Unite":null <text:s text:c="2"/>,"Config_infoName":"derog_time_boost" <text:s text:c="2"/>,"Config_value":"#slider#","Config_minValue":0 <text:s text:c="2"/>,"Config_maxValue":120 ,"Config_tempHL":null ,"setValue":"derog_time_boost" <text:s text:c="3"/>,"Display_param_step":30 <text:s text:c="2"/>,"IsHistorized":0,"IsVisible":1}</text:p>
          </table:table-cell>
          <table:table-cell table:style-name="ce15" office:value-type="string" calcext:value-type="string">
            <text:p>.</text:p>
          </table:table-cell>
          <table:table-cell table:style-name="ce14"/>
          <table:table-cell table:style-name="ce17" table:formula="of:=IF([.W42]=&quot;&quot;;&quot; &quot;;IF([.B43]&lt;&gt;&quot;&quot;;&quot;,&quot;;&quot;]&quot;))&#10;&amp;IF([.B43]&lt;&gt;&quot;&quot;;&quot;{&quot;&quot;cmd&quot;&quot;:&quot;&quot;&quot;&amp;[.B43]&amp;&quot;&quot;&quot;&quot;&amp;REPT(&quot; &quot;;20-LEN([.B43]));&quot;&quot;)" office:value-type="string" office:string-value=",{&quot;cmd&quot;:&quot;derog_boost&quot;         " calcext:value-type="string">
            <text:p>,{"cmd":"derog_boost" <text:s text:c="8"/></text:p>
          </table:table-cell>
          <table:table-cell table:style-name="ce17" table:formula="of:=&quot;,&quot;&quot;attrs&quot;&quot;:&quot;&#10;&amp;&quot;{&quot;&quot;&quot;&amp;[.B$1]&amp;&quot;&quot;&quot;:&quot;&quot;&quot;&amp;[.B43]&amp;&quot;&quot;&quot;&quot;&amp;REPT(&quot; &quot;;20-LEN([.B43]))&#10;&amp;&quot;,&quot;&quot;&quot;&amp;[.C$1]&amp;&quot;&quot;&quot;:&quot;&quot;&quot;&amp;[.C43]&amp;&quot;&quot;&quot;&quot;&amp;REPT(&quot; &quot;;35-LEN([.C43]))&#10;&amp;&quot;,&quot;&quot;&quot;&amp;[.D$1]&amp;&quot;&quot;&quot;:&quot;&amp;[.D43]&amp;REPT(&quot; &quot;;3-LEN([.D43]))&#10;&amp;&quot;,&quot;&quot;&quot;&amp;[.E$1]&amp;&quot;&quot;&quot;:&quot;&quot;&quot;&amp;[.E43]&amp;&quot;&quot;&quot;&quot;&amp;REPT(&quot; &quot;;6-LEN([.E43]))&#10;&amp;&quot;,&quot;&quot;&quot;&amp;[.F$1]&amp;&quot;&quot;&quot;:&quot;&quot;&quot;&amp;[.F43]&amp;&quot;&quot;&quot;&quot;&amp;REPT(&quot; &quot;;7-LEN([.F43]))&#10;&amp;&quot;,&quot;&quot;&quot;&amp;[.G$1]&amp;&quot;&quot;&quot;:&quot;&amp;IF([.G43]&lt;&gt;&quot;&quot;;&quot;&quot;&quot;&quot;&amp;[.G43]&amp;&quot;&quot;&quot;&quot;&amp;REPT(&quot; &quot;;5-LEN([.G43]));&quot;null&quot;&amp;REPT(&quot; &quot;;5-4+2))&#10;&amp;&quot;,&quot;&quot;&quot;&amp;[.H$1]&amp;&quot;&quot;&quot;:&quot;&amp;IF([.H43]&lt;&gt;&quot;&quot;;&quot;&quot;&quot;&quot;&amp;[.H43]&amp;&quot;&quot;&quot;&quot;&amp;REPT(&quot; &quot;;19-LEN([.H43]));&quot;null&quot;&amp;REPT(&quot; &quot;;19-4+2))&#10;&amp;&quot;,&quot;&quot;&quot;&amp;[.I$1]&amp;&quot;&quot;&quot;:&quot;&amp;IF([.I43]&lt;&gt;&quot;&quot;;&quot;&quot;&quot;&quot;&amp;[.I43]&amp;&quot;&quot;&quot;&quot;&amp;REPT(&quot; &quot;;8-LEN([.I43]));&quot;null&quot;&amp;REPT(&quot; &quot;;8-4+2))&#10;&amp;&quot;,&quot;&quot;&quot;&amp;[.J$1]&amp;&quot;&quot;&quot;:&quot;&amp;IF([.J43]&lt;&gt;&quot;&quot;;[.J43]&amp;REPT(&quot; &quot;;4-LEN([.J43]));&quot;null&quot;)&#10;&amp;&quot;,&quot;&quot;&quot;&amp;[.K$1]&amp;&quot;&quot;&quot;:&quot;&amp;IF([.K43]&lt;&gt;&quot;&quot;;[.K43]&amp;REPT(&quot; &quot;;4-LEN([.K43]));&quot;null&quot;)&#10;&amp;&quot;,&quot;&quot;&quot;&amp;[.L$1]&amp;&quot;&quot;&quot;:&quot;&amp;IF([.L43]&lt;&gt;&quot;&quot;;[.L43]&amp;REPT(&quot; &quot;;5-LEN([.L43]));&quot;null &quot;)&#10;&amp;&quot;,&quot;&quot;&quot;&amp;[.M$1]&amp;&quot;&quot;&quot;:&quot;&amp;IF([.M43]&lt;&gt;&quot;&quot;;&quot;&quot;&quot;&quot;&amp;[.M43]&amp;&quot;&quot;&quot;&quot;&amp;REPT(&quot; &quot;;20-LEN([.M43]));&quot;null&quot;&amp;REPT(&quot; &quot;;20-4+2))&#10;&amp;&quot;,&quot;&quot;&quot;&amp;[.N$1]&amp;&quot;&quot;&quot;:&quot;&amp;IF([.N43]&lt;&gt;&quot;&quot;;&quot;&quot;&quot;&quot;&amp;[.N43]&amp;&quot;&quot;&quot;&quot;&amp;REPT(&quot; &quot;;30-LEN([.N43]));&quot;null&quot;&amp;REPT(&quot; &quot;;30-4+2))&#10;&amp;&quot;,&quot;&quot;&quot;&amp;[.O$1]&amp;&quot;&quot;&quot;:&quot;&amp;[.O43]&#10;&amp;&quot;,&quot;&quot;&quot;&amp;[.P$1]&amp;&quot;&quot;&quot;:&quot;&amp;[.P43]&#10;&amp;&quot;}}&quot;" office:value-type="string" office:string-value=",&quot;attrs&quot;:{&quot;LogicalId&quot;:&quot;derog_boost&quot;         ,&quot;Name&quot;:&quot;Derogation Boost&quot;                   ,&quot;Order&quot;:66 ,&quot;Type&quot;:&quot;action&quot;,&quot;SubType&quot;:&quot;slider&quot; ,&quot;Unite&quot;:null   ,&quot;Config_infoName&quot;:&quot;derog_time_boost&quot;   ,&quot;Config_value&quot;:&quot;#slider#&quot;,&quot;Config_minValue&quot;:0   ,&quot;Config_maxValue&quot;:120 ,&quot;Config_tempHL&quot;:null ,&quot;setValue&quot;:&quot;derog_time_boost&quot;    ,&quot;Display_param_step&quot;:&quot;30&quot;                            ,&quot;IsHistorized&quot;:0,&quot;IsVisible&quot;:1}}" calcext:value-type="string">
            <text:p>,"attrs":{"LogicalId":"derog_boost" <text:s text:c="8"/>,"Name":"Derogation Boost" <text:s text:c="18"/>,"Order":66 ,"Type":"action","SubType":"slider" ,"Unite":null <text:s text:c="2"/>,"Config_infoName":"derog_time_boost" <text:s text:c="2"/>,"Config_value":"#slider#","Config_minValue":0 <text:s text:c="2"/>,"Config_maxValue":120 ,"Config_tempHL":null ,"setValue":"derog_time_boost" <text:s text:c="3"/>,"Display_param_step":"30"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derog_presence</text:p>
          </table:table-cell>
          <table:table-cell office:value-type="string" calcext:value-type="string">
            <text:p>Derogation Présence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ther</text:p>
          </table:table-cell>
          <table:table-cell/>
          <table:table-cell office:value-type="string" calcext:value-type="string">
            <text:p>derog_mode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N44])" office:value-type="float" office:value="0" calcext:value-type="float">
            <text:p>0</text:p>
          </table:table-cell>
          <table:table-cell/>
          <table:table-cell table:style-name="ce17" table:formula="of:=&quot;&quot;&amp;IF([.T43]=&quot;&quot;;&quot; &quot;;IF([.A44]&lt;&gt;&quot;&quot;;&quot;,&quot;;&quot;}&quot;)) &amp;IF([.A44]&lt;&gt;&quot;&quot;;&quot;&quot;&quot;&quot;&amp;[.A44]&amp;&quot;&quot;&quot;&quot;&amp;REPT(&quot; &quot;;20-LEN([.A44]));&quot;&quot;)" office:value-type="string" office:string-value=",&quot;derog_presence&quot;      " calcext:value-type="string">
            <text:p>,"derog_presence" <text:s text:c="5"/></text:p>
          </table:table-cell>
          <table:table-cell table:style-name="ce17" table:formula="of:=&quot;:&quot; &amp;&quot;{&quot;&quot;&quot;&amp;[.B$1]&amp;&quot;&quot;&quot;:&quot;&quot;&quot;&amp;[.B44]&amp;&quot;&quot;&quot;&quot;&amp;REPT(&quot; &quot;;20-LEN([.B44])) &amp;&quot;,&quot;&quot;&quot;&amp;[.C$1]&amp;&quot;&quot;&quot;:&quot;&quot;&quot;&amp;[.C44]&amp;&quot;&quot;&quot;&quot;&amp;REPT(&quot; &quot;;35-LEN([.C44])) &amp;&quot;,&quot;&quot;&quot;&amp;[.D$1]&amp;&quot;&quot;&quot;:&quot;&amp;[.D44]&amp;REPT(&quot; &quot;;3-LEN([.D44])) &amp;&quot;,&quot;&quot;&quot;&amp;[.E$1]&amp;&quot;&quot;&quot;:&quot;&quot;&quot;&amp;[.E44]&amp;&quot;&quot;&quot;&quot;&amp;REPT(&quot; &quot;;6-LEN([.E44])) &amp;&quot;,&quot;&quot;&quot;&amp;[.F$1]&amp;&quot;&quot;&quot;:&quot;&quot;&quot;&amp;[.F44]&amp;&quot;&quot;&quot;&quot;&amp;REPT(&quot; &quot;;7-LEN([.F44])) &amp;&quot;,&quot;&quot;&quot;&amp;[.G$1]&amp;&quot;&quot;&quot;:&quot;&amp;IF([.G44]&lt;&gt;&quot;&quot;;&quot;&quot;&quot;&quot;&amp;[.G44]&amp;&quot;&quot;&quot;&quot;&amp;REPT(&quot; &quot;;5-LEN([.G44]));&quot;null&quot;&amp;REPT(&quot; &quot;;5-4+2)) &amp;&quot;,&quot;&quot;&quot;&amp;[.H$1]&amp;&quot;&quot;&quot;:&quot;&amp;IF([.H44]&lt;&gt;&quot;&quot;;&quot;&quot;&quot;&quot;&amp;[.H44]&amp;&quot;&quot;&quot;&quot;&amp;REPT(&quot; &quot;;19-LEN([.H44]));&quot;null&quot;&amp;REPT(&quot; &quot;;19-4+2)) &amp;&quot;,&quot;&quot;&quot;&amp;[.I$1]&amp;&quot;&quot;&quot;:&quot;&amp;IF([.I44]&lt;&gt;&quot;&quot;;&quot;&quot;&quot;&quot;&amp;[.I44]&amp;&quot;&quot;&quot;&quot;&amp;REPT(&quot; &quot;;8-LEN([.I44]));&quot;null&quot;&amp;REPT(&quot; &quot;;8-4+2)) &amp;&quot;,&quot;&quot;&quot;&amp;[.J$1]&amp;&quot;&quot;&quot;:&quot;&amp;IF([.J44]&lt;&gt;&quot;&quot;;[.J44]&amp;REPT(&quot; &quot;;4-LEN([.J44]));&quot;null&quot;) &amp;&quot;,&quot;&quot;&quot;&amp;[.K$1]&amp;&quot;&quot;&quot;:&quot;&amp;IF([.K44]&lt;&gt;&quot;&quot;;[.K44]&amp;REPT(&quot; &quot;;4-LEN([.K44]));&quot;null&quot;) &amp;&quot;,&quot;&quot;&quot;&amp;[.L$1]&amp;&quot;&quot;&quot;:&quot;&amp;IF([.L44]&lt;&gt;&quot;&quot;;[.L44]&amp;REPT(&quot; &quot;;5-LEN([.L44]));&quot;null &quot;) &amp;&quot;,&quot;&quot;&quot;&amp;[.M$1]&amp;&quot;&quot;&quot;:&quot;&amp;IF([.M44]&lt;&gt;&quot;&quot;;&quot;&quot;&quot;&quot;&amp;[.M44]&amp;&quot;&quot;&quot;&quot;&amp;REPT(&quot; &quot;;20-LEN([.M44]));&quot;null&quot;&amp;REPT(&quot; &quot;;20-4+2)) &amp;&quot;,&quot;&quot;&quot;&amp;[.N$1]&amp;&quot;&quot;&quot;:&quot;&amp;IF([.N44]&lt;&gt;&quot;&quot;;&quot;&quot;&amp;[.N44]&amp;&quot;&quot;&amp;REPT(&quot; &quot;;5-LEN([.N44]));&quot;null&quot;&amp;REPT(&quot; &quot;;5-4+2)) &amp;&quot;,&quot;&quot;&quot;&amp;[.O$1]&amp;&quot;&quot;&quot;:&quot;&amp;[.O44] &amp;&quot;,&quot;&quot;&quot;&amp;[.P$1]&amp;&quot;&quot;&quot;:&quot;&amp;[.P44] &amp;&quot;}&quot;" office:value-type="string" office:string-value=":{&quot;LogicalId&quot;:&quot;derog_presence&quot;      ,&quot;Name&quot;:&quot;Derogation Présence&quot;                ,&quot;Order&quot;:67 ,&quot;Type&quot;:&quot;action&quot;,&quot;SubType&quot;:&quot;other&quot;  ,&quot;Unite&quot;:null   ,&quot;Config_infoName&quot;:&quot;derog_mode&quot;         ,&quot;Config_value&quot;:null      ,&quot;Config_minValue&quot;:null,&quot;Config_maxValue&quot;:null,&quot;Config_tempHL&quot;:null ,&quot;setValue&quot;:null                  ,&quot;Display_param_step&quot;:null   ,&quot;IsHistorized&quot;:0,&quot;IsVisible&quot;:1}" calcext:value-type="string">
            <text:p>:{"LogicalId":"derog_presence" <text:s text:c="5"/>,"Name":"Derogation Présence" <text:s text:c="15"/>,"Order":67 ,"Type":"action","SubType":"other" <text:s/>,"Unite":null <text:s text:c="2"/>,"Config_infoName":"derog_mode" <text:s text:c="8"/>,"Config_value":null <text:s text:c="5"/>,"Config_minValue":null,"Config_maxValue":null,"Config_tempHL":null ,"setValue":null <text:s text:c="17"/>,"Display_param_step":null <text:s text:c="2"/>,"IsHistorized":0,"IsVisible":1}</text:p>
          </table:table-cell>
          <table:table-cell table:style-name="ce15" office:value-type="string" calcext:value-type="string">
            <text:p>.</text:p>
          </table:table-cell>
          <table:table-cell table:style-name="ce14"/>
          <table:table-cell table:style-name="ce17" table:formula="of:=IF([.W43]=&quot;&quot;;&quot; &quot;;IF([.B44]&lt;&gt;&quot;&quot;;&quot;,&quot;;&quot;]&quot;))&#10;&amp;IF([.B44]&lt;&gt;&quot;&quot;;&quot;{&quot;&quot;cmd&quot;&quot;:&quot;&quot;&quot;&amp;[.B44]&amp;&quot;&quot;&quot;&quot;&amp;REPT(&quot; &quot;;20-LEN([.B44]));&quot;&quot;)" office:value-type="string" office:string-value=",{&quot;cmd&quot;:&quot;derog_presence&quot;      " calcext:value-type="string">
            <text:p>,{"cmd":"derog_presence" <text:s text:c="5"/></text:p>
          </table:table-cell>
          <table:table-cell table:style-name="ce17" table:formula="of:=&quot;,&quot;&quot;attrs&quot;&quot;:&quot;&#10;&amp;&quot;{&quot;&quot;&quot;&amp;[.B$1]&amp;&quot;&quot;&quot;:&quot;&quot;&quot;&amp;[.B44]&amp;&quot;&quot;&quot;&quot;&amp;REPT(&quot; &quot;;20-LEN([.B44]))&#10;&amp;&quot;,&quot;&quot;&quot;&amp;[.C$1]&amp;&quot;&quot;&quot;:&quot;&quot;&quot;&amp;[.C44]&amp;&quot;&quot;&quot;&quot;&amp;REPT(&quot; &quot;;35-LEN([.C44]))&#10;&amp;&quot;,&quot;&quot;&quot;&amp;[.D$1]&amp;&quot;&quot;&quot;:&quot;&amp;[.D44]&amp;REPT(&quot; &quot;;3-LEN([.D44]))&#10;&amp;&quot;,&quot;&quot;&quot;&amp;[.E$1]&amp;&quot;&quot;&quot;:&quot;&quot;&quot;&amp;[.E44]&amp;&quot;&quot;&quot;&quot;&amp;REPT(&quot; &quot;;6-LEN([.E44]))&#10;&amp;&quot;,&quot;&quot;&quot;&amp;[.F$1]&amp;&quot;&quot;&quot;:&quot;&quot;&quot;&amp;[.F44]&amp;&quot;&quot;&quot;&quot;&amp;REPT(&quot; &quot;;7-LEN([.F44]))&#10;&amp;&quot;,&quot;&quot;&quot;&amp;[.G$1]&amp;&quot;&quot;&quot;:&quot;&amp;IF([.G44]&lt;&gt;&quot;&quot;;&quot;&quot;&quot;&quot;&amp;[.G44]&amp;&quot;&quot;&quot;&quot;&amp;REPT(&quot; &quot;;5-LEN([.G44]));&quot;null&quot;&amp;REPT(&quot; &quot;;5-4+2))&#10;&amp;&quot;,&quot;&quot;&quot;&amp;[.H$1]&amp;&quot;&quot;&quot;:&quot;&amp;IF([.H44]&lt;&gt;&quot;&quot;;&quot;&quot;&quot;&quot;&amp;[.H44]&amp;&quot;&quot;&quot;&quot;&amp;REPT(&quot; &quot;;19-LEN([.H44]));&quot;null&quot;&amp;REPT(&quot; &quot;;19-4+2))&#10;&amp;&quot;,&quot;&quot;&quot;&amp;[.I$1]&amp;&quot;&quot;&quot;:&quot;&amp;IF([.I44]&lt;&gt;&quot;&quot;;&quot;&quot;&quot;&quot;&amp;[.I44]&amp;&quot;&quot;&quot;&quot;&amp;REPT(&quot; &quot;;8-LEN([.I44]));&quot;null&quot;&amp;REPT(&quot; &quot;;8-4+2))&#10;&amp;&quot;,&quot;&quot;&quot;&amp;[.J$1]&amp;&quot;&quot;&quot;:&quot;&amp;IF([.J44]&lt;&gt;&quot;&quot;;[.J44]&amp;REPT(&quot; &quot;;4-LEN([.J44]));&quot;null&quot;)&#10;&amp;&quot;,&quot;&quot;&quot;&amp;[.K$1]&amp;&quot;&quot;&quot;:&quot;&amp;IF([.K44]&lt;&gt;&quot;&quot;;[.K44]&amp;REPT(&quot; &quot;;4-LEN([.K44]));&quot;null&quot;)&#10;&amp;&quot;,&quot;&quot;&quot;&amp;[.L$1]&amp;&quot;&quot;&quot;:&quot;&amp;IF([.L44]&lt;&gt;&quot;&quot;;[.L44]&amp;REPT(&quot; &quot;;5-LEN([.L44]));&quot;null &quot;)&#10;&amp;&quot;,&quot;&quot;&quot;&amp;[.M$1]&amp;&quot;&quot;&quot;:&quot;&amp;IF([.M44]&lt;&gt;&quot;&quot;;&quot;&quot;&quot;&quot;&amp;[.M44]&amp;&quot;&quot;&quot;&quot;&amp;REPT(&quot; &quot;;20-LEN([.M44]));&quot;null&quot;&amp;REPT(&quot; &quot;;20-4+2))&#10;&amp;&quot;,&quot;&quot;&quot;&amp;[.N$1]&amp;&quot;&quot;&quot;:&quot;&amp;IF([.N44]&lt;&gt;&quot;&quot;;&quot;&quot;&quot;&quot;&amp;[.N44]&amp;&quot;&quot;&quot;&quot;&amp;REPT(&quot; &quot;;30-LEN([.N44]));&quot;null&quot;&amp;REPT(&quot; &quot;;30-4+2))&#10;&amp;&quot;,&quot;&quot;&quot;&amp;[.O$1]&amp;&quot;&quot;&quot;:&quot;&amp;[.O44]&#10;&amp;&quot;,&quot;&quot;&quot;&amp;[.P$1]&amp;&quot;&quot;&quot;:&quot;&amp;[.P44]&#10;&amp;&quot;}}&quot;" office:value-type="string" office:string-value=",&quot;attrs&quot;:{&quot;LogicalId&quot;:&quot;derog_presence&quot;      ,&quot;Name&quot;:&quot;Derogation Présence&quot;                ,&quot;Order&quot;:67 ,&quot;Type&quot;:&quot;action&quot;,&quot;SubType&quot;:&quot;other&quot;  ,&quot;Unite&quot;:null   ,&quot;Config_infoName&quot;:&quot;derog_mode&quot;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derog_presence" <text:s text:c="5"/>,"Name":"Derogation Présence" <text:s text:c="15"/>,"Order":67 ,"Type":"action","SubType":"other" <text:s/>,"Unite":null <text:s text:c="2"/>,"Config_infoName":"derog_mode" <text:s text:c="8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detect_presence</text:p>
          </table:table-cell>
          <table:table-cell office:value-type="string" calcext:value-type="string">
            <text:p>Détéction Présence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binary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N45])" office:value-type="float" office:value="0" calcext:value-type="float">
            <text:p>0</text:p>
          </table:table-cell>
          <table:table-cell/>
          <table:table-cell table:style-name="ce17" table:formula="of:=&quot;&quot;&amp;IF([.T44]=&quot;&quot;;&quot; &quot;;IF([.A45]&lt;&gt;&quot;&quot;;&quot;,&quot;;&quot;}&quot;)) &amp;IF([.A45]&lt;&gt;&quot;&quot;;&quot;&quot;&quot;&quot;&amp;[.A45]&amp;&quot;&quot;&quot;&quot;&amp;REPT(&quot; &quot;;20-LEN([.A45]));&quot;&quot;)" office:value-type="string" office:string-value=",&quot;detect_presence&quot;     " calcext:value-type="string">
            <text:p>,"detect_presence" <text:s text:c="4"/></text:p>
          </table:table-cell>
          <table:table-cell table:style-name="ce17" table:formula="of:=&quot;:&quot; &amp;&quot;{&quot;&quot;&quot;&amp;[.B$1]&amp;&quot;&quot;&quot;:&quot;&quot;&quot;&amp;[.B45]&amp;&quot;&quot;&quot;&quot;&amp;REPT(&quot; &quot;;20-LEN([.B45])) &amp;&quot;,&quot;&quot;&quot;&amp;[.C$1]&amp;&quot;&quot;&quot;:&quot;&quot;&quot;&amp;[.C45]&amp;&quot;&quot;&quot;&quot;&amp;REPT(&quot; &quot;;35-LEN([.C45])) &amp;&quot;,&quot;&quot;&quot;&amp;[.D$1]&amp;&quot;&quot;&quot;:&quot;&amp;[.D45]&amp;REPT(&quot; &quot;;3-LEN([.D45])) &amp;&quot;,&quot;&quot;&quot;&amp;[.E$1]&amp;&quot;&quot;&quot;:&quot;&quot;&quot;&amp;[.E45]&amp;&quot;&quot;&quot;&quot;&amp;REPT(&quot; &quot;;6-LEN([.E45])) &amp;&quot;,&quot;&quot;&quot;&amp;[.F$1]&amp;&quot;&quot;&quot;:&quot;&quot;&quot;&amp;[.F45]&amp;&quot;&quot;&quot;&quot;&amp;REPT(&quot; &quot;;7-LEN([.F45])) &amp;&quot;,&quot;&quot;&quot;&amp;[.G$1]&amp;&quot;&quot;&quot;:&quot;&amp;IF([.G45]&lt;&gt;&quot;&quot;;&quot;&quot;&quot;&quot;&amp;[.G45]&amp;&quot;&quot;&quot;&quot;&amp;REPT(&quot; &quot;;5-LEN([.G45]));&quot;null&quot;&amp;REPT(&quot; &quot;;5-4+2)) &amp;&quot;,&quot;&quot;&quot;&amp;[.H$1]&amp;&quot;&quot;&quot;:&quot;&amp;IF([.H45]&lt;&gt;&quot;&quot;;&quot;&quot;&quot;&quot;&amp;[.H45]&amp;&quot;&quot;&quot;&quot;&amp;REPT(&quot; &quot;;19-LEN([.H45]));&quot;null&quot;&amp;REPT(&quot; &quot;;19-4+2)) &amp;&quot;,&quot;&quot;&quot;&amp;[.I$1]&amp;&quot;&quot;&quot;:&quot;&amp;IF([.I45]&lt;&gt;&quot;&quot;;&quot;&quot;&quot;&quot;&amp;[.I45]&amp;&quot;&quot;&quot;&quot;&amp;REPT(&quot; &quot;;8-LEN([.I45]));&quot;null&quot;&amp;REPT(&quot; &quot;;8-4+2)) &amp;&quot;,&quot;&quot;&quot;&amp;[.J$1]&amp;&quot;&quot;&quot;:&quot;&amp;IF([.J45]&lt;&gt;&quot;&quot;;[.J45]&amp;REPT(&quot; &quot;;4-LEN([.J45]));&quot;null&quot;) &amp;&quot;,&quot;&quot;&quot;&amp;[.K$1]&amp;&quot;&quot;&quot;:&quot;&amp;IF([.K45]&lt;&gt;&quot;&quot;;[.K45]&amp;REPT(&quot; &quot;;4-LEN([.K45]));&quot;null&quot;) &amp;&quot;,&quot;&quot;&quot;&amp;[.L$1]&amp;&quot;&quot;&quot;:&quot;&amp;IF([.L45]&lt;&gt;&quot;&quot;;[.L45]&amp;REPT(&quot; &quot;;5-LEN([.L45]));&quot;null &quot;) &amp;&quot;,&quot;&quot;&quot;&amp;[.M$1]&amp;&quot;&quot;&quot;:&quot;&amp;IF([.M45]&lt;&gt;&quot;&quot;;&quot;&quot;&quot;&quot;&amp;[.M45]&amp;&quot;&quot;&quot;&quot;&amp;REPT(&quot; &quot;;20-LEN([.M45]));&quot;null&quot;&amp;REPT(&quot; &quot;;20-4+2)) &amp;&quot;,&quot;&quot;&quot;&amp;[.N$1]&amp;&quot;&quot;&quot;:&quot;&amp;IF([.N45]&lt;&gt;&quot;&quot;;&quot;&quot;&amp;[.N45]&amp;&quot;&quot;&amp;REPT(&quot; &quot;;5-LEN([.N45]));&quot;null&quot;&amp;REPT(&quot; &quot;;5-4+2)) &amp;&quot;,&quot;&quot;&quot;&amp;[.O$1]&amp;&quot;&quot;&quot;:&quot;&amp;[.O45] &amp;&quot;,&quot;&quot;&quot;&amp;[.P$1]&amp;&quot;&quot;&quot;:&quot;&amp;[.P45] &amp;&quot;}&quot;" office:value-type="string" office:string-value=":{&quot;LogicalId&quot;:&quot;detect_presence&quot;     ,&quot;Name&quot;:&quot;Détéction Présence&quot;                 ,&quot;Order&quot;:68 ,&quot;Type&quot;:&quot;info&quot;  ,&quot;SubType&quot;:&quot;binary&quot; ,&quot;Unite&quot;:null   ,&quot;Config_infoName&quot;:null                 ,&quot;Config_value&quot;:null      ,&quot;Config_minValue&quot;:null,&quot;Config_maxValue&quot;:null,&quot;Config_tempHL&quot;:null ,&quot;setValue&quot;:null                  ,&quot;Display_param_step&quot;:null   ,&quot;IsHistorized&quot;:0,&quot;IsVisible&quot;:1}" calcext:value-type="string">
            <text:p>:{"LogicalId":"detect_presence" <text:s text:c="4"/>,"Name":"Détéction Présence" <text:s text:c="16"/>,"Order":68 ,"Type":"info" <text:s/>,"SubType":"binary" ,"Unite":null <text:s text:c="2"/>,"Config_infoName":null <text:s text:c="16"/>,"Config_value":null <text:s text:c="5"/>,"Config_minValue":null,"Config_maxValue":null,"Config_tempHL":null ,"setValue":null <text:s text:c="17"/>,"Display_param_step":null <text:s text:c="2"/>,"IsHistorized":0,"IsVisible":1}</text:p>
          </table:table-cell>
          <table:table-cell table:style-name="ce15" office:value-type="string" calcext:value-type="string">
            <text:p>.</text:p>
          </table:table-cell>
          <table:table-cell table:style-name="ce14"/>
          <table:table-cell table:style-name="ce17" table:formula="of:=IF([.W44]=&quot;&quot;;&quot; &quot;;IF([.B45]&lt;&gt;&quot;&quot;;&quot;,&quot;;&quot;]&quot;))&#10;&amp;IF([.B45]&lt;&gt;&quot;&quot;;&quot;{&quot;&quot;cmd&quot;&quot;:&quot;&quot;&quot;&amp;[.B45]&amp;&quot;&quot;&quot;&quot;&amp;REPT(&quot; &quot;;20-LEN([.B45]));&quot;&quot;)" office:value-type="string" office:string-value=",{&quot;cmd&quot;:&quot;detect_presence&quot;     " calcext:value-type="string">
            <text:p>,{"cmd":"detect_presence" <text:s text:c="4"/></text:p>
          </table:table-cell>
          <table:table-cell table:style-name="ce17" table:formula="of:=&quot;,&quot;&quot;attrs&quot;&quot;:&quot;&#10;&amp;&quot;{&quot;&quot;&quot;&amp;[.B$1]&amp;&quot;&quot;&quot;:&quot;&quot;&quot;&amp;[.B45]&amp;&quot;&quot;&quot;&quot;&amp;REPT(&quot; &quot;;20-LEN([.B45]))&#10;&amp;&quot;,&quot;&quot;&quot;&amp;[.C$1]&amp;&quot;&quot;&quot;:&quot;&quot;&quot;&amp;[.C45]&amp;&quot;&quot;&quot;&quot;&amp;REPT(&quot; &quot;;35-LEN([.C45]))&#10;&amp;&quot;,&quot;&quot;&quot;&amp;[.D$1]&amp;&quot;&quot;&quot;:&quot;&amp;[.D45]&amp;REPT(&quot; &quot;;3-LEN([.D45]))&#10;&amp;&quot;,&quot;&quot;&quot;&amp;[.E$1]&amp;&quot;&quot;&quot;:&quot;&quot;&quot;&amp;[.E45]&amp;&quot;&quot;&quot;&quot;&amp;REPT(&quot; &quot;;6-LEN([.E45]))&#10;&amp;&quot;,&quot;&quot;&quot;&amp;[.F$1]&amp;&quot;&quot;&quot;:&quot;&quot;&quot;&amp;[.F45]&amp;&quot;&quot;&quot;&quot;&amp;REPT(&quot; &quot;;7-LEN([.F45]))&#10;&amp;&quot;,&quot;&quot;&quot;&amp;[.G$1]&amp;&quot;&quot;&quot;:&quot;&amp;IF([.G45]&lt;&gt;&quot;&quot;;&quot;&quot;&quot;&quot;&amp;[.G45]&amp;&quot;&quot;&quot;&quot;&amp;REPT(&quot; &quot;;5-LEN([.G45]));&quot;null&quot;&amp;REPT(&quot; &quot;;5-4+2))&#10;&amp;&quot;,&quot;&quot;&quot;&amp;[.H$1]&amp;&quot;&quot;&quot;:&quot;&amp;IF([.H45]&lt;&gt;&quot;&quot;;&quot;&quot;&quot;&quot;&amp;[.H45]&amp;&quot;&quot;&quot;&quot;&amp;REPT(&quot; &quot;;19-LEN([.H45]));&quot;null&quot;&amp;REPT(&quot; &quot;;19-4+2))&#10;&amp;&quot;,&quot;&quot;&quot;&amp;[.I$1]&amp;&quot;&quot;&quot;:&quot;&amp;IF([.I45]&lt;&gt;&quot;&quot;;&quot;&quot;&quot;&quot;&amp;[.I45]&amp;&quot;&quot;&quot;&quot;&amp;REPT(&quot; &quot;;8-LEN([.I45]));&quot;null&quot;&amp;REPT(&quot; &quot;;8-4+2))&#10;&amp;&quot;,&quot;&quot;&quot;&amp;[.J$1]&amp;&quot;&quot;&quot;:&quot;&amp;IF([.J45]&lt;&gt;&quot;&quot;;[.J45]&amp;REPT(&quot; &quot;;4-LEN([.J45]));&quot;null&quot;)&#10;&amp;&quot;,&quot;&quot;&quot;&amp;[.K$1]&amp;&quot;&quot;&quot;:&quot;&amp;IF([.K45]&lt;&gt;&quot;&quot;;[.K45]&amp;REPT(&quot; &quot;;4-LEN([.K45]));&quot;null&quot;)&#10;&amp;&quot;,&quot;&quot;&quot;&amp;[.L$1]&amp;&quot;&quot;&quot;:&quot;&amp;IF([.L45]&lt;&gt;&quot;&quot;;[.L45]&amp;REPT(&quot; &quot;;5-LEN([.L45]));&quot;null &quot;)&#10;&amp;&quot;,&quot;&quot;&quot;&amp;[.M$1]&amp;&quot;&quot;&quot;:&quot;&amp;IF([.M45]&lt;&gt;&quot;&quot;;&quot;&quot;&quot;&quot;&amp;[.M45]&amp;&quot;&quot;&quot;&quot;&amp;REPT(&quot; &quot;;20-LEN([.M45]));&quot;null&quot;&amp;REPT(&quot; &quot;;20-4+2))&#10;&amp;&quot;,&quot;&quot;&quot;&amp;[.N$1]&amp;&quot;&quot;&quot;:&quot;&amp;IF([.N45]&lt;&gt;&quot;&quot;;&quot;&quot;&quot;&quot;&amp;[.N45]&amp;&quot;&quot;&quot;&quot;&amp;REPT(&quot; &quot;;30-LEN([.N45]));&quot;null&quot;&amp;REPT(&quot; &quot;;30-4+2))&#10;&amp;&quot;,&quot;&quot;&quot;&amp;[.O$1]&amp;&quot;&quot;&quot;:&quot;&amp;[.O45]&#10;&amp;&quot;,&quot;&quot;&quot;&amp;[.P$1]&amp;&quot;&quot;&quot;:&quot;&amp;[.P45]&#10;&amp;&quot;}}&quot;" office:value-type="string" office:string-value=",&quot;attrs&quot;:{&quot;LogicalId&quot;:&quot;detect_presence&quot;     ,&quot;Name&quot;:&quot;Détéction Présence&quot;                 ,&quot;Order&quot;:68 ,&quot;Type&quot;:&quot;info&quot;  ,&quot;SubType&quot;:&quot;binary&quot; ,&quot;Unite&quot;:null   ,&quot;Config_infoName&quot;:null      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detect_presence" <text:s text:c="4"/>,"Name":"Détéction Présence" <text:s text:c="16"/>,"Order":68 ,"Type":"info" <text:s/>,"SubType":"binary" ,"Unite":null <text:s text:c="2"/>,"Config_infoName":null <text:s text:c="16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ur_power</text:p>
          </table:table-cell>
          <table:table-cell office:value-type="string" calcext:value-type="string">
            <text:p>Puissance consommée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W</text:p>
          </table:table-cell>
          <table:table-cell table:number-columns-repeated="7"/>
          <table:table-cell table:number-columns-repeated="2" office:value-type="float" office:value="0" calcext:value-type="float">
            <text:p>0</text:p>
          </table:table-cell>
          <table:table-cell table:formula="of:=LEN([.N46])" office:value-type="float" office:value="0" calcext:value-type="float">
            <text:p>0</text:p>
          </table:table-cell>
          <table:table-cell/>
          <table:table-cell table:style-name="ce17" table:formula="of:=&quot;&quot;&amp;IF([.T45]=&quot;&quot;;&quot; &quot;;IF([.A46]&lt;&gt;&quot;&quot;;&quot;,&quot;;&quot;}&quot;)) &amp;IF([.A46]&lt;&gt;&quot;&quot;;&quot;&quot;&quot;&quot;&amp;[.A46]&amp;&quot;&quot;&quot;&quot;&amp;REPT(&quot; &quot;;20-LEN([.A46]));&quot;&quot;)" office:value-type="string" office:string-value=",&quot;cur_power&quot;           " calcext:value-type="string">
            <text:p>,"cur_power" <text:s text:c="10"/></text:p>
          </table:table-cell>
          <table:table-cell table:style-name="ce17" table:formula="of:=&quot;:&quot; &amp;&quot;{&quot;&quot;&quot;&amp;[.B$1]&amp;&quot;&quot;&quot;:&quot;&quot;&quot;&amp;[.B46]&amp;&quot;&quot;&quot;&quot;&amp;REPT(&quot; &quot;;20-LEN([.B46])) &amp;&quot;,&quot;&quot;&quot;&amp;[.C$1]&amp;&quot;&quot;&quot;:&quot;&quot;&quot;&amp;[.C46]&amp;&quot;&quot;&quot;&quot;&amp;REPT(&quot; &quot;;35-LEN([.C46])) &amp;&quot;,&quot;&quot;&quot;&amp;[.D$1]&amp;&quot;&quot;&quot;:&quot;&amp;[.D46]&amp;REPT(&quot; &quot;;3-LEN([.D46])) &amp;&quot;,&quot;&quot;&quot;&amp;[.E$1]&amp;&quot;&quot;&quot;:&quot;&quot;&quot;&amp;[.E46]&amp;&quot;&quot;&quot;&quot;&amp;REPT(&quot; &quot;;6-LEN([.E46])) &amp;&quot;,&quot;&quot;&quot;&amp;[.F$1]&amp;&quot;&quot;&quot;:&quot;&quot;&quot;&amp;[.F46]&amp;&quot;&quot;&quot;&quot;&amp;REPT(&quot; &quot;;7-LEN([.F46])) &amp;&quot;,&quot;&quot;&quot;&amp;[.G$1]&amp;&quot;&quot;&quot;:&quot;&amp;IF([.G46]&lt;&gt;&quot;&quot;;&quot;&quot;&quot;&quot;&amp;[.G46]&amp;&quot;&quot;&quot;&quot;&amp;REPT(&quot; &quot;;5-LEN([.G46]));&quot;null&quot;&amp;REPT(&quot; &quot;;5-4+2)) &amp;&quot;,&quot;&quot;&quot;&amp;[.H$1]&amp;&quot;&quot;&quot;:&quot;&amp;IF([.H46]&lt;&gt;&quot;&quot;;&quot;&quot;&quot;&quot;&amp;[.H46]&amp;&quot;&quot;&quot;&quot;&amp;REPT(&quot; &quot;;19-LEN([.H46]));&quot;null&quot;&amp;REPT(&quot; &quot;;19-4+2)) &amp;&quot;,&quot;&quot;&quot;&amp;[.I$1]&amp;&quot;&quot;&quot;:&quot;&amp;IF([.I46]&lt;&gt;&quot;&quot;;&quot;&quot;&quot;&quot;&amp;[.I46]&amp;&quot;&quot;&quot;&quot;&amp;REPT(&quot; &quot;;8-LEN([.I46]));&quot;null&quot;&amp;REPT(&quot; &quot;;8-4+2)) &amp;&quot;,&quot;&quot;&quot;&amp;[.J$1]&amp;&quot;&quot;&quot;:&quot;&amp;IF([.J46]&lt;&gt;&quot;&quot;;[.J46]&amp;REPT(&quot; &quot;;4-LEN([.J46]));&quot;null&quot;) &amp;&quot;,&quot;&quot;&quot;&amp;[.K$1]&amp;&quot;&quot;&quot;:&quot;&amp;IF([.K46]&lt;&gt;&quot;&quot;;[.K46]&amp;REPT(&quot; &quot;;4-LEN([.K46]));&quot;null&quot;) &amp;&quot;,&quot;&quot;&quot;&amp;[.L$1]&amp;&quot;&quot;&quot;:&quot;&amp;IF([.L46]&lt;&gt;&quot;&quot;;[.L46]&amp;REPT(&quot; &quot;;5-LEN([.L46]));&quot;null &quot;) &amp;&quot;,&quot;&quot;&quot;&amp;[.M$1]&amp;&quot;&quot;&quot;:&quot;&amp;IF([.M46]&lt;&gt;&quot;&quot;;&quot;&quot;&quot;&quot;&amp;[.M46]&amp;&quot;&quot;&quot;&quot;&amp;REPT(&quot; &quot;;20-LEN([.M46]));&quot;null&quot;&amp;REPT(&quot; &quot;;20-4+2)) &amp;&quot;,&quot;&quot;&quot;&amp;[.N$1]&amp;&quot;&quot;&quot;:&quot;&amp;IF([.N46]&lt;&gt;&quot;&quot;;&quot;&quot;&amp;[.N46]&amp;&quot;&quot;&amp;REPT(&quot; &quot;;5-LEN([.N46]));&quot;null&quot;&amp;REPT(&quot; &quot;;5-4+2)) &amp;&quot;,&quot;&quot;&quot;&amp;[.O$1]&amp;&quot;&quot;&quot;:&quot;&amp;[.O46] &amp;&quot;,&quot;&quot;&quot;&amp;[.P$1]&amp;&quot;&quot;&quot;:&quot;&amp;[.P46] &amp;&quot;}&quot;" office:value-type="string" office:string-value=":{&quot;LogicalId&quot;:&quot;cur_power&quot;           ,&quot;Name&quot;:&quot;Puissance consommée&quot;                ,&quot;Order&quot;:80 ,&quot;Type&quot;:&quot;info&quot;  ,&quot;SubType&quot;:&quot;numeric&quot;,&quot;Unite&quot;:&quot;W&quot;    ,&quot;Config_infoName&quot;:null                 ,&quot;Config_value&quot;:null      ,&quot;Config_minValue&quot;:null,&quot;Config_maxValue&quot;:null,&quot;Config_tempHL&quot;:null ,&quot;setValue&quot;:null                  ,&quot;Display_param_step&quot;:null   ,&quot;IsHistorized&quot;:0,&quot;IsVisible&quot;:0}" calcext:value-type="string">
            <text:p>:{"LogicalId":"cur_power" <text:s text:c="10"/>,"Name":"Puissance consommée" <text:s text:c="15"/>,"Order":80 ,"Type":"info" <text:s/>,"SubType":"numeric","Unite":"W" <text:s text:c="3"/>,"Config_infoName":null <text:s text:c="16"/>,"Config_value":null <text:s text:c="5"/>,"Config_minValue":null,"Config_maxValue":null,"Config_tempHL":null ,"setValue":null <text:s text:c="17"/>,"Display_param_step":null <text:s text:c="2"/>,"IsHistorized":0,"IsVisible":0}</text:p>
          </table:table-cell>
          <table:table-cell table:style-name="ce15" office:value-type="string" calcext:value-type="string">
            <text:p>.</text:p>
          </table:table-cell>
          <table:table-cell table:style-name="ce14"/>
          <table:table-cell table:style-name="ce17" table:formula="of:=IF([.W45]=&quot;&quot;;&quot; &quot;;IF([.B46]&lt;&gt;&quot;&quot;;&quot;,&quot;;&quot;]&quot;))&#10;&amp;IF([.B46]&lt;&gt;&quot;&quot;;&quot;{&quot;&quot;cmd&quot;&quot;:&quot;&quot;&quot;&amp;[.B46]&amp;&quot;&quot;&quot;&quot;&amp;REPT(&quot; &quot;;20-LEN([.B46]));&quot;&quot;)" office:value-type="string" office:string-value=",{&quot;cmd&quot;:&quot;cur_power&quot;           " calcext:value-type="string">
            <text:p>,{"cmd":"cur_power" <text:s text:c="10"/></text:p>
          </table:table-cell>
          <table:table-cell table:style-name="ce17" table:formula="of:=&quot;,&quot;&quot;attrs&quot;&quot;:&quot;&#10;&amp;&quot;{&quot;&quot;&quot;&amp;[.B$1]&amp;&quot;&quot;&quot;:&quot;&quot;&quot;&amp;[.B46]&amp;&quot;&quot;&quot;&quot;&amp;REPT(&quot; &quot;;20-LEN([.B46]))&#10;&amp;&quot;,&quot;&quot;&quot;&amp;[.C$1]&amp;&quot;&quot;&quot;:&quot;&quot;&quot;&amp;[.C46]&amp;&quot;&quot;&quot;&quot;&amp;REPT(&quot; &quot;;35-LEN([.C46]))&#10;&amp;&quot;,&quot;&quot;&quot;&amp;[.D$1]&amp;&quot;&quot;&quot;:&quot;&amp;[.D46]&amp;REPT(&quot; &quot;;3-LEN([.D46]))&#10;&amp;&quot;,&quot;&quot;&quot;&amp;[.E$1]&amp;&quot;&quot;&quot;:&quot;&quot;&quot;&amp;[.E46]&amp;&quot;&quot;&quot;&quot;&amp;REPT(&quot; &quot;;6-LEN([.E46]))&#10;&amp;&quot;,&quot;&quot;&quot;&amp;[.F$1]&amp;&quot;&quot;&quot;:&quot;&quot;&quot;&amp;[.F46]&amp;&quot;&quot;&quot;&quot;&amp;REPT(&quot; &quot;;7-LEN([.F46]))&#10;&amp;&quot;,&quot;&quot;&quot;&amp;[.G$1]&amp;&quot;&quot;&quot;:&quot;&amp;IF([.G46]&lt;&gt;&quot;&quot;;&quot;&quot;&quot;&quot;&amp;[.G46]&amp;&quot;&quot;&quot;&quot;&amp;REPT(&quot; &quot;;5-LEN([.G46]));&quot;null&quot;&amp;REPT(&quot; &quot;;5-4+2))&#10;&amp;&quot;,&quot;&quot;&quot;&amp;[.H$1]&amp;&quot;&quot;&quot;:&quot;&amp;IF([.H46]&lt;&gt;&quot;&quot;;&quot;&quot;&quot;&quot;&amp;[.H46]&amp;&quot;&quot;&quot;&quot;&amp;REPT(&quot; &quot;;19-LEN([.H46]));&quot;null&quot;&amp;REPT(&quot; &quot;;19-4+2))&#10;&amp;&quot;,&quot;&quot;&quot;&amp;[.I$1]&amp;&quot;&quot;&quot;:&quot;&amp;IF([.I46]&lt;&gt;&quot;&quot;;&quot;&quot;&quot;&quot;&amp;[.I46]&amp;&quot;&quot;&quot;&quot;&amp;REPT(&quot; &quot;;8-LEN([.I46]));&quot;null&quot;&amp;REPT(&quot; &quot;;8-4+2))&#10;&amp;&quot;,&quot;&quot;&quot;&amp;[.J$1]&amp;&quot;&quot;&quot;:&quot;&amp;IF([.J46]&lt;&gt;&quot;&quot;;[.J46]&amp;REPT(&quot; &quot;;4-LEN([.J46]));&quot;null&quot;)&#10;&amp;&quot;,&quot;&quot;&quot;&amp;[.K$1]&amp;&quot;&quot;&quot;:&quot;&amp;IF([.K46]&lt;&gt;&quot;&quot;;[.K46]&amp;REPT(&quot; &quot;;4-LEN([.K46]));&quot;null&quot;)&#10;&amp;&quot;,&quot;&quot;&quot;&amp;[.L$1]&amp;&quot;&quot;&quot;:&quot;&amp;IF([.L46]&lt;&gt;&quot;&quot;;[.L46]&amp;REPT(&quot; &quot;;5-LEN([.L46]));&quot;null &quot;)&#10;&amp;&quot;,&quot;&quot;&quot;&amp;[.M$1]&amp;&quot;&quot;&quot;:&quot;&amp;IF([.M46]&lt;&gt;&quot;&quot;;&quot;&quot;&quot;&quot;&amp;[.M46]&amp;&quot;&quot;&quot;&quot;&amp;REPT(&quot; &quot;;20-LEN([.M46]));&quot;null&quot;&amp;REPT(&quot; &quot;;20-4+2))&#10;&amp;&quot;,&quot;&quot;&quot;&amp;[.N$1]&amp;&quot;&quot;&quot;:&quot;&amp;IF([.N46]&lt;&gt;&quot;&quot;;&quot;&quot;&quot;&quot;&amp;[.N46]&amp;&quot;&quot;&quot;&quot;&amp;REPT(&quot; &quot;;30-LEN([.N46]));&quot;null&quot;&amp;REPT(&quot; &quot;;30-4+2))&#10;&amp;&quot;,&quot;&quot;&quot;&amp;[.O$1]&amp;&quot;&quot;&quot;:&quot;&amp;[.O46]&#10;&amp;&quot;,&quot;&quot;&quot;&amp;[.P$1]&amp;&quot;&quot;&quot;:&quot;&amp;[.P46]&#10;&amp;&quot;}}&quot;" office:value-type="string" office:string-value=",&quot;attrs&quot;:{&quot;LogicalId&quot;:&quot;cur_power&quot;           ,&quot;Name&quot;:&quot;Puissance consommée&quot;                ,&quot;Order&quot;:80 ,&quot;Type&quot;:&quot;info&quot;  ,&quot;SubType&quot;:&quot;numeric&quot;,&quot;Unite&quot;:&quot;W&quot;    ,&quot;Config_infoName&quot;:null      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0}}" calcext:value-type="string">
            <text:p>,"attrs":{"LogicalId":"cur_power" <text:s text:c="10"/>,"Name":"Puissance consommée" <text:s text:c="15"/>,"Order":80 ,"Type":"info" <text:s/>,"SubType":"numeric","Unite":"W" <text:s text:c="3"/>,"Config_infoName":null <text:s text:c="16"/>,"Config_value":null <text:s text:c="5"/>,"Config_minValue":null,"Config_maxValue":null,"Config_tempHL":null ,"setValue":null <text:s text:c="17"/>,"Display_param_step":null <text:s text:c="27"/>,"IsHistorized":0,"IsVisible":0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ur_current</text:p>
          </table:table-cell>
          <table:table-cell office:value-type="string" calcext:value-type="string">
            <text:p>Intensité du circuit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A</text:p>
          </table:table-cell>
          <table:table-cell table:number-columns-repeated="7"/>
          <table:table-cell table:number-columns-repeated="2" office:value-type="float" office:value="0" calcext:value-type="float">
            <text:p>0</text:p>
          </table:table-cell>
          <table:table-cell table:formula="of:=LEN([.N47])" office:value-type="float" office:value="0" calcext:value-type="float">
            <text:p>0</text:p>
          </table:table-cell>
          <table:table-cell/>
          <table:table-cell table:style-name="ce17" table:formula="of:=&quot;&quot;&amp;IF([.T46]=&quot;&quot;;&quot; &quot;;IF([.A47]&lt;&gt;&quot;&quot;;&quot;,&quot;;&quot;}&quot;)) &amp;IF([.A47]&lt;&gt;&quot;&quot;;&quot;&quot;&quot;&quot;&amp;[.A47]&amp;&quot;&quot;&quot;&quot;&amp;REPT(&quot; &quot;;20-LEN([.A47]));&quot;&quot;)" office:value-type="string" office:string-value=",&quot;cur_current&quot;         " calcext:value-type="string">
            <text:p>,"cur_current" <text:s text:c="8"/></text:p>
          </table:table-cell>
          <table:table-cell table:style-name="ce17" table:formula="of:=&quot;:&quot; &amp;&quot;{&quot;&quot;&quot;&amp;[.B$1]&amp;&quot;&quot;&quot;:&quot;&quot;&quot;&amp;[.B47]&amp;&quot;&quot;&quot;&quot;&amp;REPT(&quot; &quot;;20-LEN([.B47])) &amp;&quot;,&quot;&quot;&quot;&amp;[.C$1]&amp;&quot;&quot;&quot;:&quot;&quot;&quot;&amp;[.C47]&amp;&quot;&quot;&quot;&quot;&amp;REPT(&quot; &quot;;35-LEN([.C47])) &amp;&quot;,&quot;&quot;&quot;&amp;[.D$1]&amp;&quot;&quot;&quot;:&quot;&amp;[.D47]&amp;REPT(&quot; &quot;;3-LEN([.D47])) &amp;&quot;,&quot;&quot;&quot;&amp;[.E$1]&amp;&quot;&quot;&quot;:&quot;&quot;&quot;&amp;[.E47]&amp;&quot;&quot;&quot;&quot;&amp;REPT(&quot; &quot;;6-LEN([.E47])) &amp;&quot;,&quot;&quot;&quot;&amp;[.F$1]&amp;&quot;&quot;&quot;:&quot;&quot;&quot;&amp;[.F47]&amp;&quot;&quot;&quot;&quot;&amp;REPT(&quot; &quot;;7-LEN([.F47])) &amp;&quot;,&quot;&quot;&quot;&amp;[.G$1]&amp;&quot;&quot;&quot;:&quot;&amp;IF([.G47]&lt;&gt;&quot;&quot;;&quot;&quot;&quot;&quot;&amp;[.G47]&amp;&quot;&quot;&quot;&quot;&amp;REPT(&quot; &quot;;5-LEN([.G47]));&quot;null&quot;&amp;REPT(&quot; &quot;;5-4+2)) &amp;&quot;,&quot;&quot;&quot;&amp;[.H$1]&amp;&quot;&quot;&quot;:&quot;&amp;IF([.H47]&lt;&gt;&quot;&quot;;&quot;&quot;&quot;&quot;&amp;[.H47]&amp;&quot;&quot;&quot;&quot;&amp;REPT(&quot; &quot;;19-LEN([.H47]));&quot;null&quot;&amp;REPT(&quot; &quot;;19-4+2)) &amp;&quot;,&quot;&quot;&quot;&amp;[.I$1]&amp;&quot;&quot;&quot;:&quot;&amp;IF([.I47]&lt;&gt;&quot;&quot;;&quot;&quot;&quot;&quot;&amp;[.I47]&amp;&quot;&quot;&quot;&quot;&amp;REPT(&quot; &quot;;8-LEN([.I47]));&quot;null&quot;&amp;REPT(&quot; &quot;;8-4+2)) &amp;&quot;,&quot;&quot;&quot;&amp;[.J$1]&amp;&quot;&quot;&quot;:&quot;&amp;IF([.J47]&lt;&gt;&quot;&quot;;[.J47]&amp;REPT(&quot; &quot;;4-LEN([.J47]));&quot;null&quot;) &amp;&quot;,&quot;&quot;&quot;&amp;[.K$1]&amp;&quot;&quot;&quot;:&quot;&amp;IF([.K47]&lt;&gt;&quot;&quot;;[.K47]&amp;REPT(&quot; &quot;;4-LEN([.K47]));&quot;null&quot;) &amp;&quot;,&quot;&quot;&quot;&amp;[.L$1]&amp;&quot;&quot;&quot;:&quot;&amp;IF([.L47]&lt;&gt;&quot;&quot;;[.L47]&amp;REPT(&quot; &quot;;5-LEN([.L47]));&quot;null &quot;) &amp;&quot;,&quot;&quot;&quot;&amp;[.M$1]&amp;&quot;&quot;&quot;:&quot;&amp;IF([.M47]&lt;&gt;&quot;&quot;;&quot;&quot;&quot;&quot;&amp;[.M47]&amp;&quot;&quot;&quot;&quot;&amp;REPT(&quot; &quot;;20-LEN([.M47]));&quot;null&quot;&amp;REPT(&quot; &quot;;20-4+2)) &amp;&quot;,&quot;&quot;&quot;&amp;[.N$1]&amp;&quot;&quot;&quot;:&quot;&amp;IF([.N47]&lt;&gt;&quot;&quot;;&quot;&quot;&amp;[.N47]&amp;&quot;&quot;&amp;REPT(&quot; &quot;;5-LEN([.N47]));&quot;null&quot;&amp;REPT(&quot; &quot;;5-4+2)) &amp;&quot;,&quot;&quot;&quot;&amp;[.O$1]&amp;&quot;&quot;&quot;:&quot;&amp;[.O47] &amp;&quot;,&quot;&quot;&quot;&amp;[.P$1]&amp;&quot;&quot;&quot;:&quot;&amp;[.P47] &amp;&quot;}&quot;" office:value-type="string" office:string-value=":{&quot;LogicalId&quot;:&quot;cur_current&quot;         ,&quot;Name&quot;:&quot;Intensité du circuit&quot;               ,&quot;Order&quot;:81 ,&quot;Type&quot;:&quot;info&quot;  ,&quot;SubType&quot;:&quot;numeric&quot;,&quot;Unite&quot;:&quot;A&quot;    ,&quot;Config_infoName&quot;:null                 ,&quot;Config_value&quot;:null      ,&quot;Config_minValue&quot;:null,&quot;Config_maxValue&quot;:null,&quot;Config_tempHL&quot;:null ,&quot;setValue&quot;:null                  ,&quot;Display_param_step&quot;:null   ,&quot;IsHistorized&quot;:0,&quot;IsVisible&quot;:0}" calcext:value-type="string">
            <text:p>:{"LogicalId":"cur_current" <text:s text:c="8"/>,"Name":"Intensité du circuit" <text:s text:c="14"/>,"Order":81 ,"Type":"info" <text:s/>,"SubType":"numeric","Unite":"A" <text:s text:c="3"/>,"Config_infoName":null <text:s text:c="16"/>,"Config_value":null <text:s text:c="5"/>,"Config_minValue":null,"Config_maxValue":null,"Config_tempHL":null ,"setValue":null <text:s text:c="17"/>,"Display_param_step":null <text:s text:c="2"/>,"IsHistorized":0,"IsVisible":0}</text:p>
          </table:table-cell>
          <table:table-cell table:style-name="ce15" office:value-type="string" calcext:value-type="string">
            <text:p>.</text:p>
          </table:table-cell>
          <table:table-cell table:style-name="ce14"/>
          <table:table-cell table:style-name="ce17" table:formula="of:=IF([.W46]=&quot;&quot;;&quot; &quot;;IF([.B47]&lt;&gt;&quot;&quot;;&quot;,&quot;;&quot;]&quot;))&#10;&amp;IF([.B47]&lt;&gt;&quot;&quot;;&quot;{&quot;&quot;cmd&quot;&quot;:&quot;&quot;&quot;&amp;[.B47]&amp;&quot;&quot;&quot;&quot;&amp;REPT(&quot; &quot;;20-LEN([.B47]));&quot;&quot;)" office:value-type="string" office:string-value=",{&quot;cmd&quot;:&quot;cur_current&quot;         " calcext:value-type="string">
            <text:p>,{"cmd":"cur_current" <text:s text:c="8"/></text:p>
          </table:table-cell>
          <table:table-cell table:style-name="ce17" table:formula="of:=&quot;,&quot;&quot;attrs&quot;&quot;:&quot;&#10;&amp;&quot;{&quot;&quot;&quot;&amp;[.B$1]&amp;&quot;&quot;&quot;:&quot;&quot;&quot;&amp;[.B47]&amp;&quot;&quot;&quot;&quot;&amp;REPT(&quot; &quot;;20-LEN([.B47]))&#10;&amp;&quot;,&quot;&quot;&quot;&amp;[.C$1]&amp;&quot;&quot;&quot;:&quot;&quot;&quot;&amp;[.C47]&amp;&quot;&quot;&quot;&quot;&amp;REPT(&quot; &quot;;35-LEN([.C47]))&#10;&amp;&quot;,&quot;&quot;&quot;&amp;[.D$1]&amp;&quot;&quot;&quot;:&quot;&amp;[.D47]&amp;REPT(&quot; &quot;;3-LEN([.D47]))&#10;&amp;&quot;,&quot;&quot;&quot;&amp;[.E$1]&amp;&quot;&quot;&quot;:&quot;&quot;&quot;&amp;[.E47]&amp;&quot;&quot;&quot;&quot;&amp;REPT(&quot; &quot;;6-LEN([.E47]))&#10;&amp;&quot;,&quot;&quot;&quot;&amp;[.F$1]&amp;&quot;&quot;&quot;:&quot;&quot;&quot;&amp;[.F47]&amp;&quot;&quot;&quot;&quot;&amp;REPT(&quot; &quot;;7-LEN([.F47]))&#10;&amp;&quot;,&quot;&quot;&quot;&amp;[.G$1]&amp;&quot;&quot;&quot;:&quot;&amp;IF([.G47]&lt;&gt;&quot;&quot;;&quot;&quot;&quot;&quot;&amp;[.G47]&amp;&quot;&quot;&quot;&quot;&amp;REPT(&quot; &quot;;5-LEN([.G47]));&quot;null&quot;&amp;REPT(&quot; &quot;;5-4+2))&#10;&amp;&quot;,&quot;&quot;&quot;&amp;[.H$1]&amp;&quot;&quot;&quot;:&quot;&amp;IF([.H47]&lt;&gt;&quot;&quot;;&quot;&quot;&quot;&quot;&amp;[.H47]&amp;&quot;&quot;&quot;&quot;&amp;REPT(&quot; &quot;;19-LEN([.H47]));&quot;null&quot;&amp;REPT(&quot; &quot;;19-4+2))&#10;&amp;&quot;,&quot;&quot;&quot;&amp;[.I$1]&amp;&quot;&quot;&quot;:&quot;&amp;IF([.I47]&lt;&gt;&quot;&quot;;&quot;&quot;&quot;&quot;&amp;[.I47]&amp;&quot;&quot;&quot;&quot;&amp;REPT(&quot; &quot;;8-LEN([.I47]));&quot;null&quot;&amp;REPT(&quot; &quot;;8-4+2))&#10;&amp;&quot;,&quot;&quot;&quot;&amp;[.J$1]&amp;&quot;&quot;&quot;:&quot;&amp;IF([.J47]&lt;&gt;&quot;&quot;;[.J47]&amp;REPT(&quot; &quot;;4-LEN([.J47]));&quot;null&quot;)&#10;&amp;&quot;,&quot;&quot;&quot;&amp;[.K$1]&amp;&quot;&quot;&quot;:&quot;&amp;IF([.K47]&lt;&gt;&quot;&quot;;[.K47]&amp;REPT(&quot; &quot;;4-LEN([.K47]));&quot;null&quot;)&#10;&amp;&quot;,&quot;&quot;&quot;&amp;[.L$1]&amp;&quot;&quot;&quot;:&quot;&amp;IF([.L47]&lt;&gt;&quot;&quot;;[.L47]&amp;REPT(&quot; &quot;;5-LEN([.L47]));&quot;null &quot;)&#10;&amp;&quot;,&quot;&quot;&quot;&amp;[.M$1]&amp;&quot;&quot;&quot;:&quot;&amp;IF([.M47]&lt;&gt;&quot;&quot;;&quot;&quot;&quot;&quot;&amp;[.M47]&amp;&quot;&quot;&quot;&quot;&amp;REPT(&quot; &quot;;20-LEN([.M47]));&quot;null&quot;&amp;REPT(&quot; &quot;;20-4+2))&#10;&amp;&quot;,&quot;&quot;&quot;&amp;[.N$1]&amp;&quot;&quot;&quot;:&quot;&amp;IF([.N47]&lt;&gt;&quot;&quot;;&quot;&quot;&quot;&quot;&amp;[.N47]&amp;&quot;&quot;&quot;&quot;&amp;REPT(&quot; &quot;;30-LEN([.N47]));&quot;null&quot;&amp;REPT(&quot; &quot;;30-4+2))&#10;&amp;&quot;,&quot;&quot;&quot;&amp;[.O$1]&amp;&quot;&quot;&quot;:&quot;&amp;[.O47]&#10;&amp;&quot;,&quot;&quot;&quot;&amp;[.P$1]&amp;&quot;&quot;&quot;:&quot;&amp;[.P47]&#10;&amp;&quot;}}&quot;" office:value-type="string" office:string-value=",&quot;attrs&quot;:{&quot;LogicalId&quot;:&quot;cur_current&quot;         ,&quot;Name&quot;:&quot;Intensité du circuit&quot;               ,&quot;Order&quot;:81 ,&quot;Type&quot;:&quot;info&quot;  ,&quot;SubType&quot;:&quot;numeric&quot;,&quot;Unite&quot;:&quot;A&quot;    ,&quot;Config_infoName&quot;:null      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0}}" calcext:value-type="string">
            <text:p>,"attrs":{"LogicalId":"cur_current" <text:s text:c="8"/>,"Name":"Intensité du circuit" <text:s text:c="14"/>,"Order":81 ,"Type":"info" <text:s/>,"SubType":"numeric","Unite":"A" <text:s text:c="3"/>,"Config_infoName":null <text:s text:c="16"/>,"Config_value":null <text:s text:c="5"/>,"Config_minValue":null,"Config_maxValue":null,"Config_tempHL":null ,"setValue":null <text:s text:c="17"/>,"Display_param_step":null <text:s text:c="27"/>,"IsHistorized":0,"IsVisible":0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ur_voltage</text:p>
          </table:table-cell>
          <table:table-cell office:value-type="string" calcext:value-type="string">
            <text:p>Tension du réseau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V</text:p>
          </table:table-cell>
          <table:table-cell table:number-columns-repeated="7"/>
          <table:table-cell table:number-columns-repeated="2" office:value-type="float" office:value="0" calcext:value-type="float">
            <text:p>0</text:p>
          </table:table-cell>
          <table:table-cell table:formula="of:=LEN([.N48])" office:value-type="float" office:value="0" calcext:value-type="float">
            <text:p>0</text:p>
          </table:table-cell>
          <table:table-cell/>
          <table:table-cell table:style-name="ce17" table:formula="of:=&quot;&quot;&amp;IF([.T47]=&quot;&quot;;&quot; &quot;;IF([.A48]&lt;&gt;&quot;&quot;;&quot;,&quot;;&quot;}&quot;)) &amp;IF([.A48]&lt;&gt;&quot;&quot;;&quot;&quot;&quot;&quot;&amp;[.A48]&amp;&quot;&quot;&quot;&quot;&amp;REPT(&quot; &quot;;20-LEN([.A48]));&quot;&quot;)" office:value-type="string" office:string-value=",&quot;cur_voltage&quot;         " calcext:value-type="string">
            <text:p>,"cur_voltage" <text:s text:c="8"/></text:p>
          </table:table-cell>
          <table:table-cell table:style-name="ce17" table:formula="of:=&quot;:&quot; &amp;&quot;{&quot;&quot;&quot;&amp;[.B$1]&amp;&quot;&quot;&quot;:&quot;&quot;&quot;&amp;[.B48]&amp;&quot;&quot;&quot;&quot;&amp;REPT(&quot; &quot;;20-LEN([.B48])) &amp;&quot;,&quot;&quot;&quot;&amp;[.C$1]&amp;&quot;&quot;&quot;:&quot;&quot;&quot;&amp;[.C48]&amp;&quot;&quot;&quot;&quot;&amp;REPT(&quot; &quot;;35-LEN([.C48])) &amp;&quot;,&quot;&quot;&quot;&amp;[.D$1]&amp;&quot;&quot;&quot;:&quot;&amp;[.D48]&amp;REPT(&quot; &quot;;3-LEN([.D48])) &amp;&quot;,&quot;&quot;&quot;&amp;[.E$1]&amp;&quot;&quot;&quot;:&quot;&quot;&quot;&amp;[.E48]&amp;&quot;&quot;&quot;&quot;&amp;REPT(&quot; &quot;;6-LEN([.E48])) &amp;&quot;,&quot;&quot;&quot;&amp;[.F$1]&amp;&quot;&quot;&quot;:&quot;&quot;&quot;&amp;[.F48]&amp;&quot;&quot;&quot;&quot;&amp;REPT(&quot; &quot;;7-LEN([.F48])) &amp;&quot;,&quot;&quot;&quot;&amp;[.G$1]&amp;&quot;&quot;&quot;:&quot;&amp;IF([.G48]&lt;&gt;&quot;&quot;;&quot;&quot;&quot;&quot;&amp;[.G48]&amp;&quot;&quot;&quot;&quot;&amp;REPT(&quot; &quot;;5-LEN([.G48]));&quot;null&quot;&amp;REPT(&quot; &quot;;5-4+2)) &amp;&quot;,&quot;&quot;&quot;&amp;[.H$1]&amp;&quot;&quot;&quot;:&quot;&amp;IF([.H48]&lt;&gt;&quot;&quot;;&quot;&quot;&quot;&quot;&amp;[.H48]&amp;&quot;&quot;&quot;&quot;&amp;REPT(&quot; &quot;;19-LEN([.H48]));&quot;null&quot;&amp;REPT(&quot; &quot;;19-4+2)) &amp;&quot;,&quot;&quot;&quot;&amp;[.I$1]&amp;&quot;&quot;&quot;:&quot;&amp;IF([.I48]&lt;&gt;&quot;&quot;;&quot;&quot;&quot;&quot;&amp;[.I48]&amp;&quot;&quot;&quot;&quot;&amp;REPT(&quot; &quot;;8-LEN([.I48]));&quot;null&quot;&amp;REPT(&quot; &quot;;8-4+2)) &amp;&quot;,&quot;&quot;&quot;&amp;[.J$1]&amp;&quot;&quot;&quot;:&quot;&amp;IF([.J48]&lt;&gt;&quot;&quot;;[.J48]&amp;REPT(&quot; &quot;;4-LEN([.J48]));&quot;null&quot;) &amp;&quot;,&quot;&quot;&quot;&amp;[.K$1]&amp;&quot;&quot;&quot;:&quot;&amp;IF([.K48]&lt;&gt;&quot;&quot;;[.K48]&amp;REPT(&quot; &quot;;4-LEN([.K48]));&quot;null&quot;) &amp;&quot;,&quot;&quot;&quot;&amp;[.L$1]&amp;&quot;&quot;&quot;:&quot;&amp;IF([.L48]&lt;&gt;&quot;&quot;;[.L48]&amp;REPT(&quot; &quot;;5-LEN([.L48]));&quot;null &quot;) &amp;&quot;,&quot;&quot;&quot;&amp;[.M$1]&amp;&quot;&quot;&quot;:&quot;&amp;IF([.M48]&lt;&gt;&quot;&quot;;&quot;&quot;&quot;&quot;&amp;[.M48]&amp;&quot;&quot;&quot;&quot;&amp;REPT(&quot; &quot;;20-LEN([.M48]));&quot;null&quot;&amp;REPT(&quot; &quot;;20-4+2)) &amp;&quot;,&quot;&quot;&quot;&amp;[.N$1]&amp;&quot;&quot;&quot;:&quot;&amp;IF([.N48]&lt;&gt;&quot;&quot;;&quot;&quot;&amp;[.N48]&amp;&quot;&quot;&amp;REPT(&quot; &quot;;5-LEN([.N48]));&quot;null&quot;&amp;REPT(&quot; &quot;;5-4+2)) &amp;&quot;,&quot;&quot;&quot;&amp;[.O$1]&amp;&quot;&quot;&quot;:&quot;&amp;[.O48] &amp;&quot;,&quot;&quot;&quot;&amp;[.P$1]&amp;&quot;&quot;&quot;:&quot;&amp;[.P48] &amp;&quot;}&quot;" office:value-type="string" office:string-value=":{&quot;LogicalId&quot;:&quot;cur_voltage&quot;         ,&quot;Name&quot;:&quot;Tension du réseau&quot;                  ,&quot;Order&quot;:82 ,&quot;Type&quot;:&quot;info&quot;  ,&quot;SubType&quot;:&quot;numeric&quot;,&quot;Unite&quot;:&quot;V&quot;    ,&quot;Config_infoName&quot;:null                 ,&quot;Config_value&quot;:null      ,&quot;Config_minValue&quot;:null,&quot;Config_maxValue&quot;:null,&quot;Config_tempHL&quot;:null ,&quot;setValue&quot;:null                  ,&quot;Display_param_step&quot;:null   ,&quot;IsHistorized&quot;:0,&quot;IsVisible&quot;:0}" calcext:value-type="string">
            <text:p>:{"LogicalId":"cur_voltage" <text:s text:c="8"/>,"Name":"Tension du réseau" <text:s text:c="17"/>,"Order":82 ,"Type":"info" <text:s/>,"SubType":"numeric","Unite":"V" <text:s text:c="3"/>,"Config_infoName":null <text:s text:c="16"/>,"Config_value":null <text:s text:c="5"/>,"Config_minValue":null,"Config_maxValue":null,"Config_tempHL":null ,"setValue":null <text:s text:c="17"/>,"Display_param_step":null <text:s text:c="2"/>,"IsHistorized":0,"IsVisible":0}</text:p>
          </table:table-cell>
          <table:table-cell table:style-name="ce15" office:value-type="string" calcext:value-type="string">
            <text:p>.</text:p>
          </table:table-cell>
          <table:table-cell table:style-name="ce14"/>
          <table:table-cell table:style-name="ce17" table:formula="of:=IF([.W47]=&quot;&quot;;&quot; &quot;;IF([.B48]&lt;&gt;&quot;&quot;;&quot;,&quot;;&quot;]&quot;))&#10;&amp;IF([.B48]&lt;&gt;&quot;&quot;;&quot;{&quot;&quot;cmd&quot;&quot;:&quot;&quot;&quot;&amp;[.B48]&amp;&quot;&quot;&quot;&quot;&amp;REPT(&quot; &quot;;20-LEN([.B48]));&quot;&quot;)" office:value-type="string" office:string-value=",{&quot;cmd&quot;:&quot;cur_voltage&quot;         " calcext:value-type="string">
            <text:p>,{"cmd":"cur_voltage" <text:s text:c="8"/></text:p>
          </table:table-cell>
          <table:table-cell table:style-name="ce17" table:formula="of:=&quot;,&quot;&quot;attrs&quot;&quot;:&quot;&#10;&amp;&quot;{&quot;&quot;&quot;&amp;[.B$1]&amp;&quot;&quot;&quot;:&quot;&quot;&quot;&amp;[.B48]&amp;&quot;&quot;&quot;&quot;&amp;REPT(&quot; &quot;;20-LEN([.B48]))&#10;&amp;&quot;,&quot;&quot;&quot;&amp;[.C$1]&amp;&quot;&quot;&quot;:&quot;&quot;&quot;&amp;[.C48]&amp;&quot;&quot;&quot;&quot;&amp;REPT(&quot; &quot;;35-LEN([.C48]))&#10;&amp;&quot;,&quot;&quot;&quot;&amp;[.D$1]&amp;&quot;&quot;&quot;:&quot;&amp;[.D48]&amp;REPT(&quot; &quot;;3-LEN([.D48]))&#10;&amp;&quot;,&quot;&quot;&quot;&amp;[.E$1]&amp;&quot;&quot;&quot;:&quot;&quot;&quot;&amp;[.E48]&amp;&quot;&quot;&quot;&quot;&amp;REPT(&quot; &quot;;6-LEN([.E48]))&#10;&amp;&quot;,&quot;&quot;&quot;&amp;[.F$1]&amp;&quot;&quot;&quot;:&quot;&quot;&quot;&amp;[.F48]&amp;&quot;&quot;&quot;&quot;&amp;REPT(&quot; &quot;;7-LEN([.F48]))&#10;&amp;&quot;,&quot;&quot;&quot;&amp;[.G$1]&amp;&quot;&quot;&quot;:&quot;&amp;IF([.G48]&lt;&gt;&quot;&quot;;&quot;&quot;&quot;&quot;&amp;[.G48]&amp;&quot;&quot;&quot;&quot;&amp;REPT(&quot; &quot;;5-LEN([.G48]));&quot;null&quot;&amp;REPT(&quot; &quot;;5-4+2))&#10;&amp;&quot;,&quot;&quot;&quot;&amp;[.H$1]&amp;&quot;&quot;&quot;:&quot;&amp;IF([.H48]&lt;&gt;&quot;&quot;;&quot;&quot;&quot;&quot;&amp;[.H48]&amp;&quot;&quot;&quot;&quot;&amp;REPT(&quot; &quot;;19-LEN([.H48]));&quot;null&quot;&amp;REPT(&quot; &quot;;19-4+2))&#10;&amp;&quot;,&quot;&quot;&quot;&amp;[.I$1]&amp;&quot;&quot;&quot;:&quot;&amp;IF([.I48]&lt;&gt;&quot;&quot;;&quot;&quot;&quot;&quot;&amp;[.I48]&amp;&quot;&quot;&quot;&quot;&amp;REPT(&quot; &quot;;8-LEN([.I48]));&quot;null&quot;&amp;REPT(&quot; &quot;;8-4+2))&#10;&amp;&quot;,&quot;&quot;&quot;&amp;[.J$1]&amp;&quot;&quot;&quot;:&quot;&amp;IF([.J48]&lt;&gt;&quot;&quot;;[.J48]&amp;REPT(&quot; &quot;;4-LEN([.J48]));&quot;null&quot;)&#10;&amp;&quot;,&quot;&quot;&quot;&amp;[.K$1]&amp;&quot;&quot;&quot;:&quot;&amp;IF([.K48]&lt;&gt;&quot;&quot;;[.K48]&amp;REPT(&quot; &quot;;4-LEN([.K48]));&quot;null&quot;)&#10;&amp;&quot;,&quot;&quot;&quot;&amp;[.L$1]&amp;&quot;&quot;&quot;:&quot;&amp;IF([.L48]&lt;&gt;&quot;&quot;;[.L48]&amp;REPT(&quot; &quot;;5-LEN([.L48]));&quot;null &quot;)&#10;&amp;&quot;,&quot;&quot;&quot;&amp;[.M$1]&amp;&quot;&quot;&quot;:&quot;&amp;IF([.M48]&lt;&gt;&quot;&quot;;&quot;&quot;&quot;&quot;&amp;[.M48]&amp;&quot;&quot;&quot;&quot;&amp;REPT(&quot; &quot;;20-LEN([.M48]));&quot;null&quot;&amp;REPT(&quot; &quot;;20-4+2))&#10;&amp;&quot;,&quot;&quot;&quot;&amp;[.N$1]&amp;&quot;&quot;&quot;:&quot;&amp;IF([.N48]&lt;&gt;&quot;&quot;;&quot;&quot;&quot;&quot;&amp;[.N48]&amp;&quot;&quot;&quot;&quot;&amp;REPT(&quot; &quot;;30-LEN([.N48]));&quot;null&quot;&amp;REPT(&quot; &quot;;30-4+2))&#10;&amp;&quot;,&quot;&quot;&quot;&amp;[.O$1]&amp;&quot;&quot;&quot;:&quot;&amp;[.O48]&#10;&amp;&quot;,&quot;&quot;&quot;&amp;[.P$1]&amp;&quot;&quot;&quot;:&quot;&amp;[.P48]&#10;&amp;&quot;}}&quot;" office:value-type="string" office:string-value=",&quot;attrs&quot;:{&quot;LogicalId&quot;:&quot;cur_voltage&quot;         ,&quot;Name&quot;:&quot;Tension du réseau&quot;                  ,&quot;Order&quot;:82 ,&quot;Type&quot;:&quot;info&quot;  ,&quot;SubType&quot;:&quot;numeric&quot;,&quot;Unite&quot;:&quot;V&quot;    ,&quot;Config_infoName&quot;:null      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0}}" calcext:value-type="string">
            <text:p>,"attrs":{"LogicalId":"cur_voltage" <text:s text:c="8"/>,"Name":"Tension du réseau" <text:s text:c="17"/>,"Order":82 ,"Type":"info" <text:s/>,"SubType":"numeric","Unite":"V" <text:s text:c="3"/>,"Config_infoName":null <text:s text:c="16"/>,"Config_value":null <text:s text:c="5"/>,"Config_minValue":null,"Config_maxValue":null,"Config_tempHL":null ,"setValue":null <text:s text:c="17"/>,"Display_param_step":null <text:s text:c="27"/>,"IsHistorized":0,"IsVisible":0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ignal_power</text:p>
          </table:table-cell>
          <table:table-cell office:value-type="string" calcext:value-type="string">
            <text:p>Puissance du signal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db</text:p>
          </table:table-cell>
          <table:table-cell table:number-columns-repeated="7"/>
          <table:table-cell table:number-columns-repeated="2" office:value-type="float" office:value="0" calcext:value-type="float">
            <text:p>0</text:p>
          </table:table-cell>
          <table:table-cell table:formula="of:=LEN([.N49])" office:value-type="float" office:value="0" calcext:value-type="float">
            <text:p>0</text:p>
          </table:table-cell>
          <table:table-cell/>
          <table:table-cell table:style-name="ce17" table:formula="of:=&quot;&quot;&amp;IF([.T48]=&quot;&quot;;&quot; &quot;;IF([.A49]&lt;&gt;&quot;&quot;;&quot;,&quot;;&quot;}&quot;)) &amp;IF([.A49]&lt;&gt;&quot;&quot;;&quot;&quot;&quot;&quot;&amp;[.A49]&amp;&quot;&quot;&quot;&quot;&amp;REPT(&quot; &quot;;20-LEN([.A49]));&quot;&quot;)" office:value-type="string" office:string-value=",&quot;signal_power&quot;        " calcext:value-type="string">
            <text:p>,"signal_power" <text:s text:c="7"/></text:p>
          </table:table-cell>
          <table:table-cell table:style-name="ce17" table:formula="of:=&quot;:&quot; &amp;&quot;{&quot;&quot;&quot;&amp;[.B$1]&amp;&quot;&quot;&quot;:&quot;&quot;&quot;&amp;[.B49]&amp;&quot;&quot;&quot;&quot;&amp;REPT(&quot; &quot;;20-LEN([.B49])) &amp;&quot;,&quot;&quot;&quot;&amp;[.C$1]&amp;&quot;&quot;&quot;:&quot;&quot;&quot;&amp;[.C49]&amp;&quot;&quot;&quot;&quot;&amp;REPT(&quot; &quot;;35-LEN([.C49])) &amp;&quot;,&quot;&quot;&quot;&amp;[.D$1]&amp;&quot;&quot;&quot;:&quot;&amp;[.D49]&amp;REPT(&quot; &quot;;3-LEN([.D49])) &amp;&quot;,&quot;&quot;&quot;&amp;[.E$1]&amp;&quot;&quot;&quot;:&quot;&quot;&quot;&amp;[.E49]&amp;&quot;&quot;&quot;&quot;&amp;REPT(&quot; &quot;;6-LEN([.E49])) &amp;&quot;,&quot;&quot;&quot;&amp;[.F$1]&amp;&quot;&quot;&quot;:&quot;&quot;&quot;&amp;[.F49]&amp;&quot;&quot;&quot;&quot;&amp;REPT(&quot; &quot;;7-LEN([.F49])) &amp;&quot;,&quot;&quot;&quot;&amp;[.G$1]&amp;&quot;&quot;&quot;:&quot;&amp;IF([.G49]&lt;&gt;&quot;&quot;;&quot;&quot;&quot;&quot;&amp;[.G49]&amp;&quot;&quot;&quot;&quot;&amp;REPT(&quot; &quot;;5-LEN([.G49]));&quot;null&quot;&amp;REPT(&quot; &quot;;5-4+2)) &amp;&quot;,&quot;&quot;&quot;&amp;[.H$1]&amp;&quot;&quot;&quot;:&quot;&amp;IF([.H49]&lt;&gt;&quot;&quot;;&quot;&quot;&quot;&quot;&amp;[.H49]&amp;&quot;&quot;&quot;&quot;&amp;REPT(&quot; &quot;;19-LEN([.H49]));&quot;null&quot;&amp;REPT(&quot; &quot;;19-4+2)) &amp;&quot;,&quot;&quot;&quot;&amp;[.I$1]&amp;&quot;&quot;&quot;:&quot;&amp;IF([.I49]&lt;&gt;&quot;&quot;;&quot;&quot;&quot;&quot;&amp;[.I49]&amp;&quot;&quot;&quot;&quot;&amp;REPT(&quot; &quot;;8-LEN([.I49]));&quot;null&quot;&amp;REPT(&quot; &quot;;8-4+2)) &amp;&quot;,&quot;&quot;&quot;&amp;[.J$1]&amp;&quot;&quot;&quot;:&quot;&amp;IF([.J49]&lt;&gt;&quot;&quot;;[.J49]&amp;REPT(&quot; &quot;;4-LEN([.J49]));&quot;null&quot;) &amp;&quot;,&quot;&quot;&quot;&amp;[.K$1]&amp;&quot;&quot;&quot;:&quot;&amp;IF([.K49]&lt;&gt;&quot;&quot;;[.K49]&amp;REPT(&quot; &quot;;4-LEN([.K49]));&quot;null&quot;) &amp;&quot;,&quot;&quot;&quot;&amp;[.L$1]&amp;&quot;&quot;&quot;:&quot;&amp;IF([.L49]&lt;&gt;&quot;&quot;;[.L49]&amp;REPT(&quot; &quot;;5-LEN([.L49]));&quot;null &quot;) &amp;&quot;,&quot;&quot;&quot;&amp;[.M$1]&amp;&quot;&quot;&quot;:&quot;&amp;IF([.M49]&lt;&gt;&quot;&quot;;&quot;&quot;&quot;&quot;&amp;[.M49]&amp;&quot;&quot;&quot;&quot;&amp;REPT(&quot; &quot;;20-LEN([.M49]));&quot;null&quot;&amp;REPT(&quot; &quot;;20-4+2)) &amp;&quot;,&quot;&quot;&quot;&amp;[.N$1]&amp;&quot;&quot;&quot;:&quot;&amp;IF([.N49]&lt;&gt;&quot;&quot;;&quot;&quot;&amp;[.N49]&amp;&quot;&quot;&amp;REPT(&quot; &quot;;5-LEN([.N49]));&quot;null&quot;&amp;REPT(&quot; &quot;;5-4+2)) &amp;&quot;,&quot;&quot;&quot;&amp;[.O$1]&amp;&quot;&quot;&quot;:&quot;&amp;[.O49] &amp;&quot;,&quot;&quot;&quot;&amp;[.P$1]&amp;&quot;&quot;&quot;:&quot;&amp;[.P49] &amp;&quot;}&quot;" office:value-type="string" office:string-value=":{&quot;LogicalId&quot;:&quot;signal_power&quot;        ,&quot;Name&quot;:&quot;Puissance du signal&quot;                ,&quot;Order&quot;:83 ,&quot;Type&quot;:&quot;info&quot;  ,&quot;SubType&quot;:&quot;numeric&quot;,&quot;Unite&quot;:&quot;db&quot;   ,&quot;Config_infoName&quot;:null                 ,&quot;Config_value&quot;:null      ,&quot;Config_minValue&quot;:null,&quot;Config_maxValue&quot;:null,&quot;Config_tempHL&quot;:null ,&quot;setValue&quot;:null                  ,&quot;Display_param_step&quot;:null   ,&quot;IsHistorized&quot;:0,&quot;IsVisible&quot;:0}" calcext:value-type="string">
            <text:p>:{"LogicalId":"signal_power" <text:s text:c="7"/>,"Name":"Puissance du signal" <text:s text:c="15"/>,"Order":83 ,"Type":"info" <text:s/>,"SubType":"numeric","Unite":"db" <text:s text:c="2"/>,"Config_infoName":null <text:s text:c="16"/>,"Config_value":null <text:s text:c="5"/>,"Config_minValue":null,"Config_maxValue":null,"Config_tempHL":null ,"setValue":null <text:s text:c="17"/>,"Display_param_step":null <text:s text:c="2"/>,"IsHistorized":0,"IsVisible":0}</text:p>
          </table:table-cell>
          <table:table-cell table:style-name="ce15" office:value-type="string" calcext:value-type="string">
            <text:p>.</text:p>
          </table:table-cell>
          <table:table-cell table:style-name="ce14"/>
          <table:table-cell table:style-name="ce17" table:formula="of:=IF([.W48]=&quot;&quot;;&quot; &quot;;IF([.B49]&lt;&gt;&quot;&quot;;&quot;,&quot;;&quot;]&quot;))&#10;&amp;IF([.B49]&lt;&gt;&quot;&quot;;&quot;{&quot;&quot;cmd&quot;&quot;:&quot;&quot;&quot;&amp;[.B49]&amp;&quot;&quot;&quot;&quot;&amp;REPT(&quot; &quot;;20-LEN([.B49]));&quot;&quot;)" office:value-type="string" office:string-value=",{&quot;cmd&quot;:&quot;signal_power&quot;        " calcext:value-type="string">
            <text:p>,{"cmd":"signal_power" <text:s text:c="7"/></text:p>
          </table:table-cell>
          <table:table-cell table:style-name="ce17" table:formula="of:=&quot;,&quot;&quot;attrs&quot;&quot;:&quot;&#10;&amp;&quot;{&quot;&quot;&quot;&amp;[.B$1]&amp;&quot;&quot;&quot;:&quot;&quot;&quot;&amp;[.B49]&amp;&quot;&quot;&quot;&quot;&amp;REPT(&quot; &quot;;20-LEN([.B49]))&#10;&amp;&quot;,&quot;&quot;&quot;&amp;[.C$1]&amp;&quot;&quot;&quot;:&quot;&quot;&quot;&amp;[.C49]&amp;&quot;&quot;&quot;&quot;&amp;REPT(&quot; &quot;;35-LEN([.C49]))&#10;&amp;&quot;,&quot;&quot;&quot;&amp;[.D$1]&amp;&quot;&quot;&quot;:&quot;&amp;[.D49]&amp;REPT(&quot; &quot;;3-LEN([.D49]))&#10;&amp;&quot;,&quot;&quot;&quot;&amp;[.E$1]&amp;&quot;&quot;&quot;:&quot;&quot;&quot;&amp;[.E49]&amp;&quot;&quot;&quot;&quot;&amp;REPT(&quot; &quot;;6-LEN([.E49]))&#10;&amp;&quot;,&quot;&quot;&quot;&amp;[.F$1]&amp;&quot;&quot;&quot;:&quot;&quot;&quot;&amp;[.F49]&amp;&quot;&quot;&quot;&quot;&amp;REPT(&quot; &quot;;7-LEN([.F49]))&#10;&amp;&quot;,&quot;&quot;&quot;&amp;[.G$1]&amp;&quot;&quot;&quot;:&quot;&amp;IF([.G49]&lt;&gt;&quot;&quot;;&quot;&quot;&quot;&quot;&amp;[.G49]&amp;&quot;&quot;&quot;&quot;&amp;REPT(&quot; &quot;;5-LEN([.G49]));&quot;null&quot;&amp;REPT(&quot; &quot;;5-4+2))&#10;&amp;&quot;,&quot;&quot;&quot;&amp;[.H$1]&amp;&quot;&quot;&quot;:&quot;&amp;IF([.H49]&lt;&gt;&quot;&quot;;&quot;&quot;&quot;&quot;&amp;[.H49]&amp;&quot;&quot;&quot;&quot;&amp;REPT(&quot; &quot;;19-LEN([.H49]));&quot;null&quot;&amp;REPT(&quot; &quot;;19-4+2))&#10;&amp;&quot;,&quot;&quot;&quot;&amp;[.I$1]&amp;&quot;&quot;&quot;:&quot;&amp;IF([.I49]&lt;&gt;&quot;&quot;;&quot;&quot;&quot;&quot;&amp;[.I49]&amp;&quot;&quot;&quot;&quot;&amp;REPT(&quot; &quot;;8-LEN([.I49]));&quot;null&quot;&amp;REPT(&quot; &quot;;8-4+2))&#10;&amp;&quot;,&quot;&quot;&quot;&amp;[.J$1]&amp;&quot;&quot;&quot;:&quot;&amp;IF([.J49]&lt;&gt;&quot;&quot;;[.J49]&amp;REPT(&quot; &quot;;4-LEN([.J49]));&quot;null&quot;)&#10;&amp;&quot;,&quot;&quot;&quot;&amp;[.K$1]&amp;&quot;&quot;&quot;:&quot;&amp;IF([.K49]&lt;&gt;&quot;&quot;;[.K49]&amp;REPT(&quot; &quot;;4-LEN([.K49]));&quot;null&quot;)&#10;&amp;&quot;,&quot;&quot;&quot;&amp;[.L$1]&amp;&quot;&quot;&quot;:&quot;&amp;IF([.L49]&lt;&gt;&quot;&quot;;[.L49]&amp;REPT(&quot; &quot;;5-LEN([.L49]));&quot;null &quot;)&#10;&amp;&quot;,&quot;&quot;&quot;&amp;[.M$1]&amp;&quot;&quot;&quot;:&quot;&amp;IF([.M49]&lt;&gt;&quot;&quot;;&quot;&quot;&quot;&quot;&amp;[.M49]&amp;&quot;&quot;&quot;&quot;&amp;REPT(&quot; &quot;;20-LEN([.M49]));&quot;null&quot;&amp;REPT(&quot; &quot;;20-4+2))&#10;&amp;&quot;,&quot;&quot;&quot;&amp;[.N$1]&amp;&quot;&quot;&quot;:&quot;&amp;IF([.N49]&lt;&gt;&quot;&quot;;&quot;&quot;&quot;&quot;&amp;[.N49]&amp;&quot;&quot;&quot;&quot;&amp;REPT(&quot; &quot;;30-LEN([.N49]));&quot;null&quot;&amp;REPT(&quot; &quot;;30-4+2))&#10;&amp;&quot;,&quot;&quot;&quot;&amp;[.O$1]&amp;&quot;&quot;&quot;:&quot;&amp;[.O49]&#10;&amp;&quot;,&quot;&quot;&quot;&amp;[.P$1]&amp;&quot;&quot;&quot;:&quot;&amp;[.P49]&#10;&amp;&quot;}}&quot;" office:value-type="string" office:string-value=",&quot;attrs&quot;:{&quot;LogicalId&quot;:&quot;signal_power&quot;        ,&quot;Name&quot;:&quot;Puissance du signal&quot;                ,&quot;Order&quot;:83 ,&quot;Type&quot;:&quot;info&quot;  ,&quot;SubType&quot;:&quot;numeric&quot;,&quot;Unite&quot;:&quot;db&quot;   ,&quot;Config_infoName&quot;:null      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0}}" calcext:value-type="string">
            <text:p>,"attrs":{"LogicalId":"signal_power" <text:s text:c="7"/>,"Name":"Puissance du signal" <text:s text:c="15"/>,"Order":83 ,"Type":"info" <text:s/>,"SubType":"numeric","Unite":"db" <text:s text:c="2"/>,"Config_infoName":null <text:s text:c="16"/>,"Config_value":null <text:s text:c="5"/>,"Config_minValue":null,"Config_maxValue":null,"Config_tempHL":null ,"setValue":null <text:s text:c="17"/>,"Display_param_step":null <text:s text:c="27"/>,"IsHistorized":0,"IsVisible":0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nergy_saving</text:p>
          </table:table-cell>
          <table:table-cell office:value-type="string" calcext:value-type="string">
            <text:p>Mode écoresponsable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°C</text:p>
          </table:table-cell>
          <table:table-cell table:number-columns-repeated="7"/>
          <table:table-cell table:number-columns-repeated="2" office:value-type="float" office:value="0" calcext:value-type="float">
            <text:p>0</text:p>
          </table:table-cell>
          <table:table-cell table:formula="of:=LEN([.N50])" office:value-type="float" office:value="0" calcext:value-type="float">
            <text:p>0</text:p>
          </table:table-cell>
          <table:table-cell/>
          <table:table-cell table:style-name="ce17" table:formula="of:=&quot;&quot;&amp;IF([.T49]=&quot;&quot;;&quot; &quot;;IF([.A50]&lt;&gt;&quot;&quot;;&quot;,&quot;;&quot;}&quot;)) &amp;IF([.A50]&lt;&gt;&quot;&quot;;&quot;&quot;&quot;&quot;&amp;[.A50]&amp;&quot;&quot;&quot;&quot;&amp;REPT(&quot; &quot;;20-LEN([.A50]));&quot;&quot;)" office:value-type="string" office:string-value=",&quot;energy_saving&quot;       " calcext:value-type="string">
            <text:p>,"energy_saving" <text:s text:c="6"/></text:p>
          </table:table-cell>
          <table:table-cell table:style-name="ce17" table:formula="of:=&quot;:&quot; &amp;&quot;{&quot;&quot;&quot;&amp;[.B$1]&amp;&quot;&quot;&quot;:&quot;&quot;&quot;&amp;[.B50]&amp;&quot;&quot;&quot;&quot;&amp;REPT(&quot; &quot;;20-LEN([.B50])) &amp;&quot;,&quot;&quot;&quot;&amp;[.C$1]&amp;&quot;&quot;&quot;:&quot;&quot;&quot;&amp;[.C50]&amp;&quot;&quot;&quot;&quot;&amp;REPT(&quot; &quot;;35-LEN([.C50])) &amp;&quot;,&quot;&quot;&quot;&amp;[.D$1]&amp;&quot;&quot;&quot;:&quot;&amp;[.D50]&amp;REPT(&quot; &quot;;3-LEN([.D50])) &amp;&quot;,&quot;&quot;&quot;&amp;[.E$1]&amp;&quot;&quot;&quot;:&quot;&quot;&quot;&amp;[.E50]&amp;&quot;&quot;&quot;&quot;&amp;REPT(&quot; &quot;;6-LEN([.E50])) &amp;&quot;,&quot;&quot;&quot;&amp;[.F$1]&amp;&quot;&quot;&quot;:&quot;&quot;&quot;&amp;[.F50]&amp;&quot;&quot;&quot;&quot;&amp;REPT(&quot; &quot;;7-LEN([.F50])) &amp;&quot;,&quot;&quot;&quot;&amp;[.G$1]&amp;&quot;&quot;&quot;:&quot;&amp;IF([.G50]&lt;&gt;&quot;&quot;;&quot;&quot;&quot;&quot;&amp;[.G50]&amp;&quot;&quot;&quot;&quot;&amp;REPT(&quot; &quot;;5-LEN([.G50]));&quot;null&quot;&amp;REPT(&quot; &quot;;5-4+2)) &amp;&quot;,&quot;&quot;&quot;&amp;[.H$1]&amp;&quot;&quot;&quot;:&quot;&amp;IF([.H50]&lt;&gt;&quot;&quot;;&quot;&quot;&quot;&quot;&amp;[.H50]&amp;&quot;&quot;&quot;&quot;&amp;REPT(&quot; &quot;;19-LEN([.H50]));&quot;null&quot;&amp;REPT(&quot; &quot;;19-4+2)) &amp;&quot;,&quot;&quot;&quot;&amp;[.I$1]&amp;&quot;&quot;&quot;:&quot;&amp;IF([.I50]&lt;&gt;&quot;&quot;;&quot;&quot;&quot;&quot;&amp;[.I50]&amp;&quot;&quot;&quot;&quot;&amp;REPT(&quot; &quot;;8-LEN([.I50]));&quot;null&quot;&amp;REPT(&quot; &quot;;8-4+2)) &amp;&quot;,&quot;&quot;&quot;&amp;[.J$1]&amp;&quot;&quot;&quot;:&quot;&amp;IF([.J50]&lt;&gt;&quot;&quot;;[.J50]&amp;REPT(&quot; &quot;;4-LEN([.J50]));&quot;null&quot;) &amp;&quot;,&quot;&quot;&quot;&amp;[.K$1]&amp;&quot;&quot;&quot;:&quot;&amp;IF([.K50]&lt;&gt;&quot;&quot;;[.K50]&amp;REPT(&quot; &quot;;4-LEN([.K50]));&quot;null&quot;) &amp;&quot;,&quot;&quot;&quot;&amp;[.L$1]&amp;&quot;&quot;&quot;:&quot;&amp;IF([.L50]&lt;&gt;&quot;&quot;;[.L50]&amp;REPT(&quot; &quot;;5-LEN([.L50]));&quot;null &quot;) &amp;&quot;,&quot;&quot;&quot;&amp;[.M$1]&amp;&quot;&quot;&quot;:&quot;&amp;IF([.M50]&lt;&gt;&quot;&quot;;&quot;&quot;&quot;&quot;&amp;[.M50]&amp;&quot;&quot;&quot;&quot;&amp;REPT(&quot; &quot;;20-LEN([.M50]));&quot;null&quot;&amp;REPT(&quot; &quot;;20-4+2)) &amp;&quot;,&quot;&quot;&quot;&amp;[.N$1]&amp;&quot;&quot;&quot;:&quot;&amp;IF([.N50]&lt;&gt;&quot;&quot;;&quot;&quot;&amp;[.N50]&amp;&quot;&quot;&amp;REPT(&quot; &quot;;5-LEN([.N50]));&quot;null&quot;&amp;REPT(&quot; &quot;;5-4+2)) &amp;&quot;,&quot;&quot;&quot;&amp;[.O$1]&amp;&quot;&quot;&quot;:&quot;&amp;[.O50] &amp;&quot;,&quot;&quot;&quot;&amp;[.P$1]&amp;&quot;&quot;&quot;:&quot;&amp;[.P50] &amp;&quot;}&quot;" office:value-type="string" office:string-value=":{&quot;LogicalId&quot;:&quot;energy_saving&quot;       ,&quot;Name&quot;:&quot;Mode écoresponsable&quot;                ,&quot;Order&quot;:84 ,&quot;Type&quot;:&quot;info&quot;  ,&quot;SubType&quot;:&quot;numeric&quot;,&quot;Unite&quot;:&quot;°C&quot;   ,&quot;Config_infoName&quot;:null                 ,&quot;Config_value&quot;:null      ,&quot;Config_minValue&quot;:null,&quot;Config_maxValue&quot;:null,&quot;Config_tempHL&quot;:null ,&quot;setValue&quot;:null                  ,&quot;Display_param_step&quot;:null   ,&quot;IsHistorized&quot;:0,&quot;IsVisible&quot;:0}" calcext:value-type="string">
            <text:p>:{"LogicalId":"energy_saving" <text:s text:c="6"/>,"Name":"Mode écoresponsable" <text:s text:c="15"/>,"Order":84 ,"Type":"info" <text:s/>,"SubType":"numeric","Unite":"°C" <text:s text:c="2"/>,"Config_infoName":null <text:s text:c="16"/>,"Config_value":null <text:s text:c="5"/>,"Config_minValue":null,"Config_maxValue":null,"Config_tempHL":null ,"setValue":null <text:s text:c="17"/>,"Display_param_step":null <text:s text:c="2"/>,"IsHistorized":0,"IsVisible":0}</text:p>
          </table:table-cell>
          <table:table-cell table:style-name="ce15" office:value-type="string" calcext:value-type="string">
            <text:p>.</text:p>
          </table:table-cell>
          <table:table-cell table:style-name="ce14"/>
          <table:table-cell table:style-name="ce17" table:formula="of:=IF([.W49]=&quot;&quot;;&quot; &quot;;IF([.B50]&lt;&gt;&quot;&quot;;&quot;,&quot;;&quot;]&quot;))&#10;&amp;IF([.B50]&lt;&gt;&quot;&quot;;&quot;{&quot;&quot;cmd&quot;&quot;:&quot;&quot;&quot;&amp;[.B50]&amp;&quot;&quot;&quot;&quot;&amp;REPT(&quot; &quot;;20-LEN([.B50]));&quot;&quot;)" office:value-type="string" office:string-value=",{&quot;cmd&quot;:&quot;energy_saving&quot;       " calcext:value-type="string">
            <text:p>,{"cmd":"energy_saving" <text:s text:c="6"/></text:p>
          </table:table-cell>
          <table:table-cell table:style-name="ce17" table:formula="of:=&quot;,&quot;&quot;attrs&quot;&quot;:&quot;&#10;&amp;&quot;{&quot;&quot;&quot;&amp;[.B$1]&amp;&quot;&quot;&quot;:&quot;&quot;&quot;&amp;[.B50]&amp;&quot;&quot;&quot;&quot;&amp;REPT(&quot; &quot;;20-LEN([.B50]))&#10;&amp;&quot;,&quot;&quot;&quot;&amp;[.C$1]&amp;&quot;&quot;&quot;:&quot;&quot;&quot;&amp;[.C50]&amp;&quot;&quot;&quot;&quot;&amp;REPT(&quot; &quot;;35-LEN([.C50]))&#10;&amp;&quot;,&quot;&quot;&quot;&amp;[.D$1]&amp;&quot;&quot;&quot;:&quot;&amp;[.D50]&amp;REPT(&quot; &quot;;3-LEN([.D50]))&#10;&amp;&quot;,&quot;&quot;&quot;&amp;[.E$1]&amp;&quot;&quot;&quot;:&quot;&quot;&quot;&amp;[.E50]&amp;&quot;&quot;&quot;&quot;&amp;REPT(&quot; &quot;;6-LEN([.E50]))&#10;&amp;&quot;,&quot;&quot;&quot;&amp;[.F$1]&amp;&quot;&quot;&quot;:&quot;&quot;&quot;&amp;[.F50]&amp;&quot;&quot;&quot;&quot;&amp;REPT(&quot; &quot;;7-LEN([.F50]))&#10;&amp;&quot;,&quot;&quot;&quot;&amp;[.G$1]&amp;&quot;&quot;&quot;:&quot;&amp;IF([.G50]&lt;&gt;&quot;&quot;;&quot;&quot;&quot;&quot;&amp;[.G50]&amp;&quot;&quot;&quot;&quot;&amp;REPT(&quot; &quot;;5-LEN([.G50]));&quot;null&quot;&amp;REPT(&quot; &quot;;5-4+2))&#10;&amp;&quot;,&quot;&quot;&quot;&amp;[.H$1]&amp;&quot;&quot;&quot;:&quot;&amp;IF([.H50]&lt;&gt;&quot;&quot;;&quot;&quot;&quot;&quot;&amp;[.H50]&amp;&quot;&quot;&quot;&quot;&amp;REPT(&quot; &quot;;19-LEN([.H50]));&quot;null&quot;&amp;REPT(&quot; &quot;;19-4+2))&#10;&amp;&quot;,&quot;&quot;&quot;&amp;[.I$1]&amp;&quot;&quot;&quot;:&quot;&amp;IF([.I50]&lt;&gt;&quot;&quot;;&quot;&quot;&quot;&quot;&amp;[.I50]&amp;&quot;&quot;&quot;&quot;&amp;REPT(&quot; &quot;;8-LEN([.I50]));&quot;null&quot;&amp;REPT(&quot; &quot;;8-4+2))&#10;&amp;&quot;,&quot;&quot;&quot;&amp;[.J$1]&amp;&quot;&quot;&quot;:&quot;&amp;IF([.J50]&lt;&gt;&quot;&quot;;[.J50]&amp;REPT(&quot; &quot;;4-LEN([.J50]));&quot;null&quot;)&#10;&amp;&quot;,&quot;&quot;&quot;&amp;[.K$1]&amp;&quot;&quot;&quot;:&quot;&amp;IF([.K50]&lt;&gt;&quot;&quot;;[.K50]&amp;REPT(&quot; &quot;;4-LEN([.K50]));&quot;null&quot;)&#10;&amp;&quot;,&quot;&quot;&quot;&amp;[.L$1]&amp;&quot;&quot;&quot;:&quot;&amp;IF([.L50]&lt;&gt;&quot;&quot;;[.L50]&amp;REPT(&quot; &quot;;5-LEN([.L50]));&quot;null &quot;)&#10;&amp;&quot;,&quot;&quot;&quot;&amp;[.M$1]&amp;&quot;&quot;&quot;:&quot;&amp;IF([.M50]&lt;&gt;&quot;&quot;;&quot;&quot;&quot;&quot;&amp;[.M50]&amp;&quot;&quot;&quot;&quot;&amp;REPT(&quot; &quot;;20-LEN([.M50]));&quot;null&quot;&amp;REPT(&quot; &quot;;20-4+2))&#10;&amp;&quot;,&quot;&quot;&quot;&amp;[.N$1]&amp;&quot;&quot;&quot;:&quot;&amp;IF([.N50]&lt;&gt;&quot;&quot;;&quot;&quot;&quot;&quot;&amp;[.N50]&amp;&quot;&quot;&quot;&quot;&amp;REPT(&quot; &quot;;30-LEN([.N50]));&quot;null&quot;&amp;REPT(&quot; &quot;;30-4+2))&#10;&amp;&quot;,&quot;&quot;&quot;&amp;[.O$1]&amp;&quot;&quot;&quot;:&quot;&amp;[.O50]&#10;&amp;&quot;,&quot;&quot;&quot;&amp;[.P$1]&amp;&quot;&quot;&quot;:&quot;&amp;[.P50]&#10;&amp;&quot;}}&quot;" office:value-type="string" office:string-value=",&quot;attrs&quot;:{&quot;LogicalId&quot;:&quot;energy_saving&quot;       ,&quot;Name&quot;:&quot;Mode écoresponsable&quot;                ,&quot;Order&quot;:84 ,&quot;Type&quot;:&quot;info&quot;  ,&quot;SubType&quot;:&quot;numeric&quot;,&quot;Unite&quot;:&quot;°C&quot;   ,&quot;Config_infoName&quot;:null      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0}}" calcext:value-type="string">
            <text:p>,"attrs":{"LogicalId":"energy_saving" <text:s text:c="6"/>,"Name":"Mode écoresponsable" <text:s text:c="15"/>,"Order":84 ,"Type":"info" <text:s/>,"SubType":"numeric","Unite":"°C" <text:s text:c="2"/>,"Config_infoName":null <text:s text:c="16"/>,"Config_value":null <text:s text:c="5"/>,"Config_minValue":null,"Config_maxValue":null,"Config_tempHL":null ,"setValue":null <text:s text:c="17"/>,"Display_param_step":null <text:s text:c="27"/>,"IsHistorized":0,"IsVisible":0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kill_switch</text:p>
          </table:table-cell>
          <table:table-cell office:value-type="string" calcext:value-type="string">
            <text:p>Coupe circuit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binary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 table:formula="of:=LEN([.N51])" office:value-type="float" office:value="0" calcext:value-type="float">
            <text:p>0</text:p>
          </table:table-cell>
          <table:table-cell/>
          <table:table-cell table:style-name="ce17" table:formula="of:=&quot;&quot;&amp;IF([.T50]=&quot;&quot;;&quot; &quot;;IF([.A51]&lt;&gt;&quot;&quot;;&quot;,&quot;;&quot;}&quot;)) &amp;IF([.A51]&lt;&gt;&quot;&quot;;&quot;&quot;&quot;&quot;&amp;[.A51]&amp;&quot;&quot;&quot;&quot;&amp;REPT(&quot; &quot;;20-LEN([.A51]));&quot;&quot;)" office:value-type="string" office:string-value=",&quot;kill_switch&quot;         " calcext:value-type="string">
            <text:p>,"kill_switch" <text:s text:c="8"/></text:p>
          </table:table-cell>
          <table:table-cell table:style-name="ce17" table:formula="of:=&quot;:&quot; &amp;&quot;{&quot;&quot;&quot;&amp;[.B$1]&amp;&quot;&quot;&quot;:&quot;&quot;&quot;&amp;[.B51]&amp;&quot;&quot;&quot;&quot;&amp;REPT(&quot; &quot;;20-LEN([.B51])) &amp;&quot;,&quot;&quot;&quot;&amp;[.C$1]&amp;&quot;&quot;&quot;:&quot;&quot;&quot;&amp;[.C51]&amp;&quot;&quot;&quot;&quot;&amp;REPT(&quot; &quot;;35-LEN([.C51])) &amp;&quot;,&quot;&quot;&quot;&amp;[.D$1]&amp;&quot;&quot;&quot;:&quot;&amp;[.D51]&amp;REPT(&quot; &quot;;3-LEN([.D51])) &amp;&quot;,&quot;&quot;&quot;&amp;[.E$1]&amp;&quot;&quot;&quot;:&quot;&quot;&quot;&amp;[.E51]&amp;&quot;&quot;&quot;&quot;&amp;REPT(&quot; &quot;;6-LEN([.E51])) &amp;&quot;,&quot;&quot;&quot;&amp;[.F$1]&amp;&quot;&quot;&quot;:&quot;&quot;&quot;&amp;[.F51]&amp;&quot;&quot;&quot;&quot;&amp;REPT(&quot; &quot;;7-LEN([.F51])) &amp;&quot;,&quot;&quot;&quot;&amp;[.G$1]&amp;&quot;&quot;&quot;:&quot;&amp;IF([.G51]&lt;&gt;&quot;&quot;;&quot;&quot;&quot;&quot;&amp;[.G51]&amp;&quot;&quot;&quot;&quot;&amp;REPT(&quot; &quot;;5-LEN([.G51]));&quot;null&quot;&amp;REPT(&quot; &quot;;5-4+2)) &amp;&quot;,&quot;&quot;&quot;&amp;[.H$1]&amp;&quot;&quot;&quot;:&quot;&amp;IF([.H51]&lt;&gt;&quot;&quot;;&quot;&quot;&quot;&quot;&amp;[.H51]&amp;&quot;&quot;&quot;&quot;&amp;REPT(&quot; &quot;;19-LEN([.H51]));&quot;null&quot;&amp;REPT(&quot; &quot;;19-4+2)) &amp;&quot;,&quot;&quot;&quot;&amp;[.I$1]&amp;&quot;&quot;&quot;:&quot;&amp;IF([.I51]&lt;&gt;&quot;&quot;;&quot;&quot;&quot;&quot;&amp;[.I51]&amp;&quot;&quot;&quot;&quot;&amp;REPT(&quot; &quot;;8-LEN([.I51]));&quot;null&quot;&amp;REPT(&quot; &quot;;8-4+2)) &amp;&quot;,&quot;&quot;&quot;&amp;[.J$1]&amp;&quot;&quot;&quot;:&quot;&amp;IF([.J51]&lt;&gt;&quot;&quot;;[.J51]&amp;REPT(&quot; &quot;;4-LEN([.J51]));&quot;null&quot;) &amp;&quot;,&quot;&quot;&quot;&amp;[.K$1]&amp;&quot;&quot;&quot;:&quot;&amp;IF([.K51]&lt;&gt;&quot;&quot;;[.K51]&amp;REPT(&quot; &quot;;4-LEN([.K51]));&quot;null&quot;) &amp;&quot;,&quot;&quot;&quot;&amp;[.L$1]&amp;&quot;&quot;&quot;:&quot;&amp;IF([.L51]&lt;&gt;&quot;&quot;;[.L51]&amp;REPT(&quot; &quot;;5-LEN([.L51]));&quot;null &quot;) &amp;&quot;,&quot;&quot;&quot;&amp;[.M$1]&amp;&quot;&quot;&quot;:&quot;&amp;IF([.M51]&lt;&gt;&quot;&quot;;&quot;&quot;&quot;&quot;&amp;[.M51]&amp;&quot;&quot;&quot;&quot;&amp;REPT(&quot; &quot;;20-LEN([.M51]));&quot;null&quot;&amp;REPT(&quot; &quot;;20-4+2)) &amp;&quot;,&quot;&quot;&quot;&amp;[.N$1]&amp;&quot;&quot;&quot;:&quot;&amp;IF([.N51]&lt;&gt;&quot;&quot;;&quot;&quot;&amp;[.N51]&amp;&quot;&quot;&amp;REPT(&quot; &quot;;5-LEN([.N51]));&quot;null&quot;&amp;REPT(&quot; &quot;;5-4+2)) &amp;&quot;,&quot;&quot;&quot;&amp;[.O$1]&amp;&quot;&quot;&quot;:&quot;&amp;[.O51] &amp;&quot;,&quot;&quot;&quot;&amp;[.P$1]&amp;&quot;&quot;&quot;:&quot;&amp;[.P51] &amp;&quot;}&quot;" office:value-type="string" office:string-value=":{&quot;LogicalId&quot;:&quot;kill_switch&quot;         ,&quot;Name&quot;:&quot;Coupe circuit&quot;                      ,&quot;Order&quot;:85 ,&quot;Type&quot;:&quot;info&quot;  ,&quot;SubType&quot;:&quot;binary&quot; ,&quot;Unite&quot;:null   ,&quot;Config_infoName&quot;:null                 ,&quot;Config_value&quot;:null      ,&quot;Config_minValue&quot;:null,&quot;Config_maxValue&quot;:null,&quot;Config_tempHL&quot;:null ,&quot;setValue&quot;:null                  ,&quot;Display_param_step&quot;:null   ,&quot;IsHistorized&quot;:0,&quot;IsVisible&quot;:0}" calcext:value-type="string">
            <text:p>:{"LogicalId":"kill_switch" <text:s text:c="8"/>,"Name":"Coupe circuit" <text:s text:c="21"/>,"Order":85 ,"Type":"info" <text:s/>,"SubType":"binary" ,"Unite":null <text:s text:c="2"/>,"Config_infoName":null <text:s text:c="16"/>,"Config_value":null <text:s text:c="5"/>,"Config_minValue":null,"Config_maxValue":null,"Config_tempHL":null ,"setValue":null <text:s text:c="17"/>,"Display_param_step":null <text:s text:c="2"/>,"IsHistorized":0,"IsVisible":0}</text:p>
          </table:table-cell>
          <table:table-cell table:style-name="ce15" office:value-type="string" calcext:value-type="string">
            <text:p>.</text:p>
          </table:table-cell>
          <table:table-cell table:style-name="ce14"/>
          <table:table-cell table:style-name="ce17" table:formula="of:=IF([.W50]=&quot;&quot;;&quot; &quot;;IF([.B51]&lt;&gt;&quot;&quot;;&quot;,&quot;;&quot;]&quot;))&#10;&amp;IF([.B51]&lt;&gt;&quot;&quot;;&quot;{&quot;&quot;cmd&quot;&quot;:&quot;&quot;&quot;&amp;[.B51]&amp;&quot;&quot;&quot;&quot;&amp;REPT(&quot; &quot;;20-LEN([.B51]));&quot;&quot;)" office:value-type="string" office:string-value=",{&quot;cmd&quot;:&quot;kill_switch&quot;         " calcext:value-type="string">
            <text:p>,{"cmd":"kill_switch" <text:s text:c="8"/></text:p>
          </table:table-cell>
          <table:table-cell table:style-name="ce17" table:formula="of:=&quot;,&quot;&quot;attrs&quot;&quot;:&quot;&#10;&amp;&quot;{&quot;&quot;&quot;&amp;[.B$1]&amp;&quot;&quot;&quot;:&quot;&quot;&quot;&amp;[.B51]&amp;&quot;&quot;&quot;&quot;&amp;REPT(&quot; &quot;;20-LEN([.B51]))&#10;&amp;&quot;,&quot;&quot;&quot;&amp;[.C$1]&amp;&quot;&quot;&quot;:&quot;&quot;&quot;&amp;[.C51]&amp;&quot;&quot;&quot;&quot;&amp;REPT(&quot; &quot;;35-LEN([.C51]))&#10;&amp;&quot;,&quot;&quot;&quot;&amp;[.D$1]&amp;&quot;&quot;&quot;:&quot;&amp;[.D51]&amp;REPT(&quot; &quot;;3-LEN([.D51]))&#10;&amp;&quot;,&quot;&quot;&quot;&amp;[.E$1]&amp;&quot;&quot;&quot;:&quot;&quot;&quot;&amp;[.E51]&amp;&quot;&quot;&quot;&quot;&amp;REPT(&quot; &quot;;6-LEN([.E51]))&#10;&amp;&quot;,&quot;&quot;&quot;&amp;[.F$1]&amp;&quot;&quot;&quot;:&quot;&quot;&quot;&amp;[.F51]&amp;&quot;&quot;&quot;&quot;&amp;REPT(&quot; &quot;;7-LEN([.F51]))&#10;&amp;&quot;,&quot;&quot;&quot;&amp;[.G$1]&amp;&quot;&quot;&quot;:&quot;&amp;IF([.G51]&lt;&gt;&quot;&quot;;&quot;&quot;&quot;&quot;&amp;[.G51]&amp;&quot;&quot;&quot;&quot;&amp;REPT(&quot; &quot;;5-LEN([.G51]));&quot;null&quot;&amp;REPT(&quot; &quot;;5-4+2))&#10;&amp;&quot;,&quot;&quot;&quot;&amp;[.H$1]&amp;&quot;&quot;&quot;:&quot;&amp;IF([.H51]&lt;&gt;&quot;&quot;;&quot;&quot;&quot;&quot;&amp;[.H51]&amp;&quot;&quot;&quot;&quot;&amp;REPT(&quot; &quot;;19-LEN([.H51]));&quot;null&quot;&amp;REPT(&quot; &quot;;19-4+2))&#10;&amp;&quot;,&quot;&quot;&quot;&amp;[.I$1]&amp;&quot;&quot;&quot;:&quot;&amp;IF([.I51]&lt;&gt;&quot;&quot;;&quot;&quot;&quot;&quot;&amp;[.I51]&amp;&quot;&quot;&quot;&quot;&amp;REPT(&quot; &quot;;8-LEN([.I51]));&quot;null&quot;&amp;REPT(&quot; &quot;;8-4+2))&#10;&amp;&quot;,&quot;&quot;&quot;&amp;[.J$1]&amp;&quot;&quot;&quot;:&quot;&amp;IF([.J51]&lt;&gt;&quot;&quot;;[.J51]&amp;REPT(&quot; &quot;;4-LEN([.J51]));&quot;null&quot;)&#10;&amp;&quot;,&quot;&quot;&quot;&amp;[.K$1]&amp;&quot;&quot;&quot;:&quot;&amp;IF([.K51]&lt;&gt;&quot;&quot;;[.K51]&amp;REPT(&quot; &quot;;4-LEN([.K51]));&quot;null&quot;)&#10;&amp;&quot;,&quot;&quot;&quot;&amp;[.L$1]&amp;&quot;&quot;&quot;:&quot;&amp;IF([.L51]&lt;&gt;&quot;&quot;;[.L51]&amp;REPT(&quot; &quot;;5-LEN([.L51]));&quot;null &quot;)&#10;&amp;&quot;,&quot;&quot;&quot;&amp;[.M$1]&amp;&quot;&quot;&quot;:&quot;&amp;IF([.M51]&lt;&gt;&quot;&quot;;&quot;&quot;&quot;&quot;&amp;[.M51]&amp;&quot;&quot;&quot;&quot;&amp;REPT(&quot; &quot;;20-LEN([.M51]));&quot;null&quot;&amp;REPT(&quot; &quot;;20-4+2))&#10;&amp;&quot;,&quot;&quot;&quot;&amp;[.N$1]&amp;&quot;&quot;&quot;:&quot;&amp;IF([.N51]&lt;&gt;&quot;&quot;;&quot;&quot;&quot;&quot;&amp;[.N51]&amp;&quot;&quot;&quot;&quot;&amp;REPT(&quot; &quot;;30-LEN([.N51]));&quot;null&quot;&amp;REPT(&quot; &quot;;30-4+2))&#10;&amp;&quot;,&quot;&quot;&quot;&amp;[.O$1]&amp;&quot;&quot;&quot;:&quot;&amp;[.O51]&#10;&amp;&quot;,&quot;&quot;&quot;&amp;[.P$1]&amp;&quot;&quot;&quot;:&quot;&amp;[.P51]&#10;&amp;&quot;}}&quot;" office:value-type="string" office:string-value=",&quot;attrs&quot;:{&quot;LogicalId&quot;:&quot;kill_switch&quot;         ,&quot;Name&quot;:&quot;Coupe circuit&quot;                      ,&quot;Order&quot;:85 ,&quot;Type&quot;:&quot;info&quot;  ,&quot;SubType&quot;:&quot;binary&quot; ,&quot;Unite&quot;:null   ,&quot;Config_infoName&quot;:null      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0}}" calcext:value-type="string">
            <text:p>,"attrs":{"LogicalId":"kill_switch" <text:s text:c="8"/>,"Name":"Coupe circuit" <text:s text:c="21"/>,"Order":85 ,"Type":"info" <text:s/>,"SubType":"binary" ,"Unite":null <text:s text:c="2"/>,"Config_infoName":null <text:s text:c="16"/>,"Config_value":null <text:s text:c="5"/>,"Config_minValue":null,"Config_maxValue":null,"Config_tempHL":null ,"setValue":null <text:s text:c="17"/>,"Display_param_step":null <text:s text:c="27"/>,"IsHistorized":0,"IsVisible":0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peak_hours</text:p>
          </table:table-cell>
          <table:table-cell office:value-type="string" calcext:value-type="string">
            <text:p>Activation heures pleines-creuses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binary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 table:formula="of:=LEN([.N52])" office:value-type="float" office:value="0" calcext:value-type="float">
            <text:p>0</text:p>
          </table:table-cell>
          <table:table-cell/>
          <table:table-cell table:style-name="ce17" table:formula="of:=&quot;&quot;&amp;IF([.T51]=&quot;&quot;;&quot; &quot;;IF([.A52]&lt;&gt;&quot;&quot;;&quot;,&quot;;&quot;}&quot;)) &amp;IF([.A52]&lt;&gt;&quot;&quot;;&quot;&quot;&quot;&quot;&amp;[.A52]&amp;&quot;&quot;&quot;&quot;&amp;REPT(&quot; &quot;;20-LEN([.A52]));&quot;&quot;)" office:value-type="string" office:string-value=",&quot;peak_hours&quot;          " calcext:value-type="string">
            <text:p>,"peak_hours" <text:s text:c="9"/></text:p>
          </table:table-cell>
          <table:table-cell table:style-name="ce17" table:formula="of:=&quot;:&quot; &amp;&quot;{&quot;&quot;&quot;&amp;[.B$1]&amp;&quot;&quot;&quot;:&quot;&quot;&quot;&amp;[.B52]&amp;&quot;&quot;&quot;&quot;&amp;REPT(&quot; &quot;;20-LEN([.B52])) &amp;&quot;,&quot;&quot;&quot;&amp;[.C$1]&amp;&quot;&quot;&quot;:&quot;&quot;&quot;&amp;[.C52]&amp;&quot;&quot;&quot;&quot;&amp;REPT(&quot; &quot;;35-LEN([.C52])) &amp;&quot;,&quot;&quot;&quot;&amp;[.D$1]&amp;&quot;&quot;&quot;:&quot;&amp;[.D52]&amp;REPT(&quot; &quot;;3-LEN([.D52])) &amp;&quot;,&quot;&quot;&quot;&amp;[.E$1]&amp;&quot;&quot;&quot;:&quot;&quot;&quot;&amp;[.E52]&amp;&quot;&quot;&quot;&quot;&amp;REPT(&quot; &quot;;6-LEN([.E52])) &amp;&quot;,&quot;&quot;&quot;&amp;[.F$1]&amp;&quot;&quot;&quot;:&quot;&quot;&quot;&amp;[.F52]&amp;&quot;&quot;&quot;&quot;&amp;REPT(&quot; &quot;;7-LEN([.F52])) &amp;&quot;,&quot;&quot;&quot;&amp;[.G$1]&amp;&quot;&quot;&quot;:&quot;&amp;IF([.G52]&lt;&gt;&quot;&quot;;&quot;&quot;&quot;&quot;&amp;[.G52]&amp;&quot;&quot;&quot;&quot;&amp;REPT(&quot; &quot;;5-LEN([.G52]));&quot;null&quot;&amp;REPT(&quot; &quot;;5-4+2)) &amp;&quot;,&quot;&quot;&quot;&amp;[.H$1]&amp;&quot;&quot;&quot;:&quot;&amp;IF([.H52]&lt;&gt;&quot;&quot;;&quot;&quot;&quot;&quot;&amp;[.H52]&amp;&quot;&quot;&quot;&quot;&amp;REPT(&quot; &quot;;19-LEN([.H52]));&quot;null&quot;&amp;REPT(&quot; &quot;;19-4+2)) &amp;&quot;,&quot;&quot;&quot;&amp;[.I$1]&amp;&quot;&quot;&quot;:&quot;&amp;IF([.I52]&lt;&gt;&quot;&quot;;&quot;&quot;&quot;&quot;&amp;[.I52]&amp;&quot;&quot;&quot;&quot;&amp;REPT(&quot; &quot;;8-LEN([.I52]));&quot;null&quot;&amp;REPT(&quot; &quot;;8-4+2)) &amp;&quot;,&quot;&quot;&quot;&amp;[.J$1]&amp;&quot;&quot;&quot;:&quot;&amp;IF([.J52]&lt;&gt;&quot;&quot;;[.J52]&amp;REPT(&quot; &quot;;4-LEN([.J52]));&quot;null&quot;) &amp;&quot;,&quot;&quot;&quot;&amp;[.K$1]&amp;&quot;&quot;&quot;:&quot;&amp;IF([.K52]&lt;&gt;&quot;&quot;;[.K52]&amp;REPT(&quot; &quot;;4-LEN([.K52]));&quot;null&quot;) &amp;&quot;,&quot;&quot;&quot;&amp;[.L$1]&amp;&quot;&quot;&quot;:&quot;&amp;IF([.L52]&lt;&gt;&quot;&quot;;[.L52]&amp;REPT(&quot; &quot;;5-LEN([.L52]));&quot;null &quot;) &amp;&quot;,&quot;&quot;&quot;&amp;[.M$1]&amp;&quot;&quot;&quot;:&quot;&amp;IF([.M52]&lt;&gt;&quot;&quot;;&quot;&quot;&quot;&quot;&amp;[.M52]&amp;&quot;&quot;&quot;&quot;&amp;REPT(&quot; &quot;;20-LEN([.M52]));&quot;null&quot;&amp;REPT(&quot; &quot;;20-4+2)) &amp;&quot;,&quot;&quot;&quot;&amp;[.N$1]&amp;&quot;&quot;&quot;:&quot;&amp;IF([.N52]&lt;&gt;&quot;&quot;;&quot;&quot;&amp;[.N52]&amp;&quot;&quot;&amp;REPT(&quot; &quot;;5-LEN([.N52]));&quot;null&quot;&amp;REPT(&quot; &quot;;5-4+2)) &amp;&quot;,&quot;&quot;&quot;&amp;[.O$1]&amp;&quot;&quot;&quot;:&quot;&amp;[.O52] &amp;&quot;,&quot;&quot;&quot;&amp;[.P$1]&amp;&quot;&quot;&quot;:&quot;&amp;[.P52] &amp;&quot;}&quot;" office:value-type="string" office:string-value=":{&quot;LogicalId&quot;:&quot;peak_hours&quot;          ,&quot;Name&quot;:&quot;Activation heures pleines-creuses&quot;  ,&quot;Order&quot;:86 ,&quot;Type&quot;:&quot;info&quot;  ,&quot;SubType&quot;:&quot;binary&quot; ,&quot;Unite&quot;:null   ,&quot;Config_infoName&quot;:null                 ,&quot;Config_value&quot;:null      ,&quot;Config_minValue&quot;:null,&quot;Config_maxValue&quot;:null,&quot;Config_tempHL&quot;:null ,&quot;setValue&quot;:null                  ,&quot;Display_param_step&quot;:null   ,&quot;IsHistorized&quot;:0,&quot;IsVisible&quot;:0}" calcext:value-type="string">
            <text:p>:{"LogicalId":"peak_hours" <text:s text:c="9"/>,"Name":"Activation heures pleines-creuses" <text:s/>,"Order":86 ,"Type":"info" <text:s/>,"SubType":"binary" ,"Unite":null <text:s text:c="2"/>,"Config_infoName":null <text:s text:c="16"/>,"Config_value":null <text:s text:c="5"/>,"Config_minValue":null,"Config_maxValue":null,"Config_tempHL":null ,"setValue":null <text:s text:c="17"/>,"Display_param_step":null <text:s text:c="2"/>,"IsHistorized":0,"IsVisible":0}</text:p>
          </table:table-cell>
          <table:table-cell table:style-name="ce15" office:value-type="string" calcext:value-type="string">
            <text:p>.</text:p>
          </table:table-cell>
          <table:table-cell table:style-name="ce14"/>
          <table:table-cell table:style-name="ce17" table:formula="of:=IF([.W51]=&quot;&quot;;&quot; &quot;;IF([.B52]&lt;&gt;&quot;&quot;;&quot;,&quot;;&quot;]&quot;))&#10;&amp;IF([.B52]&lt;&gt;&quot;&quot;;&quot;{&quot;&quot;cmd&quot;&quot;:&quot;&quot;&quot;&amp;[.B52]&amp;&quot;&quot;&quot;&quot;&amp;REPT(&quot; &quot;;20-LEN([.B52]));&quot;&quot;)" office:value-type="string" office:string-value=",{&quot;cmd&quot;:&quot;peak_hours&quot;          " calcext:value-type="string">
            <text:p>,{"cmd":"peak_hours" <text:s text:c="9"/></text:p>
          </table:table-cell>
          <table:table-cell table:style-name="ce17" table:formula="of:=&quot;,&quot;&quot;attrs&quot;&quot;:&quot;&#10;&amp;&quot;{&quot;&quot;&quot;&amp;[.B$1]&amp;&quot;&quot;&quot;:&quot;&quot;&quot;&amp;[.B52]&amp;&quot;&quot;&quot;&quot;&amp;REPT(&quot; &quot;;20-LEN([.B52]))&#10;&amp;&quot;,&quot;&quot;&quot;&amp;[.C$1]&amp;&quot;&quot;&quot;:&quot;&quot;&quot;&amp;[.C52]&amp;&quot;&quot;&quot;&quot;&amp;REPT(&quot; &quot;;35-LEN([.C52]))&#10;&amp;&quot;,&quot;&quot;&quot;&amp;[.D$1]&amp;&quot;&quot;&quot;:&quot;&amp;[.D52]&amp;REPT(&quot; &quot;;3-LEN([.D52]))&#10;&amp;&quot;,&quot;&quot;&quot;&amp;[.E$1]&amp;&quot;&quot;&quot;:&quot;&quot;&quot;&amp;[.E52]&amp;&quot;&quot;&quot;&quot;&amp;REPT(&quot; &quot;;6-LEN([.E52]))&#10;&amp;&quot;,&quot;&quot;&quot;&amp;[.F$1]&amp;&quot;&quot;&quot;:&quot;&quot;&quot;&amp;[.F52]&amp;&quot;&quot;&quot;&quot;&amp;REPT(&quot; &quot;;7-LEN([.F52]))&#10;&amp;&quot;,&quot;&quot;&quot;&amp;[.G$1]&amp;&quot;&quot;&quot;:&quot;&amp;IF([.G52]&lt;&gt;&quot;&quot;;&quot;&quot;&quot;&quot;&amp;[.G52]&amp;&quot;&quot;&quot;&quot;&amp;REPT(&quot; &quot;;5-LEN([.G52]));&quot;null&quot;&amp;REPT(&quot; &quot;;5-4+2))&#10;&amp;&quot;,&quot;&quot;&quot;&amp;[.H$1]&amp;&quot;&quot;&quot;:&quot;&amp;IF([.H52]&lt;&gt;&quot;&quot;;&quot;&quot;&quot;&quot;&amp;[.H52]&amp;&quot;&quot;&quot;&quot;&amp;REPT(&quot; &quot;;19-LEN([.H52]));&quot;null&quot;&amp;REPT(&quot; &quot;;19-4+2))&#10;&amp;&quot;,&quot;&quot;&quot;&amp;[.I$1]&amp;&quot;&quot;&quot;:&quot;&amp;IF([.I52]&lt;&gt;&quot;&quot;;&quot;&quot;&quot;&quot;&amp;[.I52]&amp;&quot;&quot;&quot;&quot;&amp;REPT(&quot; &quot;;8-LEN([.I52]));&quot;null&quot;&amp;REPT(&quot; &quot;;8-4+2))&#10;&amp;&quot;,&quot;&quot;&quot;&amp;[.J$1]&amp;&quot;&quot;&quot;:&quot;&amp;IF([.J52]&lt;&gt;&quot;&quot;;[.J52]&amp;REPT(&quot; &quot;;4-LEN([.J52]));&quot;null&quot;)&#10;&amp;&quot;,&quot;&quot;&quot;&amp;[.K$1]&amp;&quot;&quot;&quot;:&quot;&amp;IF([.K52]&lt;&gt;&quot;&quot;;[.K52]&amp;REPT(&quot; &quot;;4-LEN([.K52]));&quot;null&quot;)&#10;&amp;&quot;,&quot;&quot;&quot;&amp;[.L$1]&amp;&quot;&quot;&quot;:&quot;&amp;IF([.L52]&lt;&gt;&quot;&quot;;[.L52]&amp;REPT(&quot; &quot;;5-LEN([.L52]));&quot;null &quot;)&#10;&amp;&quot;,&quot;&quot;&quot;&amp;[.M$1]&amp;&quot;&quot;&quot;:&quot;&amp;IF([.M52]&lt;&gt;&quot;&quot;;&quot;&quot;&quot;&quot;&amp;[.M52]&amp;&quot;&quot;&quot;&quot;&amp;REPT(&quot; &quot;;20-LEN([.M52]));&quot;null&quot;&amp;REPT(&quot; &quot;;20-4+2))&#10;&amp;&quot;,&quot;&quot;&quot;&amp;[.N$1]&amp;&quot;&quot;&quot;:&quot;&amp;IF([.N52]&lt;&gt;&quot;&quot;;&quot;&quot;&quot;&quot;&amp;[.N52]&amp;&quot;&quot;&quot;&quot;&amp;REPT(&quot; &quot;;30-LEN([.N52]));&quot;null&quot;&amp;REPT(&quot; &quot;;30-4+2))&#10;&amp;&quot;,&quot;&quot;&quot;&amp;[.O$1]&amp;&quot;&quot;&quot;:&quot;&amp;[.O52]&#10;&amp;&quot;,&quot;&quot;&quot;&amp;[.P$1]&amp;&quot;&quot;&quot;:&quot;&amp;[.P52]&#10;&amp;&quot;}}&quot;" office:value-type="string" office:string-value=",&quot;attrs&quot;:{&quot;LogicalId&quot;:&quot;peak_hours&quot;          ,&quot;Name&quot;:&quot;Activation heures pleines-creuses&quot;  ,&quot;Order&quot;:86 ,&quot;Type&quot;:&quot;info&quot;  ,&quot;SubType&quot;:&quot;binary&quot; ,&quot;Unite&quot;:null   ,&quot;Config_infoName&quot;:null      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0}}" calcext:value-type="string">
            <text:p>,"attrs":{"LogicalId":"peak_hours" <text:s text:c="9"/>,"Name":"Activation heures pleines-creuses" <text:s/>,"Order":86 ,"Type":"info" <text:s/>,"SubType":"binary" ,"Unite":null <text:s text:c="2"/>,"Config_infoName":null <text:s text:c="16"/>,"Config_value":null <text:s text:c="5"/>,"Config_minValue":null,"Config_maxValue":null,"Config_tempHL":null ,"setValue":null <text:s text:c="17"/>,"Display_param_step":null <text:s text:c="27"/>,"IsHistorized":0,"IsVisible":0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peak_signal</text:p>
          </table:table-cell>
          <table:table-cell office:value-type="string" calcext:value-type="string">
            <text:p>Signal heures creuses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binary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 table:formula="of:=LEN([.N53])" office:value-type="float" office:value="0" calcext:value-type="float">
            <text:p>0</text:p>
          </table:table-cell>
          <table:table-cell/>
          <table:table-cell table:style-name="ce17" table:formula="of:=&quot;&quot;&amp;IF([.T52]=&quot;&quot;;&quot; &quot;;IF([.A53]&lt;&gt;&quot;&quot;;&quot;,&quot;;&quot;}&quot;)) &amp;IF([.A53]&lt;&gt;&quot;&quot;;&quot;&quot;&quot;&quot;&amp;[.A53]&amp;&quot;&quot;&quot;&quot;&amp;REPT(&quot; &quot;;20-LEN([.A53]));&quot;&quot;)" office:value-type="string" office:string-value=",&quot;peak_signal&quot;         " calcext:value-type="string">
            <text:p>,"peak_signal" <text:s text:c="8"/></text:p>
          </table:table-cell>
          <table:table-cell table:style-name="ce17" table:formula="of:=&quot;:&quot; &amp;&quot;{&quot;&quot;&quot;&amp;[.B$1]&amp;&quot;&quot;&quot;:&quot;&quot;&quot;&amp;[.B53]&amp;&quot;&quot;&quot;&quot;&amp;REPT(&quot; &quot;;20-LEN([.B53])) &amp;&quot;,&quot;&quot;&quot;&amp;[.C$1]&amp;&quot;&quot;&quot;:&quot;&quot;&quot;&amp;[.C53]&amp;&quot;&quot;&quot;&quot;&amp;REPT(&quot; &quot;;35-LEN([.C53])) &amp;&quot;,&quot;&quot;&quot;&amp;[.D$1]&amp;&quot;&quot;&quot;:&quot;&amp;[.D53]&amp;REPT(&quot; &quot;;3-LEN([.D53])) &amp;&quot;,&quot;&quot;&quot;&amp;[.E$1]&amp;&quot;&quot;&quot;:&quot;&quot;&quot;&amp;[.E53]&amp;&quot;&quot;&quot;&quot;&amp;REPT(&quot; &quot;;6-LEN([.E53])) &amp;&quot;,&quot;&quot;&quot;&amp;[.F$1]&amp;&quot;&quot;&quot;:&quot;&quot;&quot;&amp;[.F53]&amp;&quot;&quot;&quot;&quot;&amp;REPT(&quot; &quot;;7-LEN([.F53])) &amp;&quot;,&quot;&quot;&quot;&amp;[.G$1]&amp;&quot;&quot;&quot;:&quot;&amp;IF([.G53]&lt;&gt;&quot;&quot;;&quot;&quot;&quot;&quot;&amp;[.G53]&amp;&quot;&quot;&quot;&quot;&amp;REPT(&quot; &quot;;5-LEN([.G53]));&quot;null&quot;&amp;REPT(&quot; &quot;;5-4+2)) &amp;&quot;,&quot;&quot;&quot;&amp;[.H$1]&amp;&quot;&quot;&quot;:&quot;&amp;IF([.H53]&lt;&gt;&quot;&quot;;&quot;&quot;&quot;&quot;&amp;[.H53]&amp;&quot;&quot;&quot;&quot;&amp;REPT(&quot; &quot;;19-LEN([.H53]));&quot;null&quot;&amp;REPT(&quot; &quot;;19-4+2)) &amp;&quot;,&quot;&quot;&quot;&amp;[.I$1]&amp;&quot;&quot;&quot;:&quot;&amp;IF([.I53]&lt;&gt;&quot;&quot;;&quot;&quot;&quot;&quot;&amp;[.I53]&amp;&quot;&quot;&quot;&quot;&amp;REPT(&quot; &quot;;8-LEN([.I53]));&quot;null&quot;&amp;REPT(&quot; &quot;;8-4+2)) &amp;&quot;,&quot;&quot;&quot;&amp;[.J$1]&amp;&quot;&quot;&quot;:&quot;&amp;IF([.J53]&lt;&gt;&quot;&quot;;[.J53]&amp;REPT(&quot; &quot;;4-LEN([.J53]));&quot;null&quot;) &amp;&quot;,&quot;&quot;&quot;&amp;[.K$1]&amp;&quot;&quot;&quot;:&quot;&amp;IF([.K53]&lt;&gt;&quot;&quot;;[.K53]&amp;REPT(&quot; &quot;;4-LEN([.K53]));&quot;null&quot;) &amp;&quot;,&quot;&quot;&quot;&amp;[.L$1]&amp;&quot;&quot;&quot;:&quot;&amp;IF([.L53]&lt;&gt;&quot;&quot;;[.L53]&amp;REPT(&quot; &quot;;5-LEN([.L53]));&quot;null &quot;) &amp;&quot;,&quot;&quot;&quot;&amp;[.M$1]&amp;&quot;&quot;&quot;:&quot;&amp;IF([.M53]&lt;&gt;&quot;&quot;;&quot;&quot;&quot;&quot;&amp;[.M53]&amp;&quot;&quot;&quot;&quot;&amp;REPT(&quot; &quot;;20-LEN([.M53]));&quot;null&quot;&amp;REPT(&quot; &quot;;20-4+2)) &amp;&quot;,&quot;&quot;&quot;&amp;[.N$1]&amp;&quot;&quot;&quot;:&quot;&amp;IF([.N53]&lt;&gt;&quot;&quot;;&quot;&quot;&amp;[.N53]&amp;&quot;&quot;&amp;REPT(&quot; &quot;;5-LEN([.N53]));&quot;null&quot;&amp;REPT(&quot; &quot;;5-4+2)) &amp;&quot;,&quot;&quot;&quot;&amp;[.O$1]&amp;&quot;&quot;&quot;:&quot;&amp;[.O53] &amp;&quot;,&quot;&quot;&quot;&amp;[.P$1]&amp;&quot;&quot;&quot;:&quot;&amp;[.P53] &amp;&quot;}&quot;" office:value-type="string" office:string-value=":{&quot;LogicalId&quot;:&quot;peak_signal&quot;         ,&quot;Name&quot;:&quot;Signal heures creuses&quot;              ,&quot;Order&quot;:87 ,&quot;Type&quot;:&quot;info&quot;  ,&quot;SubType&quot;:&quot;binary&quot; ,&quot;Unite&quot;:null   ,&quot;Config_infoName&quot;:null                 ,&quot;Config_value&quot;:null      ,&quot;Config_minValue&quot;:null,&quot;Config_maxValue&quot;:null,&quot;Config_tempHL&quot;:null ,&quot;setValue&quot;:null                  ,&quot;Display_param_step&quot;:null   ,&quot;IsHistorized&quot;:0,&quot;IsVisible&quot;:0}" calcext:value-type="string">
            <text:p>:{"LogicalId":"peak_signal" <text:s text:c="8"/>,"Name":"Signal heures creuses" <text:s text:c="13"/>,"Order":87 ,"Type":"info" <text:s/>,"SubType":"binary" ,"Unite":null <text:s text:c="2"/>,"Config_infoName":null <text:s text:c="16"/>,"Config_value":null <text:s text:c="5"/>,"Config_minValue":null,"Config_maxValue":null,"Config_tempHL":null ,"setValue":null <text:s text:c="17"/>,"Display_param_step":null <text:s text:c="2"/>,"IsHistorized":0,"IsVisible":0}</text:p>
          </table:table-cell>
          <table:table-cell table:style-name="ce15" office:value-type="string" calcext:value-type="string">
            <text:p>.</text:p>
          </table:table-cell>
          <table:table-cell table:style-name="ce14"/>
          <table:table-cell table:style-name="ce17" table:formula="of:=IF([.W52]=&quot;&quot;;&quot; &quot;;IF([.B53]&lt;&gt;&quot;&quot;;&quot;,&quot;;&quot;]&quot;))&#10;&amp;IF([.B53]&lt;&gt;&quot;&quot;;&quot;{&quot;&quot;cmd&quot;&quot;:&quot;&quot;&quot;&amp;[.B53]&amp;&quot;&quot;&quot;&quot;&amp;REPT(&quot; &quot;;20-LEN([.B53]));&quot;&quot;)" office:value-type="string" office:string-value=",{&quot;cmd&quot;:&quot;peak_signal&quot;         " calcext:value-type="string">
            <text:p>,{"cmd":"peak_signal" <text:s text:c="8"/></text:p>
          </table:table-cell>
          <table:table-cell table:style-name="ce17" table:formula="of:=&quot;,&quot;&quot;attrs&quot;&quot;:&quot;&#10;&amp;&quot;{&quot;&quot;&quot;&amp;[.B$1]&amp;&quot;&quot;&quot;:&quot;&quot;&quot;&amp;[.B53]&amp;&quot;&quot;&quot;&quot;&amp;REPT(&quot; &quot;;20-LEN([.B53]))&#10;&amp;&quot;,&quot;&quot;&quot;&amp;[.C$1]&amp;&quot;&quot;&quot;:&quot;&quot;&quot;&amp;[.C53]&amp;&quot;&quot;&quot;&quot;&amp;REPT(&quot; &quot;;35-LEN([.C53]))&#10;&amp;&quot;,&quot;&quot;&quot;&amp;[.D$1]&amp;&quot;&quot;&quot;:&quot;&amp;[.D53]&amp;REPT(&quot; &quot;;3-LEN([.D53]))&#10;&amp;&quot;,&quot;&quot;&quot;&amp;[.E$1]&amp;&quot;&quot;&quot;:&quot;&quot;&quot;&amp;[.E53]&amp;&quot;&quot;&quot;&quot;&amp;REPT(&quot; &quot;;6-LEN([.E53]))&#10;&amp;&quot;,&quot;&quot;&quot;&amp;[.F$1]&amp;&quot;&quot;&quot;:&quot;&quot;&quot;&amp;[.F53]&amp;&quot;&quot;&quot;&quot;&amp;REPT(&quot; &quot;;7-LEN([.F53]))&#10;&amp;&quot;,&quot;&quot;&quot;&amp;[.G$1]&amp;&quot;&quot;&quot;:&quot;&amp;IF([.G53]&lt;&gt;&quot;&quot;;&quot;&quot;&quot;&quot;&amp;[.G53]&amp;&quot;&quot;&quot;&quot;&amp;REPT(&quot; &quot;;5-LEN([.G53]));&quot;null&quot;&amp;REPT(&quot; &quot;;5-4+2))&#10;&amp;&quot;,&quot;&quot;&quot;&amp;[.H$1]&amp;&quot;&quot;&quot;:&quot;&amp;IF([.H53]&lt;&gt;&quot;&quot;;&quot;&quot;&quot;&quot;&amp;[.H53]&amp;&quot;&quot;&quot;&quot;&amp;REPT(&quot; &quot;;19-LEN([.H53]));&quot;null&quot;&amp;REPT(&quot; &quot;;19-4+2))&#10;&amp;&quot;,&quot;&quot;&quot;&amp;[.I$1]&amp;&quot;&quot;&quot;:&quot;&amp;IF([.I53]&lt;&gt;&quot;&quot;;&quot;&quot;&quot;&quot;&amp;[.I53]&amp;&quot;&quot;&quot;&quot;&amp;REPT(&quot; &quot;;8-LEN([.I53]));&quot;null&quot;&amp;REPT(&quot; &quot;;8-4+2))&#10;&amp;&quot;,&quot;&quot;&quot;&amp;[.J$1]&amp;&quot;&quot;&quot;:&quot;&amp;IF([.J53]&lt;&gt;&quot;&quot;;[.J53]&amp;REPT(&quot; &quot;;4-LEN([.J53]));&quot;null&quot;)&#10;&amp;&quot;,&quot;&quot;&quot;&amp;[.K$1]&amp;&quot;&quot;&quot;:&quot;&amp;IF([.K53]&lt;&gt;&quot;&quot;;[.K53]&amp;REPT(&quot; &quot;;4-LEN([.K53]));&quot;null&quot;)&#10;&amp;&quot;,&quot;&quot;&quot;&amp;[.L$1]&amp;&quot;&quot;&quot;:&quot;&amp;IF([.L53]&lt;&gt;&quot;&quot;;[.L53]&amp;REPT(&quot; &quot;;5-LEN([.L53]));&quot;null &quot;)&#10;&amp;&quot;,&quot;&quot;&quot;&amp;[.M$1]&amp;&quot;&quot;&quot;:&quot;&amp;IF([.M53]&lt;&gt;&quot;&quot;;&quot;&quot;&quot;&quot;&amp;[.M53]&amp;&quot;&quot;&quot;&quot;&amp;REPT(&quot; &quot;;20-LEN([.M53]));&quot;null&quot;&amp;REPT(&quot; &quot;;20-4+2))&#10;&amp;&quot;,&quot;&quot;&quot;&amp;[.N$1]&amp;&quot;&quot;&quot;:&quot;&amp;IF([.N53]&lt;&gt;&quot;&quot;;&quot;&quot;&quot;&quot;&amp;[.N53]&amp;&quot;&quot;&quot;&quot;&amp;REPT(&quot; &quot;;30-LEN([.N53]));&quot;null&quot;&amp;REPT(&quot; &quot;;30-4+2))&#10;&amp;&quot;,&quot;&quot;&quot;&amp;[.O$1]&amp;&quot;&quot;&quot;:&quot;&amp;[.O53]&#10;&amp;&quot;,&quot;&quot;&quot;&amp;[.P$1]&amp;&quot;&quot;&quot;:&quot;&amp;[.P53]&#10;&amp;&quot;}}&quot;" office:value-type="string" office:string-value=",&quot;attrs&quot;:{&quot;LogicalId&quot;:&quot;peak_signal&quot;         ,&quot;Name&quot;:&quot;Signal heures creuses&quot;              ,&quot;Order&quot;:87 ,&quot;Type&quot;:&quot;info&quot;  ,&quot;SubType&quot;:&quot;binary&quot; ,&quot;Unite&quot;:null   ,&quot;Config_infoName&quot;:null      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0}}" calcext:value-type="string">
            <text:p>,"attrs":{"LogicalId":"peak_signal" <text:s text:c="8"/>,"Name":"Signal heures creuses" <text:s text:c="13"/>,"Order":87 ,"Type":"info" <text:s/>,"SubType":"binary" ,"Unite":null <text:s text:c="2"/>,"Config_infoName":null <text:s text:c="16"/>,"Config_value":null <text:s text:c="5"/>,"Config_minValue":null,"Config_maxValue":null,"Config_tempHL":null ,"setValue":null <text:s text:c="17"/>,"Display_param_step":null <text:s text:c="27"/>,"IsHistorized":0,"IsVisible":0}}</text:p>
          </table:table-cell>
          <table:table-cell table:style-name="ce20"/>
        </table:table-row>
        <table:table-row table:style-name="ro1">
          <table:table-cell table:number-columns-repeated="16"/>
          <table:table-cell table:formula="of:=LEN([.N54])" office:value-type="float" office:value="0" calcext:value-type="float">
            <text:p>0</text:p>
          </table:table-cell>
          <table:table-cell/>
          <table:table-cell table:style-name="ce17" table:formula="of:=&quot;&quot;&amp;IF([.T53]=&quot;&quot;;&quot; &quot;;IF([.A54]&lt;&gt;&quot;&quot;;&quot;,&quot;;&quot;}&quot;)) &amp;IF([.A54]&lt;&gt;&quot;&quot;;&quot;&quot;&quot;&quot;&amp;[.A54]&amp;&quot;&quot;&quot;&quot;&amp;REPT(&quot; &quot;;20-LEN([.A54]));&quot;&quot;)" office:value-type="string" office:string-value="}" calcext:value-type="string">
            <text:p>}</text:p>
          </table:table-cell>
          <table:table-cell table:style-name="ce17"/>
          <table:table-cell table:style-name="ce15" office:value-type="string" calcext:value-type="string">
            <text:p>.</text:p>
          </table:table-cell>
          <table:table-cell table:style-name="ce14"/>
          <table:table-cell table:style-name="ce17" table:formula="of:=IF([.W53]=&quot;&quot;;&quot; &quot;;IF([.B54]&lt;&gt;&quot;&quot;;&quot;,&quot;;&quot;]&quot;))&#10;&amp;IF([.B54]&lt;&gt;&quot;&quot;;&quot;{&quot;&quot;cmd&quot;&quot;:&quot;&quot;&quot;&amp;[.B54]&amp;&quot;&quot;&quot;&quot;&amp;REPT(&quot; &quot;;20-LEN([.B54]));&quot;&quot;)" office:value-type="string" office:string-value="]" calcext:value-type="string">
            <text:p>]</text:p>
          </table:table-cell>
          <table:table-cell table:style-name="ce17"/>
          <table:table-cell table:style-name="ce20"/>
        </table:table-row>
        <table:table-row table:style-name="ro1">
          <table:table-cell table:number-columns-repeated="16"/>
          <table:table-cell table:formula="of:=LEN([.N55])" office:value-type="float" office:value="0" calcext:value-type="float">
            <text:p>0</text:p>
          </table:table-cell>
          <table:table-cell/>
          <table:table-cell table:style-name="ce17" table:formula="of:=&quot;&quot;&amp;IF([.T54]=&quot;&quot;;&quot; &quot;;IF([.A55]&lt;&gt;&quot;&quot;;&quot;,&quot;;&quot;}&quot;)) &amp;IF([.A55]&lt;&gt;&quot;&quot;;&quot;&quot;&quot;&quot;&amp;[.A55]&amp;&quot;&quot;&quot;&quot;&amp;REPT(&quot; &quot;;20-LEN([.A55]));&quot;&quot;)" office:value-type="string" office:string-value=" " calcext:value-type="string">
            <text:p><text:s/></text:p>
          </table:table-cell>
          <table:table-cell table:style-name="ce17"/>
          <table:table-cell table:style-name="ce15" office:value-type="string" calcext:value-type="string">
            <text:p>.</text:p>
          </table:table-cell>
          <table:table-cell table:style-name="ce14"/>
          <table:table-cell table:style-name="ce17" table:number-columns-repeated="2"/>
          <table:table-cell table:style-name="ce20"/>
        </table:table-row>
        <table:table-row table:style-name="ro1">
          <table:table-cell table:number-columns-repeated="16"/>
          <table:table-cell table:formula="of:=LEN([.N56])" office:value-type="float" office:value="0" calcext:value-type="float">
            <text:p>0</text:p>
          </table:table-cell>
          <table:table-cell/>
          <table:table-cell table:style-name="ce17" table:number-columns-repeated="2"/>
          <table:table-cell table:style-name="ce15" office:value-type="string" calcext:value-type="string">
            <text:p>.</text:p>
          </table:table-cell>
          <table:table-cell table:style-name="ce23" table:number-columns-repeated="2"/>
          <table:table-cell table:number-columns-repeated="2"/>
        </table:table-row>
        <table:table-row table:style-name="ro1">
          <table:table-cell table:number-columns-repeated="16"/>
          <table:table-cell table:formula="of:=LEN([.N57])" office:value-type="float" office:value="0" calcext:value-type="float">
            <text:p>0</text:p>
          </table:table-cell>
          <table:table-cell/>
          <table:table-cell table:style-name="ce17" table:number-columns-repeated="2"/>
          <table:table-cell table:style-name="ce15" office:value-type="string" calcext:value-type="string">
            <text:p>.</text:p>
          </table:table-cell>
          <table:table-cell table:style-name="ce23" table:number-columns-repeated="2"/>
          <table:table-cell table:number-columns-repeated="2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style-name="ce23" table:number-columns-repeated="2"/>
          <table:table-cell table:number-columns-repeated="2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style-name="ce23" table:number-columns-repeated="2"/>
          <table:table-cell table:number-columns-repeated="2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style-name="ce23" table:number-columns-repeated="2"/>
          <table:table-cell table:number-columns-repeated="2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style-name="ce23" table:number-columns-repeated="2"/>
          <table:table-cell table:number-columns-repeated="2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style-name="ce23" table:number-columns-repeated="2"/>
          <table:table-cell table:number-columns-repeated="2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style-name="ce23" table:number-columns-repeated="2"/>
          <table:table-cell table:number-columns-repeated="2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style-name="ce23" table:number-columns-repeated="2"/>
          <table:table-cell table:number-columns-repeated="2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style-name="ce23" table:number-columns-repeated="2"/>
          <table:table-cell table:number-columns-repeated="2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style-name="ce23" table:number-columns-repeated="2"/>
          <table:table-cell table:number-columns-repeated="2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style-name="ce23" table:number-columns-repeated="2"/>
          <table:table-cell table:number-columns-repeated="2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style-name="ce23" table:number-columns-repeated="2"/>
          <table:table-cell table:number-columns-repeated="2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style-name="ce23" table:number-columns-repeated="2"/>
          <table:table-cell table:number-columns-repeated="2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style-name="ce23" table:number-columns-repeated="2"/>
          <table:table-cell table:number-columns-repeated="2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style-name="ce23" table:number-columns-repeated="2"/>
          <table:table-cell table:number-columns-repeated="2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style-name="ce23" table:number-columns-repeated="2"/>
          <table:table-cell table:number-columns-repeated="2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style-name="ce23" table:number-columns-repeated="2"/>
          <table:table-cell table:number-columns-repeated="2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style-name="ce23" table:number-columns-repeated="2"/>
          <table:table-cell table:number-columns-repeated="2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style-name="ce23" table:number-columns-repeated="2"/>
          <table:table-cell table:number-columns-repeated="2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style-name="ce23" table:number-columns-repeated="2"/>
          <table:table-cell table:number-columns-repeated="2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style-name="ce23" table:number-columns-repeated="2"/>
          <table:table-cell table:number-columns-repeated="2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style-name="ce23" table:number-columns-repeated="2"/>
          <table:table-cell table:number-columns-repeated="2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style-name="ce23" table:number-columns-repeated="2"/>
          <table:table-cell table:number-columns-repeated="2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style-name="ce23" table:number-columns-repeated="2"/>
          <table:table-cell table:number-columns-repeated="2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style-name="ce23" table:number-columns-repeated="2"/>
          <table:table-cell table:number-columns-repeated="2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style-name="ce23" table:number-columns-repeated="2"/>
          <table:table-cell table:number-columns-repeated="2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style-name="ce23" table:number-columns-repeated="2"/>
          <table:table-cell table:number-columns-repeated="2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number-columns-repeated="4"/>
        </table:table-row>
        <table:table-row table:style-name="ro1" table:number-rows-repeated="46">
          <table:table-cell table:number-columns-repeated="18"/>
          <table:table-cell table:style-name="ce17"/>
          <table:table-cell table:number-columns-repeated="6"/>
        </table:table-row>
        <table:table-row table:style-name="ro1" table:number-rows-repeated="1048389">
          <table:table-cell table:number-columns-repeated="25"/>
        </table:table-row>
        <table:table-row table:style-name="ro1">
          <table:table-cell table:number-columns-repeated="25"/>
        </table:table-row>
      </table:table>
      <table:table table:name="modules" table:style-name="ta1">
        <office:forms form:automatic-focus="false" form:apply-design-mode="false"/>
        <table:table-column table:style-name="co27" table:default-cell-style-name="Default"/>
        <table:table-column table:style-name="co1" table:number-columns-repeated="13" table:default-cell-style-name="ce39"/>
        <table:table-column table:style-name="co1" table:number-columns-repeated="21" table:default-cell-style-name="Default"/>
        <table:table-column table:style-name="co28" table:default-cell-style-name="Default"/>
        <table:table-column table:style-name="co1" table:number-columns-repeated="27" table:default-cell-style-name="Default"/>
        <table:table-column table:style-name="co1" table:number-columns-repeated="16321"/>
        <table:table-row table:style-name="ro1">
          <table:table-cell table:style-name="ce39"/>
          <table:table-cell table:style-name="ce38" office:value-type="string" calcext:value-type="string">
            <text:p>XXXXXX</text:p>
          </table:table-cell>
          <table:table-cell table:style-name="ce43" office:value-type="string" calcext:value-type="string">
            <text:p>PILOTE_V1</text:p>
          </table:table-cell>
          <table:table-cell table:number-columns-repeated="2" table:style-name="ce43" office:value-type="string" calcext:value-type="string">
            <text:p>PILOTE_V2</text:p>
          </table:table-cell>
          <table:table-cell table:number-columns-repeated="2" table:style-name="ce43" office:value-type="string" calcext:value-type="string">
            <text:p>PILOTE_V3</text:p>
          </table:table-cell>
          <table:table-cell table:number-columns-repeated="2" table:style-name="ce43" office:value-type="string" calcext:value-type="string">
            <text:p>PILOTE_V4</text:p>
          </table:table-cell>
          <table:table-cell office:value-type="string" calcext:value-type="string">
            <text:p>PILOTE_PRO_V1</text:p>
          </table:table-cell>
          <table:table-cell table:number-columns-repeated="4" office:value-type="string" calcext:value-type="string">
            <text:p>GLOW</text:p>
          </table:table-cell>
          <table:table-cell table:style-name="ce39" office:value-type="string" calcext:value-type="string">
            <text:p>GLOW</text:p>
          </table:table-cell>
          <table:table-cell table:style-name="ce39" office:value-type="string" calcext:value-type="string">
            <text:p>BLOOM</text:p>
          </table:table-cell>
          <table:table-cell table:style-name="ce39" table:number-columns-repeated="18"/>
          <table:table-cell table:style-name="ce57" table:number-columns-repeated="2"/>
          <table:table-cell table:style-name="ce39" table:number-columns-repeated="16348"/>
        </table:table-row>
        <table:table-row table:style-name="ro5">
          <table:table-cell table:style-name="ce6"/>
          <table:table-cell table:style-name="ce40" office:value-type="string" calcext:value-type="string">
            <text:p>Heatzy-xxxxx</text:p>
          </table:table-cell>
          <table:table-cell table:style-name="ce21" office:value-type="string" calcext:value-type="string">
            <text:p>Pilote_V1</text:p>
          </table:table-cell>
          <table:table-cell table:style-name="ce21" office:value-type="string" calcext:value-type="string">
            <text:p>Pilote2</text:p>
          </table:table-cell>
          <table:table-cell table:style-name="ce21" office:value-type="string" calcext:value-type="string">
            <text:p>Pilote2_Elec_Pro</text:p>
          </table:table-cell>
          <table:table-cell table:style-name="ce29" office:value-type="string" calcext:value-type="string">
            <text:p>Pilote_Soc</text:p>
          </table:table-cell>
          <table:table-cell table:style-name="ce21" office:value-type="string" calcext:value-type="string">
            <text:p>Elec_Pro_Soc</text:p>
          </table:table-cell>
          <table:table-cell table:style-name="ce21" office:value-type="string" calcext:value-type="string">
            <text:p>Elec_Pro_Ble</text:p>
          </table:table-cell>
          <table:table-cell table:style-name="ce21" office:value-type="string" calcext:value-type="string">
            <text:p>Pilote_Soc_C3</text:p>
          </table:table-cell>
          <table:table-cell table:style-name="ce29" office:value-type="string" calcext:value-type="string">
            <text:p>Pilote_Pro</text:p>
          </table:table-cell>
          <table:table-cell table:style-name="ce22" office:value-type="string" calcext:value-type="string">
            <text:p>Glow_Simple</text:p>
          </table:table-cell>
          <table:table-cell table:style-name="ce22" office:value-type="string" calcext:value-type="string">
            <text:p>Glow</text:p>
          </table:table-cell>
          <table:table-cell table:style-name="ce31" office:value-type="string" calcext:value-type="string">
            <text:p>Glow_Simple_ble</text:p>
          </table:table-cell>
          <table:table-cell table:style-name="ce21" office:value-type="string" calcext:value-type="string">
            <text:p>ONYX</text:p>
          </table:table-cell>
          <table:table-cell table:style-name="ce21" office:value-type="string" calcext:value-type="string">
            <text:p>INEA</text:p>
          </table:table-cell>
          <table:table-cell table:style-name="ce22" office:value-type="string" calcext:value-type="string">
            <text:p>BLOOM</text:p>
          </table:table-cell>
          <table:table-cell table:style-name="ce22" office:value-type="string" calcext:value-type="string">
            <text:p>Shine</text:p>
          </table:table-cell>
          <table:table-cell table:style-name="ce22" office:value-type="string" calcext:value-type="string">
            <text:p>Flam_Week2</text:p>
          </table:table-cell>
          <table:table-cell table:style-name="ce22" office:value-type="string" calcext:value-type="string">
            <text:p>Rocket</text:p>
          </table:table-cell>
          <table:table-cell table:style-name="ce22" office:value-type="string" calcext:value-type="string">
            <text:p>Shine_Blu</text:p>
          </table:table-cell>
          <table:table-cell table:style-name="ce22" office:value-type="string" calcext:value-type="string">
            <text:p>Socket</text:p>
          </table:table-cell>
          <table:table-cell table:style-name="ce22" office:value-type="string" calcext:value-type="string">
            <text:p>Vulcane</text:p>
          </table:table-cell>
          <table:table-cell table:style-name="ce22" office:value-type="string" calcext:value-type="string">
            <text:p>Bridge</text:p>
          </table:table-cell>
          <table:table-cell table:style-name="ce22" office:value-type="string" calcext:value-type="string">
            <text:p>Pilote_Duo</text:p>
          </table:table-cell>
          <table:table-cell table:style-name="ce22" office:value-type="string" calcext:value-type="string">
            <text:p>Heatzy_Boiler</text:p>
          </table:table-cell>
          <table:table-cell table:style-name="ce22" table:number-columns-repeated="2"/>
          <table:table-cell table:style-name="ce6"/>
          <table:table-cell table:number-columns-repeated="6"/>
          <table:table-cell table:style-name="ce24" office:value-type="string" calcext:value-type="string">
            <text:p>{</text:p>
            <text:p>"Modules":{</text:p>
          </table:table-cell>
          <table:table-cell table:style-name="ce24"/>
          <table:table-cell table:number-columns-repeated="27"/>
          <table:table-cell table:style-name="Default" table:number-columns-repeated="16321"/>
        </table:table-row>
        <table:table-row table:style-name="ro1">
          <table:table-cell/>
          <table:table-cell table:style-name="ce41" office:value-type="string" calcext:value-type="string">
            <text:p>xxxxxx</text:p>
          </table:table-cell>
          <table:table-cell office:value-type="string" calcext:value-type="string">
            <text:p>9420ae048da545c88fc6274d204dd25f</text:p>
          </table:table-cell>
          <table:table-cell office:value-type="string" calcext:value-type="string">
            <text:p>51d16c22a5f74280bc3cfe9ebcdc6402</text:p>
          </table:table-cell>
          <table:table-cell office:value-type="string" calcext:value-type="string">
            <text:p>4fc968a21e7243b390e9ede6f1c6465d</text:p>
          </table:table-cell>
          <table:table-cell office:value-type="string" calcext:value-type="string">
            <text:p>b9a67b6ce24b437d9794103fd317e627</text:p>
          </table:table-cell>
          <table:table-cell office:value-type="string" calcext:value-type="string">
            <text:p>b8c6657b66c34148b4dee64d615cefc7</text:p>
          </table:table-cell>
          <table:table-cell office:value-type="string" calcext:value-type="string">
            <text:p>9dacde7ef459421eaf8dc4bea9385634</text:p>
          </table:table-cell>
          <table:table-cell office:value-type="string" calcext:value-type="string">
            <text:p>46409c7f29d4411c85a3a46e5ee3703e</text:p>
          </table:table-cell>
          <table:table-cell office:value-type="string" calcext:value-type="string">
            <text:p>a77a929fcf0d4631bc4f669080376891</text:p>
          </table:table-cell>
          <table:table-cell office:value-type="string" calcext:value-type="string">
            <text:p>2fd622e45283470f9e27e8e6167d7533</text:p>
          </table:table-cell>
          <table:table-cell office:value-type="string" calcext:value-type="string">
            <text:p>51c35c204f854cebbc780bf9785db409</text:p>
          </table:table-cell>
          <table:table-cell office:value-type="string" calcext:value-type="string">
            <text:p>cffa0df68a52449085c5d1e72c2f6bb0</text:p>
          </table:table-cell>
          <table:table-cell office:value-type="string" calcext:value-type="string">
            <text:p>bb10d064f8de409db633b750faa22a52</text:p>
          </table:table-cell>
          <table:table-cell table:style-name="ce39" office:value-type="string" calcext:value-type="string">
            <text:p>fc89066ee74c4149a9beb37d4ea93604</text:p>
          </table:table-cell>
          <table:table-cell table:style-name="ce39" office:value-type="string" calcext:value-type="string">
            <text:p>480253852d574f11b2d7fbf4460d7a41</text:p>
          </table:table-cell>
          <table:table-cell table:style-name="ce39" office:value-type="string" calcext:value-type="string">
            <text:p>XXXXXXXXXXXXXXXXXXXXXXXXXXXXXXXX</text:p>
          </table:table-cell>
          <table:table-cell table:style-name="ce39" office:value-type="string" calcext:value-type="string">
            <text:p>f71ee820660f4f358db8b8a474689726</text:p>
          </table:table-cell>
          <table:table-cell table:style-name="ce39" office:value-type="string" calcext:value-type="string">
            <text:p>d60c58d724b845068bf4652a10883c92</text:p>
          </table:table-cell>
          <table:table-cell table:style-name="ce39" office:value-type="string" calcext:value-type="string">
            <text:p>2884feb88e0b4f30b75ea5572276a102</text:p>
          </table:table-cell>
          <table:table-cell table:style-name="ce39" office:value-type="string" calcext:value-type="string">
            <text:p>0a000341206048a0be23e2cbf9d8f29a</text:p>
          </table:table-cell>
          <table:table-cell table:style-name="ce39" office:value-type="string" calcext:value-type="string">
            <text:p>e5d5766484db4b4d9b9fa7c08cd65481</text:p>
          </table:table-cell>
          <table:table-cell table:style-name="ce39" office:value-type="string" calcext:value-type="string">
            <text:p>18e548a0df9444669a480a7ab31bc314</text:p>
          </table:table-cell>
          <table:table-cell table:style-name="ce39" office:value-type="string" calcext:value-type="string">
            <text:p>aa85e43fc4464e4d0000000000000000</text:p>
          </table:table-cell>
          <table:table-cell table:style-name="ce39" office:value-type="string" calcext:value-type="string">
            <text:p>528f35158d854e220000000000000000</text:p>
          </table:table-cell>
          <table:table-cell table:style-name="ce39" table:number-columns-repeated="2"/>
          <table:table-cell table:number-columns-repeated="3"/>
          <table:table-cell office:value-type="string" calcext:value-type="string">
            <text:p>refresh</text:p>
          </table:table-cell>
          <table:table-cell table:number-columns-repeated="3"/>
          <table:table-cell table:style-name="ce24"/>
          <table:table-cell table:style-name="ce24" table:formula="of:=CHAR(9)&amp;&quot;&quot;&quot;&quot;&amp;[.B2]&amp;&quot;&quot;&quot;&quot;&amp;&quot;:&quot;&amp;REPT(&quot; &quot;;20-LEN([.B2]))&amp;&quot;{&quot;&quot;product_key&quot;&quot;:&quot;&quot;&quot;&amp;[.B3]&amp;&quot;&quot;&quot;,&quot;&quot;cmds&quot;&quot;:[&quot;&amp;&quot;&quot;&quot;&quot;&amp;COM.MICROSOFT.TEXTJOIN(&quot;&quot;&quot;,&quot;&quot;&quot;;1;COM.MICROSOFT.FILTER([.$A4:.$A60];[.B4:.B60]=&quot;x&quot;))&amp;&quot;&quot;&quot;&quot;&amp;&quot;]}&quot;" office:value-type="string" office:string-value="&#9;&quot;Heatzy-xxxxx&quot;:        {&quot;product_key&quot;:&quot;xxxxxx&quot;,&quot;cmds&quot;:[&quot;refresh&quot;]}" calcext:value-type="string">
            <text:p><text:tab/>"Heatzy-xxxxx": <text:s text:c="7"/>{"product_key":"xxxxxx","cmds":["refresh"]}</text:p>
          </table:table-cell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2]" office:value-type="string" office:string-value="refresh" calcext:value-type="string">
            <text:p>refresh</text:p>
          </table:table-cell>
          <table:table-cell table:style-name="ce41" office:value-type="string" calcext:value-type="string">
            <text:p>x</text:p>
          </table:table-cell>
          <table:table-cell table:number-columns-repeated="12" office:value-type="string" calcext:value-type="string">
            <text:p>x</text:p>
          </table:table-cell>
          <table:table-cell table:number-columns-repeated="11" table:style-name="ce39" office:value-type="string" calcext:value-type="string">
            <text:p>x</text:p>
          </table:table-cell>
          <table:table-cell table:style-name="ce39" table:number-columns-repeated="2"/>
          <table:table-cell/>
          <table:table-cell table:formula="of:=IF(ISERROR(VLOOKUP([.A4];[.AE:.AE];1;0));&quot;&quot;;&quot;x&quot;)" office:value-type="string" office:string-value="x" calcext:value-type="string">
            <text:p>x</text:p>
          </table:table-cell>
          <table:table-cell/>
          <table:table-cell office:value-type="string" calcext:value-type="string">
            <text:p>IsOnLine</text:p>
          </table:table-cell>
          <table:table-cell table:number-columns-repeated="3"/>
          <table:table-cell table:style-name="ce24" office:value-type="string" calcext:value-type="string">
            <text:p>,</text:p>
          </table:table-cell>
          <table:table-cell table:style-name="ce24" table:formula="of:=CHAR(9)&amp;&quot;&quot;&quot;&quot;&amp;[.C2]&amp;&quot;&quot;&quot;&quot;&amp;&quot;:&quot;&amp;REPT(&quot; &quot;;20-LEN([.C2]))&amp;&quot;{&quot;&quot;product_key&quot;&quot;:&quot;&quot;&quot;&amp;[.C3]&amp;&quot;&quot;&quot;,&quot;&quot;cmds&quot;&quot;:[&quot;&amp;&quot;&quot;&quot;&quot;&amp;COM.MICROSOFT.TEXTJOIN(&quot;&quot;&quot;,&quot;&quot;&quot;;1;COM.MICROSOFT.FILTER([.$A4:.$A60];[.C4:.C60]=&quot;x&quot;))&amp;&quot;&quot;&quot;&quot;&amp;&quot;]}&quot;" office:value-type="string" office:string-value="&#9;&quot;Pilote_V1&quot;:           {&quot;product_key&quot;:&quot;9420ae048da545c88fc6274d204dd25f&quot;,&quot;cmds&quot;:[&quot;refresh&quot;,&quot;IsOnLine&quot;,&quot;EtatConsigne&quot;,&quot;mode&quot;,&quot;Confort&quot;,&quot;Eco&quot;,&quot;HorsGel&quot;,&quot;Off&quot;,&quot;etatprog&quot;,&quot;ProgOn&quot;,&quot;ProgOff&quot;]}" calcext:value-type="string">
            <text:p><text:tab/>"Pilote_V1": <text:s text:c="10"/>{"product_key":"9420ae048da545c88fc6274d204dd25f","cmds":["refresh","IsOnLine","EtatConsigne","mode","Confort","Eco","HorsGel","Off","etatprog","ProgOn","ProgOff"]}</text:p>
          </table:table-cell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3]" office:value-type="string" office:string-value="IsOnLine" calcext:value-type="string">
            <text:p>IsOnLine</text:p>
          </table:table-cell>
          <table:table-cell table:style-name="ce41"/>
          <table:table-cell table:number-columns-repeated="12" office:value-type="string" calcext:value-type="string">
            <text:p>x</text:p>
          </table:table-cell>
          <table:table-cell table:number-columns-repeated="11" table:style-name="ce39" office:value-type="string" calcext:value-type="string">
            <text:p>x</text:p>
          </table:table-cell>
          <table:table-cell table:style-name="ce39" table:number-columns-repeated="2"/>
          <table:table-cell/>
          <table:table-cell table:formula="of:=IF(ISERROR(VLOOKUP([.A5];[.AE:.AE];1;0));&quot;&quot;;&quot;x&quot;)" office:value-type="string" office:string-value="x" calcext:value-type="string">
            <text:p>x</text:p>
          </table:table-cell>
          <table:table-cell/>
          <table:table-cell office:value-type="string" calcext:value-type="string">
            <text:p>EtatConsigne</text:p>
          </table:table-cell>
          <table:table-cell table:number-columns-repeated="3"/>
          <table:table-cell table:style-name="ce24" office:value-type="string" calcext:value-type="string">
            <text:p>,</text:p>
          </table:table-cell>
          <table:table-cell table:style-name="ce24" table:formula="of:=CHAR(9)&amp;&quot;&quot;&quot;&quot;&amp;[.D2]&amp;&quot;&quot;&quot;&quot;&amp;&quot;:&quot;&amp;REPT(&quot; &quot;;20-LEN([.D2]))&amp;&quot;{&quot;&quot;product_key&quot;&quot;:&quot;&quot;&quot;&amp;[.D3]&amp;&quot;&quot;&quot;,&quot;&quot;cmds&quot;&quot;:[&quot;&amp;&quot;&quot;&quot;&quot;&amp;COM.MICROSOFT.TEXTJOIN(&quot;&quot;&quot;,&quot;&quot;&quot;;1;COM.MICROSOFT.FILTER([.$A4:.$A60];[.D4:.D60]=&quot;x&quot;))&amp;&quot;&quot;&quot;&quot;&amp;&quot;]}&quot;" office:value-type="string" office:string-value="&#9;&quot;Pilote2&quot;:             {&quot;product_key&quot;:&quot;51d16c22a5f74280bc3cfe9ebcdc6402&quot;,&quot;cmds&quot;:[&quot;refresh&quot;,&quot;IsOnLine&quot;,&quot;EtatConsigne&quot;,&quot;mode&quot;,&quot;Confort&quot;,&quot;Eco&quot;,&quot;HorsGel&quot;,&quot;Off&quot;,&quot;etatprog&quot;,&quot;ProgOn&quot;,&quot;ProgOff&quot;,&quot;etatlock&quot;,&quot;LockOn&quot;,&quot;LockOff&quot;,&quot;derog_mode&quot;,&quot;derog_off&quot;,&quot;derog_time_vacances&quot;,&quot;derog_vacances&quot;,&quot;derog_time_boost&quot;,&quot;derog_boost&quot;]}" calcext:value-type="string">
            <text:p><text:tab/>"Pilote2": <text:s text:c="12"/>{"product_key":"51d16c22a5f74280bc3cfe9ebcdc6402","cmds":["refresh","IsOnLine","EtatConsigne","mode","Confort","Eco","HorsGel","Off","etatprog","ProgOn","ProgOff","etatlock","LockOn","LockOff","derog_mode","derog_off","derog_time_vacances","derog_vacances","derog_time_boost","derog_boost"]}</text:p>
          </table:table-cell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4]" office:value-type="string" office:string-value="cur_temp" calcext:value-type="string">
            <text:p>cur_temp</text:p>
          </table:table-cell>
          <table:table-cell table:style-name="ce41"/>
          <table:table-cell table:number-columns-repeated="7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39" office:value-type="string" calcext:value-type="string">
            <text:p>x</text:p>
          </table:table-cell>
          <table:table-cell table:style-name="ce39" table:number-columns-repeated="2"/>
          <table:table-cell table:style-name="ce39" office:value-type="string" calcext:value-type="string">
            <text:p>x</text:p>
          </table:table-cell>
          <table:table-cell table:style-name="ce39" table:number-columns-repeated="9"/>
          <table:table-cell/>
          <table:table-cell table:formula="of:=IF(ISERROR(VLOOKUP([.A6];[.AE:.AE];1;0));&quot;&quot;;&quot;x&quot;)">
            <text:p/>
          </table:table-cell>
          <table:table-cell/>
          <table:table-cell office:value-type="string" calcext:value-type="string">
            <text:p>mode</text:p>
          </table:table-cell>
          <table:table-cell table:number-columns-repeated="3"/>
          <table:table-cell table:style-name="ce24" office:value-type="string" calcext:value-type="string">
            <text:p>,</text:p>
          </table:table-cell>
          <table:table-cell table:style-name="ce24" table:formula="of:=CHAR(9)&amp;&quot;&quot;&quot;&quot;&amp;[.E2]&amp;&quot;&quot;&quot;&quot;&amp;&quot;:&quot;&amp;REPT(&quot; &quot;;20-LEN([.E2]))&amp;&quot;{&quot;&quot;product_key&quot;&quot;:&quot;&quot;&quot;&amp;[.E3]&amp;&quot;&quot;&quot;,&quot;&quot;cmds&quot;&quot;:[&quot;&amp;&quot;&quot;&quot;&quot;&amp;COM.MICROSOFT.TEXTJOIN(&quot;&quot;&quot;,&quot;&quot;&quot;;1;COM.MICROSOFT.FILTER([.$A4:.$A60];[.E4:.E60]=&quot;x&quot;))&amp;&quot;&quot;&quot;&quot;&amp;&quot;]}&quot;" office:value-type="string" office:string-value="&#9;&quot;Pilote2_Elec_Pro&quot;:    {&quot;product_key&quot;:&quot;4fc968a21e7243b390e9ede6f1c6465d&quot;,&quot;cmds&quot;:[&quot;refresh&quot;,&quot;IsOnLine&quot;,&quot;EtatConsigne&quot;,&quot;mode&quot;,&quot;Confort&quot;,&quot;Eco&quot;,&quot;HorsGel&quot;,&quot;Off&quot;,&quot;etatprog&quot;,&quot;ProgOn&quot;,&quot;ProgOff&quot;]}" calcext:value-type="string">
            <text:p><text:tab/>"Pilote2_Elec_Pro": <text:s text:c="3"/>{"product_key":"4fc968a21e7243b390e9ede6f1c6465d","cmds":["refresh","IsOnLine","EtatConsigne","mode","Confort","Eco","HorsGel","Off","etatprog","ProgOn","ProgOff"]}</text:p>
          </table:table-cell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5]" office:value-type="string" office:string-value="cur_humi" calcext:value-type="string">
            <text:p>cur_humi</text:p>
          </table:table-cell>
          <table:table-cell table:style-name="ce41"/>
          <table:table-cell table:number-columns-repeated="7"/>
          <table:table-cell office:value-type="string" calcext:value-type="string">
            <text:p>x</text:p>
          </table:table-cell>
          <table:table-cell table:number-columns-repeated="4"/>
          <table:table-cell table:style-name="ce39" table:number-columns-repeated="13"/>
          <table:table-cell/>
          <table:table-cell table:formula="of:=IF(ISERROR(VLOOKUP([.A7];[.AE:.AE];1;0));&quot;&quot;;&quot;x&quot;)">
            <text:p/>
          </table:table-cell>
          <table:table-cell/>
          <table:table-cell office:value-type="string" calcext:value-type="string">
            <text:p>Confort</text:p>
          </table:table-cell>
          <table:table-cell table:number-columns-repeated="3"/>
          <table:table-cell table:style-name="ce24" office:value-type="string" calcext:value-type="string">
            <text:p>,</text:p>
          </table:table-cell>
          <table:table-cell table:style-name="ce24" table:formula="of:=CHAR(9)&amp;&quot;&quot;&quot;&quot;&amp;[.F2]&amp;&quot;&quot;&quot;&quot;&amp;&quot;:&quot;&amp;REPT(&quot; &quot;;20-LEN([.F2]))&amp;&quot;{&quot;&quot;product_key&quot;&quot;:&quot;&quot;&quot;&amp;[.F3]&amp;&quot;&quot;&quot;,&quot;&quot;cmds&quot;&quot;:[&quot;&amp;&quot;&quot;&quot;&quot;&amp;COM.MICROSOFT.TEXTJOIN(&quot;&quot;&quot;,&quot;&quot;&quot;;1;COM.MICROSOFT.FILTER([.$A4:.$A60];[.F4:.F60]=&quot;x&quot;))&amp;&quot;&quot;&quot;&quot;&amp;&quot;]}&quot;" office:value-type="string" office:string-value="&#9;&quot;Pilote_Soc&quot;:          {&quot;product_key&quot;:&quot;b9a67b6ce24b437d9794103fd317e627&quot;,&quot;cmds&quot;:[&quot;refresh&quot;,&quot;IsOnLine&quot;,&quot;EtatConsigne&quot;,&quot;mode&quot;,&quot;Confort&quot;,&quot;Eco&quot;,&quot;HorsGel&quot;,&quot;Off&quot;,&quot;etatprog&quot;,&quot;ProgOn&quot;,&quot;ProgOff&quot;,&quot;etatlock&quot;,&quot;LockOn&quot;,&quot;LockOff&quot;,&quot;derog_mode&quot;,&quot;derog_off&quot;,&quot;derog_time_vacances&quot;,&quot;derog_vacances&quot;,&quot;derog_time_boost&quot;,&quot;derog_boost&quot;]}" calcext:value-type="string">
            <text:p><text:tab/>"Pilote_Soc": <text:s text:c="9"/>{"product_key":"b9a67b6ce24b437d9794103fd317e627","cmds":["refresh","IsOnLine","EtatConsigne","mode","Confort","Eco","HorsGel","Off","etatprog","ProgOn","ProgOff","etatlock","LockOn","LockOff","derog_mode","derog_off","derog_time_vacances","derog_vacances","derog_time_boost","derog_boost"]}</text:p>
          </table:table-cell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6]" office:value-type="string" office:string-value="eco_temp" calcext:value-type="string">
            <text:p>eco_temp</text:p>
          </table:table-cell>
          <table:table-cell table:style-name="ce41"/>
          <table:table-cell table:number-columns-repeated="7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style-name="ce39" office:value-type="string" calcext:value-type="string">
            <text:p>x</text:p>
          </table:table-cell>
          <table:table-cell table:style-name="ce39"/>
          <table:table-cell table:number-columns-repeated="2" table:style-name="ce39" office:value-type="string" calcext:value-type="string">
            <text:p>x</text:p>
          </table:table-cell>
          <table:table-cell table:style-name="ce39" table:number-columns-repeated="9"/>
          <table:table-cell/>
          <table:table-cell table:formula="of:=IF(ISERROR(VLOOKUP([.A8];[.AE:.AE];1;0));&quot;&quot;;&quot;x&quot;)">
            <text:p/>
          </table:table-cell>
          <table:table-cell/>
          <table:table-cell office:value-type="string" calcext:value-type="string">
            <text:p>Eco</text:p>
          </table:table-cell>
          <table:table-cell table:number-columns-repeated="3"/>
          <table:table-cell table:style-name="ce24" office:value-type="string" calcext:value-type="string">
            <text:p>,</text:p>
          </table:table-cell>
          <table:table-cell table:style-name="ce24" table:formula="of:=CHAR(9)&amp;&quot;&quot;&quot;&quot;&amp;[.G2]&amp;&quot;&quot;&quot;&quot;&amp;&quot;:&quot;&amp;REPT(&quot; &quot;;20-LEN([.G2]))&amp;&quot;{&quot;&quot;product_key&quot;&quot;:&quot;&quot;&quot;&amp;[.G3]&amp;&quot;&quot;&quot;,&quot;&quot;cmds&quot;&quot;:[&quot;&amp;&quot;&quot;&quot;&quot;&amp;COM.MICROSOFT.TEXTJOIN(&quot;&quot;&quot;,&quot;&quot;&quot;;1;COM.MICROSOFT.FILTER([.$A4:.$A60];[.G4:.G60]=&quot;x&quot;))&amp;&quot;&quot;&quot;&quot;&amp;&quot;]}&quot;" office:value-type="string" office:string-value="&#9;&quot;Elec_Pro_Soc&quot;:        {&quot;product_key&quot;:&quot;b8c6657b66c34148b4dee64d615cefc7&quot;,&quot;cmds&quot;:[&quot;refresh&quot;,&quot;IsOnLine&quot;,&quot;EtatConsigne&quot;,&quot;mode&quot;,&quot;Confort&quot;,&quot;Eco&quot;,&quot;HorsGel&quot;,&quot;Off&quot;,&quot;etatprog&quot;,&quot;ProgOn&quot;,&quot;ProgOff&quot;]}" calcext:value-type="string">
            <text:p><text:tab/>"Elec_Pro_Soc": <text:s text:c="7"/>{"product_key":"b8c6657b66c34148b4dee64d615cefc7","cmds":["refresh","IsOnLine","EtatConsigne","mode","Confort","Eco","HorsGel","Off","etatprog","ProgOn","ProgOff"]}</text:p>
          </table:table-cell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7]" office:value-type="string" office:string-value="eco_temp_consigne" calcext:value-type="string">
            <text:p>eco_temp_consigne</text:p>
          </table:table-cell>
          <table:table-cell table:style-name="ce41"/>
          <table:table-cell table:number-columns-repeated="7"/>
          <table:table-cell office:value-type="string" calcext:value-type="string">
            <text:p>x</text:p>
          </table:table-cell>
          <table:table-cell table:number-columns-repeated="4"/>
          <table:table-cell table:style-name="ce39" table:number-columns-repeated="13"/>
          <table:table-cell/>
          <table:table-cell table:formula="of:=IF(ISERROR(VLOOKUP([.A9];[.AE:.AE];1;0));&quot;&quot;;&quot;x&quot;)">
            <text:p/>
          </table:table-cell>
          <table:table-cell/>
          <table:table-cell office:value-type="string" calcext:value-type="string">
            <text:p>HorsGel</text:p>
          </table:table-cell>
          <table:table-cell table:number-columns-repeated="3"/>
          <table:table-cell table:style-name="ce24" office:value-type="string" calcext:value-type="string">
            <text:p>,</text:p>
          </table:table-cell>
          <table:table-cell table:style-name="ce24" table:formula="of:=CHAR(9)&amp;&quot;&quot;&quot;&quot;&amp;[.H2]&amp;&quot;&quot;&quot;&quot;&amp;&quot;:&quot;&amp;REPT(&quot; &quot;;20-LEN([.H2]))&amp;&quot;{&quot;&quot;product_key&quot;&quot;:&quot;&quot;&quot;&amp;[.H3]&amp;&quot;&quot;&quot;,&quot;&quot;cmds&quot;&quot;:[&quot;&amp;&quot;&quot;&quot;&quot;&amp;COM.MICROSOFT.TEXTJOIN(&quot;&quot;&quot;,&quot;&quot;&quot;;1;COM.MICROSOFT.FILTER([.$A4:.$A60];[.H4:.H60]=&quot;x&quot;))&amp;&quot;&quot;&quot;&quot;&amp;&quot;]}&quot;" office:value-type="string" office:string-value="&#9;&quot;Elec_Pro_Ble&quot;:        {&quot;product_key&quot;:&quot;9dacde7ef459421eaf8dc4bea9385634&quot;,&quot;cmds&quot;:[&quot;refresh&quot;,&quot;IsOnLine&quot;,&quot;EtatConsigne&quot;,&quot;mode&quot;,&quot;Confort&quot;,&quot;Eco&quot;,&quot;HorsGel&quot;,&quot;Off&quot;,&quot;etatprog&quot;,&quot;ProgOn&quot;,&quot;ProgOff&quot;,&quot;etatlock&quot;,&quot;LockOn&quot;,&quot;LockOff&quot;,&quot;derog_mode&quot;,&quot;derog_off&quot;,&quot;derog_time_vacances&quot;,&quot;derog_vacances&quot;,&quot;derog_time_boost&quot;,&quot;derog_boost&quot;]}" calcext:value-type="string">
            <text:p><text:tab/>"Elec_Pro_Ble": <text:s text:c="7"/>{"product_key":"9dacde7ef459421eaf8dc4bea9385634","cmds":["refresh","IsOnLine","EtatConsigne","mode","Confort","Eco","HorsGel","Off","etatprog","ProgOn","ProgOff","etatlock","LockOn","LockOff","derog_mode","derog_off","derog_time_vacances","derog_vacances","derog_time_boost","derog_boost"]}</text:p>
          </table:table-cell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8]" office:value-type="string" office:string-value="eco_temp_consigneHL" calcext:value-type="string">
            <text:p>eco_temp_consigneHL</text:p>
          </table:table-cell>
          <table:table-cell table:style-name="ce41"/>
          <table:table-cell table:number-columns-repeated="9"/>
          <table:table-cell table:number-columns-repeated="2" office:value-type="string" calcext:value-type="string">
            <text:p>x</text:p>
          </table:table-cell>
          <table:table-cell/>
          <table:table-cell table:style-name="ce39" office:value-type="string" calcext:value-type="string">
            <text:p>x</text:p>
          </table:table-cell>
          <table:table-cell table:style-name="ce39"/>
          <table:table-cell table:number-columns-repeated="2" table:style-name="ce39" office:value-type="string" calcext:value-type="string">
            <text:p>x</text:p>
          </table:table-cell>
          <table:table-cell table:style-name="ce39" table:number-columns-repeated="9"/>
          <table:table-cell/>
          <table:table-cell table:formula="of:=IF(ISERROR(VLOOKUP([.A10];[.AE:.AE];1;0));&quot;&quot;;&quot;x&quot;)">
            <text:p/>
          </table:table-cell>
          <table:table-cell/>
          <table:table-cell office:value-type="string" calcext:value-type="string">
            <text:p>Off</text:p>
          </table:table-cell>
          <table:table-cell table:number-columns-repeated="3"/>
          <table:table-cell table:style-name="ce24" office:value-type="string" calcext:value-type="string">
            <text:p>,</text:p>
          </table:table-cell>
          <table:table-cell table:style-name="ce24" table:formula="of:=CHAR(9)&amp;&quot;&quot;&quot;&quot;&amp;[.I2]&amp;&quot;&quot;&quot;&quot;&amp;&quot;:&quot;&amp;REPT(&quot; &quot;;20-LEN([.I2]))&amp;&quot;{&quot;&quot;product_key&quot;&quot;:&quot;&quot;&quot;&amp;[.I3]&amp;&quot;&quot;&quot;,&quot;&quot;cmds&quot;&quot;:[&quot;&amp;&quot;&quot;&quot;&quot;&amp;COM.MICROSOFT.TEXTJOIN(&quot;&quot;&quot;,&quot;&quot;&quot;;1;COM.MICROSOFT.FILTER([.$A4:.$A60];[.I4:.I60]=&quot;x&quot;))&amp;&quot;&quot;&quot;&quot;&amp;&quot;]}&quot;" office:value-type="string" office:string-value="&#9;&quot;Pilote_Soc_C3&quot;:       {&quot;product_key&quot;:&quot;46409c7f29d4411c85a3a46e5ee3703e&quot;,&quot;cmds&quot;:[&quot;refresh&quot;,&quot;IsOnLine&quot;,&quot;EtatConsigne&quot;,&quot;mode&quot;,&quot;Confort&quot;,&quot;Eco&quot;,&quot;HorsGel&quot;,&quot;Off&quot;,&quot;etatprog&quot;,&quot;ProgOn&quot;,&quot;ProgOff&quot;]}" calcext:value-type="string">
            <text:p><text:tab/>"Pilote_Soc_C3": <text:s text:c="6"/>{"product_key":"46409c7f29d4411c85a3a46e5ee3703e","cmds":["refresh","IsOnLine","EtatConsigne","mode","Confort","Eco","HorsGel","Off","etatprog","ProgOn","ProgOff"]}</text:p>
          </table:table-cell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9]" office:value-type="string" office:string-value="cft_temp" calcext:value-type="string">
            <text:p>cft_temp</text:p>
          </table:table-cell>
          <table:table-cell table:style-name="ce41"/>
          <table:table-cell table:number-columns-repeated="7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style-name="ce39" table:number-columns-repeated="2"/>
          <table:table-cell table:style-name="ce39" office:value-type="string" calcext:value-type="string">
            <text:p>x</text:p>
          </table:table-cell>
          <table:table-cell table:style-name="ce39" table:number-columns-repeated="10"/>
          <table:table-cell/>
          <table:table-cell table:formula="of:=IF(ISERROR(VLOOKUP([.A11];[.AE:.AE];1;0));&quot;&quot;;&quot;x&quot;)">
            <text:p/>
          </table:table-cell>
          <table:table-cell/>
          <table:table-cell office:value-type="string" calcext:value-type="string">
            <text:p>etatprog</text:p>
          </table:table-cell>
          <table:table-cell table:number-columns-repeated="3"/>
          <table:table-cell table:style-name="ce24" office:value-type="string" calcext:value-type="string">
            <text:p>,</text:p>
          </table:table-cell>
          <table:table-cell table:style-name="ce24" table:formula="of:=CHAR(9)&amp;&quot;&quot;&quot;&quot;&amp;[.J2]&amp;&quot;&quot;&quot;&quot;&amp;&quot;:&quot;&amp;REPT(&quot; &quot;;20-LEN([.J2]))&amp;&quot;{&quot;&quot;product_key&quot;&quot;:&quot;&quot;&quot;&amp;[.J3]&amp;&quot;&quot;&quot;,&quot;&quot;cmds&quot;&quot;:[&quot;&amp;&quot;&quot;&quot;&quot;&amp;COM.MICROSOFT.TEXTJOIN(&quot;&quot;&quot;,&quot;&quot;&quot;;1;COM.MICROSOFT.FILTER([.$A4:.$A60];[.J4:.J60]=&quot;x&quot;))&amp;&quot;&quot;&quot;&quot;&amp;&quot;]}&quot;" office:value-type="string" office:string-value="&#9;&quot;Pilote_Pro&quot;:          {&quot;product_key&quot;:&quot;a77a929fcf0d4631bc4f669080376891&quot;,&quot;cmds&quot;:[&quot;refresh&quot;,&quot;IsOnLine&quot;,&quot;cur_temp&quot;,&quot;cur_humi&quot;,&quot;eco_temp&quot;,&quot;eco_temp_consigne&quot;,&quot;cft_temp&quot;,&quot;cft_temp_consigne&quot;,&quot;Tendance&quot;,&quot;WindowOpened&quot;,&quot;EtatConsigne&quot;,&quot;mode&quot;,&quot;Confort&quot;,&quot;Eco&quot;,&quot;HorsGel&quot;,&quot;Off&quot;,&quot;Confort-1&quot;,&quot;Confort-2&quot;,&quot;etatprog&quot;,&quot;ProgOn&quot;,&quot;ProgOff&quot;,&quot;etatlock&quot;,&quot;LockOn&quot;,&quot;LockOff&quot;,&quot;WindowSwitch&quot;,&quot;WindowSwitchOn&quot;,&quot;WindowSwitchOff&quot;,&quot;derog_mode&quot;,&quot;derog_off&quot;,&quot;derog_time_vacances&quot;,&quot;derog_vacances&quot;,&quot;derog_time_boost&quot;,&quot;derog_boost&quot;,&quot;derog_presence&quot;,&quot;detect_presence&quot;]}" calcext:value-type="string">
            <text:p><text:tab/>"Pilote_Pro": <text:s text:c="9"/>{"product_key":"a77a929fcf0d4631bc4f669080376891","cmds":["refresh","IsOnLine","cur_temp","cur_humi","eco_temp","eco_temp_consigne","cft_temp","cft_temp_consigne","Tendance","WindowOpened","EtatConsigne","mode","Confort","Eco","HorsGel","Off","Confort-1","Confort-2","etatprog","ProgOn","ProgOff","etatlock","LockOn","LockOff","WindowSwitch","WindowSwitchOn","WindowSwitchOff","derog_mode","derog_off","derog_time_vacances","derog_vacances","derog_time_boost","derog_boost","derog_presence","detect_presence"]}</text:p>
          </table:table-cell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10]" office:value-type="string" office:string-value="cft_temp_consigne" calcext:value-type="string">
            <text:p>cft_temp_consigne</text:p>
          </table:table-cell>
          <table:table-cell table:style-name="ce41"/>
          <table:table-cell table:number-columns-repeated="7"/>
          <table:table-cell office:value-type="string" calcext:value-type="string">
            <text:p>x</text:p>
          </table:table-cell>
          <table:table-cell table:number-columns-repeated="4"/>
          <table:table-cell table:style-name="ce39" table:number-columns-repeated="13"/>
          <table:table-cell/>
          <table:table-cell table:formula="of:=IF(ISERROR(VLOOKUP([.A12];[.AE:.AE];1;0));&quot;&quot;;&quot;x&quot;)">
            <text:p/>
          </table:table-cell>
          <table:table-cell/>
          <table:table-cell office:value-type="string" calcext:value-type="string">
            <text:p>ProgOn</text:p>
          </table:table-cell>
          <table:table-cell table:number-columns-repeated="3"/>
          <table:table-cell table:style-name="ce24" office:value-type="string" calcext:value-type="string">
            <text:p>,</text:p>
          </table:table-cell>
          <table:table-cell table:style-name="ce24" table:formula="of:=CHAR(9)&amp;&quot;&quot;&quot;&quot;&amp;[.K2]&amp;&quot;&quot;&quot;&quot;&amp;&quot;:&quot;&amp;REPT(&quot; &quot;;20-LEN([.K2]))&amp;&quot;{&quot;&quot;product_key&quot;&quot;:&quot;&quot;&quot;&amp;[.K3]&amp;&quot;&quot;&quot;,&quot;&quot;cmds&quot;&quot;:[&quot;&amp;&quot;&quot;&quot;&quot;&amp;COM.MICROSOFT.TEXTJOIN(&quot;&quot;&quot;,&quot;&quot;&quot;;1;COM.MICROSOFT.FILTER([.$A4:.$A60];[.K4:.K60]=&quot;x&quot;))&amp;&quot;&quot;&quot;&quot;&amp;&quot;]}&quot;" office:value-type="string" office:string-value="&#9;&quot;Glow_Simple&quot;:         {&quot;product_key&quot;:&quot;2fd622e45283470f9e27e8e6167d7533&quot;,&quot;cmds&quot;:[&quot;refresh&quot;,&quot;IsOnLine&quot;,&quot;EtatConsigne&quot;,&quot;mode&quot;,&quot;Confort&quot;,&quot;Eco&quot;,&quot;HorsGel&quot;,&quot;Off&quot;,&quot;etatprog&quot;,&quot;ProgOn&quot;,&quot;ProgOff&quot;]}" calcext:value-type="string">
            <text:p><text:tab/>"Glow_Simple": <text:s text:c="8"/>{"product_key":"2fd622e45283470f9e27e8e6167d7533","cmds":["refresh","IsOnLine","EtatConsigne","mode","Confort","Eco","HorsGel","Off","etatprog","ProgOn","ProgOff"]}</text:p>
          </table:table-cell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11]" office:value-type="string" office:string-value="cft_temp_consigneHL" calcext:value-type="string">
            <text:p>cft_temp_consigneHL</text:p>
          </table:table-cell>
          <table:table-cell table:style-name="ce41"/>
          <table:table-cell table:number-columns-repeated="9"/>
          <table:table-cell table:number-columns-repeated="2" office:value-type="string" calcext:value-type="string">
            <text:p>x</text:p>
          </table:table-cell>
          <table:table-cell/>
          <table:table-cell table:style-name="ce39" table:number-columns-repeated="2"/>
          <table:table-cell table:style-name="ce39" office:value-type="string" calcext:value-type="string">
            <text:p>x</text:p>
          </table:table-cell>
          <table:table-cell table:style-name="ce39" table:number-columns-repeated="10"/>
          <table:table-cell/>
          <table:table-cell table:formula="of:=IF(ISERROR(VLOOKUP([.A13];[.AE:.AE];1;0));&quot;&quot;;&quot;x&quot;)">
            <text:p/>
          </table:table-cell>
          <table:table-cell/>
          <table:table-cell office:value-type="string" calcext:value-type="string">
            <text:p>ProgOff</text:p>
          </table:table-cell>
          <table:table-cell table:number-columns-repeated="3"/>
          <table:table-cell table:style-name="ce24" office:value-type="string" calcext:value-type="string">
            <text:p>,</text:p>
          </table:table-cell>
          <table:table-cell table:style-name="ce24" table:formula="of:=CHAR(9)&amp;&quot;&quot;&quot;&quot;&amp;[.L2]&amp;&quot;&quot;&quot;&quot;&amp;&quot;:&quot;&amp;REPT(&quot; &quot;;20-LEN([.L2]))&amp;&quot;{&quot;&quot;product_key&quot;&quot;:&quot;&quot;&quot;&amp;[.L3]&amp;&quot;&quot;&quot;,&quot;&quot;cmds&quot;&quot;:[&quot;&amp;&quot;&quot;&quot;&quot;&amp;COM.MICROSOFT.TEXTJOIN(&quot;&quot;&quot;,&quot;&quot;&quot;;1;COM.MICROSOFT.FILTER([.$A4:.$A60];[.L4:.L60]=&quot;x&quot;))&amp;&quot;&quot;&quot;&quot;&amp;&quot;]}&quot;" office:value-type="string" office:string-value="&#9;&quot;Glow&quot;:                {&quot;product_key&quot;:&quot;51c35c204f854cebbc780bf9785db409&quot;,&quot;cmds&quot;:[&quot;refresh&quot;,&quot;IsOnLine&quot;,&quot;eco_temp&quot;,&quot;eco_temp_consigneHL&quot;,&quot;cft_temp&quot;,&quot;cft_temp_consigneHL&quot;,&quot;EtatConsigne&quot;,&quot;mode&quot;,&quot;Confort&quot;,&quot;Eco&quot;,&quot;HorsGel&quot;,&quot;Off&quot;,&quot;etatprog&quot;,&quot;ProgOn&quot;,&quot;ProgOff&quot;]}" calcext:value-type="string">
            <text:p><text:tab/>"Glow": <text:s text:c="15"/>{"product_key":"51c35c204f854cebbc780bf9785db409","cmds":["refresh","IsOnLine","eco_temp","eco_temp_consigneHL","cft_temp","cft_temp_consigneHL","EtatConsigne","mode","Confort","Eco","HorsGel","Off","etatprog","ProgOn","ProgOff"]}</text:p>
          </table:table-cell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12]" office:value-type="string" office:string-value="Tendance" calcext:value-type="string">
            <text:p>Tendance</text:p>
          </table:table-cell>
          <table:table-cell table:style-name="ce41"/>
          <table:table-cell table:number-columns-repeated="7"/>
          <table:table-cell office:value-type="string" calcext:value-type="string">
            <text:p>x</text:p>
          </table:table-cell>
          <table:table-cell table:number-columns-repeated="4"/>
          <table:table-cell table:style-name="ce39" table:number-columns-repeated="13"/>
          <table:table-cell/>
          <table:table-cell table:formula="of:=IF(ISERROR(VLOOKUP([.A14];[.AE:.AE];1;0));&quot;&quot;;&quot;x&quot;)">
            <text:p/>
          </table:table-cell>
          <table:table-cell/>
          <table:table-cell office:value-type="string" calcext:value-type="string">
            <text:p>etatlock</text:p>
          </table:table-cell>
          <table:table-cell table:number-columns-repeated="3"/>
          <table:table-cell table:style-name="ce24" office:value-type="string" calcext:value-type="string">
            <text:p>,</text:p>
          </table:table-cell>
          <table:table-cell table:style-name="ce24" table:formula="of:=CHAR(9)&amp;&quot;&quot;&quot;&quot;&amp;[.M2]&amp;&quot;&quot;&quot;&quot;&amp;&quot;:&quot;&amp;REPT(&quot; &quot;;20-LEN([.M2]))&amp;&quot;{&quot;&quot;product_key&quot;&quot;:&quot;&quot;&quot;&amp;[.M3]&amp;&quot;&quot;&quot;,&quot;&quot;cmds&quot;&quot;:[&quot;&amp;&quot;&quot;&quot;&quot;&amp;COM.MICROSOFT.TEXTJOIN(&quot;&quot;&quot;,&quot;&quot;&quot;;1;COM.MICROSOFT.FILTER([.$A4:.$A60];[.M4:.M60]=&quot;x&quot;))&amp;&quot;&quot;&quot;&quot;&amp;&quot;]}&quot;" office:value-type="string" office:string-value="&#9;&quot;Glow_Simple_ble&quot;:     {&quot;product_key&quot;:&quot;cffa0df68a52449085c5d1e72c2f6bb0&quot;,&quot;cmds&quot;:[&quot;refresh&quot;,&quot;IsOnLine&quot;,&quot;cur_temp&quot;,&quot;eco_temp&quot;,&quot;eco_temp_consigneHL&quot;,&quot;cft_temp&quot;,&quot;cft_temp_consigneHL&quot;,&quot;EtatConsigne&quot;,&quot;mode&quot;,&quot;Confort&quot;,&quot;Eco&quot;,&quot;HorsGel&quot;,&quot;Off&quot;,&quot;etatprog&quot;,&quot;ProgOn&quot;,&quot;ProgOff&quot;,&quot;plugzy&quot;,&quot;plugzyon&quot;,&quot;plugzyoff&quot;,&quot;derog_mode&quot;,&quot;derog_off&quot;,&quot;derog_time_vacances&quot;,&quot;derog_vacances&quot;,&quot;derog_time_boost&quot;,&quot;derog_boost&quot;,&quot;derog_presence&quot;,&quot;detect_presence&quot;]}" calcext:value-type="string">
            <text:p><text:tab/>"Glow_Simple_ble": <text:s text:c="4"/>{"product_key":"cffa0df68a52449085c5d1e72c2f6bb0","cmds":["refresh","IsOnLine","cur_temp","eco_temp","eco_temp_consigneHL","cft_temp","cft_temp_consigneHL","EtatConsigne","mode","Confort","Eco","HorsGel","Off","etatprog","ProgOn","ProgOff","plugzy","plugzyon","plugzyoff","derog_mode","derog_off","derog_time_vacances","derog_vacances","derog_time_boost","derog_boost","derog_presence","detect_presence"]}</text:p>
          </table:table-cell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13]" office:value-type="string" office:string-value="WindowOpened" calcext:value-type="string">
            <text:p>WindowOpened</text:p>
          </table:table-cell>
          <table:table-cell table:style-name="ce41"/>
          <table:table-cell table:number-columns-repeated="7"/>
          <table:table-cell office:value-type="string" calcext:value-type="string">
            <text:p>x</text:p>
          </table:table-cell>
          <table:table-cell table:number-columns-repeated="4"/>
          <table:table-cell table:style-name="ce39" table:number-columns-repeated="13"/>
          <table:table-cell/>
          <table:table-cell table:formula="of:=IF(ISERROR(VLOOKUP([.A15];[.AE:.AE];1;0));&quot;&quot;;&quot;x&quot;)">
            <text:p/>
          </table:table-cell>
          <table:table-cell/>
          <table:table-cell office:value-type="string" calcext:value-type="string">
            <text:p>LockOn</text:p>
          </table:table-cell>
          <table:table-cell table:number-columns-repeated="3"/>
          <table:table-cell table:style-name="ce24" office:value-type="string" calcext:value-type="string">
            <text:p>,</text:p>
          </table:table-cell>
          <table:table-cell table:style-name="ce24" table:formula="of:=CHAR(9)&amp;&quot;&quot;&quot;&quot;&amp;[.N2]&amp;&quot;&quot;&quot;&quot;&amp;&quot;:&quot;&amp;REPT(&quot; &quot;;20-LEN([.N2]))&amp;&quot;{&quot;&quot;product_key&quot;&quot;:&quot;&quot;&quot;&amp;[.N3]&amp;&quot;&quot;&quot;,&quot;&quot;cmds&quot;&quot;:[&quot;&amp;&quot;&quot;&quot;&quot;&amp;COM.MICROSOFT.TEXTJOIN(&quot;&quot;&quot;,&quot;&quot;&quot;;1;COM.MICROSOFT.FILTER([.$A4:.$A60];[.N4:.N60]=&quot;x&quot;))&amp;&quot;&quot;&quot;&quot;&amp;&quot;]}&quot;" office:value-type="string" office:string-value="&#9;&quot;ONYX&quot;:                {&quot;product_key&quot;:&quot;bb10d064f8de409db633b750faa22a52&quot;,&quot;cmds&quot;:[&quot;refresh&quot;,&quot;IsOnLine&quot;,&quot;EtatConsigne&quot;,&quot;mode&quot;,&quot;Confort&quot;,&quot;Eco&quot;,&quot;HorsGel&quot;,&quot;Off&quot;,&quot;etatprog&quot;,&quot;ProgOn&quot;,&quot;ProgOff&quot;]}" calcext:value-type="string">
            <text:p><text:tab/>"ONYX": <text:s text:c="15"/>{"product_key":"bb10d064f8de409db633b750faa22a52","cmds":["refresh","IsOnLine","EtatConsigne","mode","Confort","Eco","HorsGel","Off","etatprog","ProgOn","ProgOff"]}</text:p>
          </table:table-cell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14]" office:value-type="string" office:string-value="EtatConsigne" calcext:value-type="string">
            <text:p>EtatConsigne</text:p>
          </table:table-cell>
          <table:table-cell table:style-name="ce41"/>
          <table:table-cell table:number-columns-repeated="12" office:value-type="string" calcext:value-type="string">
            <text:p>x</text:p>
          </table:table-cell>
          <table:table-cell table:number-columns-repeated="8" table:style-name="ce39" office:value-type="string" calcext:value-type="string">
            <text:p>x</text:p>
          </table:table-cell>
          <table:table-cell table:style-name="ce39"/>
          <table:table-cell table:number-columns-repeated="2" table:style-name="ce39" office:value-type="string" calcext:value-type="string">
            <text:p>x</text:p>
          </table:table-cell>
          <table:table-cell table:style-name="ce39" table:number-columns-repeated="2"/>
          <table:table-cell/>
          <table:table-cell table:formula="of:=IF(ISERROR(VLOOKUP([.A16];[.AE:.AE];1;0));&quot;&quot;;&quot;x&quot;)" office:value-type="string" office:string-value="x" calcext:value-type="string">
            <text:p>x</text:p>
          </table:table-cell>
          <table:table-cell/>
          <table:table-cell office:value-type="string" calcext:value-type="string">
            <text:p>LockOff</text:p>
          </table:table-cell>
          <table:table-cell table:number-columns-repeated="3"/>
          <table:table-cell table:style-name="ce24" office:value-type="string" calcext:value-type="string">
            <text:p>,</text:p>
          </table:table-cell>
          <table:table-cell table:style-name="ce24" table:formula="of:=CHAR(9)&amp;&quot;&quot;&quot;&quot;&amp;[.O2]&amp;&quot;&quot;&quot;&quot;&amp;&quot;:&quot;&amp;REPT(&quot; &quot;;20-LEN([.O2]))&amp;&quot;{&quot;&quot;product_key&quot;&quot;:&quot;&quot;&quot;&amp;[.O3]&amp;&quot;&quot;&quot;,&quot;&quot;cmds&quot;&quot;:[&quot;&amp;&quot;&quot;&quot;&quot;&amp;COM.MICROSOFT.TEXTJOIN(&quot;&quot;&quot;,&quot;&quot;&quot;;1;COM.MICROSOFT.FILTER([.$A4:.$A60];[.O4:.O60]=&quot;x&quot;))&amp;&quot;&quot;&quot;&quot;&amp;&quot;]}&quot;" office:value-type="string" office:string-value="&#9;&quot;INEA&quot;:                {&quot;product_key&quot;:&quot;fc89066ee74c4149a9beb37d4ea93604&quot;,&quot;cmds&quot;:[&quot;refresh&quot;,&quot;IsOnLine&quot;,&quot;cur_temp&quot;,&quot;eco_temp&quot;,&quot;eco_temp_consigneHL&quot;,&quot;EtatConsigne&quot;,&quot;mode&quot;,&quot;Confort&quot;,&quot;Eco&quot;,&quot;HorsGel&quot;,&quot;Off&quot;,&quot;etatprog&quot;,&quot;ProgOn&quot;,&quot;ProgOff&quot;]}" calcext:value-type="string">
            <text:p><text:tab/>"INEA": <text:s text:c="15"/>{"product_key":"fc89066ee74c4149a9beb37d4ea93604","cmds":["refresh","IsOnLine","cur_temp","eco_temp","eco_temp_consigneHL","EtatConsigne","mode","Confort","Eco","HorsGel","Off","etatprog","ProgOn","ProgOff"]}</text:p>
          </table:table-cell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15]" office:value-type="string" office:string-value="mode" calcext:value-type="string">
            <text:p>mode</text:p>
          </table:table-cell>
          <table:table-cell table:style-name="ce41"/>
          <table:table-cell table:number-columns-repeated="12" office:value-type="string" calcext:value-type="string">
            <text:p>x</text:p>
          </table:table-cell>
          <table:table-cell table:number-columns-repeated="8" table:style-name="ce39" office:value-type="string" calcext:value-type="string">
            <text:p>x</text:p>
          </table:table-cell>
          <table:table-cell table:style-name="ce39"/>
          <table:table-cell table:number-columns-repeated="2" table:style-name="ce39" office:value-type="string" calcext:value-type="string">
            <text:p>x</text:p>
          </table:table-cell>
          <table:table-cell table:style-name="ce39" table:number-columns-repeated="2"/>
          <table:table-cell/>
          <table:table-cell table:formula="of:=IF(ISERROR(VLOOKUP([.A17];[.AE:.AE];1;0));&quot;&quot;;&quot;x&quot;)" office:value-type="string" office:string-value="x" calcext:value-type="string">
            <text:p>x</text:p>
          </table:table-cell>
          <table:table-cell/>
          <table:table-cell office:value-type="string" calcext:value-type="string">
            <text:p>derog_mode</text:p>
          </table:table-cell>
          <table:table-cell table:number-columns-repeated="3"/>
          <table:table-cell table:style-name="ce24" office:value-type="string" calcext:value-type="string">
            <text:p>,</text:p>
          </table:table-cell>
          <table:table-cell table:style-name="ce24" table:formula="of:=CHAR(9)&amp;&quot;&quot;&quot;&quot;&amp;[.P2]&amp;&quot;&quot;&quot;&quot;&amp;&quot;:&quot;&amp;REPT(&quot; &quot;;20-LEN([.P2]))&amp;&quot;{&quot;&quot;product_key&quot;&quot;:&quot;&quot;&quot;&amp;[.P3]&amp;&quot;&quot;&quot;,&quot;&quot;cmds&quot;&quot;:[&quot;&amp;&quot;&quot;&quot;&quot;&amp;COM.MICROSOFT.TEXTJOIN(&quot;&quot;&quot;,&quot;&quot;&quot;;1;COM.MICROSOFT.FILTER([.$A4:.$A60];[.P4:.P60]=&quot;x&quot;))&amp;&quot;&quot;&quot;&quot;&amp;&quot;]}&quot;" office:value-type="string" office:string-value="&#9;&quot;BLOOM&quot;:               {&quot;product_key&quot;:&quot;480253852d574f11b2d7fbf4460d7a41&quot;,&quot;cmds&quot;:[&quot;refresh&quot;,&quot;IsOnLine&quot;,&quot;EtatConsigne&quot;,&quot;mode&quot;,&quot;Confort&quot;,&quot;Eco&quot;,&quot;HorsGel&quot;,&quot;Off&quot;,&quot;etatprog&quot;,&quot;ProgOn&quot;,&quot;ProgOff&quot;]}" calcext:value-type="string">
            <text:p><text:tab/>"BLOOM": <text:s text:c="14"/>{"product_key":"480253852d574f11b2d7fbf4460d7a41","cmds":["refresh","IsOnLine","EtatConsigne","mode","Confort","Eco","HorsGel","Off","etatprog","ProgOn","ProgOff"]}</text:p>
          </table:table-cell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16]" office:value-type="string" office:string-value="Confort" calcext:value-type="string">
            <text:p>Confort</text:p>
          </table:table-cell>
          <table:table-cell table:style-name="ce41"/>
          <table:table-cell table:number-columns-repeated="12" office:value-type="string" calcext:value-type="string">
            <text:p>x</text:p>
          </table:table-cell>
          <table:table-cell table:number-columns-repeated="8" table:style-name="ce39" office:value-type="string" calcext:value-type="string">
            <text:p>x</text:p>
          </table:table-cell>
          <table:table-cell table:style-name="ce39"/>
          <table:table-cell table:number-columns-repeated="2" table:style-name="ce39" office:value-type="string" calcext:value-type="string">
            <text:p>x</text:p>
          </table:table-cell>
          <table:table-cell table:style-name="ce39" table:number-columns-repeated="2"/>
          <table:table-cell/>
          <table:table-cell table:formula="of:=IF(ISERROR(VLOOKUP([.A18];[.AE:.AE];1;0));&quot;&quot;;&quot;x&quot;)" office:value-type="string" office:string-value="x" calcext:value-type="string">
            <text:p>x</text:p>
          </table:table-cell>
          <table:table-cell/>
          <table:table-cell office:value-type="string" calcext:value-type="string">
            <text:p>derog_off</text:p>
          </table:table-cell>
          <table:table-cell table:number-columns-repeated="3"/>
          <table:table-cell table:style-name="ce24" office:value-type="string" calcext:value-type="string">
            <text:p>,</text:p>
          </table:table-cell>
          <table:table-cell table:style-name="ce24" table:formula="of:=CHAR(9)&amp;&quot;&quot;&quot;&quot;&amp;[.Q2]&amp;&quot;&quot;&quot;&quot;&amp;&quot;:&quot;&amp;REPT(&quot; &quot;;20-LEN([.Q2]))&amp;&quot;{&quot;&quot;product_key&quot;&quot;:&quot;&quot;&quot;&amp;[.Q3]&amp;&quot;&quot;&quot;,&quot;&quot;cmds&quot;&quot;:[&quot;&amp;&quot;&quot;&quot;&quot;&amp;COM.MICROSOFT.TEXTJOIN(&quot;&quot;&quot;,&quot;&quot;&quot;;1;COM.MICROSOFT.FILTER([.$A4:.$A60];[.Q4:.Q60]=&quot;x&quot;))&amp;&quot;&quot;&quot;&quot;&amp;&quot;]}&quot;" office:value-type="string" office:string-value="&#9;&quot;Shine&quot;:               {&quot;product_key&quot;:&quot;XXXXXXXXXXXXXXXXXXXXXXXXXXXXXXXX&quot;,&quot;cmds&quot;:[&quot;refresh&quot;,&quot;IsOnLine&quot;,&quot;eco_temp&quot;,&quot;eco_temp_consigneHL&quot;,&quot;cft_temp&quot;,&quot;cft_temp_consigneHL&quot;,&quot;EtatConsigne&quot;,&quot;mode&quot;,&quot;Confort&quot;,&quot;Eco&quot;,&quot;HorsGel&quot;,&quot;Off&quot;,&quot;etatprog&quot;,&quot;ProgOn&quot;,&quot;ProgOff&quot;,&quot;plugzy&quot;,&quot;plugzyon&quot;,&quot;plugzyoff&quot;,&quot;derog_mode&quot;,&quot;derog_off&quot;,&quot;derog_time_vacances&quot;,&quot;derog_vacances&quot;,&quot;derog_time_boost&quot;,&quot;derog_boost&quot;]}" calcext:value-type="string">
            <text:p><text:tab/>"Shine": <text:s text:c="14"/>{"product_key":"XXXXXXXXXXXXXXXXXXXXXXXXXXXXXXXX","cmds":["refresh","IsOnLine","eco_temp","eco_temp_consigneHL","cft_temp","cft_temp_consigneHL","EtatConsigne","mode","Confort","Eco","HorsGel","Off","etatprog","ProgOn","ProgOff","plugzy","plugzyon","plugzyoff","derog_mode","derog_off","derog_time_vacances","derog_vacances","derog_time_boost","derog_boost"]}</text:p>
          </table:table-cell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17]" office:value-type="string" office:string-value="Eco" calcext:value-type="string">
            <text:p>Eco</text:p>
          </table:table-cell>
          <table:table-cell table:style-name="ce41"/>
          <table:table-cell table:number-columns-repeated="12" office:value-type="string" calcext:value-type="string">
            <text:p>x</text:p>
          </table:table-cell>
          <table:table-cell table:number-columns-repeated="8" table:style-name="ce39" office:value-type="string" calcext:value-type="string">
            <text:p>x</text:p>
          </table:table-cell>
          <table:table-cell table:style-name="ce39"/>
          <table:table-cell table:number-columns-repeated="2" table:style-name="ce39" office:value-type="string" calcext:value-type="string">
            <text:p>x</text:p>
          </table:table-cell>
          <table:table-cell table:style-name="ce39" table:number-columns-repeated="2"/>
          <table:table-cell/>
          <table:table-cell table:formula="of:=IF(ISERROR(VLOOKUP([.A19];[.AE:.AE];1;0));&quot;&quot;;&quot;x&quot;)" office:value-type="string" office:string-value="x" calcext:value-type="string">
            <text:p>x</text:p>
          </table:table-cell>
          <table:table-cell/>
          <table:table-cell office:value-type="string" calcext:value-type="string">
            <text:p>derog_time_vacances</text:p>
          </table:table-cell>
          <table:table-cell table:number-columns-repeated="3"/>
          <table:table-cell table:style-name="ce24" office:value-type="string" calcext:value-type="string">
            <text:p>,</text:p>
          </table:table-cell>
          <table:table-cell table:style-name="ce24" table:formula="of:=CHAR(9)&amp;&quot;&quot;&quot;&quot;&amp;[.R2]&amp;&quot;&quot;&quot;&quot;&amp;&quot;:&quot;&amp;REPT(&quot; &quot;;20-LEN([.R2]))&amp;&quot;{&quot;&quot;product_key&quot;&quot;:&quot;&quot;&quot;&amp;[.R3]&amp;&quot;&quot;&quot;,&quot;&quot;cmds&quot;&quot;:[&quot;&amp;&quot;&quot;&quot;&quot;&amp;COM.MICROSOFT.TEXTJOIN(&quot;&quot;&quot;,&quot;&quot;&quot;;1;COM.MICROSOFT.FILTER([.$A4:.$A60];[.R4:.R60]=&quot;x&quot;))&amp;&quot;&quot;&quot;&quot;&amp;&quot;]}&quot;" office:value-type="string" office:string-value="&#9;&quot;Flam_Week2&quot;:          {&quot;product_key&quot;:&quot;f71ee820660f4f358db8b8a474689726&quot;,&quot;cmds&quot;:[&quot;refresh&quot;,&quot;IsOnLine&quot;,&quot;cur_temp&quot;,&quot;eco_temp&quot;,&quot;eco_temp_consigneHL&quot;,&quot;EtatConsigne&quot;,&quot;mode&quot;,&quot;Confort&quot;,&quot;Eco&quot;,&quot;HorsGel&quot;,&quot;Off&quot;,&quot;etatprog&quot;,&quot;ProgOn&quot;,&quot;ProgOff&quot;,&quot;plugzy&quot;,&quot;plugzyon&quot;,&quot;plugzyoff&quot;]}" calcext:value-type="string">
            <text:p><text:tab/>"Flam_Week2": <text:s text:c="9"/>{"product_key":"f71ee820660f4f358db8b8a474689726","cmds":["refresh","IsOnLine","cur_temp","eco_temp","eco_temp_consigneHL","EtatConsigne","mode","Confort","Eco","HorsGel","Off","etatprog","ProgOn","ProgOff","plugzy","plugzyon","plugzyoff"]}</text:p>
          </table:table-cell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18]" office:value-type="string" office:string-value="HorsGel" calcext:value-type="string">
            <text:p>HorsGel</text:p>
          </table:table-cell>
          <table:table-cell table:style-name="ce41"/>
          <table:table-cell table:number-columns-repeated="12" office:value-type="string" calcext:value-type="string">
            <text:p>x</text:p>
          </table:table-cell>
          <table:table-cell table:number-columns-repeated="8" table:style-name="ce39" office:value-type="string" calcext:value-type="string">
            <text:p>x</text:p>
          </table:table-cell>
          <table:table-cell table:style-name="ce39"/>
          <table:table-cell table:number-columns-repeated="2" table:style-name="ce39" office:value-type="string" calcext:value-type="string">
            <text:p>x</text:p>
          </table:table-cell>
          <table:table-cell table:style-name="ce39" table:number-columns-repeated="2"/>
          <table:table-cell/>
          <table:table-cell table:formula="of:=IF(ISERROR(VLOOKUP([.A20];[.AE:.AE];1;0));&quot;&quot;;&quot;x&quot;)" office:value-type="string" office:string-value="x" calcext:value-type="string">
            <text:p>x</text:p>
          </table:table-cell>
          <table:table-cell/>
          <table:table-cell office:value-type="string" calcext:value-type="string">
            <text:p>derog_vacances</text:p>
          </table:table-cell>
          <table:table-cell table:number-columns-repeated="3"/>
          <table:table-cell table:style-name="ce24" office:value-type="string" calcext:value-type="string">
            <text:p>,</text:p>
          </table:table-cell>
          <table:table-cell table:style-name="ce24" table:formula="of:=CHAR(9)&amp;&quot;&quot;&quot;&quot;&amp;[.S2]&amp;&quot;&quot;&quot;&quot;&amp;&quot;:&quot;&amp;REPT(&quot; &quot;;20-LEN([.S2]))&amp;&quot;{&quot;&quot;product_key&quot;&quot;:&quot;&quot;&quot;&amp;[.S3]&amp;&quot;&quot;&quot;,&quot;&quot;cmds&quot;&quot;:[&quot;&amp;&quot;&quot;&quot;&quot;&amp;COM.MICROSOFT.TEXTJOIN(&quot;&quot;&quot;,&quot;&quot;&quot;;1;COM.MICROSOFT.FILTER([.$A4:.$A60];[.S4:.S60]=&quot;x&quot;))&amp;&quot;&quot;&quot;&quot;&amp;&quot;]}&quot;" office:value-type="string" office:string-value="&#9;&quot;Rocket&quot;:              {&quot;product_key&quot;:&quot;d60c58d724b845068bf4652a10883c92&quot;,&quot;cmds&quot;:[&quot;refresh&quot;,&quot;IsOnLine&quot;,&quot;EtatConsigne&quot;,&quot;mode&quot;,&quot;Confort&quot;,&quot;Eco&quot;,&quot;HorsGel&quot;,&quot;Off&quot;,&quot;etatprog&quot;,&quot;ProgOn&quot;,&quot;ProgOff&quot;]}" calcext:value-type="string">
            <text:p><text:tab/>"Rocket": <text:s text:c="13"/>{"product_key":"d60c58d724b845068bf4652a10883c92","cmds":["refresh","IsOnLine","EtatConsigne","mode","Confort","Eco","HorsGel","Off","etatprog","ProgOn","ProgOff"]}</text:p>
          </table:table-cell>
          <table:table-cell table:number-columns-repeated="27"/>
          <table:table-cell table:style-name="ce7" table:number-columns-repeated="16321"/>
        </table:table-row>
        <table:table-row table:style-name="ro1">
          <table:table-cell table:formula="of:=[$cmds.A19]" office:value-type="string" office:string-value="Off" calcext:value-type="string">
            <text:p>Off</text:p>
          </table:table-cell>
          <table:table-cell table:style-name="ce41"/>
          <table:table-cell table:number-columns-repeated="12" office:value-type="string" calcext:value-type="string">
            <text:p>x</text:p>
          </table:table-cell>
          <table:table-cell table:number-columns-repeated="8" table:style-name="ce39" office:value-type="string" calcext:value-type="string">
            <text:p>x</text:p>
          </table:table-cell>
          <table:table-cell table:style-name="ce39"/>
          <table:table-cell table:number-columns-repeated="2" table:style-name="ce39" office:value-type="string" calcext:value-type="string">
            <text:p>x</text:p>
          </table:table-cell>
          <table:table-cell table:style-name="ce39" table:number-columns-repeated="2"/>
          <table:table-cell/>
          <table:table-cell table:formula="of:=IF(ISERROR(VLOOKUP([.A21];[.AE:.AE];1;0));&quot;&quot;;&quot;x&quot;)" office:value-type="string" office:string-value="x" calcext:value-type="string">
            <text:p>x</text:p>
          </table:table-cell>
          <table:table-cell/>
          <table:table-cell office:value-type="string" calcext:value-type="string">
            <text:p>derog_time_boost</text:p>
          </table:table-cell>
          <table:table-cell table:number-columns-repeated="3"/>
          <table:table-cell table:style-name="ce24" office:value-type="string" calcext:value-type="string">
            <text:p>,</text:p>
          </table:table-cell>
          <table:table-cell table:style-name="ce24" table:formula="of:=CHAR(9)&amp;&quot;&quot;&quot;&quot;&amp;[.T2]&amp;&quot;&quot;&quot;&quot;&amp;&quot;:&quot;&amp;REPT(&quot; &quot;;20-LEN([.T2]))&amp;&quot;{&quot;&quot;product_key&quot;&quot;:&quot;&quot;&quot;&amp;[.T3]&amp;&quot;&quot;&quot;,&quot;&quot;cmds&quot;&quot;:[&quot;&amp;&quot;&quot;&quot;&quot;&amp;COM.MICROSOFT.TEXTJOIN(&quot;&quot;&quot;,&quot;&quot;&quot;;1;COM.MICROSOFT.FILTER([.$A4:.$A60];[.T4:.T60]=&quot;x&quot;))&amp;&quot;&quot;&quot;&quot;&amp;&quot;]}&quot;" office:value-type="string" office:string-value="&#9;&quot;Shine_Blu&quot;:           {&quot;product_key&quot;:&quot;2884feb88e0b4f30b75ea5572276a102&quot;,&quot;cmds&quot;:[&quot;refresh&quot;,&quot;IsOnLine&quot;,&quot;EtatConsigne&quot;,&quot;mode&quot;,&quot;Confort&quot;,&quot;Eco&quot;,&quot;HorsGel&quot;,&quot;Off&quot;,&quot;etatprog&quot;,&quot;ProgOn&quot;,&quot;ProgOff&quot;]}" calcext:value-type="string">
            <text:p><text:tab/>"Shine_Blu": <text:s text:c="10"/>{"product_key":"2884feb88e0b4f30b75ea5572276a102","cmds":["refresh","IsOnLine","EtatConsigne","mode","Confort","Eco","HorsGel","Off","etatprog","ProgOn","ProgOff"]}</text:p>
          </table:table-cell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20]" office:value-type="string" office:string-value="Confort-1" calcext:value-type="string">
            <text:p>Confort-1</text:p>
          </table:table-cell>
          <table:table-cell table:style-name="ce41"/>
          <table:table-cell table:number-columns-repeated="7"/>
          <table:table-cell office:value-type="string" calcext:value-type="string">
            <text:p>x</text:p>
          </table:table-cell>
          <table:table-cell table:number-columns-repeated="4"/>
          <table:table-cell table:style-name="ce39" table:number-columns-repeated="10"/>
          <table:table-cell table:style-name="ce46"/>
          <table:table-cell table:style-name="ce39" table:number-columns-repeated="2"/>
          <table:table-cell/>
          <table:table-cell table:formula="of:=IF(ISERROR(VLOOKUP([.A22];[.AE:.AE];1;0));&quot;&quot;;&quot;x&quot;)">
            <text:p/>
          </table:table-cell>
          <table:table-cell/>
          <table:table-cell office:value-type="string" calcext:value-type="string">
            <text:p>derog_boost</text:p>
          </table:table-cell>
          <table:table-cell table:number-columns-repeated="3"/>
          <table:table-cell table:style-name="ce24" office:value-type="string" calcext:value-type="string">
            <text:p>,</text:p>
          </table:table-cell>
          <table:table-cell table:style-name="ce24" table:formula="of:=CHAR(9)&amp;&quot;&quot;&quot;&quot;&amp;[.U2]&amp;&quot;&quot;&quot;&quot;&amp;&quot;:&quot;&amp;REPT(&quot; &quot;;20-LEN([.U2]))&amp;&quot;{&quot;&quot;product_key&quot;&quot;:&quot;&quot;&quot;&amp;[.U3]&amp;&quot;&quot;&quot;,&quot;&quot;cmds&quot;&quot;:[&quot;&amp;&quot;&quot;&quot;&quot;&amp;COM.MICROSOFT.TEXTJOIN(&quot;&quot;&quot;,&quot;&quot;&quot;;1;COM.MICROSOFT.FILTER([.$A4:.$A60];[.U4:.U60]=&quot;x&quot;))&amp;&quot;&quot;&quot;&quot;&amp;&quot;]}&quot;" office:value-type="string" office:string-value="&#9;&quot;Socket&quot;:              {&quot;product_key&quot;:&quot;0a000341206048a0be23e2cbf9d8f29a&quot;,&quot;cmds&quot;:[&quot;refresh&quot;,&quot;IsOnLine&quot;,&quot;EtatConsigne&quot;,&quot;mode&quot;,&quot;Confort&quot;,&quot;Eco&quot;,&quot;HorsGel&quot;,&quot;Off&quot;,&quot;etatprog&quot;,&quot;ProgOn&quot;,&quot;ProgOff&quot;]}" calcext:value-type="string">
            <text:p><text:tab/>"Socket": <text:s text:c="13"/>{"product_key":"0a000341206048a0be23e2cbf9d8f29a","cmds":["refresh","IsOnLine","EtatConsigne","mode","Confort","Eco","HorsGel","Off","etatprog","ProgOn","ProgOff"]}</text:p>
          </table:table-cell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21]" office:value-type="string" office:string-value="Confort-2" calcext:value-type="string">
            <text:p>Confort-2</text:p>
          </table:table-cell>
          <table:table-cell table:style-name="ce41"/>
          <table:table-cell table:number-columns-repeated="7"/>
          <table:table-cell office:value-type="string" calcext:value-type="string">
            <text:p>x</text:p>
          </table:table-cell>
          <table:table-cell table:number-columns-repeated="4"/>
          <table:table-cell table:style-name="ce39" table:number-columns-repeated="10"/>
          <table:table-cell table:style-name="ce46"/>
          <table:table-cell table:style-name="ce39" table:number-columns-repeated="2"/>
          <table:table-cell/>
          <table:table-cell table:formula="of:=IF(ISERROR(VLOOKUP([.A23];[.AE:.AE];1;0));&quot;&quot;;&quot;x&quot;)">
            <text:p/>
          </table:table-cell>
          <table:table-cell table:number-columns-repeated="5"/>
          <table:table-cell table:style-name="ce24" office:value-type="string" calcext:value-type="string">
            <text:p>,</text:p>
          </table:table-cell>
          <table:table-cell table:style-name="ce24" table:formula="of:=CHAR(9)&amp;&quot;&quot;&quot;&quot;&amp;[.V2]&amp;&quot;&quot;&quot;&quot;&amp;&quot;:&quot;&amp;REPT(&quot; &quot;;20-LEN([.V2]))&amp;&quot;{&quot;&quot;product_key&quot;&quot;:&quot;&quot;&quot;&amp;[.V3]&amp;&quot;&quot;&quot;,&quot;&quot;cmds&quot;&quot;:[&quot;&amp;&quot;&quot;&quot;&quot;&amp;COM.MICROSOFT.TEXTJOIN(&quot;&quot;&quot;,&quot;&quot;&quot;;1;COM.MICROSOFT.FILTER([.$A4:.$A60];[.V4:.V60]=&quot;x&quot;))&amp;&quot;&quot;&quot;&quot;&amp;&quot;]}&quot;" office:value-type="string" office:string-value="&#9;&quot;Vulcane&quot;:             {&quot;product_key&quot;:&quot;e5d5766484db4b4d9b9fa7c08cd65481&quot;,&quot;cmds&quot;:[&quot;refresh&quot;,&quot;IsOnLine&quot;,&quot;EtatConsigne&quot;,&quot;mode&quot;,&quot;Confort&quot;,&quot;Eco&quot;,&quot;HorsGel&quot;,&quot;Off&quot;,&quot;etatprog&quot;,&quot;ProgOn&quot;,&quot;ProgOff&quot;]}" calcext:value-type="string">
            <text:p><text:tab/>"Vulcane": <text:s text:c="12"/>{"product_key":"e5d5766484db4b4d9b9fa7c08cd65481","cmds":["refresh","IsOnLine","EtatConsigne","mode","Confort","Eco","HorsGel","Off","etatprog","ProgOn","ProgOff"]}</text:p>
          </table:table-cell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22]" office:value-type="string" office:string-value="etatprog" calcext:value-type="string">
            <text:p>etatprog</text:p>
          </table:table-cell>
          <table:table-cell table:style-name="ce41"/>
          <table:table-cell table:number-columns-repeated="12" office:value-type="string" calcext:value-type="string">
            <text:p>x</text:p>
          </table:table-cell>
          <table:table-cell table:number-columns-repeated="11" table:style-name="ce39" office:value-type="string" calcext:value-type="string">
            <text:p>x</text:p>
          </table:table-cell>
          <table:table-cell table:style-name="ce39" table:number-columns-repeated="2"/>
          <table:table-cell/>
          <table:table-cell table:formula="of:=IF(ISERROR(VLOOKUP([.A24];[.AE:.AE];1;0));&quot;&quot;;&quot;x&quot;)" office:value-type="string" office:string-value="x" calcext:value-type="string">
            <text:p>x</text:p>
          </table:table-cell>
          <table:table-cell table:number-columns-repeated="5"/>
          <table:table-cell table:style-name="ce24" office:value-type="string" calcext:value-type="string">
            <text:p>,</text:p>
          </table:table-cell>
          <table:table-cell table:style-name="ce24" table:formula="of:=CHAR(9)&amp;&quot;&quot;&quot;&quot;&amp;[.W2]&amp;&quot;&quot;&quot;&quot;&amp;&quot;:&quot;&amp;REPT(&quot; &quot;;20-LEN([.W2]))&amp;&quot;{&quot;&quot;product_key&quot;&quot;:&quot;&quot;&quot;&amp;[.W3]&amp;&quot;&quot;&quot;,&quot;&quot;cmds&quot;&quot;:[&quot;&amp;&quot;&quot;&quot;&quot;&amp;COM.MICROSOFT.TEXTJOIN(&quot;&quot;&quot;,&quot;&quot;&quot;;1;COM.MICROSOFT.FILTER([.$A4:.$A60];[.W4:.W60]=&quot;x&quot;))&amp;&quot;&quot;&quot;&quot;&amp;&quot;]}&quot;" office:value-type="string" office:string-value="&#9;&quot;Bridge&quot;:              {&quot;product_key&quot;:&quot;18e548a0df9444669a480a7ab31bc314&quot;,&quot;cmds&quot;:[&quot;refresh&quot;,&quot;IsOnLine&quot;,&quot;etatprog&quot;,&quot;ProgOn&quot;,&quot;ProgOff&quot;]}" calcext:value-type="string">
            <text:p><text:tab/>"Bridge": <text:s text:c="13"/>{"product_key":"18e548a0df9444669a480a7ab31bc314","cmds":["refresh","IsOnLine","etatprog","ProgOn","ProgOff"]}</text:p>
          </table:table-cell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23]" office:value-type="string" office:string-value="ProgOn" calcext:value-type="string">
            <text:p>ProgOn</text:p>
          </table:table-cell>
          <table:table-cell table:style-name="ce41"/>
          <table:table-cell table:number-columns-repeated="12" office:value-type="string" calcext:value-type="string">
            <text:p>x</text:p>
          </table:table-cell>
          <table:table-cell table:number-columns-repeated="11" table:style-name="ce39" office:value-type="string" calcext:value-type="string">
            <text:p>x</text:p>
          </table:table-cell>
          <table:table-cell table:style-name="ce39" table:number-columns-repeated="2"/>
          <table:table-cell/>
          <table:table-cell table:formula="of:=IF(ISERROR(VLOOKUP([.A25];[.AE:.AE];1;0));&quot;&quot;;&quot;x&quot;)" office:value-type="string" office:string-value="x" calcext:value-type="string">
            <text:p>x</text:p>
          </table:table-cell>
          <table:table-cell table:number-columns-repeated="5"/>
          <table:table-cell table:style-name="ce24" office:value-type="string" calcext:value-type="string">
            <text:p>,</text:p>
          </table:table-cell>
          <table:table-cell table:style-name="ce24" table:formula="of:=CHAR(9)&amp;&quot;&quot;&quot;&quot;&amp;[.X2]&amp;&quot;&quot;&quot;&quot;&amp;&quot;:&quot;&amp;REPT(&quot; &quot;;20-LEN([.X2]))&amp;&quot;{&quot;&quot;product_key&quot;&quot;:&quot;&quot;&quot;&amp;[.X3]&amp;&quot;&quot;&quot;,&quot;&quot;cmds&quot;&quot;:[&quot;&amp;&quot;&quot;&quot;&quot;&amp;COM.MICROSOFT.TEXTJOIN(&quot;&quot;&quot;,&quot;&quot;&quot;;1;COM.MICROSOFT.FILTER([.$A4:.$A60];[.X4:.X60]=&quot;x&quot;))&amp;&quot;&quot;&quot;&quot;&amp;&quot;]}&quot;" office:value-type="string" office:string-value="&#9;&quot;Pilote_Duo&quot;:          {&quot;product_key&quot;:&quot;aa85e43fc4464e4d0000000000000000&quot;,&quot;cmds&quot;:[&quot;refresh&quot;,&quot;IsOnLine&quot;,&quot;EtatConsigne&quot;,&quot;mode&quot;,&quot;Confort&quot;,&quot;Eco&quot;,&quot;HorsGel&quot;,&quot;Off&quot;,&quot;etatprog&quot;,&quot;ProgOn&quot;,&quot;ProgOff&quot;,&quot;cur_power&quot;,&quot;cur_current&quot;,&quot;cur_voltage&quot;,&quot;signal_power&quot;,&quot;energy_saving&quot;,&quot;kill_switch&quot;,&quot;peak_hours&quot;,&quot;peak_signal&quot;]}" calcext:value-type="string">
            <text:p><text:tab/>"Pilote_Duo": <text:s text:c="9"/>{"product_key":"aa85e43fc4464e4d0000000000000000","cmds":["refresh","IsOnLine","EtatConsigne","mode","Confort","Eco","HorsGel","Off","etatprog","ProgOn","ProgOff","cur_power","cur_current","cur_voltage","signal_power","energy_saving","kill_switch","peak_hours","peak_signal"]}</text:p>
          </table:table-cell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24]" office:value-type="string" office:string-value="ProgOff" calcext:value-type="string">
            <text:p>ProgOff</text:p>
          </table:table-cell>
          <table:table-cell table:style-name="ce41"/>
          <table:table-cell table:number-columns-repeated="12" office:value-type="string" calcext:value-type="string">
            <text:p>x</text:p>
          </table:table-cell>
          <table:table-cell table:number-columns-repeated="11" table:style-name="ce39" office:value-type="string" calcext:value-type="string">
            <text:p>x</text:p>
          </table:table-cell>
          <table:table-cell table:style-name="ce39" table:number-columns-repeated="2"/>
          <table:table-cell/>
          <table:table-cell table:formula="of:=IF(ISERROR(VLOOKUP([.A26];[.AE:.AE];1;0));&quot;&quot;;&quot;x&quot;)" office:value-type="string" office:string-value="x" calcext:value-type="string">
            <text:p>x</text:p>
          </table:table-cell>
          <table:table-cell table:number-columns-repeated="5"/>
          <table:table-cell table:style-name="ce24" office:value-type="string" calcext:value-type="string">
            <text:p>}</text:p>
          </table:table-cell>
          <table:table-cell table:style-name="ce24"/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25]" office:value-type="string" office:string-value="etatlock" calcext:value-type="string">
            <text:p>etatlock</text:p>
          </table:table-cell>
          <table:table-cell table:style-name="ce41"/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table:style-name="ce39" table:number-columns-repeated="13"/>
          <table:table-cell/>
          <table:table-cell table:formula="of:=IF(ISERROR(VLOOKUP([.A27];[.AE:.AE];1;0));&quot;&quot;;&quot;x&quot;)" office:value-type="string" office:string-value="x" calcext:value-type="string">
            <text:p>x</text:p>
          </table:table-cell>
          <table:table-cell table:number-columns-repeated="5"/>
          <table:table-cell table:style-name="ce24" table:number-columns-repeated="2"/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26]" office:value-type="string" office:string-value="LockOn" calcext:value-type="string">
            <text:p>LockOn</text:p>
          </table:table-cell>
          <table:table-cell table:style-name="ce41"/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table:style-name="ce39" table:number-columns-repeated="13"/>
          <table:table-cell/>
          <table:table-cell table:formula="of:=IF(ISERROR(VLOOKUP([.A28];[.AE:.AE];1;0));&quot;&quot;;&quot;x&quot;)" office:value-type="string" office:string-value="x" calcext:value-type="string">
            <text:p>x</text:p>
          </table:table-cell>
          <table:table-cell table:number-columns-repeated="5"/>
          <table:table-cell table:style-name="ce24" table:number-columns-repeated="2"/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27]" office:value-type="string" office:string-value="LockOff" calcext:value-type="string">
            <text:p>LockOff</text:p>
          </table:table-cell>
          <table:table-cell table:style-name="ce41"/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table:style-name="ce39" table:number-columns-repeated="13"/>
          <table:table-cell/>
          <table:table-cell table:formula="of:=IF(ISERROR(VLOOKUP([.A29];[.AE:.AE];1;0));&quot;&quot;;&quot;x&quot;)" office:value-type="string" office:string-value="x" calcext:value-type="string">
            <text:p>x</text:p>
          </table:table-cell>
          <table:table-cell table:number-columns-repeated="5"/>
          <table:table-cell table:style-name="ce24" table:number-columns-repeated="2"/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28]" office:value-type="string" office:string-value="Lock_C_State" calcext:value-type="string">
            <text:p>Lock_C_State</text:p>
          </table:table-cell>
          <table:table-cell table:style-name="ce41"/>
          <table:table-cell table:number-columns-repeated="12"/>
          <table:table-cell table:style-name="ce39" table:number-columns-repeated="13"/>
          <table:table-cell/>
          <table:table-cell table:formula="of:=IF(ISERROR(VLOOKUP([.A30];[.AE:.AE];1;0));&quot;&quot;;&quot;x&quot;)">
            <text:p/>
          </table:table-cell>
          <table:table-cell table:number-columns-repeated="5"/>
          <table:table-cell table:style-name="ce24" table:number-columns-repeated="2"/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29]" office:value-type="string" office:string-value="Lock_C_On" calcext:value-type="string">
            <text:p>Lock_C_On</text:p>
          </table:table-cell>
          <table:table-cell table:style-name="ce41"/>
          <table:table-cell table:number-columns-repeated="12"/>
          <table:table-cell table:style-name="ce39" table:number-columns-repeated="13"/>
          <table:table-cell/>
          <table:table-cell table:formula="of:=IF(ISERROR(VLOOKUP([.A31];[.AE:.AE];1;0));&quot;&quot;;&quot;x&quot;)">
            <text:p/>
          </table:table-cell>
          <table:table-cell table:number-columns-repeated="5"/>
          <table:table-cell table:style-name="ce24" table:number-columns-repeated="2"/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30]" office:value-type="string" office:string-value="Lock_C_Off" calcext:value-type="string">
            <text:p>Lock_C_Off</text:p>
          </table:table-cell>
          <table:table-cell table:style-name="ce41"/>
          <table:table-cell table:number-columns-repeated="12"/>
          <table:table-cell table:style-name="ce39" table:number-columns-repeated="13"/>
          <table:table-cell/>
          <table:table-cell table:formula="of:=IF(ISERROR(VLOOKUP([.A32];[.AE:.AE];1;0));&quot;&quot;;&quot;x&quot;)">
            <text:p/>
          </table:table-cell>
          <table:table-cell table:number-columns-repeated="5"/>
          <table:table-cell table:style-name="ce24" table:number-columns-repeated="2"/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31]" office:value-type="string" office:string-value="WindowSwitch" calcext:value-type="string">
            <text:p>WindowSwitch</text:p>
          </table:table-cell>
          <table:table-cell table:style-name="ce41"/>
          <table:table-cell table:number-columns-repeated="7"/>
          <table:table-cell office:value-type="string" calcext:value-type="string">
            <text:p>x</text:p>
          </table:table-cell>
          <table:table-cell table:number-columns-repeated="4"/>
          <table:table-cell table:style-name="ce39" table:number-columns-repeated="13"/>
          <table:table-cell/>
          <table:table-cell table:formula="of:=IF(ISERROR(VLOOKUP([.A33];[.AE:.AE];1;0));&quot;&quot;;&quot;x&quot;)">
            <text:p/>
          </table:table-cell>
          <table:table-cell table:number-columns-repeated="5"/>
          <table:table-cell table:style-name="ce24" table:number-columns-repeated="2"/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32]" office:value-type="string" office:string-value="WindowSwitchOn" calcext:value-type="string">
            <text:p>WindowSwitchOn</text:p>
          </table:table-cell>
          <table:table-cell table:style-name="ce41"/>
          <table:table-cell table:number-columns-repeated="7"/>
          <table:table-cell office:value-type="string" calcext:value-type="string">
            <text:p>x</text:p>
          </table:table-cell>
          <table:table-cell table:number-columns-repeated="4"/>
          <table:table-cell table:style-name="ce39" table:number-columns-repeated="13"/>
          <table:table-cell/>
          <table:table-cell table:formula="of:=IF(ISERROR(VLOOKUP([.A34];[.AE:.AE];1;0));&quot;&quot;;&quot;x&quot;)">
            <text:p/>
          </table:table-cell>
          <table:table-cell table:number-columns-repeated="5"/>
          <table:table-cell table:style-name="ce24" table:number-columns-repeated="2"/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33]" office:value-type="string" office:string-value="WindowSwitchOff" calcext:value-type="string">
            <text:p>WindowSwitchOff</text:p>
          </table:table-cell>
          <table:table-cell table:style-name="ce41"/>
          <table:table-cell table:number-columns-repeated="7"/>
          <table:table-cell office:value-type="string" calcext:value-type="string">
            <text:p>x</text:p>
          </table:table-cell>
          <table:table-cell table:number-columns-repeated="4"/>
          <table:table-cell table:style-name="ce39" table:number-columns-repeated="13"/>
          <table:table-cell/>
          <table:table-cell table:formula="of:=IF(ISERROR(VLOOKUP([.A35];[.AE:.AE];1;0));&quot;&quot;;&quot;x&quot;)">
            <text:p/>
          </table:table-cell>
          <table:table-cell table:number-columns-repeated="5"/>
          <table:table-cell table:style-name="ce24" table:number-columns-repeated="2"/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34]" office:value-type="string" office:string-value="plugzy" calcext:value-type="string">
            <text:p>plugzy</text:p>
          </table:table-cell>
          <table:table-cell table:style-name="ce41"/>
          <table:table-cell table:number-columns-repeated="10"/>
          <table:table-cell office:value-type="string" calcext:value-type="string">
            <text:p>x</text:p>
          </table:table-cell>
          <table:table-cell/>
          <table:table-cell table:style-name="ce39" table:number-columns-repeated="2"/>
          <table:table-cell table:number-columns-repeated="2" table:style-name="ce39" office:value-type="string" calcext:value-type="string">
            <text:p>x</text:p>
          </table:table-cell>
          <table:table-cell table:style-name="ce39" table:number-columns-repeated="9"/>
          <table:table-cell/>
          <table:table-cell table:formula="of:=IF(ISERROR(VLOOKUP([.A36];[.AE:.AE];1;0));&quot;&quot;;&quot;x&quot;)">
            <text:p/>
          </table:table-cell>
          <table:table-cell table:number-columns-repeated="5"/>
          <table:table-cell table:style-name="ce24" table:number-columns-repeated="2"/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35]" office:value-type="string" office:string-value="plugzyon" calcext:value-type="string">
            <text:p>plugzyon</text:p>
          </table:table-cell>
          <table:table-cell table:style-name="ce41"/>
          <table:table-cell table:number-columns-repeated="10"/>
          <table:table-cell office:value-type="string" calcext:value-type="string">
            <text:p>x</text:p>
          </table:table-cell>
          <table:table-cell/>
          <table:table-cell table:style-name="ce39" table:number-columns-repeated="2"/>
          <table:table-cell table:number-columns-repeated="2" table:style-name="ce39" office:value-type="string" calcext:value-type="string">
            <text:p>x</text:p>
          </table:table-cell>
          <table:table-cell table:style-name="ce39" table:number-columns-repeated="9"/>
          <table:table-cell/>
          <table:table-cell table:formula="of:=IF(ISERROR(VLOOKUP([.A37];[.AE:.AE];1;0));&quot;&quot;;&quot;x&quot;)">
            <text:p/>
          </table:table-cell>
          <table:table-cell table:number-columns-repeated="5"/>
          <table:table-cell table:style-name="ce24" table:number-columns-repeated="2"/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36]" office:value-type="string" office:string-value="plugzyoff" calcext:value-type="string">
            <text:p>plugzyoff</text:p>
          </table:table-cell>
          <table:table-cell table:style-name="ce41"/>
          <table:table-cell table:number-columns-repeated="10"/>
          <table:table-cell office:value-type="string" calcext:value-type="string">
            <text:p>x</text:p>
          </table:table-cell>
          <table:table-cell/>
          <table:table-cell table:style-name="ce39" table:number-columns-repeated="2"/>
          <table:table-cell table:number-columns-repeated="2" table:style-name="ce39" office:value-type="string" calcext:value-type="string">
            <text:p>x</text:p>
          </table:table-cell>
          <table:table-cell table:style-name="ce39" table:number-columns-repeated="9"/>
          <table:table-cell/>
          <table:table-cell table:formula="of:=IF(ISERROR(VLOOKUP([.A38];[.AE:.AE];1;0));&quot;&quot;;&quot;x&quot;)">
            <text:p/>
          </table:table-cell>
          <table:table-cell table:number-columns-repeated="5"/>
          <table:table-cell table:style-name="ce24" table:number-columns-repeated="2"/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37]" office:value-type="string" office:string-value="derog_mode" calcext:value-type="string">
            <text:p>derog_mode</text:p>
          </table:table-cell>
          <table:table-cell table:style-name="ce41"/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39" table:number-columns-repeated="2"/>
          <table:table-cell table:style-name="ce39" office:value-type="string" calcext:value-type="string">
            <text:p>x</text:p>
          </table:table-cell>
          <table:table-cell table:style-name="ce39" table:number-columns-repeated="7"/>
          <table:table-cell table:style-name="ce39" office:value-type="string" calcext:value-type="string">
            <text:p>x</text:p>
          </table:table-cell>
          <table:table-cell table:style-name="ce39" table:number-columns-repeated="2"/>
          <table:table-cell/>
          <table:table-cell table:formula="of:=IF(ISERROR(VLOOKUP([.A39];[.AE:.AE];1;0));&quot;&quot;;&quot;x&quot;)" office:value-type="string" office:string-value="x" calcext:value-type="string">
            <text:p>x</text:p>
          </table:table-cell>
          <table:table-cell table:number-columns-repeated="5"/>
          <table:table-cell table:style-name="ce24" table:number-columns-repeated="2"/>
          <table:table-cell table:number-columns-repeated="27"/>
          <table:table-cell table:style-name="Default" table:number-columns-repeated="16321"/>
        </table:table-row>
        <table:table-row table:style-name="ro1">
          <table:table-cell table:style-name="ce36" table:formula="of:=[$cmds.A38]" office:value-type="string" office:string-value="derog_time" calcext:value-type="string">
            <text:p>derog_time</text:p>
          </table:table-cell>
          <table:table-cell table:style-name="ce41"/>
          <table:table-cell table:style-name="ce48" table:number-columns-repeated="23"/>
          <table:table-cell table:style-name="ce39" table:number-columns-repeated="2"/>
          <table:table-cell/>
          <table:table-cell table:formula="of:=IF(ISERROR(VLOOKUP([.A40];[.AE:.AE];1;0));&quot;&quot;;&quot;x&quot;)">
            <text:p/>
          </table:table-cell>
          <table:table-cell table:number-columns-repeated="5"/>
          <table:table-cell table:style-name="ce24" table:number-columns-repeated="2"/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39]" office:value-type="string" office:string-value="derog_off" calcext:value-type="string">
            <text:p>derog_off</text:p>
          </table:table-cell>
          <table:table-cell table:style-name="ce41"/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39" table:number-columns-repeated="2"/>
          <table:table-cell table:style-name="ce39" office:value-type="string" calcext:value-type="string">
            <text:p>x</text:p>
          </table:table-cell>
          <table:table-cell table:style-name="ce39" table:number-columns-repeated="7"/>
          <table:table-cell table:style-name="ce39" office:value-type="string" calcext:value-type="string">
            <text:p>x</text:p>
          </table:table-cell>
          <table:table-cell table:style-name="ce39" table:number-columns-repeated="2"/>
          <table:table-cell/>
          <table:table-cell table:formula="of:=IF(ISERROR(VLOOKUP([.A41];[.AE:.AE];1;0));&quot;&quot;;&quot;x&quot;)" office:value-type="string" office:string-value="x" calcext:value-type="string">
            <text:p>x</text:p>
          </table:table-cell>
          <table:table-cell table:number-columns-repeated="5"/>
          <table:table-cell table:style-name="ce24" table:number-columns-repeated="2"/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40]" office:value-type="string" office:string-value="derog_time_vacances" calcext:value-type="string">
            <text:p>derog_time_vacances</text:p>
          </table:table-cell>
          <table:table-cell table:style-name="ce41"/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39" table:number-columns-repeated="2"/>
          <table:table-cell table:style-name="ce39" office:value-type="string" calcext:value-type="string">
            <text:p>x</text:p>
          </table:table-cell>
          <table:table-cell table:style-name="ce39" table:number-columns-repeated="7"/>
          <table:table-cell table:style-name="ce39" office:value-type="string" calcext:value-type="string">
            <text:p>x</text:p>
          </table:table-cell>
          <table:table-cell table:style-name="ce39" table:number-columns-repeated="2"/>
          <table:table-cell/>
          <table:table-cell table:formula="of:=IF(ISERROR(VLOOKUP([.A42];[.AE:.AE];1;0));&quot;&quot;;&quot;x&quot;)" office:value-type="string" office:string-value="x" calcext:value-type="string">
            <text:p>x</text:p>
          </table:table-cell>
          <table:table-cell table:number-columns-repeated="5"/>
          <table:table-cell table:style-name="ce24" table:number-columns-repeated="2"/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41]" office:value-type="string" office:string-value="derog_vacances" calcext:value-type="string">
            <text:p>derog_vacances</text:p>
          </table:table-cell>
          <table:table-cell table:style-name="ce41"/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39" table:number-columns-repeated="2"/>
          <table:table-cell table:style-name="ce39" office:value-type="string" calcext:value-type="string">
            <text:p>x</text:p>
          </table:table-cell>
          <table:table-cell table:style-name="ce39" table:number-columns-repeated="7"/>
          <table:table-cell table:style-name="ce39" office:value-type="string" calcext:value-type="string">
            <text:p>x</text:p>
          </table:table-cell>
          <table:table-cell table:style-name="ce39" table:number-columns-repeated="2"/>
          <table:table-cell/>
          <table:table-cell table:formula="of:=IF(ISERROR(VLOOKUP([.A43];[.AE:.AE];1;0));&quot;&quot;;&quot;x&quot;)" office:value-type="string" office:string-value="x" calcext:value-type="string">
            <text:p>x</text:p>
          </table:table-cell>
          <table:table-cell table:number-columns-repeated="5"/>
          <table:table-cell table:style-name="ce24" table:number-columns-repeated="2"/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42]" office:value-type="string" office:string-value="derog_time_boost" calcext:value-type="string">
            <text:p>derog_time_boost</text:p>
          </table:table-cell>
          <table:table-cell table:style-name="ce41"/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39" table:number-columns-repeated="2"/>
          <table:table-cell table:style-name="ce39" office:value-type="string" calcext:value-type="string">
            <text:p>x</text:p>
          </table:table-cell>
          <table:table-cell table:style-name="ce39" table:number-columns-repeated="7"/>
          <table:table-cell table:style-name="ce39" office:value-type="string" calcext:value-type="string">
            <text:p>x</text:p>
          </table:table-cell>
          <table:table-cell table:style-name="ce39" table:number-columns-repeated="2"/>
          <table:table-cell/>
          <table:table-cell table:formula="of:=IF(ISERROR(VLOOKUP([.A44];[.AE:.AE];1;0));&quot;&quot;;&quot;x&quot;)" office:value-type="string" office:string-value="x" calcext:value-type="string">
            <text:p>x</text:p>
          </table:table-cell>
          <table:table-cell table:number-columns-repeated="5"/>
          <table:table-cell table:style-name="ce24" table:number-columns-repeated="2"/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43]" office:value-type="string" office:string-value="derog_boost" calcext:value-type="string">
            <text:p>derog_boost</text:p>
          </table:table-cell>
          <table:table-cell table:style-name="ce41"/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39" table:number-columns-repeated="2"/>
          <table:table-cell table:style-name="ce39" office:value-type="string" calcext:value-type="string">
            <text:p>x</text:p>
          </table:table-cell>
          <table:table-cell table:style-name="ce39" table:number-columns-repeated="7"/>
          <table:table-cell table:style-name="ce39" office:value-type="string" calcext:value-type="string">
            <text:p>x</text:p>
          </table:table-cell>
          <table:table-cell table:style-name="ce39" table:number-columns-repeated="2"/>
          <table:table-cell/>
          <table:table-cell table:formula="of:=IF(ISERROR(VLOOKUP([.A45];[.AE:.AE];1;0));&quot;&quot;;&quot;x&quot;)" office:value-type="string" office:string-value="x" calcext:value-type="string">
            <text:p>x</text:p>
          </table:table-cell>
          <table:table-cell table:number-columns-repeated="5"/>
          <table:table-cell table:style-name="ce24" table:number-columns-repeated="2"/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44]" office:value-type="string" office:string-value="derog_presence" calcext:value-type="string">
            <text:p>derog_presence</text:p>
          </table:table-cell>
          <table:table-cell table:style-name="ce41"/>
          <table:table-cell table:number-columns-repeated="7"/>
          <table:table-cell office:value-type="string" calcext:value-type="string">
            <text:p>x</text:p>
          </table:table-cell>
          <table:table-cell table:number-columns-repeated="2"/>
          <table:table-cell table:style-name="ce55" office:value-type="string" calcext:value-type="string">
            <text:p>x</text:p>
          </table:table-cell>
          <table:table-cell/>
          <table:table-cell table:style-name="ce39" table:number-columns-repeated="10"/>
          <table:table-cell table:style-name="ce55" office:value-type="string" calcext:value-type="string">
            <text:p>x</text:p>
          </table:table-cell>
          <table:table-cell table:style-name="ce39" table:number-columns-repeated="2"/>
          <table:table-cell/>
          <table:table-cell table:formula="of:=IF(ISERROR(VLOOKUP([.A46];[.AE:.AE];1;0));&quot;&quot;;&quot;x&quot;)">
            <text:p/>
          </table:table-cell>
          <table:table-cell table:number-columns-repeated="5"/>
          <table:table-cell table:style-name="ce24" table:number-columns-repeated="2"/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45]" office:value-type="string" office:string-value="detect_presence" calcext:value-type="string">
            <text:p>detect_presence</text:p>
          </table:table-cell>
          <table:table-cell table:style-name="ce41"/>
          <table:table-cell table:number-columns-repeated="7"/>
          <table:table-cell office:value-type="string" calcext:value-type="string">
            <text:p>x</text:p>
          </table:table-cell>
          <table:table-cell table:number-columns-repeated="2"/>
          <table:table-cell table:style-name="ce55" office:value-type="string" calcext:value-type="string">
            <text:p>x</text:p>
          </table:table-cell>
          <table:table-cell/>
          <table:table-cell table:style-name="ce39" table:number-columns-repeated="10"/>
          <table:table-cell table:style-name="ce55" office:value-type="string" calcext:value-type="string">
            <text:p>x</text:p>
          </table:table-cell>
          <table:table-cell table:style-name="ce39" table:number-columns-repeated="2"/>
          <table:table-cell/>
          <table:table-cell table:formula="of:=IF(ISERROR(VLOOKUP([.A47];[.AE:.AE];1;0));&quot;&quot;;&quot;x&quot;)">
            <text:p/>
          </table:table-cell>
          <table:table-cell table:number-columns-repeated="5"/>
          <table:table-cell table:style-name="ce24" table:number-columns-repeated="2"/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46]" office:value-type="string" office:string-value="cur_power" calcext:value-type="string">
            <text:p>cur_power</text:p>
          </table:table-cell>
          <table:table-cell table:style-name="ce41"/>
          <table:table-cell table:number-columns-repeated="12"/>
          <table:table-cell table:style-name="ce39" table:number-columns-repeated="9"/>
          <table:table-cell table:number-columns-repeated="2" table:style-name="ce39" office:value-type="string" calcext:value-type="string">
            <text:p>x</text:p>
          </table:table-cell>
          <table:table-cell table:style-name="ce39" table:number-columns-repeated="2"/>
          <table:table-cell/>
          <table:table-cell table:formula="of:=IF(ISERROR(VLOOKUP([.A48];[.AE:.AE];1;0));&quot;&quot;;&quot;x&quot;)">
            <text:p/>
          </table:table-cell>
          <table:table-cell table:number-columns-repeated="5"/>
          <table:table-cell table:style-name="ce24" table:number-columns-repeated="2"/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47]" office:value-type="string" office:string-value="cur_current" calcext:value-type="string">
            <text:p>cur_current</text:p>
          </table:table-cell>
          <table:table-cell table:style-name="ce41"/>
          <table:table-cell table:number-columns-repeated="12"/>
          <table:table-cell table:style-name="ce39" table:number-columns-repeated="9"/>
          <table:table-cell table:number-columns-repeated="2" table:style-name="ce39" office:value-type="string" calcext:value-type="string">
            <text:p>x</text:p>
          </table:table-cell>
          <table:table-cell table:style-name="ce39" table:number-columns-repeated="2"/>
          <table:table-cell/>
          <table:table-cell table:formula="of:=IF(ISERROR(VLOOKUP([.A49];[.AE:.AE];1;0));&quot;&quot;;&quot;x&quot;)">
            <text:p/>
          </table:table-cell>
          <table:table-cell table:number-columns-repeated="5"/>
          <table:table-cell table:style-name="ce24" table:number-columns-repeated="2"/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48]" office:value-type="string" office:string-value="cur_voltage" calcext:value-type="string">
            <text:p>cur_voltage</text:p>
          </table:table-cell>
          <table:table-cell table:style-name="ce41"/>
          <table:table-cell table:number-columns-repeated="12"/>
          <table:table-cell table:style-name="ce39" table:number-columns-repeated="9"/>
          <table:table-cell table:number-columns-repeated="2" table:style-name="ce39" office:value-type="string" calcext:value-type="string">
            <text:p>x</text:p>
          </table:table-cell>
          <table:table-cell table:style-name="ce39" table:number-columns-repeated="2"/>
          <table:table-cell/>
          <table:table-cell table:formula="of:=IF(ISERROR(VLOOKUP([.A50];[.AE:.AE];1;0));&quot;&quot;;&quot;x&quot;)">
            <text:p/>
          </table:table-cell>
          <table:table-cell table:number-columns-repeated="5"/>
          <table:table-cell table:style-name="ce25" table:number-columns-repeated="2"/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49]" office:value-type="string" office:string-value="signal_power" calcext:value-type="string">
            <text:p>signal_power</text:p>
          </table:table-cell>
          <table:table-cell table:style-name="ce41"/>
          <table:table-cell table:number-columns-repeated="12"/>
          <table:table-cell table:style-name="ce39" table:number-columns-repeated="9"/>
          <table:table-cell table:number-columns-repeated="2" table:style-name="ce39" office:value-type="string" calcext:value-type="string">
            <text:p>x</text:p>
          </table:table-cell>
          <table:table-cell table:style-name="ce39" table:number-columns-repeated="2"/>
          <table:table-cell/>
          <table:table-cell table:formula="of:=IF(ISERROR(VLOOKUP([.A51];[.AE:.AE];1;0));&quot;&quot;;&quot;x&quot;)">
            <text:p/>
          </table:table-cell>
          <table:table-cell table:number-columns-repeated="5"/>
          <table:table-cell table:style-name="ce25" table:number-columns-repeated="2"/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50]" office:value-type="string" office:string-value="energy_saving" calcext:value-type="string">
            <text:p>energy_saving</text:p>
          </table:table-cell>
          <table:table-cell table:style-name="ce41"/>
          <table:table-cell table:number-columns-repeated="12"/>
          <table:table-cell table:style-name="ce39" table:number-columns-repeated="9"/>
          <table:table-cell table:number-columns-repeated="2" table:style-name="ce39" office:value-type="string" calcext:value-type="string">
            <text:p>x</text:p>
          </table:table-cell>
          <table:table-cell table:style-name="ce39" table:number-columns-repeated="2"/>
          <table:table-cell/>
          <table:table-cell table:formula="of:=IF(ISERROR(VLOOKUP([.A52];[.AE:.AE];1;0));&quot;&quot;;&quot;x&quot;)">
            <text:p/>
          </table:table-cell>
          <table:table-cell table:number-columns-repeated="5"/>
          <table:table-cell table:style-name="ce25" table:number-columns-repeated="2"/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51]" office:value-type="string" office:string-value="kill_switch" calcext:value-type="string">
            <text:p>kill_switch</text:p>
          </table:table-cell>
          <table:table-cell table:style-name="ce41"/>
          <table:table-cell table:number-columns-repeated="12"/>
          <table:table-cell table:style-name="ce39" table:number-columns-repeated="9"/>
          <table:table-cell table:style-name="ce39" office:value-type="string" calcext:value-type="string">
            <text:p>x</text:p>
          </table:table-cell>
          <table:table-cell table:style-name="ce39" table:number-columns-repeated="3"/>
          <table:table-cell/>
          <table:table-cell table:formula="of:=IF(ISERROR(VLOOKUP([.A53];[.AE:.AE];1;0));&quot;&quot;;&quot;x&quot;)">
            <text:p/>
          </table:table-cell>
          <table:table-cell table:number-columns-repeated="5"/>
          <table:table-cell table:style-name="ce25" table:number-columns-repeated="2"/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52]" office:value-type="string" office:string-value="peak_hours" calcext:value-type="string">
            <text:p>peak_hours</text:p>
          </table:table-cell>
          <table:table-cell table:style-name="ce41"/>
          <table:table-cell table:number-columns-repeated="12"/>
          <table:table-cell table:style-name="ce39" table:number-columns-repeated="9"/>
          <table:table-cell table:number-columns-repeated="2" table:style-name="ce39" office:value-type="string" calcext:value-type="string">
            <text:p>x</text:p>
          </table:table-cell>
          <table:table-cell table:style-name="ce39" table:number-columns-repeated="2"/>
          <table:table-cell/>
          <table:table-cell table:formula="of:=IF(ISERROR(VLOOKUP([.A54];[.AE:.AE];1;0));&quot;&quot;;&quot;x&quot;)">
            <text:p/>
          </table:table-cell>
          <table:table-cell table:number-columns-repeated="5"/>
          <table:table-cell table:style-name="ce25" table:number-columns-repeated="2"/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53]" office:value-type="string" office:string-value="peak_signal" calcext:value-type="string">
            <text:p>peak_signal</text:p>
          </table:table-cell>
          <table:table-cell table:style-name="ce41"/>
          <table:table-cell table:number-columns-repeated="12"/>
          <table:table-cell table:style-name="ce39" table:number-columns-repeated="9"/>
          <table:table-cell table:number-columns-repeated="2" table:style-name="ce39" office:value-type="string" calcext:value-type="string">
            <text:p>x</text:p>
          </table:table-cell>
          <table:table-cell table:style-name="ce39" table:number-columns-repeated="2"/>
          <table:table-cell/>
          <table:table-cell table:formula="of:=IF(ISERROR(VLOOKUP([.A55];[.AE:.AE];1;0));&quot;&quot;;&quot;x&quot;)">
            <text:p/>
          </table:table-cell>
          <table:table-cell table:number-columns-repeated="5"/>
          <table:table-cell table:style-name="ce25" table:number-columns-repeated="2"/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54]" office:value-type="float" office:value="0" calcext:value-type="float">
            <text:p>0</text:p>
          </table:table-cell>
          <table:table-cell table:style-name="ce41"/>
          <table:table-cell table:number-columns-repeated="12"/>
          <table:table-cell table:style-name="ce39" table:number-columns-repeated="13"/>
          <table:table-cell/>
          <table:table-cell table:formula="of:=IF(ISERROR(VLOOKUP([.A56];[.AE:.AE];1;0));&quot;&quot;;&quot;x&quot;)">
            <text:p/>
          </table:table-cell>
          <table:table-cell table:number-columns-repeated="34"/>
          <table:table-cell table:style-name="Default" table:number-columns-repeated="16321"/>
        </table:table-row>
        <table:table-row table:style-name="ro1">
          <table:table-cell table:formula="of:=[$cmds.A55]" office:value-type="float" office:value="0" calcext:value-type="float">
            <text:p>0</text:p>
          </table:table-cell>
          <table:table-cell table:style-name="ce41"/>
          <table:table-cell table:number-columns-repeated="12"/>
          <table:table-cell table:style-name="ce39" table:number-columns-repeated="13"/>
          <table:table-cell/>
          <table:table-cell table:formula="of:=IF(ISERROR(VLOOKUP([.A57];[.AE:.AE];1;0));&quot;&quot;;&quot;x&quot;)">
            <text:p/>
          </table:table-cell>
          <table:table-cell table:number-columns-repeated="34"/>
          <table:table-cell table:style-name="Default" table:number-columns-repeated="16321"/>
        </table:table-row>
        <table:table-row table:style-name="ro1">
          <table:table-cell table:formula="of:=[$cmds.A55]" office:value-type="float" office:value="0" calcext:value-type="float">
            <text:p>0</text:p>
          </table:table-cell>
          <table:table-cell table:style-name="ce41"/>
          <table:table-cell table:number-columns-repeated="12"/>
          <table:table-cell table:style-name="ce39" table:number-columns-repeated="13"/>
          <table:table-cell/>
          <table:table-cell table:formula="of:=IF(ISERROR(VLOOKUP([.A58];[.AE:.AE];1;0));&quot;&quot;;&quot;x&quot;)">
            <text:p/>
          </table:table-cell>
          <table:table-cell table:number-columns-repeated="34"/>
          <table:table-cell table:style-name="Default" table:number-columns-repeated="16321"/>
        </table:table-row>
        <table:table-row table:style-name="ro1">
          <table:table-cell table:formula="of:=[$cmds.A56]" office:value-type="float" office:value="0" calcext:value-type="float">
            <text:p>0</text:p>
          </table:table-cell>
          <table:table-cell table:style-name="ce41"/>
          <table:table-cell table:number-columns-repeated="12"/>
          <table:table-cell table:style-name="ce39" table:number-columns-repeated="13"/>
          <table:table-cell/>
          <table:table-cell table:formula="of:=IF(ISERROR(VLOOKUP([.A59];[.AE:.AE];1;0));&quot;&quot;;&quot;x&quot;)">
            <text:p/>
          </table:table-cell>
          <table:table-cell table:number-columns-repeated="34"/>
          <table:table-cell table:style-name="Default" table:number-columns-repeated="16321"/>
        </table:table-row>
        <table:table-row table:style-name="ro1">
          <table:table-cell/>
          <table:table-cell table:style-name="ce41"/>
          <table:table-cell table:number-columns-repeated="12"/>
          <table:table-cell table:style-name="ce39" table:number-columns-repeated="13"/>
          <table:table-cell/>
          <table:table-cell table:formula="of:=IF(ISERROR(VLOOKUP([.A60];[.AE:.AE];1;0));&quot;&quot;;&quot;x&quot;)">
            <text:p/>
          </table:table-cell>
          <table:table-cell table:number-columns-repeated="34"/>
          <table:table-cell table:style-name="Default" table:number-columns-repeated="16321"/>
        </table:table-row>
        <table:table-row table:style-name="ro1">
          <table:table-cell table:style-name="ce7"/>
          <table:table-cell table:style-name="ce18" table:number-columns-repeated="26"/>
          <table:table-cell table:style-name="ce7"/>
          <table:table-cell table:style-name="ce7" table:formula="of:=IF(ISERROR(VLOOKUP([.A61];[.AE:.AE];1;0));&quot;&quot;;&quot;x&quot;)">
            <text:p/>
          </table:table-cell>
          <table:table-cell table:style-name="ce7" table:number-columns-repeated="34"/>
          <table:table-cell table:style-name="Default" table:number-columns-repeated="16321"/>
        </table:table-row>
        <table:table-row table:style-name="ro1">
          <table:table-cell table:style-name="ce14" office:value-type="string" calcext:value-type="string">
            <text:p>{</text:p>
          </table:table-cell>
          <table:table-cell table:style-name="Default" table:number-columns-repeated="13"/>
          <table:table-cell table:number-columns-repeated="10"/>
          <table:table-cell table:style-name="ce39" table:number-columns-repeated="3"/>
          <table:table-cell table:number-columns-repeated="36"/>
          <table:table-cell table:style-name="Default" table:number-columns-repeated="16321"/>
        </table:table-row>
        <table:table-row table:style-name="ro1">
          <table:table-cell table:style-name="ce14" table:formula="of:=COM.MICROSOFT.CONCAT([.B63:.Y63])" office:value-type="string" office:string-value="&#13;     &#9;&quot;xxxxxx&quot;:                          {&quot;product_name&quot;:&quot;Heatzy-xxxxx&quot;        ,&quot;product_key&quot;:&quot;xxxxxx&quot;                          ,&quot;cmds&quot;:[&quot;refresh&quot;]}&#13;    ,&#9;&quot;9420ae048da545c88fc6274d204dd25f&quot;:{&quot;product_name&quot;:&quot;Pilote_V1&quot;           ,&quot;product_key&quot;:&quot;9420ae048da545c88fc6274d204dd25f&quot;,&quot;cmds&quot;:[&quot;refresh&quot;,&quot;IsOnLine&quot;,&quot;EtatConsigne&quot;,&quot;mode&quot;,&quot;Confort&quot;,&quot;Eco&quot;,&quot;HorsGel&quot;,&quot;Off&quot;,&quot;etatprog&quot;,&quot;ProgOn&quot;,&quot;ProgOff&quot;]}&#13;    ,&#9;&quot;51d16c22a5f74280bc3cfe9ebcdc6402&quot;:{&quot;product_name&quot;:&quot;Pilote2&quot;             ,&quot;product_key&quot;:&quot;51d16c22a5f74280bc3cfe9ebcdc6402&quot;,&quot;cmds&quot;:[&quot;refresh&quot;,&quot;IsOnLine&quot;,&quot;EtatConsigne&quot;,&quot;mode&quot;,&quot;Confort&quot;,&quot;Eco&quot;,&quot;HorsGel&quot;,&quot;Off&quot;,&quot;etatprog&quot;,&quot;ProgOn&quot;,&quot;ProgOff&quot;,&quot;etatlock&quot;,&quot;LockOn&quot;,&quot;LockOff&quot;,&quot;derog_mode&quot;,&quot;derog_off&quot;,&quot;derog_time_vacances&quot;,&quot;derog_vacances&quot;,&quot;derog_time_boost&quot;,&quot;derog_boost&quot;]}&#13;    ,&#9;&quot;4fc968a21e7243b390e9ede6f1c6465d&quot;:{&quot;product_name&quot;:&quot;Pilote2_Elec_Pro&quot;    ,&quot;product_key&quot;:&quot;4fc968a21e7243b390e9ede6f1c6465d&quot;,&quot;cmds&quot;:[&quot;refresh&quot;,&quot;IsOnLine&quot;,&quot;EtatConsigne&quot;,&quot;mode&quot;,&quot;Confort&quot;,&quot;Eco&quot;,&quot;HorsGel&quot;,&quot;Off&quot;,&quot;etatprog&quot;,&quot;ProgOn&quot;,&quot;ProgOff&quot;]}&#13;    ,&#9;&quot;b9a67b6ce24b437d9794103fd317e627&quot;:{&quot;product_name&quot;:&quot;Pilote_Soc&quot;          ,&quot;product_key&quot;:&quot;b9a67b6ce24b437d9794103fd317e627&quot;,&quot;cmds&quot;:[&quot;refresh&quot;,&quot;IsOnLine&quot;,&quot;EtatConsigne&quot;,&quot;mode&quot;,&quot;Confort&quot;,&quot;Eco&quot;,&quot;HorsGel&quot;,&quot;Off&quot;,&quot;etatprog&quot;,&quot;ProgOn&quot;,&quot;ProgOff&quot;,&quot;etatlock&quot;,&quot;LockOn&quot;,&quot;LockOff&quot;,&quot;derog_mode&quot;,&quot;derog_off&quot;,&quot;derog_time_vacances&quot;,&quot;derog_vacances&quot;,&quot;derog_time_boost&quot;,&quot;derog_boost&quot;]}&#13;    ,&#9;&quot;b8c6657b66c34148b4dee64d615cefc7&quot;:{&quot;product_name&quot;:&quot;Elec_Pro_Soc&quot;        ,&quot;product_key&quot;:&quot;b8c6657b66c34148b4dee64d615cefc7&quot;,&quot;cmds&quot;:[&quot;refresh&quot;,&quot;IsOnLine&quot;,&quot;EtatConsigne&quot;,&quot;mode&quot;,&quot;Confort&quot;,&quot;Eco&quot;,&quot;HorsGel&quot;,&quot;Off&quot;,&quot;etatprog&quot;,&quot;ProgOn&quot;,&quot;ProgOff&quot;]}&#13;    ,&#9;&quot;9dacde7ef459421eaf8dc4bea9385634&quot;:{&quot;product_name&quot;:&quot;Elec_Pro_Ble&quot;        ,&quot;product_key&quot;:&quot;9dacde7ef459421eaf8dc4bea9385634&quot;,&quot;cmds&quot;:[&quot;refresh&quot;,&quot;IsOnLine&quot;,&quot;EtatConsigne&quot;,&quot;mode&quot;,&quot;Confort&quot;,&quot;Eco&quot;,&quot;HorsGel&quot;,&quot;Off&quot;,&quot;etatprog&quot;,&quot;ProgOn&quot;,&quot;ProgOff&quot;,&quot;etatlock&quot;,&quot;LockOn&quot;,&quot;LockOff&quot;,&quot;derog_mode&quot;,&quot;derog_off&quot;,&quot;derog_time_vacances&quot;,&quot;derog_vacances&quot;,&quot;derog_time_boost&quot;,&quot;derog_boost&quot;]}&#13;    ,&#9;&quot;46409c7f29d4411c85a3a46e5ee3703e&quot;:{&quot;product_name&quot;:&quot;Pilote_Soc_C3&quot;       ,&quot;product_key&quot;:&quot;46409c7f29d4411c85a3a46e5ee3703e&quot;,&quot;cmds&quot;:[&quot;refresh&quot;,&quot;IsOnLine&quot;,&quot;EtatConsigne&quot;,&quot;mode&quot;,&quot;Confort&quot;,&quot;Eco&quot;,&quot;HorsGel&quot;,&quot;Off&quot;,&quot;etatprog&quot;,&quot;ProgOn&quot;,&quot;ProgOff&quot;]}&#13;    ,&#9;&quot;a77a929fcf0d4631bc4f669080376891&quot;:{&quot;product_name&quot;:&quot;Pilote_Pro&quot;          ,&quot;product_key&quot;:&quot;a77a929fcf0d4631bc4f669080376891&quot;,&quot;cmds&quot;:[&quot;refresh&quot;,&quot;IsOnLine&quot;,&quot;cur_temp&quot;,&quot;cur_humi&quot;,&quot;eco_temp&quot;,&quot;eco_temp_consigne&quot;,&quot;cft_temp&quot;,&quot;cft_temp_consigne&quot;,&quot;Tendance&quot;,&quot;WindowOpened&quot;,&quot;EtatConsigne&quot;,&quot;mode&quot;,&quot;Confort&quot;,&quot;Eco&quot;,&quot;HorsGel&quot;,&quot;Off&quot;,&quot;Confort-1&quot;,&quot;Confort-2&quot;,&quot;etatprog&quot;,&quot;ProgOn&quot;,&quot;ProgOff&quot;,&quot;etatlock&quot;,&quot;LockOn&quot;,&quot;LockOff&quot;,&quot;WindowSwitch&quot;,&quot;WindowSwitchOn&quot;,&quot;WindowSwitchOff&quot;,&quot;derog_mode&quot;,&quot;derog_off&quot;,&quot;derog_time_vacances&quot;,&quot;derog_vacances&quot;,&quot;derog_time_boost&quot;,&quot;derog_boost&quot;,&quot;derog_presence&quot;,&quot;detect_presence&quot;]}&#13;    ,&#9;&quot;2fd622e45283470f9e27e8e6167d7533&quot;:{&quot;product_name&quot;:&quot;Glow_Simple&quot;         ,&quot;product_key&quot;:&quot;2fd622e45283470f9e27e8e6167d7533&quot;,&quot;cmds&quot;:[&quot;refresh&quot;,&quot;IsOnLine&quot;,&quot;EtatConsigne&quot;,&quot;mode&quot;,&quot;Confort&quot;,&quot;Eco&quot;,&quot;HorsGel&quot;,&quot;Off&quot;,&quot;etatprog&quot;,&quot;ProgOn&quot;,&quot;ProgOff&quot;]}&#13;    ,&#9;&quot;51c35c204f854cebbc780bf9785db409&quot;:{&quot;product_name&quot;:&quot;Glow&quot;                ,&quot;product_key&quot;:&quot;51c35c204f854cebbc780bf9785db409&quot;,&quot;cmds&quot;:[&quot;refresh&quot;,&quot;IsOnLine&quot;,&quot;eco_temp&quot;,&quot;eco_temp_consigneHL&quot;,&quot;cft_temp&quot;,&quot;cft_temp_consigneHL&quot;,&quot;EtatConsigne&quot;,&quot;mode&quot;,&quot;Confort&quot;,&quot;Eco&quot;,&quot;HorsGel&quot;,&quot;Off&quot;,&quot;etatprog&quot;,&quot;ProgOn&quot;,&quot;ProgOff&quot;]}&#13;    ,&#9;&quot;cffa0df68a52449085c5d1e72c2f6bb0&quot;:{&quot;product_name&quot;:&quot;Glow_Simple_ble&quot;     ,&quot;product_key&quot;:&quot;cffa0df68a52449085c5d1e72c2f6bb0&quot;,&quot;cmds&quot;:[&quot;refresh&quot;,&quot;IsOnLine&quot;,&quot;cur_temp&quot;,&quot;eco_temp&quot;,&quot;eco_temp_consigneHL&quot;,&quot;cft_temp&quot;,&quot;cft_temp_consigneHL&quot;,&quot;EtatConsigne&quot;,&quot;mode&quot;,&quot;Confort&quot;,&quot;Eco&quot;,&quot;HorsGel&quot;,&quot;Off&quot;,&quot;etatprog&quot;,&quot;ProgOn&quot;,&quot;ProgOff&quot;,&quot;plugzy&quot;,&quot;plugzyon&quot;,&quot;plugzyoff&quot;,&quot;derog_mode&quot;,&quot;derog_off&quot;,&quot;derog_time_vacances&quot;,&quot;derog_vacances&quot;,&quot;derog_time_boost&quot;,&quot;derog_boost&quot;,&quot;derog_presence&quot;,&quot;detect_presence&quot;]}&#13;    ,&#9;&quot;bb10d064f8de409db633b750faa22a52&quot;:{&quot;product_name&quot;:&quot;ONYX&quot;                ,&quot;product_key&quot;:&quot;bb10d064f8de409db633b750faa22a52&quot;,&quot;cmds&quot;:[&quot;refresh&quot;,&quot;IsOnLine&quot;,&quot;EtatConsigne&quot;,&quot;mode&quot;,&quot;Confort&quot;,&quot;Eco&quot;,&quot;HorsGel&quot;,&quot;Off&quot;,&quot;etatprog&quot;,&quot;ProgOn&quot;,&quot;ProgOff&quot;]}&#13;    ,&#9;&quot;fc89066ee74c4149a9beb37d4ea93604&quot;:{&quot;product_name&quot;:&quot;INEA&quot;                ,&quot;product_key&quot;:&quot;fc89066ee74c4149a9beb37d4ea93604&quot;,&quot;cmds&quot;:[&quot;refresh&quot;,&quot;IsOnLine&quot;,&quot;cur_temp&quot;,&quot;eco_temp&quot;,&quot;eco_temp_consigneHL&quot;,&quot;EtatConsigne&quot;,&quot;mode&quot;,&quot;Confort&quot;,&quot;Eco&quot;,&quot;HorsGel&quot;,&quot;Off&quot;,&quot;etatprog&quot;,&quot;ProgOn&quot;,&quot;ProgOff&quot;]}&#13;    ,&#9;&quot;480253852d574f11b2d7fbf4460d7a41&quot;:{&quot;product_name&quot;:&quot;BLOOM&quot;               ,&quot;product_key&quot;:&quot;480253852d574f11b2d7fbf4460d7a41&quot;,&quot;cmds&quot;:[&quot;refresh&quot;,&quot;IsOnLine&quot;,&quot;EtatConsigne&quot;,&quot;mode&quot;,&quot;Confort&quot;,&quot;Eco&quot;,&quot;HorsGel&quot;,&quot;Off&quot;,&quot;etatprog&quot;,&quot;ProgOn&quot;,&quot;ProgOff&quot;]}&#13;    ,&#9;&quot;XXXXXXXXXXXXXXXXXXXXXXXXXXXXXXXX&quot;:{&quot;product_name&quot;:&quot;Shine&quot;               ,&quot;product_key&quot;:&quot;XXXXXXXXXXXXXXXXXXXXXXXXXXXXXXXX&quot;,&quot;cmds&quot;:[&quot;refresh&quot;,&quot;IsOnLine&quot;,&quot;eco_temp&quot;,&quot;eco_temp_consigneHL&quot;,&quot;cft_temp&quot;,&quot;cft_temp_consigneHL&quot;,&quot;EtatConsigne&quot;,&quot;mode&quot;,&quot;Confort&quot;,&quot;Eco&quot;,&quot;HorsGel&quot;,&quot;Off&quot;,&quot;etatprog&quot;,&quot;ProgOn&quot;,&quot;ProgOff&quot;,&quot;plugzy&quot;,&quot;plugzyon&quot;,&quot;plugzyoff&quot;,&quot;derog_mode&quot;,&quot;derog_off&quot;,&quot;derog_time_vacances&quot;,&quot;derog_vacances&quot;,&quot;derog_time_boost&quot;,&quot;derog_boost&quot;]}&#13;    ,&#9;&quot;f71ee820660f4f358db8b8a474689726&quot;:{&quot;product_name&quot;:&quot;Flam_Week2&quot;          ,&quot;product_key&quot;:&quot;f71ee820660f4f358db8b8a474689726&quot;,&quot;cmds&quot;:[&quot;refresh&quot;,&quot;IsOnLine&quot;,&quot;cur_temp&quot;,&quot;eco_temp&quot;,&quot;eco_temp_consigneHL&quot;,&quot;EtatConsigne&quot;,&quot;mode&quot;,&quot;Confort&quot;,&quot;Eco&quot;,&quot;HorsGel&quot;,&quot;Off&quot;,&quot;etatprog&quot;,&quot;ProgOn&quot;,&quot;ProgOff&quot;,&quot;plugzy&quot;,&quot;plugzyon&quot;,&quot;plugzyoff&quot;]}&#13;    ,&#9;&quot;d60c58d724b845068bf4652a10883c92&quot;:{&quot;product_name&quot;:&quot;Rocket&quot;              ,&quot;product_key&quot;:&quot;d60c58d724b845068bf4652a10883c92&quot;,&quot;cmds&quot;:[&quot;refresh&quot;,&quot;IsOnLine&quot;,&quot;EtatConsigne&quot;,&quot;mode&quot;,&quot;Confort&quot;,&quot;Eco&quot;,&quot;HorsGel&quot;,&quot;Off&quot;,&quot;etatprog&quot;,&quot;ProgOn&quot;,&quot;ProgOff&quot;]}&#13;    ,&#9;&quot;2884feb88e0b4f30b75ea5572276a102&quot;:{&quot;product_name&quot;:&quot;Shine_Blu&quot;           ,&quot;product_key&quot;:&quot;2884feb88e0b4f30b75ea5572276a102&quot;,&quot;cmds&quot;:[&quot;refresh&quot;,&quot;IsOnLine&quot;,&quot;EtatConsigne&quot;,&quot;mode&quot;,&quot;Confort&quot;,&quot;Eco&quot;,&quot;HorsGel&quot;,&quot;Off&quot;,&quot;etatprog&quot;,&quot;ProgOn&quot;,&quot;ProgOff&quot;]}&#13;    ,&#9;&quot;0a000341206048a0be23e2cbf9d8f29a&quot;:{&quot;product_name&quot;:&quot;Socket&quot;              ,&quot;product_key&quot;:&quot;0a000341206048a0be23e2cbf9d8f29a&quot;,&quot;cmds&quot;:[&quot;refresh&quot;,&quot;IsOnLine&quot;,&quot;EtatConsigne&quot;,&quot;mode&quot;,&quot;Confort&quot;,&quot;Eco&quot;,&quot;HorsGel&quot;,&quot;Off&quot;,&quot;etatprog&quot;,&quot;ProgOn&quot;,&quot;ProgOff&quot;]}&#13;    ,&#9;&quot;e5d5766484db4b4d9b9fa7c08cd65481&quot;:{&quot;product_name&quot;:&quot;Vulcane&quot;             ,&quot;product_key&quot;:&quot;e5d5766484db4b4d9b9fa7c08cd65481&quot;,&quot;cmds&quot;:[&quot;refresh&quot;,&quot;IsOnLine&quot;,&quot;EtatConsigne&quot;,&quot;mode&quot;,&quot;Confort&quot;,&quot;Eco&quot;,&quot;HorsGel&quot;,&quot;Off&quot;,&quot;etatprog&quot;,&quot;ProgOn&quot;,&quot;ProgOff&quot;]}&#13;    ,&#9;&quot;18e548a0df9444669a480a7ab31bc314&quot;:{&quot;product_name&quot;:&quot;Bridge&quot;              ,&quot;product_key&quot;:&quot;18e548a0df9444669a480a7ab31bc314&quot;,&quot;cmds&quot;:[&quot;refresh&quot;,&quot;IsOnLine&quot;,&quot;etatprog&quot;,&quot;ProgOn&quot;,&quot;ProgOff&quot;]}&#13;    ,&#9;&quot;aa85e43fc4464e4d0000000000000000&quot;:{&quot;product_name&quot;:&quot;Pilote_Duo&quot;          ,&quot;product_key&quot;:&quot;aa85e43fc4464e4d0000000000000000&quot;,&quot;cmds&quot;:[&quot;refresh&quot;,&quot;IsOnLine&quot;,&quot;EtatConsigne&quot;,&quot;mode&quot;,&quot;Confort&quot;,&quot;Eco&quot;,&quot;HorsGel&quot;,&quot;Off&quot;,&quot;etatprog&quot;,&quot;ProgOn&quot;,&quot;ProgOff&quot;,&quot;cur_power&quot;,&quot;cur_current&quot;,&quot;cur_voltage&quot;,&quot;signal_power&quot;,&quot;energy_saving&quot;,&quot;kill_switch&quot;,&quot;peak_hours&quot;,&quot;peak_signal&quot;]}&#13;    ,&#9;&quot;528f35158d854e220000000000000000&quot;:{&quot;product_name&quot;:&quot;Heatzy_Boiler&quot;       ,&quot;product_key&quot;:&quot;528f35158d854e220000000000000000&quot;,&quot;cmds&quot;:[&quot;refresh&quot;,&quot;IsOnLine&quot;,&quot;EtatConsigne&quot;,&quot;mode&quot;,&quot;Confort&quot;,&quot;Eco&quot;,&quot;HorsGel&quot;,&quot;Off&quot;,&quot;etatprog&quot;,&quot;ProgOn&quot;,&quot;ProgOff&quot;,&quot;derog_mode&quot;,&quot;derog_off&quot;,&quot;derog_time_vacances&quot;,&quot;derog_vacances&quot;,&quot;derog_time_boost&quot;,&quot;derog_boost&quot;,&quot;derog_presence&quot;,&quot;detect_presence&quot;,&quot;cur_power&quot;,&quot;cur_current&quot;,&quot;cur_voltage&quot;,&quot;signal_power&quot;,&quot;energy_saving&quot;,&quot;peak_hours&quot;,&quot;peak_signal&quot;]}" calcext:value-type="string">
            <text:p> <text:s text:c="4"/><text:tab/>"xxxxxx": <text:s text:c="25"/>{"product_name":"Heatzy-xxxxx" <text:s text:c="7"/>,"product_key":"xxxxxx" <text:s text:c="25"/>,"cmds":["refresh"]} <text:s text:c="3"/>,<text:tab/>"9420ae048da545c88fc6274d204dd25f":{"product_name":"Pilote_V1" <text:s text:c="10"/>,"product_key":"9420ae048da545c88fc6274d204dd25f","cmds":["refresh","IsOnLine","EtatConsigne","mode","Confort","Eco","HorsGel","Off","etatprog","ProgOn","ProgOff"]} <text:s text:c="3"/>,<text:tab/>"51d16c22a5f74280bc3cfe9ebcdc6402":{"product_name":"Pilote2" <text:s text:c="12"/>,"product_key":"51d16c22a5f74280bc3cfe9ebcdc6402","cmds":["refresh","IsOnLine","EtatConsigne","mode","Confort","Eco","HorsGel","Off","etatprog","ProgOn","ProgOff","etatlock","LockOn","LockOff","derog_mode","derog_off","derog_time_vacances","derog_vacances","derog_time_boost","derog_boost"]} <text:s text:c="3"/>,<text:tab/>"4fc968a21e7243b390e9ede6f1c6465d":{"product_name":"Pilote2_Elec_Pro" <text:s text:c="3"/>,"product_key":"4fc968a21e7243b390e9ede6f1c6465d","cmds":["refresh","IsOnLine","EtatConsigne","mode","Confort","Eco","HorsGel","Off","etatprog","ProgOn","ProgOff"]} <text:s text:c="3"/>,<text:tab/>"b9a67b6ce24b437d9794103fd317e627":{"product_name":"Pilote_Soc" <text:s text:c="9"/>,"product_key":"b9a67b6ce24b437d9794103fd317e627","cmds":["refresh","IsOnLine","EtatConsigne","mode","Confort","Eco","HorsGel","Off","etatprog","ProgOn","ProgOff","etatlock","LockOn","LockOff","derog_mode","derog_off","derog_time_vacances","derog_vacances","derog_time_boost","derog_boost"]} <text:s text:c="3"/>,<text:tab/>"b8c6657b66c34148b4dee64d615cefc7":{"product_name":"Elec_Pro_Soc" <text:s text:c="7"/>,"product_key":"b8c6657b66c34148b4dee64d615cefc7","cmds":["refresh","IsOnLine","EtatConsigne","mode","Confort","Eco","HorsGel","Off","etatprog","ProgOn","ProgOff"]} <text:s text:c="3"/>,<text:tab/>"9dacde7ef459421eaf8dc4bea9385634":{"product_name":"Elec_Pro_Ble" <text:s text:c="7"/>,"product_key":"9dacde7ef459421eaf8dc4bea9385634","cmds":["refresh","IsOnLine","EtatConsigne","mode","Confort","Eco","HorsGel","Off","etatprog","ProgOn","ProgOff","etatlock","LockOn","LockOff","derog_mode","derog_off","derog_time_vacances","derog_vacances","derog_time_boost","derog_boost"]} <text:s text:c="3"/>,<text:tab/>"46409c7f29d4411c85a3a46e5ee3703e":{"product_name":"Pilote_Soc_C3" <text:s text:c="6"/>,"product_key":"46409c7f29d4411c85a3a46e5ee3703e","cmds":["refresh","IsOnLine","EtatConsigne","mode","Confort","Eco","HorsGel","Off","etatprog","ProgOn","ProgOff"]} <text:s text:c="3"/>,<text:tab/>"a77a929fcf0d4631bc4f669080376891":{"product_name":"Pilote_Pro" <text:s text:c="9"/>,"product_key":"a77a929fcf0d4631bc4f669080376891","cmds":["refresh","IsOnLine","cur_temp","cur_humi","eco_temp","eco_temp_consigne","cft_temp","cft_temp_consigne","Tendance","WindowOpened","EtatConsigne","mode","Confort","Eco","HorsGel","Off","Confort-1","Confort-2","etatprog","ProgOn","ProgOff","etatlock","LockOn","LockOff","WindowSwitch","WindowSwitchOn","WindowSwitchOff","derog_mode","derog_off","derog_time_vacances","derog_vacances","derog_time_boost","derog_boost","derog_presence","detect_presence"]} <text:s text:c="3"/>,<text:tab/>"2fd622e45283470f9e27e8e6167d7533":{"product_name":"Glow_Simple" <text:s text:c="8"/>,"product_key":"2fd622e45283470f9e27e8e6167d7533","cmds":["refresh","IsOnLine","EtatConsigne","mode","Confort","Eco","HorsGel","Off","etatprog","ProgOn","ProgOff"]} <text:s text:c="3"/>,<text:tab/>"51c35c204f854cebbc780bf9785db409":{"product_name":"Glow" <text:s text:c="15"/>,"product_key":"51c35c204f854cebbc780bf9785db409","cmds":["refresh","IsOnLine","eco_temp","eco_temp_consigneHL","cft_temp","cft_temp_consigneHL","EtatConsigne","mode","Confort","Eco","HorsGel","Off","etatprog","ProgOn","ProgOff"]} <text:s text:c="3"/>,<text:tab/>"cffa0df68a52449085c5d1e72c2f6bb0":{"product_name":"Glow_Simple_ble" <text:s text:c="4"/>,"product_key":"cffa0df68a52449085c5d1e72c2f6bb0","cmds":["refresh","IsOnLine","cur_temp","eco_temp","eco_temp_consigneHL","cft_temp","cft_temp_consigneHL","EtatConsigne","mode","Confort","Eco","HorsGel","Off","etatprog","ProgOn","ProgOff","plugzy","plugzyon","plugzyoff","derog_mode","derog_off","derog_time_vacances","derog_vacances","derog_time_boost","derog_boost","derog_presence","detect_presence"]} <text:s text:c="3"/>,<text:tab/>"bb10d064f8de409db633b750faa22a52":{"product_name":"ONYX" <text:s text:c="15"/>,"product_key":"bb10d064f8de409db633b750faa22a52","cmds":["refresh","IsOnLine","EtatConsigne","mode","Confort","Eco","HorsGel","Off","etatprog","ProgOn","ProgOff"]} <text:s text:c="3"/>,<text:tab/>"fc89066ee74c4149a9beb37d4ea93604":{"product_name":"INEA" <text:s text:c="15"/>,"product_key":"fc89066ee74c4149a9beb37d4ea93604","cmds":["refresh","IsOnLine","cur_temp","eco_temp","eco_temp_consigneHL","EtatConsigne","mode","Confort","Eco","HorsGel","Off","etatprog","ProgOn","ProgOff"]} <text:s text:c="3"/>,<text:tab/>"480253852d574f11b2d7fbf4460d7a41":{"product_name":"BLOOM" <text:s text:c="14"/>,"product_key":"480253852d574f11b2d7fbf4460d7a41","cmds":["refresh","IsOnLine","EtatConsigne","mode","Confort","Eco","HorsGel","Off","etatprog","ProgOn","ProgOff"]} <text:s text:c="3"/>,<text:tab/>"XXXXXXXXXXXXXXXXXXXXXXXXXXXXXXXX":{"product_name":"Shine" <text:s text:c="14"/>,"product_key":"XXXXXXXXXXXXXXXXXXXXXXXXXXXXXXXX","cmds":["refresh","IsOnLine","eco_temp","eco_temp_consigneHL","cft_temp","cft_temp_consigneHL","EtatConsigne","mode","Confort","Eco","HorsGel","Off","etatprog","ProgOn","ProgOff","plugzy","plugzyon","plugzyoff","derog_mode","derog_off","derog_time_vacances","derog_vacances","derog_time_boost","derog_boost"]} <text:s text:c="3"/>,<text:tab/>"f71ee820660f4f358db8b8a474689726":{"product_name":"Flam_Week2" <text:s text:c="9"/>,"product_key":"f71ee820660f4f358db8b8a474689726","cmds":["refresh","IsOnLine","cur_temp","eco_temp","eco_temp_consigneHL","EtatConsigne","mode","Confort","Eco","HorsGel","Off","etatprog","ProgOn","ProgOff","plugzy","plugzyon","plugzyoff"]} <text:s text:c="3"/>,<text:tab/>"d60c58d724b845068bf4652a10883c92":{"product_name":"Rocket" <text:s text:c="13"/>,"product_key":"d60c58d724b845068bf4652a10883c92","cmds":["refresh","IsOnLine","EtatConsigne","mode","Confort","Eco","HorsGel","Off","etatprog","ProgOn","ProgOff"]} <text:s text:c="3"/>,<text:tab/>"2884feb88e0b4f30b75ea5572276a102":{"product_name":"Shine_Blu" <text:s text:c="10"/>,"product_key":"2884feb88e0b4f30b75ea5572276a102","cmds":["refresh","IsOnLine","EtatConsigne","mode","Confort","Eco","HorsGel","Off","etatprog","ProgOn","ProgOff"]} <text:s text:c="3"/>,<text:tab/>"0a000341206048a0be23e2cbf9d8f29a":{"product_name":"Socket" <text:s text:c="13"/>,"product_key":"0a000341206048a0be23e2cbf9d8f29a","cmds":["refresh","IsOnLine","EtatConsigne","mode","Confort","Eco","HorsGel","Off","etatprog","ProgOn","ProgOff"]} <text:s text:c="3"/>,<text:tab/>"e5d5766484db4b4d9b9fa7c08cd65481":{"product_name":"Vulcane" <text:s text:c="12"/>,"product_key":"e5d5766484db4b4d9b9fa7c08cd65481","cmds":["refresh","IsOnLine","EtatConsigne","mode","Confort","Eco","HorsGel","Off","etatprog","ProgOn","ProgOff"]} <text:s text:c="3"/>,<text:tab/>"18e548a0df9444669a480a7ab31bc314":{"product_name":"Bridge" <text:s text:c="13"/>,"product_key":"18e548a0df9444669a480a7ab31bc314","cmds":["refresh","IsOnLine","etatprog","ProgOn","ProgOff"]} <text:s text:c="3"/>,<text:tab/>"aa85e43fc4464e4d0000000000000000":{"product_name":"Pilote_Duo" <text:s text:c="9"/>,"product_key":"aa85e43fc4464e4d0000000000000000","cmds":["refresh","IsOnLine","EtatConsigne","mode","Confort","Eco","HorsGel","Off","etatprog","ProgOn","ProgOff","cur_power","cur_current","cur_voltage","signal_power","energy_saving","kill_switch","peak_hours","peak_signal"]} <text:s text:c="3"/>,<text:tab/>"528f35158d854e220000000000000000":{"product_name":"Heatzy_Boiler" <text:s text:c="6"/>,"product_key":"528f35158d854e220000000000000000","cmds":["refresh","IsOnLine","EtatConsigne","mode","Confort","Eco","HorsGel","Off","etatprog","ProgOn","ProgOff","derog_mode","derog_off","derog_time_vacances","derog_vacances","derog_time_boost","derog_boost","derog_presence","detect_presence","cur_power","cur_current","cur_voltage","signal_power","energy_saving","peak_hours","peak_signal"]}</text:p>
          </table:table-cell>
          <table:table-cell table:style-name="ce28" table:formula="of:=CHAR(13)&amp;&quot;    &quot;&amp;IF([.A3]&lt;&gt;&quot;&quot;;&quot;,&quot;;&quot; &quot;)&amp;CHAR(9)&amp;&quot;&quot;&quot;&quot;&amp;[.B3]&amp;&quot;&quot;&quot;&quot;&amp;&quot;:&quot;&amp;REPT(&quot; &quot;;32-LEN([.B3]))&amp;&quot;{&quot;&quot;product_name&quot;&quot;:&quot;&quot;&quot;&amp;[.B2]&amp;&quot;&quot;&quot;&quot;&amp;REPT(&quot; &quot;;20-LEN([.B2]))&amp;&quot;,&quot;&quot;product_key&quot;&quot;:&quot;&quot;&quot;&amp;[.B3]&amp;&quot;&quot;&quot;&quot;&amp;REPT(&quot; &quot;;32-LEN([.B3]))&amp;&quot;,&quot;&quot;cmds&quot;&quot;:[&quot;&amp;&quot;&quot;&quot;&quot;&amp;COM.MICROSOFT.TEXTJOIN(&quot;&quot;&quot;,&quot;&quot;&quot;;1;COM.MICROSOFT.FILTER([.$A4:.$A60];[.B4:.B60]=&quot;x&quot;))&amp;&quot;&quot;&quot;&quot;&amp;&quot;]}&quot;" office:value-type="string" office:string-value="&#13;     &#9;&quot;xxxxxx&quot;:                          {&quot;product_name&quot;:&quot;Heatzy-xxxxx&quot;        ,&quot;product_key&quot;:&quot;xxxxxx&quot;                          ,&quot;cmds&quot;:[&quot;refresh&quot;]}" calcext:value-type="string">
            <text:p> <text:s text:c="4"/><text:tab/>"xxxxxx": <text:s text:c="25"/>{"product_name":"Heatzy-xxxxx" <text:s text:c="7"/>,"product_key":"xxxxxx" <text:s text:c="25"/>,"cmds":["refresh"]}</text:p>
          </table:table-cell>
          <table:table-cell table:style-name="ce28" table:formula="of:=CHAR(13)&amp;&quot;    &quot;&amp;IF([.B3]&lt;&gt;&quot;&quot;;&quot;,&quot;;&quot; &quot;)&amp;CHAR(9)&amp;&quot;&quot;&quot;&quot;&amp;[.C3]&amp;&quot;&quot;&quot;&quot;&amp;&quot;:&quot;&amp;REPT(&quot; &quot;;32-LEN([.C3]))&amp;&quot;{&quot;&quot;product_name&quot;&quot;:&quot;&quot;&quot;&amp;[.C2]&amp;&quot;&quot;&quot;&quot;&amp;REPT(&quot; &quot;;20-LEN([.C2]))&amp;&quot;,&quot;&quot;product_key&quot;&quot;:&quot;&quot;&quot;&amp;[.C3]&amp;&quot;&quot;&quot;&quot;&amp;REPT(&quot; &quot;;32-LEN([.C3]))&amp;&quot;,&quot;&quot;cmds&quot;&quot;:[&quot;&amp;&quot;&quot;&quot;&quot;&amp;COM.MICROSOFT.TEXTJOIN(&quot;&quot;&quot;,&quot;&quot;&quot;;1;COM.MICROSOFT.FILTER([.$A4:.$A60];[.C4:.C60]=&quot;x&quot;))&amp;&quot;&quot;&quot;&quot;&amp;&quot;]}&quot;" office:value-type="string" office:string-value="&#13;    ,&#9;&quot;9420ae048da545c88fc6274d204dd25f&quot;:{&quot;product_name&quot;:&quot;Pilote_V1&quot;           ,&quot;product_key&quot;:&quot;9420ae048da545c88fc6274d204dd25f&quot;,&quot;cmds&quot;:[&quot;refresh&quot;,&quot;IsOnLine&quot;,&quot;EtatConsigne&quot;,&quot;mode&quot;,&quot;Confort&quot;,&quot;Eco&quot;,&quot;HorsGel&quot;,&quot;Off&quot;,&quot;etatprog&quot;,&quot;ProgOn&quot;,&quot;ProgOff&quot;]}" calcext:value-type="string">
            <text:p> <text:s text:c="3"/>,<text:tab/>"9420ae048da545c88fc6274d204dd25f":{"product_name":"Pilote_V1" <text:s text:c="10"/>,"product_key":"9420ae048da545c88fc6274d204dd25f","cmds":["refresh","IsOnLine","EtatConsigne","mode","Confort","Eco","HorsGel","Off","etatprog","ProgOn","ProgOff"]}</text:p>
          </table:table-cell>
          <table:table-cell table:style-name="ce28" table:formula="of:=CHAR(13)&amp;&quot;    &quot;&amp;IF([.C3]&lt;&gt;&quot;&quot;;&quot;,&quot;;&quot; &quot;)&amp;CHAR(9)&amp;&quot;&quot;&quot;&quot;&amp;[.D3]&amp;&quot;&quot;&quot;&quot;&amp;&quot;:&quot;&amp;REPT(&quot; &quot;;32-LEN([.D3]))&amp;&quot;{&quot;&quot;product_name&quot;&quot;:&quot;&quot;&quot;&amp;[.D2]&amp;&quot;&quot;&quot;&quot;&amp;REPT(&quot; &quot;;20-LEN([.D2]))&amp;&quot;,&quot;&quot;product_key&quot;&quot;:&quot;&quot;&quot;&amp;[.D3]&amp;&quot;&quot;&quot;&quot;&amp;REPT(&quot; &quot;;32-LEN([.D3]))&amp;&quot;,&quot;&quot;cmds&quot;&quot;:[&quot;&amp;&quot;&quot;&quot;&quot;&amp;COM.MICROSOFT.TEXTJOIN(&quot;&quot;&quot;,&quot;&quot;&quot;;1;COM.MICROSOFT.FILTER([.$A4:.$A60];[.D4:.D60]=&quot;x&quot;))&amp;&quot;&quot;&quot;&quot;&amp;&quot;]}&quot;" office:value-type="string" office:string-value="&#13;    ,&#9;&quot;51d16c22a5f74280bc3cfe9ebcdc6402&quot;:{&quot;product_name&quot;:&quot;Pilote2&quot;             ,&quot;product_key&quot;:&quot;51d16c22a5f74280bc3cfe9ebcdc6402&quot;,&quot;cmds&quot;:[&quot;refresh&quot;,&quot;IsOnLine&quot;,&quot;EtatConsigne&quot;,&quot;mode&quot;,&quot;Confort&quot;,&quot;Eco&quot;,&quot;HorsGel&quot;,&quot;Off&quot;,&quot;etatprog&quot;,&quot;ProgOn&quot;,&quot;ProgOff&quot;,&quot;etatlock&quot;,&quot;LockOn&quot;,&quot;LockOff&quot;,&quot;derog_mode&quot;,&quot;derog_off&quot;,&quot;derog_time_vacances&quot;,&quot;derog_vacances&quot;,&quot;derog_time_boost&quot;,&quot;derog_boost&quot;]}" calcext:value-type="string">
            <text:p> <text:s text:c="3"/>,<text:tab/>"51d16c22a5f74280bc3cfe9ebcdc6402":{"product_name":"Pilote2" <text:s text:c="12"/>,"product_key":"51d16c22a5f74280bc3cfe9ebcdc6402","cmds":["refresh","IsOnLine","EtatConsigne","mode","Confort","Eco","HorsGel","Off","etatprog","ProgOn","ProgOff","etatlock","LockOn","LockOff","derog_mode","derog_off","derog_time_vacances","derog_vacances","derog_time_boost","derog_boost"]}</text:p>
          </table:table-cell>
          <table:table-cell table:style-name="ce28" table:formula="of:=CHAR(13)&amp;&quot;    &quot;&amp;IF([.D3]&lt;&gt;&quot;&quot;;&quot;,&quot;;&quot; &quot;)&amp;CHAR(9)&amp;&quot;&quot;&quot;&quot;&amp;[.E3]&amp;&quot;&quot;&quot;&quot;&amp;&quot;:&quot;&amp;REPT(&quot; &quot;;32-LEN([.E3]))&amp;&quot;{&quot;&quot;product_name&quot;&quot;:&quot;&quot;&quot;&amp;[.E2]&amp;&quot;&quot;&quot;&quot;&amp;REPT(&quot; &quot;;20-LEN([.E2]))&amp;&quot;,&quot;&quot;product_key&quot;&quot;:&quot;&quot;&quot;&amp;[.E3]&amp;&quot;&quot;&quot;&quot;&amp;REPT(&quot; &quot;;32-LEN([.E3]))&amp;&quot;,&quot;&quot;cmds&quot;&quot;:[&quot;&amp;&quot;&quot;&quot;&quot;&amp;COM.MICROSOFT.TEXTJOIN(&quot;&quot;&quot;,&quot;&quot;&quot;;1;COM.MICROSOFT.FILTER([.$A4:.$A60];[.E4:.E60]=&quot;x&quot;))&amp;&quot;&quot;&quot;&quot;&amp;&quot;]}&quot;" office:value-type="string" office:string-value="&#13;    ,&#9;&quot;4fc968a21e7243b390e9ede6f1c6465d&quot;:{&quot;product_name&quot;:&quot;Pilote2_Elec_Pro&quot;    ,&quot;product_key&quot;:&quot;4fc968a21e7243b390e9ede6f1c6465d&quot;,&quot;cmds&quot;:[&quot;refresh&quot;,&quot;IsOnLine&quot;,&quot;EtatConsigne&quot;,&quot;mode&quot;,&quot;Confort&quot;,&quot;Eco&quot;,&quot;HorsGel&quot;,&quot;Off&quot;,&quot;etatprog&quot;,&quot;ProgOn&quot;,&quot;ProgOff&quot;]}" calcext:value-type="string">
            <text:p> <text:s text:c="3"/>,<text:tab/>"4fc968a21e7243b390e9ede6f1c6465d":{"product_name":"Pilote2_Elec_Pro" <text:s text:c="3"/>,"product_key":"4fc968a21e7243b390e9ede6f1c6465d","cmds":["refresh","IsOnLine","EtatConsigne","mode","Confort","Eco","HorsGel","Off","etatprog","ProgOn","ProgOff"]}</text:p>
          </table:table-cell>
          <table:table-cell table:style-name="ce28" table:formula="of:=CHAR(13)&amp;&quot;    &quot;&amp;IF([.E3]&lt;&gt;&quot;&quot;;&quot;,&quot;;&quot; &quot;)&amp;CHAR(9)&amp;&quot;&quot;&quot;&quot;&amp;[.F3]&amp;&quot;&quot;&quot;&quot;&amp;&quot;:&quot;&amp;REPT(&quot; &quot;;32-LEN([.F3]))&amp;&quot;{&quot;&quot;product_name&quot;&quot;:&quot;&quot;&quot;&amp;[.F2]&amp;&quot;&quot;&quot;&quot;&amp;REPT(&quot; &quot;;20-LEN([.F2]))&amp;&quot;,&quot;&quot;product_key&quot;&quot;:&quot;&quot;&quot;&amp;[.F3]&amp;&quot;&quot;&quot;&quot;&amp;REPT(&quot; &quot;;32-LEN([.F3]))&amp;&quot;,&quot;&quot;cmds&quot;&quot;:[&quot;&amp;&quot;&quot;&quot;&quot;&amp;COM.MICROSOFT.TEXTJOIN(&quot;&quot;&quot;,&quot;&quot;&quot;;1;COM.MICROSOFT.FILTER([.$A4:.$A60];[.F4:.F60]=&quot;x&quot;))&amp;&quot;&quot;&quot;&quot;&amp;&quot;]}&quot;" office:value-type="string" office:string-value="&#13;    ,&#9;&quot;b9a67b6ce24b437d9794103fd317e627&quot;:{&quot;product_name&quot;:&quot;Pilote_Soc&quot;          ,&quot;product_key&quot;:&quot;b9a67b6ce24b437d9794103fd317e627&quot;,&quot;cmds&quot;:[&quot;refresh&quot;,&quot;IsOnLine&quot;,&quot;EtatConsigne&quot;,&quot;mode&quot;,&quot;Confort&quot;,&quot;Eco&quot;,&quot;HorsGel&quot;,&quot;Off&quot;,&quot;etatprog&quot;,&quot;ProgOn&quot;,&quot;ProgOff&quot;,&quot;etatlock&quot;,&quot;LockOn&quot;,&quot;LockOff&quot;,&quot;derog_mode&quot;,&quot;derog_off&quot;,&quot;derog_time_vacances&quot;,&quot;derog_vacances&quot;,&quot;derog_time_boost&quot;,&quot;derog_boost&quot;]}" calcext:value-type="string">
            <text:p> <text:s text:c="3"/>,<text:tab/>"b9a67b6ce24b437d9794103fd317e627":{"product_name":"Pilote_Soc" <text:s text:c="9"/>,"product_key":"b9a67b6ce24b437d9794103fd317e627","cmds":["refresh","IsOnLine","EtatConsigne","mode","Confort","Eco","HorsGel","Off","etatprog","ProgOn","ProgOff","etatlock","LockOn","LockOff","derog_mode","derog_off","derog_time_vacances","derog_vacances","derog_time_boost","derog_boost"]}</text:p>
          </table:table-cell>
          <table:table-cell table:style-name="ce28" table:formula="of:=CHAR(13)&amp;&quot;    &quot;&amp;IF([.F3]&lt;&gt;&quot;&quot;;&quot;,&quot;;&quot; &quot;)&amp;CHAR(9)&amp;&quot;&quot;&quot;&quot;&amp;[.G3]&amp;&quot;&quot;&quot;&quot;&amp;&quot;:&quot;&amp;REPT(&quot; &quot;;32-LEN([.G3]))&amp;&quot;{&quot;&quot;product_name&quot;&quot;:&quot;&quot;&quot;&amp;[.G2]&amp;&quot;&quot;&quot;&quot;&amp;REPT(&quot; &quot;;20-LEN([.G2]))&amp;&quot;,&quot;&quot;product_key&quot;&quot;:&quot;&quot;&quot;&amp;[.G3]&amp;&quot;&quot;&quot;&quot;&amp;REPT(&quot; &quot;;32-LEN([.G3]))&amp;&quot;,&quot;&quot;cmds&quot;&quot;:[&quot;&amp;&quot;&quot;&quot;&quot;&amp;COM.MICROSOFT.TEXTJOIN(&quot;&quot;&quot;,&quot;&quot;&quot;;1;COM.MICROSOFT.FILTER([.$A4:.$A60];[.G4:.G60]=&quot;x&quot;))&amp;&quot;&quot;&quot;&quot;&amp;&quot;]}&quot;" office:value-type="string" office:string-value="&#13;    ,&#9;&quot;b8c6657b66c34148b4dee64d615cefc7&quot;:{&quot;product_name&quot;:&quot;Elec_Pro_Soc&quot;        ,&quot;product_key&quot;:&quot;b8c6657b66c34148b4dee64d615cefc7&quot;,&quot;cmds&quot;:[&quot;refresh&quot;,&quot;IsOnLine&quot;,&quot;EtatConsigne&quot;,&quot;mode&quot;,&quot;Confort&quot;,&quot;Eco&quot;,&quot;HorsGel&quot;,&quot;Off&quot;,&quot;etatprog&quot;,&quot;ProgOn&quot;,&quot;ProgOff&quot;]}" calcext:value-type="string">
            <text:p> <text:s text:c="3"/>,<text:tab/>"b8c6657b66c34148b4dee64d615cefc7":{"product_name":"Elec_Pro_Soc" <text:s text:c="7"/>,"product_key":"b8c6657b66c34148b4dee64d615cefc7","cmds":["refresh","IsOnLine","EtatConsigne","mode","Confort","Eco","HorsGel","Off","etatprog","ProgOn","ProgOff"]}</text:p>
          </table:table-cell>
          <table:table-cell table:style-name="ce28" table:formula="of:=CHAR(13)&amp;&quot;    &quot;&amp;IF([.G3]&lt;&gt;&quot;&quot;;&quot;,&quot;;&quot; &quot;)&amp;CHAR(9)&amp;&quot;&quot;&quot;&quot;&amp;[.H3]&amp;&quot;&quot;&quot;&quot;&amp;&quot;:&quot;&amp;REPT(&quot; &quot;;32-LEN([.H3]))&amp;&quot;{&quot;&quot;product_name&quot;&quot;:&quot;&quot;&quot;&amp;[.H2]&amp;&quot;&quot;&quot;&quot;&amp;REPT(&quot; &quot;;20-LEN([.H2]))&amp;&quot;,&quot;&quot;product_key&quot;&quot;:&quot;&quot;&quot;&amp;[.H3]&amp;&quot;&quot;&quot;&quot;&amp;REPT(&quot; &quot;;32-LEN([.H3]))&amp;&quot;,&quot;&quot;cmds&quot;&quot;:[&quot;&amp;&quot;&quot;&quot;&quot;&amp;COM.MICROSOFT.TEXTJOIN(&quot;&quot;&quot;,&quot;&quot;&quot;;1;COM.MICROSOFT.FILTER([.$A4:.$A60];[.H4:.H60]=&quot;x&quot;))&amp;&quot;&quot;&quot;&quot;&amp;&quot;]}&quot;" office:value-type="string" office:string-value="&#13;    ,&#9;&quot;9dacde7ef459421eaf8dc4bea9385634&quot;:{&quot;product_name&quot;:&quot;Elec_Pro_Ble&quot;        ,&quot;product_key&quot;:&quot;9dacde7ef459421eaf8dc4bea9385634&quot;,&quot;cmds&quot;:[&quot;refresh&quot;,&quot;IsOnLine&quot;,&quot;EtatConsigne&quot;,&quot;mode&quot;,&quot;Confort&quot;,&quot;Eco&quot;,&quot;HorsGel&quot;,&quot;Off&quot;,&quot;etatprog&quot;,&quot;ProgOn&quot;,&quot;ProgOff&quot;,&quot;etatlock&quot;,&quot;LockOn&quot;,&quot;LockOff&quot;,&quot;derog_mode&quot;,&quot;derog_off&quot;,&quot;derog_time_vacances&quot;,&quot;derog_vacances&quot;,&quot;derog_time_boost&quot;,&quot;derog_boost&quot;]}" calcext:value-type="string">
            <text:p> <text:s text:c="3"/>,<text:tab/>"9dacde7ef459421eaf8dc4bea9385634":{"product_name":"Elec_Pro_Ble" <text:s text:c="7"/>,"product_key":"9dacde7ef459421eaf8dc4bea9385634","cmds":["refresh","IsOnLine","EtatConsigne","mode","Confort","Eco","HorsGel","Off","etatprog","ProgOn","ProgOff","etatlock","LockOn","LockOff","derog_mode","derog_off","derog_time_vacances","derog_vacances","derog_time_boost","derog_boost"]}</text:p>
          </table:table-cell>
          <table:table-cell table:style-name="ce28" table:formula="of:=CHAR(13)&amp;&quot;    &quot;&amp;IF([.H3]&lt;&gt;&quot;&quot;;&quot;,&quot;;&quot; &quot;)&amp;CHAR(9)&amp;&quot;&quot;&quot;&quot;&amp;[.I3]&amp;&quot;&quot;&quot;&quot;&amp;&quot;:&quot;&amp;REPT(&quot; &quot;;32-LEN([.I3]))&amp;&quot;{&quot;&quot;product_name&quot;&quot;:&quot;&quot;&quot;&amp;[.I2]&amp;&quot;&quot;&quot;&quot;&amp;REPT(&quot; &quot;;20-LEN([.I2]))&amp;&quot;,&quot;&quot;product_key&quot;&quot;:&quot;&quot;&quot;&amp;[.I3]&amp;&quot;&quot;&quot;&quot;&amp;REPT(&quot; &quot;;32-LEN([.I3]))&amp;&quot;,&quot;&quot;cmds&quot;&quot;:[&quot;&amp;&quot;&quot;&quot;&quot;&amp;COM.MICROSOFT.TEXTJOIN(&quot;&quot;&quot;,&quot;&quot;&quot;;1;COM.MICROSOFT.FILTER([.$A4:.$A60];[.I4:.I60]=&quot;x&quot;))&amp;&quot;&quot;&quot;&quot;&amp;&quot;]}&quot;" office:value-type="string" office:string-value="&#13;    ,&#9;&quot;46409c7f29d4411c85a3a46e5ee3703e&quot;:{&quot;product_name&quot;:&quot;Pilote_Soc_C3&quot;       ,&quot;product_key&quot;:&quot;46409c7f29d4411c85a3a46e5ee3703e&quot;,&quot;cmds&quot;:[&quot;refresh&quot;,&quot;IsOnLine&quot;,&quot;EtatConsigne&quot;,&quot;mode&quot;,&quot;Confort&quot;,&quot;Eco&quot;,&quot;HorsGel&quot;,&quot;Off&quot;,&quot;etatprog&quot;,&quot;ProgOn&quot;,&quot;ProgOff&quot;]}" calcext:value-type="string">
            <text:p> <text:s text:c="3"/>,<text:tab/>"46409c7f29d4411c85a3a46e5ee3703e":{"product_name":"Pilote_Soc_C3" <text:s text:c="6"/>,"product_key":"46409c7f29d4411c85a3a46e5ee3703e","cmds":["refresh","IsOnLine","EtatConsigne","mode","Confort","Eco","HorsGel","Off","etatprog","ProgOn","ProgOff"]}</text:p>
          </table:table-cell>
          <table:table-cell table:style-name="ce28" table:formula="of:=CHAR(13)&amp;&quot;    &quot;&amp;IF([.I3]&lt;&gt;&quot;&quot;;&quot;,&quot;;&quot; &quot;)&amp;CHAR(9)&amp;&quot;&quot;&quot;&quot;&amp;[.J3]&amp;&quot;&quot;&quot;&quot;&amp;&quot;:&quot;&amp;REPT(&quot; &quot;;32-LEN([.J3]))&amp;&quot;{&quot;&quot;product_name&quot;&quot;:&quot;&quot;&quot;&amp;[.J2]&amp;&quot;&quot;&quot;&quot;&amp;REPT(&quot; &quot;;20-LEN([.J2]))&amp;&quot;,&quot;&quot;product_key&quot;&quot;:&quot;&quot;&quot;&amp;[.J3]&amp;&quot;&quot;&quot;&quot;&amp;REPT(&quot; &quot;;32-LEN([.J3]))&amp;&quot;,&quot;&quot;cmds&quot;&quot;:[&quot;&amp;&quot;&quot;&quot;&quot;&amp;COM.MICROSOFT.TEXTJOIN(&quot;&quot;&quot;,&quot;&quot;&quot;;1;COM.MICROSOFT.FILTER([.$A4:.$A60];[.J4:.J60]=&quot;x&quot;))&amp;&quot;&quot;&quot;&quot;&amp;&quot;]}&quot;" office:value-type="string" office:string-value="&#13;    ,&#9;&quot;a77a929fcf0d4631bc4f669080376891&quot;:{&quot;product_name&quot;:&quot;Pilote_Pro&quot;          ,&quot;product_key&quot;:&quot;a77a929fcf0d4631bc4f669080376891&quot;,&quot;cmds&quot;:[&quot;refresh&quot;,&quot;IsOnLine&quot;,&quot;cur_temp&quot;,&quot;cur_humi&quot;,&quot;eco_temp&quot;,&quot;eco_temp_consigne&quot;,&quot;cft_temp&quot;,&quot;cft_temp_consigne&quot;,&quot;Tendance&quot;,&quot;WindowOpened&quot;,&quot;EtatConsigne&quot;,&quot;mode&quot;,&quot;Confort&quot;,&quot;Eco&quot;,&quot;HorsGel&quot;,&quot;Off&quot;,&quot;Confort-1&quot;,&quot;Confort-2&quot;,&quot;etatprog&quot;,&quot;ProgOn&quot;,&quot;ProgOff&quot;,&quot;etatlock&quot;,&quot;LockOn&quot;,&quot;LockOff&quot;,&quot;WindowSwitch&quot;,&quot;WindowSwitchOn&quot;,&quot;WindowSwitchOff&quot;,&quot;derog_mode&quot;,&quot;derog_off&quot;,&quot;derog_time_vacances&quot;,&quot;derog_vacances&quot;,&quot;derog_time_boost&quot;,&quot;derog_boost&quot;,&quot;derog_presence&quot;,&quot;detect_presence&quot;]}" calcext:value-type="string">
            <text:p> <text:s text:c="3"/>,<text:tab/>"a77a929fcf0d4631bc4f669080376891":{"product_name":"Pilote_Pro" <text:s text:c="9"/>,"product_key":"a77a929fcf0d4631bc4f669080376891","cmds":["refresh","IsOnLine","cur_temp","cur_humi","eco_temp","eco_temp_consigne","cft_temp","cft_temp_consigne","Tendance","WindowOpened","EtatConsigne","mode","Confort","Eco","HorsGel","Off","Confort-1","Confort-2","etatprog","ProgOn","ProgOff","etatlock","LockOn","LockOff","WindowSwitch","WindowSwitchOn","WindowSwitchOff","derog_mode","derog_off","derog_time_vacances","derog_vacances","derog_time_boost","derog_boost","derog_presence","detect_presence"]}</text:p>
          </table:table-cell>
          <table:table-cell table:style-name="ce28" table:formula="of:=CHAR(13)&amp;&quot;    &quot;&amp;IF([.J3]&lt;&gt;&quot;&quot;;&quot;,&quot;;&quot; &quot;)&amp;CHAR(9)&amp;&quot;&quot;&quot;&quot;&amp;[.K3]&amp;&quot;&quot;&quot;&quot;&amp;&quot;:&quot;&amp;REPT(&quot; &quot;;32-LEN([.K3]))&amp;&quot;{&quot;&quot;product_name&quot;&quot;:&quot;&quot;&quot;&amp;[.K2]&amp;&quot;&quot;&quot;&quot;&amp;REPT(&quot; &quot;;20-LEN([.K2]))&amp;&quot;,&quot;&quot;product_key&quot;&quot;:&quot;&quot;&quot;&amp;[.K3]&amp;&quot;&quot;&quot;&quot;&amp;REPT(&quot; &quot;;32-LEN([.K3]))&amp;&quot;,&quot;&quot;cmds&quot;&quot;:[&quot;&amp;&quot;&quot;&quot;&quot;&amp;COM.MICROSOFT.TEXTJOIN(&quot;&quot;&quot;,&quot;&quot;&quot;;1;COM.MICROSOFT.FILTER([.$A4:.$A60];[.K4:.K60]=&quot;x&quot;))&amp;&quot;&quot;&quot;&quot;&amp;&quot;]}&quot;" office:value-type="string" office:string-value="&#13;    ,&#9;&quot;2fd622e45283470f9e27e8e6167d7533&quot;:{&quot;product_name&quot;:&quot;Glow_Simple&quot;         ,&quot;product_key&quot;:&quot;2fd622e45283470f9e27e8e6167d7533&quot;,&quot;cmds&quot;:[&quot;refresh&quot;,&quot;IsOnLine&quot;,&quot;EtatConsigne&quot;,&quot;mode&quot;,&quot;Confort&quot;,&quot;Eco&quot;,&quot;HorsGel&quot;,&quot;Off&quot;,&quot;etatprog&quot;,&quot;ProgOn&quot;,&quot;ProgOff&quot;]}" calcext:value-type="string">
            <text:p> <text:s text:c="3"/>,<text:tab/>"2fd622e45283470f9e27e8e6167d7533":{"product_name":"Glow_Simple" <text:s text:c="8"/>,"product_key":"2fd622e45283470f9e27e8e6167d7533","cmds":["refresh","IsOnLine","EtatConsigne","mode","Confort","Eco","HorsGel","Off","etatprog","ProgOn","ProgOff"]}</text:p>
          </table:table-cell>
          <table:table-cell table:style-name="ce28" table:formula="of:=CHAR(13)&amp;&quot;    &quot;&amp;IF([.K3]&lt;&gt;&quot;&quot;;&quot;,&quot;;&quot; &quot;)&amp;CHAR(9)&amp;&quot;&quot;&quot;&quot;&amp;[.L3]&amp;&quot;&quot;&quot;&quot;&amp;&quot;:&quot;&amp;REPT(&quot; &quot;;32-LEN([.L3]))&amp;&quot;{&quot;&quot;product_name&quot;&quot;:&quot;&quot;&quot;&amp;[.L2]&amp;&quot;&quot;&quot;&quot;&amp;REPT(&quot; &quot;;20-LEN([.L2]))&amp;&quot;,&quot;&quot;product_key&quot;&quot;:&quot;&quot;&quot;&amp;[.L3]&amp;&quot;&quot;&quot;&quot;&amp;REPT(&quot; &quot;;32-LEN([.L3]))&amp;&quot;,&quot;&quot;cmds&quot;&quot;:[&quot;&amp;&quot;&quot;&quot;&quot;&amp;COM.MICROSOFT.TEXTJOIN(&quot;&quot;&quot;,&quot;&quot;&quot;;1;COM.MICROSOFT.FILTER([.$A4:.$A60];[.L4:.L60]=&quot;x&quot;))&amp;&quot;&quot;&quot;&quot;&amp;&quot;]}&quot;" office:value-type="string" office:string-value="&#13;    ,&#9;&quot;51c35c204f854cebbc780bf9785db409&quot;:{&quot;product_name&quot;:&quot;Glow&quot;                ,&quot;product_key&quot;:&quot;51c35c204f854cebbc780bf9785db409&quot;,&quot;cmds&quot;:[&quot;refresh&quot;,&quot;IsOnLine&quot;,&quot;eco_temp&quot;,&quot;eco_temp_consigneHL&quot;,&quot;cft_temp&quot;,&quot;cft_temp_consigneHL&quot;,&quot;EtatConsigne&quot;,&quot;mode&quot;,&quot;Confort&quot;,&quot;Eco&quot;,&quot;HorsGel&quot;,&quot;Off&quot;,&quot;etatprog&quot;,&quot;ProgOn&quot;,&quot;ProgOff&quot;]}" calcext:value-type="string">
            <text:p> <text:s text:c="3"/>,<text:tab/>"51c35c204f854cebbc780bf9785db409":{"product_name":"Glow" <text:s text:c="15"/>,"product_key":"51c35c204f854cebbc780bf9785db409","cmds":["refresh","IsOnLine","eco_temp","eco_temp_consigneHL","cft_temp","cft_temp_consigneHL","EtatConsigne","mode","Confort","Eco","HorsGel","Off","etatprog","ProgOn","ProgOff"]}</text:p>
          </table:table-cell>
          <table:table-cell table:style-name="ce28" table:formula="of:=CHAR(13)&amp;&quot;    &quot;&amp;IF([.L3]&lt;&gt;&quot;&quot;;&quot;,&quot;;&quot; &quot;)&amp;CHAR(9)&amp;&quot;&quot;&quot;&quot;&amp;[.M3]&amp;&quot;&quot;&quot;&quot;&amp;&quot;:&quot;&amp;REPT(&quot; &quot;;32-LEN([.M3]))&amp;&quot;{&quot;&quot;product_name&quot;&quot;:&quot;&quot;&quot;&amp;[.M2]&amp;&quot;&quot;&quot;&quot;&amp;REPT(&quot; &quot;;20-LEN([.M2]))&amp;&quot;,&quot;&quot;product_key&quot;&quot;:&quot;&quot;&quot;&amp;[.M3]&amp;&quot;&quot;&quot;&quot;&amp;REPT(&quot; &quot;;32-LEN([.M3]))&amp;&quot;,&quot;&quot;cmds&quot;&quot;:[&quot;&amp;&quot;&quot;&quot;&quot;&amp;COM.MICROSOFT.TEXTJOIN(&quot;&quot;&quot;,&quot;&quot;&quot;;1;COM.MICROSOFT.FILTER([.$A4:.$A60];[.M4:.M60]=&quot;x&quot;))&amp;&quot;&quot;&quot;&quot;&amp;&quot;]}&quot;" office:value-type="string" office:string-value="&#13;    ,&#9;&quot;cffa0df68a52449085c5d1e72c2f6bb0&quot;:{&quot;product_name&quot;:&quot;Glow_Simple_ble&quot;     ,&quot;product_key&quot;:&quot;cffa0df68a52449085c5d1e72c2f6bb0&quot;,&quot;cmds&quot;:[&quot;refresh&quot;,&quot;IsOnLine&quot;,&quot;cur_temp&quot;,&quot;eco_temp&quot;,&quot;eco_temp_consigneHL&quot;,&quot;cft_temp&quot;,&quot;cft_temp_consigneHL&quot;,&quot;EtatConsigne&quot;,&quot;mode&quot;,&quot;Confort&quot;,&quot;Eco&quot;,&quot;HorsGel&quot;,&quot;Off&quot;,&quot;etatprog&quot;,&quot;ProgOn&quot;,&quot;ProgOff&quot;,&quot;plugzy&quot;,&quot;plugzyon&quot;,&quot;plugzyoff&quot;,&quot;derog_mode&quot;,&quot;derog_off&quot;,&quot;derog_time_vacances&quot;,&quot;derog_vacances&quot;,&quot;derog_time_boost&quot;,&quot;derog_boost&quot;,&quot;derog_presence&quot;,&quot;detect_presence&quot;]}" calcext:value-type="string">
            <text:p> <text:s text:c="3"/>,<text:tab/>"cffa0df68a52449085c5d1e72c2f6bb0":{"product_name":"Glow_Simple_ble" <text:s text:c="4"/>,"product_key":"cffa0df68a52449085c5d1e72c2f6bb0","cmds":["refresh","IsOnLine","cur_temp","eco_temp","eco_temp_consigneHL","cft_temp","cft_temp_consigneHL","EtatConsigne","mode","Confort","Eco","HorsGel","Off","etatprog","ProgOn","ProgOff","plugzy","plugzyon","plugzyoff","derog_mode","derog_off","derog_time_vacances","derog_vacances","derog_time_boost","derog_boost","derog_presence","detect_presence"]}</text:p>
          </table:table-cell>
          <table:table-cell table:style-name="ce28" table:formula="of:=CHAR(13)&amp;&quot;    &quot;&amp;IF([.M3]&lt;&gt;&quot;&quot;;&quot;,&quot;;&quot; &quot;)&amp;CHAR(9)&amp;&quot;&quot;&quot;&quot;&amp;[.N3]&amp;&quot;&quot;&quot;&quot;&amp;&quot;:&quot;&amp;REPT(&quot; &quot;;32-LEN([.N3]))&amp;&quot;{&quot;&quot;product_name&quot;&quot;:&quot;&quot;&quot;&amp;[.N2]&amp;&quot;&quot;&quot;&quot;&amp;REPT(&quot; &quot;;20-LEN([.N2]))&amp;&quot;,&quot;&quot;product_key&quot;&quot;:&quot;&quot;&quot;&amp;[.N3]&amp;&quot;&quot;&quot;&quot;&amp;REPT(&quot; &quot;;32-LEN([.N3]))&amp;&quot;,&quot;&quot;cmds&quot;&quot;:[&quot;&amp;&quot;&quot;&quot;&quot;&amp;COM.MICROSOFT.TEXTJOIN(&quot;&quot;&quot;,&quot;&quot;&quot;;1;COM.MICROSOFT.FILTER([.$A4:.$A60];[.N4:.N60]=&quot;x&quot;))&amp;&quot;&quot;&quot;&quot;&amp;&quot;]}&quot;" office:value-type="string" office:string-value="&#13;    ,&#9;&quot;bb10d064f8de409db633b750faa22a52&quot;:{&quot;product_name&quot;:&quot;ONYX&quot;                ,&quot;product_key&quot;:&quot;bb10d064f8de409db633b750faa22a52&quot;,&quot;cmds&quot;:[&quot;refresh&quot;,&quot;IsOnLine&quot;,&quot;EtatConsigne&quot;,&quot;mode&quot;,&quot;Confort&quot;,&quot;Eco&quot;,&quot;HorsGel&quot;,&quot;Off&quot;,&quot;etatprog&quot;,&quot;ProgOn&quot;,&quot;ProgOff&quot;]}" calcext:value-type="string">
            <text:p> <text:s text:c="3"/>,<text:tab/>"bb10d064f8de409db633b750faa22a52":{"product_name":"ONYX" <text:s text:c="15"/>,"product_key":"bb10d064f8de409db633b750faa22a52","cmds":["refresh","IsOnLine","EtatConsigne","mode","Confort","Eco","HorsGel","Off","etatprog","ProgOn","ProgOff"]}</text:p>
          </table:table-cell>
          <table:table-cell table:style-name="ce28" table:formula="of:=CHAR(13)&amp;&quot;    &quot;&amp;IF([.N3]&lt;&gt;&quot;&quot;;&quot;,&quot;;&quot; &quot;)&amp;CHAR(9)&amp;&quot;&quot;&quot;&quot;&amp;[.O3]&amp;&quot;&quot;&quot;&quot;&amp;&quot;:&quot;&amp;REPT(&quot; &quot;;32-LEN([.O3]))&amp;&quot;{&quot;&quot;product_name&quot;&quot;:&quot;&quot;&quot;&amp;[.O2]&amp;&quot;&quot;&quot;&quot;&amp;REPT(&quot; &quot;;20-LEN([.O2]))&amp;&quot;,&quot;&quot;product_key&quot;&quot;:&quot;&quot;&quot;&amp;[.O3]&amp;&quot;&quot;&quot;&quot;&amp;REPT(&quot; &quot;;32-LEN([.O3]))&amp;&quot;,&quot;&quot;cmds&quot;&quot;:[&quot;&amp;&quot;&quot;&quot;&quot;&amp;COM.MICROSOFT.TEXTJOIN(&quot;&quot;&quot;,&quot;&quot;&quot;;1;COM.MICROSOFT.FILTER([.$A4:.$A60];[.O4:.O60]=&quot;x&quot;))&amp;&quot;&quot;&quot;&quot;&amp;&quot;]}&quot;" office:value-type="string" office:string-value="&#13;    ,&#9;&quot;fc89066ee74c4149a9beb37d4ea93604&quot;:{&quot;product_name&quot;:&quot;INEA&quot;                ,&quot;product_key&quot;:&quot;fc89066ee74c4149a9beb37d4ea93604&quot;,&quot;cmds&quot;:[&quot;refresh&quot;,&quot;IsOnLine&quot;,&quot;cur_temp&quot;,&quot;eco_temp&quot;,&quot;eco_temp_consigneHL&quot;,&quot;EtatConsigne&quot;,&quot;mode&quot;,&quot;Confort&quot;,&quot;Eco&quot;,&quot;HorsGel&quot;,&quot;Off&quot;,&quot;etatprog&quot;,&quot;ProgOn&quot;,&quot;ProgOff&quot;]}" calcext:value-type="string">
            <text:p> <text:s text:c="3"/>,<text:tab/>"fc89066ee74c4149a9beb37d4ea93604":{"product_name":"INEA" <text:s text:c="15"/>,"product_key":"fc89066ee74c4149a9beb37d4ea93604","cmds":["refresh","IsOnLine","cur_temp","eco_temp","eco_temp_consigneHL","EtatConsigne","mode","Confort","Eco","HorsGel","Off","etatprog","ProgOn","ProgOff"]}</text:p>
          </table:table-cell>
          <table:table-cell table:style-name="ce28" table:formula="of:=CHAR(13)&amp;&quot;    &quot;&amp;IF([.O3]&lt;&gt;&quot;&quot;;&quot;,&quot;;&quot; &quot;)&amp;CHAR(9)&amp;&quot;&quot;&quot;&quot;&amp;[.P3]&amp;&quot;&quot;&quot;&quot;&amp;&quot;:&quot;&amp;REPT(&quot; &quot;;32-LEN([.P3]))&amp;&quot;{&quot;&quot;product_name&quot;&quot;:&quot;&quot;&quot;&amp;[.P2]&amp;&quot;&quot;&quot;&quot;&amp;REPT(&quot; &quot;;20-LEN([.P2]))&amp;&quot;,&quot;&quot;product_key&quot;&quot;:&quot;&quot;&quot;&amp;[.P3]&amp;&quot;&quot;&quot;&quot;&amp;REPT(&quot; &quot;;32-LEN([.P3]))&amp;&quot;,&quot;&quot;cmds&quot;&quot;:[&quot;&amp;&quot;&quot;&quot;&quot;&amp;COM.MICROSOFT.TEXTJOIN(&quot;&quot;&quot;,&quot;&quot;&quot;;1;COM.MICROSOFT.FILTER([.$A4:.$A60];[.P4:.P60]=&quot;x&quot;))&amp;&quot;&quot;&quot;&quot;&amp;&quot;]}&quot;" office:value-type="string" office:string-value="&#13;    ,&#9;&quot;480253852d574f11b2d7fbf4460d7a41&quot;:{&quot;product_name&quot;:&quot;BLOOM&quot;               ,&quot;product_key&quot;:&quot;480253852d574f11b2d7fbf4460d7a41&quot;,&quot;cmds&quot;:[&quot;refresh&quot;,&quot;IsOnLine&quot;,&quot;EtatConsigne&quot;,&quot;mode&quot;,&quot;Confort&quot;,&quot;Eco&quot;,&quot;HorsGel&quot;,&quot;Off&quot;,&quot;etatprog&quot;,&quot;ProgOn&quot;,&quot;ProgOff&quot;]}" calcext:value-type="string">
            <text:p> <text:s text:c="3"/>,<text:tab/>"480253852d574f11b2d7fbf4460d7a41":{"product_name":"BLOOM" <text:s text:c="14"/>,"product_key":"480253852d574f11b2d7fbf4460d7a41","cmds":["refresh","IsOnLine","EtatConsigne","mode","Confort","Eco","HorsGel","Off","etatprog","ProgOn","ProgOff"]}</text:p>
          </table:table-cell>
          <table:table-cell table:style-name="ce28" table:formula="of:=CHAR(13)&amp;&quot;    &quot;&amp;IF([.P3]&lt;&gt;&quot;&quot;;&quot;,&quot;;&quot; &quot;)&amp;CHAR(9)&amp;&quot;&quot;&quot;&quot;&amp;[.Q3]&amp;&quot;&quot;&quot;&quot;&amp;&quot;:&quot;&amp;REPT(&quot; &quot;;32-LEN([.Q3]))&amp;&quot;{&quot;&quot;product_name&quot;&quot;:&quot;&quot;&quot;&amp;[.Q2]&amp;&quot;&quot;&quot;&quot;&amp;REPT(&quot; &quot;;20-LEN([.Q2]))&amp;&quot;,&quot;&quot;product_key&quot;&quot;:&quot;&quot;&quot;&amp;[.Q3]&amp;&quot;&quot;&quot;&quot;&amp;REPT(&quot; &quot;;32-LEN([.Q3]))&amp;&quot;,&quot;&quot;cmds&quot;&quot;:[&quot;&amp;&quot;&quot;&quot;&quot;&amp;COM.MICROSOFT.TEXTJOIN(&quot;&quot;&quot;,&quot;&quot;&quot;;1;COM.MICROSOFT.FILTER([.$A4:.$A60];[.Q4:.Q60]=&quot;x&quot;))&amp;&quot;&quot;&quot;&quot;&amp;&quot;]}&quot;" office:value-type="string" office:string-value="&#13;    ,&#9;&quot;XXXXXXXXXXXXXXXXXXXXXXXXXXXXXXXX&quot;:{&quot;product_name&quot;:&quot;Shine&quot;               ,&quot;product_key&quot;:&quot;XXXXXXXXXXXXXXXXXXXXXXXXXXXXXXXX&quot;,&quot;cmds&quot;:[&quot;refresh&quot;,&quot;IsOnLine&quot;,&quot;eco_temp&quot;,&quot;eco_temp_consigneHL&quot;,&quot;cft_temp&quot;,&quot;cft_temp_consigneHL&quot;,&quot;EtatConsigne&quot;,&quot;mode&quot;,&quot;Confort&quot;,&quot;Eco&quot;,&quot;HorsGel&quot;,&quot;Off&quot;,&quot;etatprog&quot;,&quot;ProgOn&quot;,&quot;ProgOff&quot;,&quot;plugzy&quot;,&quot;plugzyon&quot;,&quot;plugzyoff&quot;,&quot;derog_mode&quot;,&quot;derog_off&quot;,&quot;derog_time_vacances&quot;,&quot;derog_vacances&quot;,&quot;derog_time_boost&quot;,&quot;derog_boost&quot;]}" calcext:value-type="string">
            <text:p> <text:s text:c="3"/>,<text:tab/>"XXXXXXXXXXXXXXXXXXXXXXXXXXXXXXXX":{"product_name":"Shine" <text:s text:c="14"/>,"product_key":"XXXXXXXXXXXXXXXXXXXXXXXXXXXXXXXX","cmds":["refresh","IsOnLine","eco_temp","eco_temp_consigneHL","cft_temp","cft_temp_consigneHL","EtatConsigne","mode","Confort","Eco","HorsGel","Off","etatprog","ProgOn","ProgOff","plugzy","plugzyon","plugzyoff","derog_mode","derog_off","derog_time_vacances","derog_vacances","derog_time_boost","derog_boost"]}</text:p>
          </table:table-cell>
          <table:table-cell table:style-name="ce28" table:formula="of:=CHAR(13)&amp;&quot;    &quot;&amp;IF([.Q3]&lt;&gt;&quot;&quot;;&quot;,&quot;;&quot; &quot;)&amp;CHAR(9)&amp;&quot;&quot;&quot;&quot;&amp;[.R3]&amp;&quot;&quot;&quot;&quot;&amp;&quot;:&quot;&amp;REPT(&quot; &quot;;32-LEN([.R3]))&amp;&quot;{&quot;&quot;product_name&quot;&quot;:&quot;&quot;&quot;&amp;[.R2]&amp;&quot;&quot;&quot;&quot;&amp;REPT(&quot; &quot;;20-LEN([.R2]))&amp;&quot;,&quot;&quot;product_key&quot;&quot;:&quot;&quot;&quot;&amp;[.R3]&amp;&quot;&quot;&quot;&quot;&amp;REPT(&quot; &quot;;32-LEN([.R3]))&amp;&quot;,&quot;&quot;cmds&quot;&quot;:[&quot;&amp;&quot;&quot;&quot;&quot;&amp;COM.MICROSOFT.TEXTJOIN(&quot;&quot;&quot;,&quot;&quot;&quot;;1;COM.MICROSOFT.FILTER([.$A4:.$A60];[.R4:.R60]=&quot;x&quot;))&amp;&quot;&quot;&quot;&quot;&amp;&quot;]}&quot;" office:value-type="string" office:string-value="&#13;    ,&#9;&quot;f71ee820660f4f358db8b8a474689726&quot;:{&quot;product_name&quot;:&quot;Flam_Week2&quot;          ,&quot;product_key&quot;:&quot;f71ee820660f4f358db8b8a474689726&quot;,&quot;cmds&quot;:[&quot;refresh&quot;,&quot;IsOnLine&quot;,&quot;cur_temp&quot;,&quot;eco_temp&quot;,&quot;eco_temp_consigneHL&quot;,&quot;EtatConsigne&quot;,&quot;mode&quot;,&quot;Confort&quot;,&quot;Eco&quot;,&quot;HorsGel&quot;,&quot;Off&quot;,&quot;etatprog&quot;,&quot;ProgOn&quot;,&quot;ProgOff&quot;,&quot;plugzy&quot;,&quot;plugzyon&quot;,&quot;plugzyoff&quot;]}" calcext:value-type="string">
            <text:p> <text:s text:c="3"/>,<text:tab/>"f71ee820660f4f358db8b8a474689726":{"product_name":"Flam_Week2" <text:s text:c="9"/>,"product_key":"f71ee820660f4f358db8b8a474689726","cmds":["refresh","IsOnLine","cur_temp","eco_temp","eco_temp_consigneHL","EtatConsigne","mode","Confort","Eco","HorsGel","Off","etatprog","ProgOn","ProgOff","plugzy","plugzyon","plugzyoff"]}</text:p>
          </table:table-cell>
          <table:table-cell table:style-name="ce28" table:formula="of:=CHAR(13)&amp;&quot;    &quot;&amp;IF([.R3]&lt;&gt;&quot;&quot;;&quot;,&quot;;&quot; &quot;)&amp;CHAR(9)&amp;&quot;&quot;&quot;&quot;&amp;[.S3]&amp;&quot;&quot;&quot;&quot;&amp;&quot;:&quot;&amp;REPT(&quot; &quot;;32-LEN([.S3]))&amp;&quot;{&quot;&quot;product_name&quot;&quot;:&quot;&quot;&quot;&amp;[.S2]&amp;&quot;&quot;&quot;&quot;&amp;REPT(&quot; &quot;;20-LEN([.S2]))&amp;&quot;,&quot;&quot;product_key&quot;&quot;:&quot;&quot;&quot;&amp;[.S3]&amp;&quot;&quot;&quot;&quot;&amp;REPT(&quot; &quot;;32-LEN([.S3]))&amp;&quot;,&quot;&quot;cmds&quot;&quot;:[&quot;&amp;&quot;&quot;&quot;&quot;&amp;COM.MICROSOFT.TEXTJOIN(&quot;&quot;&quot;,&quot;&quot;&quot;;1;COM.MICROSOFT.FILTER([.$A4:.$A60];[.S4:.S60]=&quot;x&quot;))&amp;&quot;&quot;&quot;&quot;&amp;&quot;]}&quot;" office:value-type="string" office:string-value="&#13;    ,&#9;&quot;d60c58d724b845068bf4652a10883c92&quot;:{&quot;product_name&quot;:&quot;Rocket&quot;              ,&quot;product_key&quot;:&quot;d60c58d724b845068bf4652a10883c92&quot;,&quot;cmds&quot;:[&quot;refresh&quot;,&quot;IsOnLine&quot;,&quot;EtatConsigne&quot;,&quot;mode&quot;,&quot;Confort&quot;,&quot;Eco&quot;,&quot;HorsGel&quot;,&quot;Off&quot;,&quot;etatprog&quot;,&quot;ProgOn&quot;,&quot;ProgOff&quot;]}" calcext:value-type="string">
            <text:p> <text:s text:c="3"/>,<text:tab/>"d60c58d724b845068bf4652a10883c92":{"product_name":"Rocket" <text:s text:c="13"/>,"product_key":"d60c58d724b845068bf4652a10883c92","cmds":["refresh","IsOnLine","EtatConsigne","mode","Confort","Eco","HorsGel","Off","etatprog","ProgOn","ProgOff"]}</text:p>
          </table:table-cell>
          <table:table-cell table:style-name="ce28" table:formula="of:=CHAR(13)&amp;&quot;    &quot;&amp;IF([.S3]&lt;&gt;&quot;&quot;;&quot;,&quot;;&quot; &quot;)&amp;CHAR(9)&amp;&quot;&quot;&quot;&quot;&amp;[.T3]&amp;&quot;&quot;&quot;&quot;&amp;&quot;:&quot;&amp;REPT(&quot; &quot;;32-LEN([.T3]))&amp;&quot;{&quot;&quot;product_name&quot;&quot;:&quot;&quot;&quot;&amp;[.T2]&amp;&quot;&quot;&quot;&quot;&amp;REPT(&quot; &quot;;20-LEN([.T2]))&amp;&quot;,&quot;&quot;product_key&quot;&quot;:&quot;&quot;&quot;&amp;[.T3]&amp;&quot;&quot;&quot;&quot;&amp;REPT(&quot; &quot;;32-LEN([.T3]))&amp;&quot;,&quot;&quot;cmds&quot;&quot;:[&quot;&amp;&quot;&quot;&quot;&quot;&amp;COM.MICROSOFT.TEXTJOIN(&quot;&quot;&quot;,&quot;&quot;&quot;;1;COM.MICROSOFT.FILTER([.$A4:.$A60];[.T4:.T60]=&quot;x&quot;))&amp;&quot;&quot;&quot;&quot;&amp;&quot;]}&quot;" office:value-type="string" office:string-value="&#13;    ,&#9;&quot;2884feb88e0b4f30b75ea5572276a102&quot;:{&quot;product_name&quot;:&quot;Shine_Blu&quot;           ,&quot;product_key&quot;:&quot;2884feb88e0b4f30b75ea5572276a102&quot;,&quot;cmds&quot;:[&quot;refresh&quot;,&quot;IsOnLine&quot;,&quot;EtatConsigne&quot;,&quot;mode&quot;,&quot;Confort&quot;,&quot;Eco&quot;,&quot;HorsGel&quot;,&quot;Off&quot;,&quot;etatprog&quot;,&quot;ProgOn&quot;,&quot;ProgOff&quot;]}" calcext:value-type="string">
            <text:p> <text:s text:c="3"/>,<text:tab/>"2884feb88e0b4f30b75ea5572276a102":{"product_name":"Shine_Blu" <text:s text:c="10"/>,"product_key":"2884feb88e0b4f30b75ea5572276a102","cmds":["refresh","IsOnLine","EtatConsigne","mode","Confort","Eco","HorsGel","Off","etatprog","ProgOn","ProgOff"]}</text:p>
          </table:table-cell>
          <table:table-cell table:style-name="ce28" table:formula="of:=CHAR(13)&amp;&quot;    &quot;&amp;IF([.T3]&lt;&gt;&quot;&quot;;&quot;,&quot;;&quot; &quot;)&amp;CHAR(9)&amp;&quot;&quot;&quot;&quot;&amp;[.U3]&amp;&quot;&quot;&quot;&quot;&amp;&quot;:&quot;&amp;REPT(&quot; &quot;;32-LEN([.U3]))&amp;&quot;{&quot;&quot;product_name&quot;&quot;:&quot;&quot;&quot;&amp;[.U2]&amp;&quot;&quot;&quot;&quot;&amp;REPT(&quot; &quot;;20-LEN([.U2]))&amp;&quot;,&quot;&quot;product_key&quot;&quot;:&quot;&quot;&quot;&amp;[.U3]&amp;&quot;&quot;&quot;&quot;&amp;REPT(&quot; &quot;;32-LEN([.U3]))&amp;&quot;,&quot;&quot;cmds&quot;&quot;:[&quot;&amp;&quot;&quot;&quot;&quot;&amp;COM.MICROSOFT.TEXTJOIN(&quot;&quot;&quot;,&quot;&quot;&quot;;1;COM.MICROSOFT.FILTER([.$A4:.$A60];[.U4:.U60]=&quot;x&quot;))&amp;&quot;&quot;&quot;&quot;&amp;&quot;]}&quot;" office:value-type="string" office:string-value="&#13;    ,&#9;&quot;0a000341206048a0be23e2cbf9d8f29a&quot;:{&quot;product_name&quot;:&quot;Socket&quot;              ,&quot;product_key&quot;:&quot;0a000341206048a0be23e2cbf9d8f29a&quot;,&quot;cmds&quot;:[&quot;refresh&quot;,&quot;IsOnLine&quot;,&quot;EtatConsigne&quot;,&quot;mode&quot;,&quot;Confort&quot;,&quot;Eco&quot;,&quot;HorsGel&quot;,&quot;Off&quot;,&quot;etatprog&quot;,&quot;ProgOn&quot;,&quot;ProgOff&quot;]}" calcext:value-type="string">
            <text:p> <text:s text:c="3"/>,<text:tab/>"0a000341206048a0be23e2cbf9d8f29a":{"product_name":"Socket" <text:s text:c="13"/>,"product_key":"0a000341206048a0be23e2cbf9d8f29a","cmds":["refresh","IsOnLine","EtatConsigne","mode","Confort","Eco","HorsGel","Off","etatprog","ProgOn","ProgOff"]}</text:p>
          </table:table-cell>
          <table:table-cell table:style-name="ce28" table:formula="of:=CHAR(13)&amp;&quot;    &quot;&amp;IF([.U3]&lt;&gt;&quot;&quot;;&quot;,&quot;;&quot; &quot;)&amp;CHAR(9)&amp;&quot;&quot;&quot;&quot;&amp;[.V3]&amp;&quot;&quot;&quot;&quot;&amp;&quot;:&quot;&amp;REPT(&quot; &quot;;32-LEN([.V3]))&amp;&quot;{&quot;&quot;product_name&quot;&quot;:&quot;&quot;&quot;&amp;[.V2]&amp;&quot;&quot;&quot;&quot;&amp;REPT(&quot; &quot;;20-LEN([.V2]))&amp;&quot;,&quot;&quot;product_key&quot;&quot;:&quot;&quot;&quot;&amp;[.V3]&amp;&quot;&quot;&quot;&quot;&amp;REPT(&quot; &quot;;32-LEN([.V3]))&amp;&quot;,&quot;&quot;cmds&quot;&quot;:[&quot;&amp;&quot;&quot;&quot;&quot;&amp;COM.MICROSOFT.TEXTJOIN(&quot;&quot;&quot;,&quot;&quot;&quot;;1;COM.MICROSOFT.FILTER([.$A4:.$A60];[.V4:.V60]=&quot;x&quot;))&amp;&quot;&quot;&quot;&quot;&amp;&quot;]}&quot;" office:value-type="string" office:string-value="&#13;    ,&#9;&quot;e5d5766484db4b4d9b9fa7c08cd65481&quot;:{&quot;product_name&quot;:&quot;Vulcane&quot;             ,&quot;product_key&quot;:&quot;e5d5766484db4b4d9b9fa7c08cd65481&quot;,&quot;cmds&quot;:[&quot;refresh&quot;,&quot;IsOnLine&quot;,&quot;EtatConsigne&quot;,&quot;mode&quot;,&quot;Confort&quot;,&quot;Eco&quot;,&quot;HorsGel&quot;,&quot;Off&quot;,&quot;etatprog&quot;,&quot;ProgOn&quot;,&quot;ProgOff&quot;]}" calcext:value-type="string">
            <text:p> <text:s text:c="3"/>,<text:tab/>"e5d5766484db4b4d9b9fa7c08cd65481":{"product_name":"Vulcane" <text:s text:c="12"/>,"product_key":"e5d5766484db4b4d9b9fa7c08cd65481","cmds":["refresh","IsOnLine","EtatConsigne","mode","Confort","Eco","HorsGel","Off","etatprog","ProgOn","ProgOff"]}</text:p>
          </table:table-cell>
          <table:table-cell table:style-name="ce28" table:formula="of:=CHAR(13)&amp;&quot;    &quot;&amp;IF([.V3]&lt;&gt;&quot;&quot;;&quot;,&quot;;&quot; &quot;)&amp;CHAR(9)&amp;&quot;&quot;&quot;&quot;&amp;[.W3]&amp;&quot;&quot;&quot;&quot;&amp;&quot;:&quot;&amp;REPT(&quot; &quot;;32-LEN([.W3]))&amp;&quot;{&quot;&quot;product_name&quot;&quot;:&quot;&quot;&quot;&amp;[.W2]&amp;&quot;&quot;&quot;&quot;&amp;REPT(&quot; &quot;;20-LEN([.W2]))&amp;&quot;,&quot;&quot;product_key&quot;&quot;:&quot;&quot;&quot;&amp;[.W3]&amp;&quot;&quot;&quot;&quot;&amp;REPT(&quot; &quot;;32-LEN([.W3]))&amp;&quot;,&quot;&quot;cmds&quot;&quot;:[&quot;&amp;&quot;&quot;&quot;&quot;&amp;COM.MICROSOFT.TEXTJOIN(&quot;&quot;&quot;,&quot;&quot;&quot;;1;COM.MICROSOFT.FILTER([.$A4:.$A60];[.W4:.W60]=&quot;x&quot;))&amp;&quot;&quot;&quot;&quot;&amp;&quot;]}&quot;" office:value-type="string" office:string-value="&#13;    ,&#9;&quot;18e548a0df9444669a480a7ab31bc314&quot;:{&quot;product_name&quot;:&quot;Bridge&quot;              ,&quot;product_key&quot;:&quot;18e548a0df9444669a480a7ab31bc314&quot;,&quot;cmds&quot;:[&quot;refresh&quot;,&quot;IsOnLine&quot;,&quot;etatprog&quot;,&quot;ProgOn&quot;,&quot;ProgOff&quot;]}" calcext:value-type="string">
            <text:p> <text:s text:c="3"/>,<text:tab/>"18e548a0df9444669a480a7ab31bc314":{"product_name":"Bridge" <text:s text:c="13"/>,"product_key":"18e548a0df9444669a480a7ab31bc314","cmds":["refresh","IsOnLine","etatprog","ProgOn","ProgOff"]}</text:p>
          </table:table-cell>
          <table:table-cell table:style-name="ce28" table:formula="of:=CHAR(13)&amp;&quot;    &quot;&amp;IF([.W3]&lt;&gt;&quot;&quot;;&quot;,&quot;;&quot; &quot;)&amp;CHAR(9)&amp;&quot;&quot;&quot;&quot;&amp;[.X3]&amp;&quot;&quot;&quot;&quot;&amp;&quot;:&quot;&amp;REPT(&quot; &quot;;32-LEN([.X3]))&amp;&quot;{&quot;&quot;product_name&quot;&quot;:&quot;&quot;&quot;&amp;[.X2]&amp;&quot;&quot;&quot;&quot;&amp;REPT(&quot; &quot;;20-LEN([.X2]))&amp;&quot;,&quot;&quot;product_key&quot;&quot;:&quot;&quot;&quot;&amp;[.X3]&amp;&quot;&quot;&quot;&quot;&amp;REPT(&quot; &quot;;32-LEN([.X3]))&amp;&quot;,&quot;&quot;cmds&quot;&quot;:[&quot;&amp;&quot;&quot;&quot;&quot;&amp;COM.MICROSOFT.TEXTJOIN(&quot;&quot;&quot;,&quot;&quot;&quot;;1;COM.MICROSOFT.FILTER([.$A4:.$A60];[.X4:.X60]=&quot;x&quot;))&amp;&quot;&quot;&quot;&quot;&amp;&quot;]}&quot;" office:value-type="string" office:string-value="&#13;    ,&#9;&quot;aa85e43fc4464e4d0000000000000000&quot;:{&quot;product_name&quot;:&quot;Pilote_Duo&quot;          ,&quot;product_key&quot;:&quot;aa85e43fc4464e4d0000000000000000&quot;,&quot;cmds&quot;:[&quot;refresh&quot;,&quot;IsOnLine&quot;,&quot;EtatConsigne&quot;,&quot;mode&quot;,&quot;Confort&quot;,&quot;Eco&quot;,&quot;HorsGel&quot;,&quot;Off&quot;,&quot;etatprog&quot;,&quot;ProgOn&quot;,&quot;ProgOff&quot;,&quot;cur_power&quot;,&quot;cur_current&quot;,&quot;cur_voltage&quot;,&quot;signal_power&quot;,&quot;energy_saving&quot;,&quot;kill_switch&quot;,&quot;peak_hours&quot;,&quot;peak_signal&quot;]}" calcext:value-type="string">
            <text:p> <text:s text:c="3"/>,<text:tab/>"aa85e43fc4464e4d0000000000000000":{"product_name":"Pilote_Duo" <text:s text:c="9"/>,"product_key":"aa85e43fc4464e4d0000000000000000","cmds":["refresh","IsOnLine","EtatConsigne","mode","Confort","Eco","HorsGel","Off","etatprog","ProgOn","ProgOff","cur_power","cur_current","cur_voltage","signal_power","energy_saving","kill_switch","peak_hours","peak_signal"]}</text:p>
          </table:table-cell>
          <table:table-cell table:style-name="ce28" table:formula="of:=CHAR(13)&amp;&quot;    &quot;&amp;IF([.X3]&lt;&gt;&quot;&quot;;&quot;,&quot;;&quot; &quot;)&amp;CHAR(9)&amp;&quot;&quot;&quot;&quot;&amp;[.Y3]&amp;&quot;&quot;&quot;&quot;&amp;&quot;:&quot;&amp;REPT(&quot; &quot;;32-LEN([.Y3]))&amp;&quot;{&quot;&quot;product_name&quot;&quot;:&quot;&quot;&quot;&amp;[.Y2]&amp;&quot;&quot;&quot;&quot;&amp;REPT(&quot; &quot;;20-LEN([.Y2]))&amp;&quot;,&quot;&quot;product_key&quot;&quot;:&quot;&quot;&quot;&amp;[.Y3]&amp;&quot;&quot;&quot;&quot;&amp;REPT(&quot; &quot;;32-LEN([.Y3]))&amp;&quot;,&quot;&quot;cmds&quot;&quot;:[&quot;&amp;&quot;&quot;&quot;&quot;&amp;COM.MICROSOFT.TEXTJOIN(&quot;&quot;&quot;,&quot;&quot;&quot;;1;COM.MICROSOFT.FILTER([.$A4:.$A60];[.Y4:.Y60]=&quot;x&quot;))&amp;&quot;&quot;&quot;&quot;&amp;&quot;]}&quot;" office:value-type="string" office:string-value="&#13;    ,&#9;&quot;528f35158d854e220000000000000000&quot;:{&quot;product_name&quot;:&quot;Heatzy_Boiler&quot;       ,&quot;product_key&quot;:&quot;528f35158d854e220000000000000000&quot;,&quot;cmds&quot;:[&quot;refresh&quot;,&quot;IsOnLine&quot;,&quot;EtatConsigne&quot;,&quot;mode&quot;,&quot;Confort&quot;,&quot;Eco&quot;,&quot;HorsGel&quot;,&quot;Off&quot;,&quot;etatprog&quot;,&quot;ProgOn&quot;,&quot;ProgOff&quot;,&quot;derog_mode&quot;,&quot;derog_off&quot;,&quot;derog_time_vacances&quot;,&quot;derog_vacances&quot;,&quot;derog_time_boost&quot;,&quot;derog_boost&quot;,&quot;derog_presence&quot;,&quot;detect_presence&quot;,&quot;cur_power&quot;,&quot;cur_current&quot;,&quot;cur_voltage&quot;,&quot;signal_power&quot;,&quot;energy_saving&quot;,&quot;peak_hours&quot;,&quot;peak_signal&quot;]}" calcext:value-type="string">
            <text:p> <text:s text:c="3"/>,<text:tab/>"528f35158d854e220000000000000000":{"product_name":"Heatzy_Boiler" <text:s text:c="6"/>,"product_key":"528f35158d854e220000000000000000","cmds":["refresh","IsOnLine","EtatConsigne","mode","Confort","Eco","HorsGel","Off","etatprog","ProgOn","ProgOff","derog_mode","derog_off","derog_time_vacances","derog_vacances","derog_time_boost","derog_boost","derog_presence","detect_presence","cur_power","cur_current","cur_voltage","signal_power","energy_saving","peak_hours","peak_signal"]}</text:p>
          </table:table-cell>
          <table:table-cell table:style-name="ce39" table:number-columns-repeated="2"/>
          <table:table-cell table:number-columns-repeated="36"/>
          <table:table-cell table:style-name="Default" table:number-columns-repeated="16321"/>
        </table:table-row>
        <table:table-row table:style-name="ro1">
          <table:table-cell table:style-name="ce14" office:value-type="string" calcext:value-type="string">
            <text:p>}</text:p>
          </table:table-cell>
          <table:table-cell table:number-columns-repeated="13"/>
          <table:table-cell table:style-name="ce39" table:number-columns-repeated="13"/>
          <table:table-cell table:number-columns-repeated="36"/>
          <table:table-cell table:style-name="Default" table:number-columns-repeated="16321"/>
        </table:table-row>
        <table:table-row table:style-name="ro1" table:number-rows-repeated="10">
          <table:table-cell table:number-columns-repeated="14"/>
          <table:table-cell table:style-name="ce39" table:number-columns-repeated="13"/>
          <table:table-cell table:number-columns-repeated="36"/>
          <table:table-cell table:style-name="Default" table:number-columns-repeated="16321"/>
        </table:table-row>
        <table:table-row table:style-name="ro1" table:number-rows-repeated="1048501">
          <table:table-cell table:number-columns-repeated="63"/>
          <table:table-cell table:style-name="Default" table:number-columns-repeated="16321"/>
        </table:table-row>
        <table:table-row table:style-name="ro1">
          <table:table-cell table:number-columns-repeated="63"/>
          <table:table-cell table:style-name="Default" table:number-columns-repeated="16321"/>
        </table:table-row>
      </table:table>
      <table:table table:name="Learning" table:style-name="ta1">
        <table:table-column table:style-name="co1" table:default-cell-style-name="ce73"/>
        <table:table-column table:style-name="co25" table:default-cell-style-name="ce73"/>
        <table:table-column table:style-name="co1" table:number-columns-repeated="16382"/>
        <table:table-row table:style-name="ro4">
          <table:table-cell table:style-name="ce72" office:value-type="string" calcext:value-type="string">
            <text:p>{</text:p>
          </table:table-cell>
          <table:table-cell table:style-name="ce72"/>
          <table:table-cell table:style-name="ce73" table:number-columns-repeated="16382"/>
        </table:table-row>
        <table:table-row table:style-name="ro4">
          <table:table-cell table:style-name="ce72"/>
          <table:table-cell table:style-name="ce72" office:value-type="string" calcext:value-type="string">
            <text:p><text:s/>"Confort-2": <text:s text:c="5"/>{ "prerequis":["mode"] <text:s text:c="6"/>, "consigne":{"mode":"cft2"} <text:s text:c="17"/>, "after":{"mode":"stop"} <text:s/>, "verif":true , "create":["Confort-1" <text:s text:c="9"/>,"Confort-2"]}</text:p>
          </table:table-cell>
          <table:table-cell table:style-name="ce73" table:number-columns-repeated="16382"/>
        </table:table-row>
        <table:table-row table:style-name="ro4">
          <table:table-cell table:style-name="ce72"/>
          <table:table-cell table:style-name="ce72" office:value-type="string" calcext:value-type="string">
            <text:p>,"derog_vacances": { "prerequis":["derog_mode"] , "consigne":{"derog_mode":1,"derog_time":1 } , "after":{"derog_mode":0} , "verif":true , "create":["derog_off","derog_time_vacances","derog_vacances"]}</text:p>
          </table:table-cell>
          <table:table-cell table:style-name="ce73" table:number-columns-repeated="16382"/>
        </table:table-row>
        <table:table-row table:style-name="ro4">
          <table:table-cell table:style-name="ce72"/>
          <table:table-cell table:style-name="ce72" office:value-type="string" calcext:value-type="string">
            <text:p>,"derog_boost": <text:s text:c="3"/>{ "prerequis":["derog_mode"] , "consigne":{"derog_mode":2,"derog_time":30} , "after":{"derog_mode":0} , "verif":true , "create":["derog_off","derog_time_boost" <text:s text:c="2"/>,"derog_boost"]}</text:p>
          </table:table-cell>
          <table:table-cell table:style-name="ce73" table:number-columns-repeated="16382"/>
        </table:table-row>
        <table:table-row table:style-name="ro4">
          <table:table-cell table:style-name="ce72"/>
          <table:table-cell table:style-name="ce72" office:value-type="string" calcext:value-type="string">
            <text:p>,"derog_presence": { "prerequis":["derog_mode"] , "consigne":{"derog_mode":3} <text:s text:c="16"/>, "after":{"derog_mode":0} , "verif":true , "create":["derog_off","derog_presence" <text:s text:c="4"/>,"detect_presence"]}</text:p>
          </table:table-cell>
          <table:table-cell table:style-name="ce73" table:number-columns-repeated="16382"/>
        </table:table-row>
        <table:table-row table:style-name="ro4">
          <table:table-cell table:style-name="ce72" office:value-type="string" calcext:value-type="string">
            <text:p>}</text:p>
          </table:table-cell>
          <table:table-cell table:style-name="ce72"/>
          <table:table-cell table:style-name="ce73" table:number-columns-repeated="16382"/>
        </table:table-row>
        <table:table-row table:style-name="ro4" table:number-rows-repeated="1048569">
          <table:table-cell table:number-columns-repeated="2"/>
          <table:table-cell table:style-name="ce73" table:number-columns-repeated="16382"/>
        </table:table-row>
        <table:table-row table:style-name="ro4">
          <table:table-cell table:number-columns-repeated="2"/>
          <table:table-cell table:style-name="ce73" table:number-columns-repeated="16382"/>
        </table:table-row>
      </table:table>
      <table:table table:name="Acknow" table:style-name="ta1">
        <table:table-column table:style-name="co29" table:default-cell-style-name="Default"/>
        <table:table-column table:style-name="co30" table:default-cell-style-name="Default"/>
        <table:table-column table:style-name="co31" table:number-columns-repeated="2" table:default-cell-style-name="Default"/>
        <table:table-column table:style-name="co1" table:number-columns-repeated="3" table:default-cell-style-name="Default"/>
        <table:table-column table:style-name="co34" table:default-cell-style-name="Default"/>
        <table:table-column table:style-name="co35" table:default-cell-style-name="ce7"/>
        <table:table-column table:style-name="co1" table:number-columns-repeated="2" table:default-cell-style-name="Default"/>
        <table:table-column table:style-name="co36" table:default-cell-style-name="Default"/>
        <table:table-row table:style-name="ro1">
          <table:table-cell table:number-columns-repeated="9"/>
          <table:table-cell table:style-name="ce14" office:value-type="string" calcext:value-type="string">
            <text:p>{</text:p>
          </table:table-cell>
          <table:table-cell table:style-name="ce14"/>
          <table:table-cell/>
        </table:table-row>
        <table:table-row table:style-name="ro1">
          <table:table-cell table:number-columns-repeated="2" office:value-type="string" calcext:value-type="string">
            <text:p>mode</text:p>
          </table:table-cell>
          <table:table-cell office:value-type="string" calcext:value-type="string">
            <text:p>EtatConsigne</text:p>
          </table:table-cell>
          <table:table-cell office:value-type="string" calcext:value-type="string">
            <text:p>Confort</text:p>
          </table:table-cell>
          <table:table-cell office:value-type="string" calcext:value-type="string">
            <text:p>Eco</text:p>
          </table:table-cell>
          <table:table-cell office:value-type="string" calcext:value-type="string">
            <text:p>HorsGel</text:p>
          </table:table-cell>
          <table:table-cell office:value-type="string" calcext:value-type="string">
            <text:p>Off</text:p>
          </table:table-cell>
          <table:table-cell table:number-columns-repeated="2"/>
          <table:table-cell table:style-name="ce14" table:formula="of:=IF([.A1]=&quot;&quot;;&quot; &quot;;IF([.A2]&lt;&gt;&quot;&quot;;&quot;,&quot;;&quot;}&quot;))" office:value-type="string" office:string-value=" " calcext:value-type="string">
            <text:p><text:s/></text:p>
          </table:table-cell>
          <table:table-cell table:style-name="ce14" table:formula="of:=IF([.A2]&lt;&gt;&quot;&quot;;&quot;&quot;&quot;&quot;&amp;[.A2]&amp;&quot;&quot;&quot;:[&quot;&quot;&quot;&amp;COM.MICROSOFT.TEXTJOIN(&quot;&quot;&quot;,&quot;&quot;&quot;;1;[.B2:.H2])&amp;&quot;&quot;&quot;]&quot;;&quot;&quot;)" office:value-type="string" office:string-value="&quot;mode&quot;:[&quot;mode&quot;,&quot;EtatConsigne&quot;,&quot;Confort&quot;,&quot;Eco&quot;,&quot;HorsGel&quot;,&quot;Off&quot;]" calcext:value-type="string">
            <text:p>"mode":["mode","EtatConsigne","Confort","Eco","HorsGel","Off"]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co_temp</text:p>
          </table:table-cell>
          <table:table-cell office:value-type="string" calcext:value-type="string">
            <text:p>eco_temp_consigne</text:p>
          </table:table-cell>
          <table:table-cell table:number-columns-repeated="6"/>
          <table:table-cell table:style-name="ce14" table:formula="of:=IF([.A2]=&quot;&quot;;&quot; &quot;;IF([.A3]&lt;&gt;&quot;&quot;;&quot;,&quot;;&quot;}&quot;))" office:value-type="string" office:string-value="," calcext:value-type="string">
            <text:p>,</text:p>
          </table:table-cell>
          <table:table-cell table:style-name="ce14" table:formula="of:=IF([.A3]&lt;&gt;&quot;&quot;;&quot;&quot;&quot;&quot;&amp;[.A3]&amp;&quot;&quot;&quot;:[&quot;&quot;&quot;&amp;COM.MICROSOFT.TEXTJOIN(&quot;&quot;&quot;,&quot;&quot;&quot;;1;[.B3:.H3])&amp;&quot;&quot;&quot;]&quot;;&quot;&quot;)" office:value-type="string" office:string-value="&quot;eco_temp&quot;:[&quot;eco_temp&quot;,&quot;eco_temp_consigne&quot;]" calcext:value-type="string">
            <text:p>"eco_temp":["eco_temp","eco_temp_consigne"]</text:p>
          </table:table-cell>
          <table:table-cell/>
        </table:table-row>
        <table:table-row table:style-name="ro1">
          <table:table-cell office:value-type="string" calcext:value-type="string">
            <text:p>eco_tempH</text:p>
          </table:table-cell>
          <table:table-cell office:value-type="string" calcext:value-type="string">
            <text:p>eco_temp</text:p>
          </table:table-cell>
          <table:table-cell office:value-type="string" calcext:value-type="string">
            <text:p>eco_temp_consigneHL</text:p>
          </table:table-cell>
          <table:table-cell table:number-columns-repeated="6"/>
          <table:table-cell table:style-name="ce14" table:formula="of:=IF([.A3]=&quot;&quot;;&quot; &quot;;IF([.A4]&lt;&gt;&quot;&quot;;&quot;,&quot;;&quot;}&quot;))" office:value-type="string" office:string-value="," calcext:value-type="string">
            <text:p>,</text:p>
          </table:table-cell>
          <table:table-cell table:style-name="ce14" table:formula="of:=IF([.A4]&lt;&gt;&quot;&quot;;&quot;&quot;&quot;&quot;&amp;[.A4]&amp;&quot;&quot;&quot;:[&quot;&quot;&quot;&amp;COM.MICROSOFT.TEXTJOIN(&quot;&quot;&quot;,&quot;&quot;&quot;;1;[.B4:.H4])&amp;&quot;&quot;&quot;]&quot;;&quot;&quot;)" office:value-type="string" office:string-value="&quot;eco_tempH&quot;:[&quot;eco_temp&quot;,&quot;eco_temp_consigneHL&quot;]" calcext:value-type="string">
            <text:p>"eco_tempH":["eco_temp","eco_temp_consigneHL"]</text:p>
          </table:table-cell>
          <table:table-cell/>
        </table:table-row>
        <table:table-row table:style-name="ro1">
          <table:table-cell office:value-type="string" calcext:value-type="string">
            <text:p>eco_tempL</text:p>
          </table:table-cell>
          <table:table-cell office:value-type="string" calcext:value-type="string">
            <text:p>eco_temp</text:p>
          </table:table-cell>
          <table:table-cell office:value-type="string" calcext:value-type="string">
            <text:p>eco_temp_consigneHL</text:p>
          </table:table-cell>
          <table:table-cell table:number-columns-repeated="6"/>
          <table:table-cell table:style-name="ce14" table:formula="of:=IF([.A4]=&quot;&quot;;&quot; &quot;;IF([.A5]&lt;&gt;&quot;&quot;;&quot;,&quot;;&quot;}&quot;))" office:value-type="string" office:string-value="," calcext:value-type="string">
            <text:p>,</text:p>
          </table:table-cell>
          <table:table-cell table:style-name="ce14" table:formula="of:=IF([.A5]&lt;&gt;&quot;&quot;;&quot;&quot;&quot;&quot;&amp;[.A5]&amp;&quot;&quot;&quot;:[&quot;&quot;&quot;&amp;COM.MICROSOFT.TEXTJOIN(&quot;&quot;&quot;,&quot;&quot;&quot;;1;[.B5:.H5])&amp;&quot;&quot;&quot;]&quot;;&quot;&quot;)" office:value-type="string" office:string-value="&quot;eco_tempL&quot;:[&quot;eco_temp&quot;,&quot;eco_temp_consigneHL&quot;]" calcext:value-type="string">
            <text:p>"eco_tempL":["eco_temp","eco_temp_consigneHL"]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ft_temp</text:p>
          </table:table-cell>
          <table:table-cell office:value-type="string" calcext:value-type="string">
            <text:p>cft_temp_consigne</text:p>
          </table:table-cell>
          <table:table-cell table:number-columns-repeated="6"/>
          <table:table-cell table:style-name="ce14" table:formula="of:=IF([.A5]=&quot;&quot;;&quot; &quot;;IF([.A6]&lt;&gt;&quot;&quot;;&quot;,&quot;;&quot;}&quot;))" office:value-type="string" office:string-value="," calcext:value-type="string">
            <text:p>,</text:p>
          </table:table-cell>
          <table:table-cell table:style-name="ce14" table:formula="of:=IF([.A6]&lt;&gt;&quot;&quot;;&quot;&quot;&quot;&quot;&amp;[.A6]&amp;&quot;&quot;&quot;:[&quot;&quot;&quot;&amp;COM.MICROSOFT.TEXTJOIN(&quot;&quot;&quot;,&quot;&quot;&quot;;1;[.B6:.H6])&amp;&quot;&quot;&quot;]&quot;;&quot;&quot;)" office:value-type="string" office:string-value="&quot;cft_temp&quot;:[&quot;cft_temp&quot;,&quot;cft_temp_consigne&quot;]" calcext:value-type="string">
            <text:p>"cft_temp":["cft_temp","cft_temp_consigne"]</text:p>
          </table:table-cell>
          <table:table-cell/>
        </table:table-row>
        <table:table-row table:style-name="ro1">
          <table:table-cell office:value-type="string" calcext:value-type="string">
            <text:p>cft_tempH</text:p>
          </table:table-cell>
          <table:table-cell office:value-type="string" calcext:value-type="string">
            <text:p>cft_temp</text:p>
          </table:table-cell>
          <table:table-cell office:value-type="string" calcext:value-type="string">
            <text:p>cft_temp_consigneHL</text:p>
          </table:table-cell>
          <table:table-cell table:number-columns-repeated="6"/>
          <table:table-cell table:style-name="ce14" table:formula="of:=IF([.A6]=&quot;&quot;;&quot; &quot;;IF([.A7]&lt;&gt;&quot;&quot;;&quot;,&quot;;&quot;}&quot;))" office:value-type="string" office:string-value="," calcext:value-type="string">
            <text:p>,</text:p>
          </table:table-cell>
          <table:table-cell table:style-name="ce14" table:formula="of:=IF([.A7]&lt;&gt;&quot;&quot;;&quot;&quot;&quot;&quot;&amp;[.A7]&amp;&quot;&quot;&quot;:[&quot;&quot;&quot;&amp;COM.MICROSOFT.TEXTJOIN(&quot;&quot;&quot;,&quot;&quot;&quot;;1;[.B7:.H7])&amp;&quot;&quot;&quot;]&quot;;&quot;&quot;)" office:value-type="string" office:string-value="&quot;cft_tempH&quot;:[&quot;cft_temp&quot;,&quot;cft_temp_consigneHL&quot;]" calcext:value-type="string">
            <text:p>"cft_tempH":["cft_temp","cft_temp_consigneHL"]</text:p>
          </table:table-cell>
          <table:table-cell/>
        </table:table-row>
        <table:table-row table:style-name="ro1">
          <table:table-cell office:value-type="string" calcext:value-type="string">
            <text:p>cft_tempL</text:p>
          </table:table-cell>
          <table:table-cell office:value-type="string" calcext:value-type="string">
            <text:p>cft_temp</text:p>
          </table:table-cell>
          <table:table-cell office:value-type="string" calcext:value-type="string">
            <text:p>cft_temp_consigneHL</text:p>
          </table:table-cell>
          <table:table-cell table:number-columns-repeated="6"/>
          <table:table-cell table:style-name="ce14" table:formula="of:=IF([.A7]=&quot;&quot;;&quot; &quot;;IF([.A8]&lt;&gt;&quot;&quot;;&quot;,&quot;;&quot;}&quot;))" office:value-type="string" office:string-value="," calcext:value-type="string">
            <text:p>,</text:p>
          </table:table-cell>
          <table:table-cell table:style-name="ce14" table:formula="of:=IF([.A8]&lt;&gt;&quot;&quot;;&quot;&quot;&quot;&quot;&amp;[.A8]&amp;&quot;&quot;&quot;:[&quot;&quot;&quot;&amp;COM.MICROSOFT.TEXTJOIN(&quot;&quot;&quot;,&quot;&quot;&quot;;1;[.B8:.H8])&amp;&quot;&quot;&quot;]&quot;;&quot;&quot;)" office:value-type="string" office:string-value="&quot;cft_tempL&quot;:[&quot;cft_temp&quot;,&quot;cft_temp_consigneHL&quot;]" calcext:value-type="string">
            <text:p>"cft_tempL":["cft_temp","cft_temp_consigneHL"]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ur_temp</text:p>
          </table:table-cell>
          <table:table-cell table:number-columns-repeated="7"/>
          <table:table-cell table:style-name="ce14" table:formula="of:=IF([.A8]=&quot;&quot;;&quot; &quot;;IF([.A9]&lt;&gt;&quot;&quot;;&quot;,&quot;;&quot;}&quot;))" office:value-type="string" office:string-value="," calcext:value-type="string">
            <text:p>,</text:p>
          </table:table-cell>
          <table:table-cell table:style-name="ce14" table:formula="of:=IF([.A9]&lt;&gt;&quot;&quot;;&quot;&quot;&quot;&quot;&amp;[.A9]&amp;&quot;&quot;&quot;:[&quot;&quot;&quot;&amp;COM.MICROSOFT.TEXTJOIN(&quot;&quot;&quot;,&quot;&quot;&quot;;1;[.B9:.H9])&amp;&quot;&quot;&quot;]&quot;;&quot;&quot;)" office:value-type="string" office:string-value="&quot;cur_temp&quot;:[&quot;cur_temp&quot;]" calcext:value-type="string">
            <text:p>"cur_temp":["cur_temp"]</text:p>
          </table:table-cell>
          <table:table-cell/>
        </table:table-row>
        <table:table-row table:style-name="ro1">
          <table:table-cell office:value-type="string" calcext:value-type="string">
            <text:p>cur_tempH</text:p>
          </table:table-cell>
          <table:table-cell office:value-type="string" calcext:value-type="string">
            <text:p>cur_temp</text:p>
          </table:table-cell>
          <table:table-cell table:number-columns-repeated="7"/>
          <table:table-cell table:style-name="ce14" table:formula="of:=IF([.A9]=&quot;&quot;;&quot; &quot;;IF([.A10]&lt;&gt;&quot;&quot;;&quot;,&quot;;&quot;}&quot;))" office:value-type="string" office:string-value="," calcext:value-type="string">
            <text:p>,</text:p>
          </table:table-cell>
          <table:table-cell table:style-name="ce14" table:formula="of:=IF([.A10]&lt;&gt;&quot;&quot;;&quot;&quot;&quot;&quot;&amp;[.A10]&amp;&quot;&quot;&quot;:[&quot;&quot;&quot;&amp;COM.MICROSOFT.TEXTJOIN(&quot;&quot;&quot;,&quot;&quot;&quot;;1;[.B10:.H10])&amp;&quot;&quot;&quot;]&quot;;&quot;&quot;)" office:value-type="string" office:string-value="&quot;cur_tempH&quot;:[&quot;cur_temp&quot;]" calcext:value-type="string">
            <text:p>"cur_tempH":["cur_temp"]</text:p>
          </table:table-cell>
          <table:table-cell/>
        </table:table-row>
        <table:table-row table:style-name="ro1">
          <table:table-cell office:value-type="string" calcext:value-type="string">
            <text:p>cur_tempL</text:p>
          </table:table-cell>
          <table:table-cell office:value-type="string" calcext:value-type="string">
            <text:p>cur_temp</text:p>
          </table:table-cell>
          <table:table-cell table:number-columns-repeated="7"/>
          <table:table-cell table:style-name="ce14" table:formula="of:=IF([.A10]=&quot;&quot;;&quot; &quot;;IF([.A11]&lt;&gt;&quot;&quot;;&quot;,&quot;;&quot;}&quot;))" office:value-type="string" office:string-value="," calcext:value-type="string">
            <text:p>,</text:p>
          </table:table-cell>
          <table:table-cell table:style-name="ce14" table:formula="of:=IF([.A11]&lt;&gt;&quot;&quot;;&quot;&quot;&quot;&quot;&amp;[.A11]&amp;&quot;&quot;&quot;:[&quot;&quot;&quot;&amp;COM.MICROSOFT.TEXTJOIN(&quot;&quot;&quot;,&quot;&quot;&quot;;1;[.B11:.H11])&amp;&quot;&quot;&quot;]&quot;;&quot;&quot;)" office:value-type="string" office:string-value="&quot;cur_tempL&quot;:[&quot;cur_temp&quot;]" calcext:value-type="string">
            <text:p>"cur_tempL":["cur_temp"]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ur_humi</text:p>
          </table:table-cell>
          <table:table-cell table:number-columns-repeated="7"/>
          <table:table-cell table:style-name="ce14" table:formula="of:=IF([.A11]=&quot;&quot;;&quot; &quot;;IF([.A12]&lt;&gt;&quot;&quot;;&quot;,&quot;;&quot;}&quot;))" office:value-type="string" office:string-value="," calcext:value-type="string">
            <text:p>,</text:p>
          </table:table-cell>
          <table:table-cell table:style-name="ce14" table:formula="of:=IF([.A12]&lt;&gt;&quot;&quot;;&quot;&quot;&quot;&quot;&amp;[.A12]&amp;&quot;&quot;&quot;:[&quot;&quot;&quot;&amp;COM.MICROSOFT.TEXTJOIN(&quot;&quot;&quot;,&quot;&quot;&quot;;1;[.B12:.H12])&amp;&quot;&quot;&quot;]&quot;;&quot;&quot;)" office:value-type="string" office:string-value="&quot;cur_humi&quot;:[&quot;cur_humi&quot;]" calcext:value-type="string">
            <text:p>"cur_humi":["cur_humi"]</text:p>
          </table:table-cell>
          <table:table-cell/>
        </table:table-row>
        <table:table-row table:style-name="ro1">
          <table:table-cell office:value-type="string" calcext:value-type="string">
            <text:p>on_off</text:p>
          </table:table-cell>
          <table:table-cell office:value-type="string" calcext:value-type="string">
            <text:p>plugzy</text:p>
          </table:table-cell>
          <table:table-cell office:value-type="string" calcext:value-type="string">
            <text:p>plugzyon</text:p>
          </table:table-cell>
          <table:table-cell office:value-type="string" calcext:value-type="string">
            <text:p>plugzyoff</text:p>
          </table:table-cell>
          <table:table-cell table:number-columns-repeated="5"/>
          <table:table-cell table:style-name="ce14" table:formula="of:=IF([.A12]=&quot;&quot;;&quot; &quot;;IF([.A13]&lt;&gt;&quot;&quot;;&quot;,&quot;;&quot;}&quot;))" office:value-type="string" office:string-value="," calcext:value-type="string">
            <text:p>,</text:p>
          </table:table-cell>
          <table:table-cell table:style-name="ce14" table:formula="of:=IF([.A13]&lt;&gt;&quot;&quot;;&quot;&quot;&quot;&quot;&amp;[.A13]&amp;&quot;&quot;&quot;:[&quot;&quot;&quot;&amp;COM.MICROSOFT.TEXTJOIN(&quot;&quot;&quot;,&quot;&quot;&quot;;1;[.B13:.H13])&amp;&quot;&quot;&quot;]&quot;;&quot;&quot;)" office:value-type="string" office:string-value="&quot;on_off&quot;:[&quot;plugzy&quot;,&quot;plugzyon&quot;,&quot;plugzyoff&quot;]" calcext:value-type="string">
            <text:p>"on_off":["plugzy","plugzyon","plugzyoff"]</text:p>
          </table:table-cell>
          <table:table-cell/>
        </table:table-row>
        <table:table-row table:style-name="ro1">
          <table:table-cell office:value-type="string" calcext:value-type="string">
            <text:p>timer_switch</text:p>
          </table:table-cell>
          <table:table-cell office:value-type="string" calcext:value-type="string">
            <text:p>etatprog</text:p>
          </table:table-cell>
          <table:table-cell office:value-type="string" calcext:value-type="string">
            <text:p>ProgOn</text:p>
          </table:table-cell>
          <table:table-cell office:value-type="string" calcext:value-type="string">
            <text:p>ProgOff</text:p>
          </table:table-cell>
          <table:table-cell table:number-columns-repeated="5"/>
          <table:table-cell table:style-name="ce14" table:formula="of:=IF([.A13]=&quot;&quot;;&quot; &quot;;IF([.A14]&lt;&gt;&quot;&quot;;&quot;,&quot;;&quot;}&quot;))" office:value-type="string" office:string-value="," calcext:value-type="string">
            <text:p>,</text:p>
          </table:table-cell>
          <table:table-cell table:style-name="ce14" table:formula="of:=IF([.A14]&lt;&gt;&quot;&quot;;&quot;&quot;&quot;&quot;&amp;[.A14]&amp;&quot;&quot;&quot;:[&quot;&quot;&quot;&amp;COM.MICROSOFT.TEXTJOIN(&quot;&quot;&quot;,&quot;&quot;&quot;;1;[.B14:.H14])&amp;&quot;&quot;&quot;]&quot;;&quot;&quot;)" office:value-type="string" office:string-value="&quot;timer_switch&quot;:[&quot;etatprog&quot;,&quot;ProgOn&quot;,&quot;ProgOff&quot;]" calcext:value-type="string">
            <text:p>"timer_switch":["etatprog","ProgOn","ProgOff"]</text:p>
          </table:table-cell>
          <table:table-cell/>
        </table:table-row>
        <table:table-row table:style-name="ro1">
          <table:table-cell office:value-type="string" calcext:value-type="string">
            <text:p>lock_switch</text:p>
          </table:table-cell>
          <table:table-cell office:value-type="string" calcext:value-type="string">
            <text:p>etatlock</text:p>
          </table:table-cell>
          <table:table-cell office:value-type="string" calcext:value-type="string">
            <text:p>LockOn</text:p>
          </table:table-cell>
          <table:table-cell office:value-type="string" calcext:value-type="string">
            <text:p>LockOff</text:p>
          </table:table-cell>
          <table:table-cell table:number-columns-repeated="5"/>
          <table:table-cell table:style-name="ce14" table:formula="of:=IF([.A14]=&quot;&quot;;&quot; &quot;;IF([.A15]&lt;&gt;&quot;&quot;;&quot;,&quot;;&quot;}&quot;))" office:value-type="string" office:string-value="," calcext:value-type="string">
            <text:p>,</text:p>
          </table:table-cell>
          <table:table-cell table:style-name="ce14" table:formula="of:=IF([.A15]&lt;&gt;&quot;&quot;;&quot;&quot;&quot;&quot;&amp;[.A15]&amp;&quot;&quot;&quot;:[&quot;&quot;&quot;&amp;COM.MICROSOFT.TEXTJOIN(&quot;&quot;&quot;,&quot;&quot;&quot;;1;[.B15:.H15])&amp;&quot;&quot;&quot;]&quot;;&quot;&quot;)" office:value-type="string" office:string-value="&quot;lock_switch&quot;:[&quot;etatlock&quot;,&quot;LockOn&quot;,&quot;LockOff&quot;]" calcext:value-type="string">
            <text:p>"lock_switch":["etatlock","LockOn","LockOff"]</text:p>
          </table:table-cell>
          <table:table-cell/>
        </table:table-row>
        <table:table-row table:style-name="ro1">
          <table:table-cell office:value-type="string" calcext:value-type="string">
            <text:p>LOCK_C</text:p>
          </table:table-cell>
          <table:table-cell office:value-type="string" calcext:value-type="string">
            <text:p>Lock_C_State</text:p>
          </table:table-cell>
          <table:table-cell office:value-type="string" calcext:value-type="string">
            <text:p>Lock_C_On</text:p>
          </table:table-cell>
          <table:table-cell office:value-type="string" calcext:value-type="string">
            <text:p>Lock_C_Off</text:p>
          </table:table-cell>
          <table:table-cell table:number-columns-repeated="5"/>
          <table:table-cell table:style-name="ce14" table:formula="of:=IF([.A15]=&quot;&quot;;&quot; &quot;;IF([.A16]&lt;&gt;&quot;&quot;;&quot;,&quot;;&quot;}&quot;))" office:value-type="string" office:string-value="," calcext:value-type="string">
            <text:p>,</text:p>
          </table:table-cell>
          <table:table-cell table:style-name="ce14" table:formula="of:=IF([.A16]&lt;&gt;&quot;&quot;;&quot;&quot;&quot;&quot;&amp;[.A16]&amp;&quot;&quot;&quot;:[&quot;&quot;&quot;&amp;COM.MICROSOFT.TEXTJOIN(&quot;&quot;&quot;,&quot;&quot;&quot;;1;[.B16:.H16])&amp;&quot;&quot;&quot;]&quot;;&quot;&quot;)" office:value-type="string" office:string-value="&quot;LOCK_C&quot;:[&quot;Lock_C_State&quot;,&quot;Lock_C_On&quot;,&quot;Lock_C_Off&quot;]" calcext:value-type="string">
            <text:p>"LOCK_C":["Lock_C_State","Lock_C_On","Lock_C_Off"]</text:p>
          </table:table-cell>
          <table:table-cell/>
        </table:table-row>
        <table:table-row table:style-name="ro1">
          <table:table-cell office:value-type="string" calcext:value-type="string">
            <text:p>window_switch</text:p>
          </table:table-cell>
          <table:table-cell office:value-type="string" calcext:value-type="string">
            <text:p>WindowSwitch</text:p>
          </table:table-cell>
          <table:table-cell office:value-type="string" calcext:value-type="string">
            <text:p>WindowSwitchOn</text:p>
          </table:table-cell>
          <table:table-cell office:value-type="string" calcext:value-type="string">
            <text:p>WindowSwitchOff</text:p>
          </table:table-cell>
          <table:table-cell table:number-columns-repeated="5"/>
          <table:table-cell table:style-name="ce14" table:formula="of:=IF([.A16]=&quot;&quot;;&quot; &quot;;IF([.A17]&lt;&gt;&quot;&quot;;&quot;,&quot;;&quot;}&quot;))" office:value-type="string" office:string-value="," calcext:value-type="string">
            <text:p>,</text:p>
          </table:table-cell>
          <table:table-cell table:style-name="ce14" table:formula="of:=IF([.A17]&lt;&gt;&quot;&quot;;&quot;&quot;&quot;&quot;&amp;[.A17]&amp;&quot;&quot;&quot;:[&quot;&quot;&quot;&amp;COM.MICROSOFT.TEXTJOIN(&quot;&quot;&quot;,&quot;&quot;&quot;;1;[.B17:.H17])&amp;&quot;&quot;&quot;]&quot;;&quot;&quot;)" office:value-type="string" office:string-value="&quot;window_switch&quot;:[&quot;WindowSwitch&quot;,&quot;WindowSwitchOn&quot;,&quot;WindowSwitchOff&quot;]" calcext:value-type="string">
            <text:p>"window_switch":["WindowSwitch","WindowSwitchOn","WindowSwitchOff"]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derog_mode</text:p>
          </table:table-cell>
          <table:table-cell table:number-columns-repeated="7"/>
          <table:table-cell table:style-name="ce14" table:formula="of:=IF([.A17]=&quot;&quot;;&quot; &quot;;IF([.A18]&lt;&gt;&quot;&quot;;&quot;,&quot;;&quot;}&quot;))" office:value-type="string" office:string-value="," calcext:value-type="string">
            <text:p>,</text:p>
          </table:table-cell>
          <table:table-cell table:style-name="ce14" table:formula="of:=IF([.A18]&lt;&gt;&quot;&quot;;&quot;&quot;&quot;&quot;&amp;[.A18]&amp;&quot;&quot;&quot;:[&quot;&quot;&quot;&amp;COM.MICROSOFT.TEXTJOIN(&quot;&quot;&quot;,&quot;&quot;&quot;;1;[.B18:.H18])&amp;&quot;&quot;&quot;]&quot;;&quot;&quot;)" office:value-type="string" office:string-value="&quot;derog_mode&quot;:[&quot;derog_mode&quot;]" calcext:value-type="string">
            <text:p>"derog_mode":["derog_mode"]</text:p>
          </table:table-cell>
          <table:table-cell/>
        </table:table-row>
        <table:table-row table:style-name="ro1">
          <table:table-cell office:value-type="string" calcext:value-type="string">
            <text:p>derog_time</text:p>
          </table:table-cell>
          <table:table-cell office:value-type="string" calcext:value-type="string">
            <text:p>derog_time_vacances</text:p>
          </table:table-cell>
          <table:table-cell office:value-type="string" calcext:value-type="string">
            <text:p>derog_time_boost</text:p>
          </table:table-cell>
          <table:table-cell table:number-columns-repeated="6"/>
          <table:table-cell table:style-name="ce14" table:formula="of:=IF([.A18]=&quot;&quot;;&quot; &quot;;IF([.A19]&lt;&gt;&quot;&quot;;&quot;,&quot;;&quot;}&quot;))" office:value-type="string" office:string-value="," calcext:value-type="string">
            <text:p>,</text:p>
          </table:table-cell>
          <table:table-cell table:style-name="ce14" table:formula="of:=IF([.A19]&lt;&gt;&quot;&quot;;&quot;&quot;&quot;&quot;&amp;[.A19]&amp;&quot;&quot;&quot;:[&quot;&quot;&quot;&amp;COM.MICROSOFT.TEXTJOIN(&quot;&quot;&quot;,&quot;&quot;&quot;;1;[.B19:.H19])&amp;&quot;&quot;&quot;]&quot;;&quot;&quot;)" office:value-type="string" office:string-value="&quot;derog_time&quot;:[&quot;derog_time_vacances&quot;,&quot;derog_time_boost&quot;]" calcext:value-type="string">
            <text:p>"derog_time":["derog_time_vacances","derog_time_boost"]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ur_power</text:p>
          </table:table-cell>
          <table:table-cell table:number-columns-repeated="7"/>
          <table:table-cell table:style-name="ce14" table:formula="of:=IF([.A19]=&quot;&quot;;&quot; &quot;;IF([.A20]&lt;&gt;&quot;&quot;;&quot;,&quot;;&quot;}&quot;))" office:value-type="string" office:string-value="," calcext:value-type="string">
            <text:p>,</text:p>
          </table:table-cell>
          <table:table-cell table:style-name="ce14" table:formula="of:=IF([.A20]&lt;&gt;&quot;&quot;;&quot;&quot;&quot;&quot;&amp;[.A20]&amp;&quot;&quot;&quot;:[&quot;&quot;&quot;&amp;COM.MICROSOFT.TEXTJOIN(&quot;&quot;&quot;,&quot;&quot;&quot;;1;[.B20:.H20])&amp;&quot;&quot;&quot;]&quot;;&quot;&quot;)" office:value-type="string" office:string-value="&quot;cur_power&quot;:[&quot;cur_power&quot;]" calcext:value-type="string">
            <text:p>"cur_power":["cur_power"]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ur_current</text:p>
          </table:table-cell>
          <table:table-cell table:number-columns-repeated="7"/>
          <table:table-cell table:style-name="ce14" table:formula="of:=IF([.A20]=&quot;&quot;;&quot; &quot;;IF([.A21]&lt;&gt;&quot;&quot;;&quot;,&quot;;&quot;}&quot;))" office:value-type="string" office:string-value="," calcext:value-type="string">
            <text:p>,</text:p>
          </table:table-cell>
          <table:table-cell table:style-name="ce14" table:formula="of:=IF([.A21]&lt;&gt;&quot;&quot;;&quot;&quot;&quot;&quot;&amp;[.A21]&amp;&quot;&quot;&quot;:[&quot;&quot;&quot;&amp;COM.MICROSOFT.TEXTJOIN(&quot;&quot;&quot;,&quot;&quot;&quot;;1;[.B21:.H21])&amp;&quot;&quot;&quot;]&quot;;&quot;&quot;)" office:value-type="string" office:string-value="&quot;cur_current&quot;:[&quot;cur_current&quot;]" calcext:value-type="string">
            <text:p>"cur_current":["cur_current"]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ur_voltage</text:p>
          </table:table-cell>
          <table:table-cell table:number-columns-repeated="7"/>
          <table:table-cell table:style-name="ce14" table:formula="of:=IF([.A21]=&quot;&quot;;&quot; &quot;;IF([.A22]&lt;&gt;&quot;&quot;;&quot;,&quot;;&quot;}&quot;))" office:value-type="string" office:string-value="," calcext:value-type="string">
            <text:p>,</text:p>
          </table:table-cell>
          <table:table-cell table:style-name="ce14" table:formula="of:=IF([.A22]&lt;&gt;&quot;&quot;;&quot;&quot;&quot;&quot;&amp;[.A22]&amp;&quot;&quot;&quot;:[&quot;&quot;&quot;&amp;COM.MICROSOFT.TEXTJOIN(&quot;&quot;&quot;,&quot;&quot;&quot;;1;[.B22:.H22])&amp;&quot;&quot;&quot;]&quot;;&quot;&quot;)" office:value-type="string" office:string-value="&quot;cur_voltage&quot;:[&quot;cur_voltage&quot;]" calcext:value-type="string">
            <text:p>"cur_voltage":["cur_voltage"]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ignal_power</text:p>
          </table:table-cell>
          <table:table-cell table:number-columns-repeated="7"/>
          <table:table-cell table:style-name="ce14" table:formula="of:=IF([.A22]=&quot;&quot;;&quot; &quot;;IF([.A23]&lt;&gt;&quot;&quot;;&quot;,&quot;;&quot;}&quot;))" office:value-type="string" office:string-value="," calcext:value-type="string">
            <text:p>,</text:p>
          </table:table-cell>
          <table:table-cell table:style-name="ce14" table:formula="of:=IF([.A23]&lt;&gt;&quot;&quot;;&quot;&quot;&quot;&quot;&amp;[.A23]&amp;&quot;&quot;&quot;:[&quot;&quot;&quot;&amp;COM.MICROSOFT.TEXTJOIN(&quot;&quot;&quot;,&quot;&quot;&quot;;1;[.B23:.H23])&amp;&quot;&quot;&quot;]&quot;;&quot;&quot;)" office:value-type="string" office:string-value="&quot;signal_power&quot;:[&quot;signal_power&quot;]" calcext:value-type="string">
            <text:p>"signal_power":["signal_power"]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nergy_saving</text:p>
          </table:table-cell>
          <table:table-cell table:number-columns-repeated="7"/>
          <table:table-cell table:style-name="ce14" table:formula="of:=IF([.A23]=&quot;&quot;;&quot; &quot;;IF([.A24]&lt;&gt;&quot;&quot;;&quot;,&quot;;&quot;}&quot;))" office:value-type="string" office:string-value="," calcext:value-type="string">
            <text:p>,</text:p>
          </table:table-cell>
          <table:table-cell table:style-name="ce14" table:formula="of:=IF([.A24]&lt;&gt;&quot;&quot;;&quot;&quot;&quot;&quot;&amp;[.A24]&amp;&quot;&quot;&quot;:[&quot;&quot;&quot;&amp;COM.MICROSOFT.TEXTJOIN(&quot;&quot;&quot;,&quot;&quot;&quot;;1;[.B24:.H24])&amp;&quot;&quot;&quot;]&quot;;&quot;&quot;)" office:value-type="string" office:string-value="&quot;energy_saving&quot;:[&quot;energy_saving&quot;]" calcext:value-type="string">
            <text:p>"energy_saving":["energy_saving"]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kill_switch</text:p>
          </table:table-cell>
          <table:table-cell table:number-columns-repeated="7"/>
          <table:table-cell table:style-name="ce14" table:formula="of:=IF([.A24]=&quot;&quot;;&quot; &quot;;IF([.A25]&lt;&gt;&quot;&quot;;&quot;,&quot;;&quot;}&quot;))" office:value-type="string" office:string-value="," calcext:value-type="string">
            <text:p>,</text:p>
          </table:table-cell>
          <table:table-cell table:style-name="ce14" table:formula="of:=IF([.A25]&lt;&gt;&quot;&quot;;&quot;&quot;&quot;&quot;&amp;[.A25]&amp;&quot;&quot;&quot;:[&quot;&quot;&quot;&amp;COM.MICROSOFT.TEXTJOIN(&quot;&quot;&quot;,&quot;&quot;&quot;;1;[.B25:.H25])&amp;&quot;&quot;&quot;]&quot;;&quot;&quot;)" office:value-type="string" office:string-value="&quot;kill_switch&quot;:[&quot;kill_switch&quot;]" calcext:value-type="string">
            <text:p>"kill_switch":["kill_switch"]</text:p>
          </table:table-cell>
          <table:table-cell/>
        </table:table-row>
        <table:table-row table:style-name="ro1">
          <table:table-cell table:number-columns-repeated="9"/>
          <table:table-cell table:style-name="ce14" table:formula="of:=IF([.A25]=&quot;&quot;;&quot; &quot;;IF([.A26]&lt;&gt;&quot;&quot;;&quot;,&quot;;&quot;}&quot;))" office:value-type="string" office:string-value="}" calcext:value-type="string">
            <text:p>}</text:p>
          </table:table-cell>
          <table:table-cell table:style-name="ce14" table:formula="of:=IF([.A26]&lt;&gt;&quot;&quot;;&quot;&quot;&quot;&quot;&amp;[.A26]&amp;&quot;&quot;&quot;:[&quot;&quot;&quot;&amp;COM.MICROSOFT.TEXTJOIN(&quot;&quot;&quot;,&quot;&quot;&quot;;1;[.B26:.H26])&amp;&quot;&quot;&quot;]&quot;;&quot;&quot;)">
            <text:p/>
          </table:table-cell>
          <table:table-cell/>
        </table:table-row>
        <table:table-row table:style-name="ro1">
          <table:table-cell table:number-columns-repeated="9"/>
          <table:table-cell table:formula="of:=IF([.A26]=&quot;&quot;;&quot; &quot;;IF([.A27]&lt;&gt;&quot;&quot;;&quot;,&quot;;&quot;}&quot;))" office:value-type="string" office:string-value=" " calcext:value-type="string">
            <text:p><text:s/></text:p>
          </table:table-cell>
          <table:table-cell table:formula="of:=IF([.A27]&lt;&gt;&quot;&quot;;&quot;&quot;&quot;&quot;&amp;[.A27]&amp;&quot;&quot;&quot;:[&quot;&quot;&quot;&amp;COM.MICROSOFT.TEXTJOIN(&quot;&quot;&quot;,&quot;&quot;&quot;;1;[.B27:.H27])&amp;&quot;&quot;&quot;]&quot;;&quot;&quot;)">
            <text:p/>
          </table:table-cell>
          <table:table-cell/>
        </table:table-row>
        <table:table-row table:style-name="ro1">
          <table:table-cell table:number-columns-repeated="9"/>
          <table:table-cell table:formula="of:=IF([.A27]=&quot;&quot;;&quot; &quot;;IF([.A28]&lt;&gt;&quot;&quot;;&quot;,&quot;;&quot;}&quot;))" office:value-type="string" office:string-value=" " calcext:value-type="string">
            <text:p><text:s/></text:p>
          </table:table-cell>
          <table:table-cell table:formula="of:=IF([.A28]&lt;&gt;&quot;&quot;;&quot;&quot;&quot;&quot;&amp;[.A28]&amp;&quot;&quot;&quot;:[&quot;&quot;&quot;&amp;COM.MICROSOFT.TEXTJOIN(&quot;&quot;&quot;,&quot;&quot;&quot;;1;[.B28:.H28])&amp;&quot;&quot;&quot;]&quot;;&quot;&quot;)">
            <text:p/>
          </table:table-cell>
          <table:table-cell/>
        </table:table-row>
        <table:table-row table:style-name="ro1">
          <table:table-cell table:number-columns-repeated="9"/>
          <table:table-cell table:formula="of:=IF([.A28]=&quot;&quot;;&quot; &quot;;IF([.A29]&lt;&gt;&quot;&quot;;&quot;,&quot;;&quot;}&quot;))" office:value-type="string" office:string-value=" " calcext:value-type="string">
            <text:p><text:s/></text:p>
          </table:table-cell>
          <table:table-cell table:formula="of:=IF([.A29]&lt;&gt;&quot;&quot;;&quot;&quot;&quot;&quot;&amp;[.A29]&amp;&quot;&quot;&quot;:[&quot;&quot;&quot;&amp;COM.MICROSOFT.TEXTJOIN(&quot;&quot;&quot;,&quot;&quot;&quot;;1;[.B29:.H29])&amp;&quot;&quot;&quot;]&quot;;&quot;&quot;)">
            <text:p/>
          </table:table-cell>
          <table:table-cell/>
        </table:table-row>
        <table:table-row table:style-name="ro1">
          <table:table-cell table:number-columns-repeated="10"/>
          <table:table-cell table:formula="of:=IF([.A30]&lt;&gt;&quot;&quot;;&quot;&quot;&quot;&quot;&amp;[.A30]&amp;&quot;&quot;&quot;:[&quot;&quot;&quot;&amp;COM.MICROSOFT.TEXTJOIN(&quot;&quot;&quot;,&quot;&quot;&quot;;1;[.B30:.H30])&amp;&quot;&quot;&quot;]&quot;;&quot;&quot;)">
            <text:p/>
          </table:table-cell>
          <table:table-cell/>
        </table:table-row>
        <table:table-row table:style-name="ro1">
          <table:table-cell table:number-columns-repeated="10"/>
          <table:table-cell table:formula="of:=IF([.A31]&lt;&gt;&quot;&quot;;&quot;&quot;&quot;&quot;&amp;[.A31]&amp;&quot;&quot;&quot;:[&quot;&quot;&quot;&amp;COM.MICROSOFT.TEXTJOIN(&quot;&quot;&quot;,&quot;&quot;&quot;;1;[.B31:.H31])&amp;&quot;&quot;&quot;]&quot;;&quot;&quot;)">
            <text:p/>
          </table:table-cell>
          <table:table-cell/>
        </table:table-row>
        <table:table-row table:style-name="ro1">
          <table:table-cell table:number-columns-repeated="10"/>
          <table:table-cell table:formula="of:=IF([.A32]&lt;&gt;&quot;&quot;;&quot;&quot;&quot;&quot;&amp;[.A32]&amp;&quot;&quot;&quot;:[&quot;&quot;&quot;&amp;COM.MICROSOFT.TEXTJOIN(&quot;&quot;&quot;,&quot;&quot;&quot;;1;[.B32:.H32])&amp;&quot;&quot;&quot;]&quot;;&quot;&quot;)">
            <text:p/>
          </table:table-cell>
          <table:table-cell/>
        </table:table-row>
        <table:table-row table:style-name="ro1">
          <table:table-cell table:number-columns-repeated="10"/>
          <table:table-cell table:formula="of:=IF([.A33]&lt;&gt;&quot;&quot;;&quot;&quot;&quot;&quot;&amp;[.A33]&amp;&quot;&quot;&quot;:[&quot;&quot;&quot;&amp;COM.MICROSOFT.TEXTJOIN(&quot;&quot;&quot;,&quot;&quot;&quot;;1;[.B34:.E34])&amp;&quot;&quot;&quot;]&quot;;&quot;&quot;)">
            <text:p/>
          </table:table-cell>
          <table:table-cell/>
        </table:table-row>
        <table:table-row table:style-name="ro1" table:number-rows-repeated="1048542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RetourAPI" table:style-name="ta1">
        <table:table-column table:style-name="co32" table:default-cell-style-name="ce73"/>
        <table:table-column table:style-name="co33" table:default-cell-style-name="ce73"/>
        <table:table-column table:style-name="co1" table:number-columns-repeated="16382"/>
        <table:table-row table:style-name="ro4">
          <table:table-cell office:value-type="string" calcext:value-type="string">
            <text:p>Glow_Simple_ble</text:p>
          </table:table-cell>
          <table:table-cell table:style-name="ce75" office:value-type="string" calcext:value-type="string">
            <text:p>array ( 'did' =&gt; 'YVAPcxDcvteIFNbXPnKgrZ', 'updated_at' =&gt; 1772800782, 'attr' =&gt; array ( 'LOCK_C' =&gt; 0, 'p4_data11' =&gt; 85, 'p4_data10' =&gt; 0, 'p4_data12' =&gt; 85, 'minute' =&gt; 54, 'on_off' =&gt; 1, 'mode' =&gt; 'cft', 'p5_data2' =&gt; 85, 'power_dataH' =&gt; 0, 'p3_data9' =&gt; 0, 'power_dataL' =&gt; 0, 'com_temp' =&gt; 5, 'p5_data12' =&gt; 85, 'p7_data7' =&gt; 21, 'p5_data10' =&gt; 0, 'p5_data11' =&gt; 85, 'p7_data2' =&gt; 85, 'p7_data3' =&gt; 85, 'p7_data1' =&gt; 85, 'p7_data8' =&gt; 0, 'p7_data9' =&gt; 0, 'cur_tempH' =&gt; 0, 'p3_data2' =&gt; 85, 'cur_tempL' =&gt; 155, 'p3_data3' =&gt; 85, 'p5_data1' =&gt; 85, 'p3_data8' =&gt; 85, 'p5_data3' =&gt; 85, 'p5_data4' =&gt; 85, 'p5_data5' =&gt; 85, 'p5_data6' =&gt; 85, 'p5_data7' =&gt; 85, 'p5_data8' =&gt; 85, 'p5_data9' =&gt; 0, 'p3_data1' =&gt; 85, 'p3_data6' =&gt; 85, 'p3_data7' =&gt; 85, 'p3_data4' =&gt; 85, 'p3_data5' =&gt; 85, 'eco_tempH' =&gt; 0, 'eco_tempL' =&gt; 150, 'p6_data12' =&gt; 85, 'p6_data11' =&gt; 85, 'p6_data10' =&gt; 0, 'cur_mode' =&gt; 0, 'derog_mode' =&gt; 1, 'p1_data12' =&gt; 85, 'p1_data10' =&gt; 0, 'p1_data11' =&gt; 85, 'p2_data9' =&gt; 0, 'p2_data8' =&gt; 85, 'p2_data3' =&gt; 85, 'p2_data2' =&gt; 85, 'p2_data1' =&gt; 85, 'p2_data7' =&gt; 85, 'p2_data6' =&gt; 85, 'p2_data5' =&gt; 85, 'p2_data4' =&gt; 85, 'p6_data7' =&gt; 21, 'p6_data6' =&gt; 85, 'p6_data5' =&gt; 85, 'p6_data4' =&gt; 85, 'p6_data3' =&gt; 85, 'p6_data2' =&gt; 85, 'p6_data1' =&gt; 85, 'p6_data9' =&gt; 0, 'p6_data8' =&gt; 0, 'p1_data4' =&gt; 85, 'p1_data5' =&gt; 85, 'p1_data6' =&gt; 85, 'p1_data7' =&gt; 85, 'p1_data1' =&gt; 85, 'p1_data2' =&gt; 85, 'p1_data3' =&gt; 85, 'p1_data8' =&gt; 85, 'p1_data9' =&gt; 0, 'p3_data10' =&gt; 0, 'p3_data11' =&gt; 85, 'p3_data12' =&gt; 85, 'cft_tempH' =&gt; 0, 'cft_tempL' =&gt; 205, 'hour' =&gt; 8, 'timer_switch' =&gt; 0, 'p4_data1' =&gt; 85, 'p4_data3' =&gt; 85, 'p4_data2' =&gt; 85, 'p4_data5' =&gt; 85, 'p4_data4' =&gt; 85, 'p4_data7' =&gt; 85, 'p4_data6' =&gt; 85, 'p4_data9' =&gt; 0, 'p4_data8' =&gt; 85, 'power_cnt' =&gt; 0, 'derog_time' =&gt; 30, 'p2_data12' =&gt; 85, 'p2_data11' =&gt; 85, 'p2_data10' =&gt; 0, 'week' =&gt; 6, 'p7_data6' =&gt; 85, 'p7_data4' =&gt; 85, 'p7_data5' =&gt; 85, 'p7_data10' =&gt; 0, 'p7_data11' =&gt; 85, 'p7_data12' =&gt; 85, ), )</text:p>
          </table:table-cell>
          <table:table-cell table:style-name="ce73" table:number-columns-repeated="16382"/>
        </table:table-row>
        <table:table-row table:style-name="ro4">
          <table:table-cell office:value-type="string" calcext:value-type="string">
            <text:p>Pilote_Pro</text:p>
          </table:table-cell>
          <table:table-cell table:style-name="ce75" office:value-type="string" calcext:value-type="string">
            <text:p>array ( 'did' =&gt; 'yCpPJifDjBpjNdhsrGEmdH', 'updated_at' =&gt; 1772820579, 'attr' =&gt; array ( 'Heating_state' =&gt; 0, 'boost_switch' =&gt; 0, 'boost_time' =&gt; 0, 'cft_temp' =&gt; 210, 'com_temp' =&gt; 50, 'cur_humi' =&gt; 80, 'cur_mode' =&gt; 'cft', 'cur_signal' =&gt; 'stop', 'cur_temp' =&gt; 144, 'data1' =&gt; 0, 'data2' =&gt; 0, 'derog_mode' =&gt; 0, 'derog_time' =&gt; 0, 'eco_temp' =&gt; 150, 'lock_switch' =&gt; 0, 'mode' =&gt; 'cft', 'p1_data1' =&gt; 85, 'p1_data10' =&gt; 85, 'p1_data11' =&gt; 5, 'p1_data12' =&gt; 85, 'p1_data2' =&gt; 85, 'p1_data3' =&gt; 85, 'p1_data4' =&gt; 85, 'p1_data5' =&gt; 85, 'p1_data6' =&gt; 85, 'p1_data7' =&gt; 85, 'p1_data8' =&gt; 85, 'p1_data9' =&gt; 85, 'p2_data1' =&gt; 85, 'p2_data10' =&gt; 85, 'p2_data11' =&gt; 85, 'p2_data12' =&gt; 85, 'p2_data2' =&gt; 85, 'p2_data3' =&gt; 85, 'p2_data4' =&gt; 85, 'p2_data5' =&gt; 85, 'p2_data6' =&gt; 85, 'p2_data7' =&gt; 85, 'p2_data8' =&gt; 85, 'p2_data9' =&gt; 85, 'p3_data1' =&gt; 85, 'p3_data10' =&gt; 85, 'p3_data11' =&gt; 85, 'p3_data12' =&gt; 85, 'p3_data2' =&gt; 85, 'p3_data3' =&gt; 85, 'p3_data4' =&gt; 85, 'p3_data5' =&gt; 85, 'p3_data6' =&gt; 85, 'p3_data7' =&gt; 101, 'p3_data8' =&gt; 85, 'p3_data9' =&gt; 85, 'p4_data1' =&gt; 85, 'p4_data10' =&gt; 85, 'p4_data11' =&gt; 85, 'p4_data12' =&gt; 85, 'p4_data2' =&gt; 85, 'p4_data3' =&gt; 85, 'p4_data4' =&gt; 85, 'p4_data5' =&gt; 85, 'p4_data6' =&gt; 85, 'p4_data7' =&gt; 85, 'p4_data8' =&gt; 85, 'p4_data9' =&gt; 85, 'p5_data1' =&gt; 85, 'p5_data10' =&gt; 85, 'p5_data11' =&gt; 85, 'p5_data12' =&gt; 85, 'p5_data2' =&gt; 85, 'p5_data3' =&gt; 85, 'p5_data4' =&gt; 85, 'p5_data5' =&gt; 85, 'p5_data6' =&gt; 85, 'p5_data7' =&gt; 85, 'p5_data8' =&gt; 85, 'p5_data9' =&gt; 85, 'p6_data1' =&gt; 85, 'p6_data10' =&gt; 85, 'p6_data11' =&gt; 85, 'p6_data12' =&gt; 85, 'p6_data2' =&gt; 85, 'p6_data3' =&gt; 85, 'p6_data4' =&gt; 85, 'p6_data5' =&gt; 85, 'p6_data6' =&gt; 85, 'p6_data7' =&gt; 85, 'p6_data8' =&gt; 85, 'p6_data9' =&gt; 85, 'p7_data1' =&gt; 85, 'p7_data10' =&gt; 85, 'p7_data11' =&gt; 85, 'p7_data12' =&gt; 85, 'p7_data2' =&gt; 85, 'p7_data3' =&gt; 85, 'p7_data4' =&gt; 85, 'p7_data5' =&gt; 85, 'p7_data6' =&gt; 85, 'p7_data7' =&gt; 85, 'p7_data8' =&gt; 85, 'p7_data9' =&gt; 85, 'temp_set_step' =&gt; 'off', 'time_hour' =&gt; 38, 'time_min' =&gt; 0, 'time_week' =&gt; 5, 'timer_switch' =&gt; 0, 'window_switch' =&gt; 0, ),</text:p>
          </table:table-cell>
          <table:table-cell table:style-name="ce73" table:number-columns-repeated="16382"/>
        </table:table-row>
        <table:table-row table:style-name="ro4">
          <table:table-cell office:value-type="string" calcext:value-type="string">
            <text:p>Pilote_Soc</text:p>
          </table:table-cell>
          <table:table-cell table:style-name="ce75" office:value-type="string" calcext:value-type="string">
            <text:p>array ( 'did' =&gt; 'Eq7LnhD4ajkzYpNMFYczVz', 'updated_at' =&gt; 1772820755, 'attr' =&gt; array ( 'time_week' =&gt; 1, 'p4_data11' =&gt; 0, 'p4_data10' =&gt; 85, 'p4_data12' =&gt; 0, 'mode' =&gt; 'stop', 'data2' =&gt; 0, 'p5_data2' =&gt; 0, 'p3_data9' =&gt; 85, 'p5_data12' =&gt; 0, 'p7_data7' =&gt; 85, 'p5_data10' =&gt; 85, 'p5_data11' =&gt; 0, 'p7_data2' =&gt; 0, 'p7_data3' =&gt; 128, 'p7_data1' =&gt; 0, 'p7_data8' =&gt; 85, 'p7_data9' =&gt; 85, 'p3_data2' =&gt; 0, 'p3_data3' =&gt; 128, 'p4_data4' =&gt; 170, 'p5_data1' =&gt; 0, 'p3_data8' =&gt; 85, 'p5_data3' =&gt; 128, 'p5_data4' =&gt; 170, 'p5_data5' =&gt; 170, 'p5_data6' =&gt; 86, 'p5_data7' =&gt; 85, 'p5_data8' =&gt; 85, 'p5_data9' =&gt; 85, 'p3_data1' =&gt; 0, 'p3_data6' =&gt; 86, 'p3_data7' =&gt; 85, 'p3_data4' =&gt; 170, 'p3_data5' =&gt; 170, 'time_min' =&gt; 0, 'p6_data12' =&gt; 0, 'p6_data11' =&gt; 0, 'p6_data10' =&gt; 85, 'derog_mode' =&gt; 0, 'p1_data12' =&gt; 0, 'p1_data10' =&gt; 85, 'p1_data11' =&gt; 0, 'p2_data9' =&gt; 85, 'p2_data8' =&gt; 85, 'p2_data3' =&gt; 128, 'p2_data2' =&gt; 0, 'p2_data1' =&gt; 0, 'p2_data7' =&gt; 85, 'p2_data6' =&gt; 86, 'p2_data5' =&gt; 170, 'p2_data4' =&gt; 170, 'p6_data7' =&gt; 85, 'p6_data6' =&gt; 86, 'p6_data5' =&gt; 170, 'p6_data4' =&gt; 170, 'p6_data3' =&gt; 128, 'p6_data2' =&gt; 0, 'p6_data1' =&gt; 0, 'time_hour' =&gt; 38, 'p6_data9' =&gt; 85, 'p6_data8' =&gt; 85, 'p1_data4' =&gt; 170, 'p1_data5' =&gt; 170, 'p1_data6' =&gt; 86, 'p1_data7' =&gt; 85, 'p1_data1' =&gt; 0, 'p1_data2' =&gt; 0, 'p1_data3' =&gt; 128, 'p1_data8' =&gt; 85, 'p1_data9' =&gt; 85, 'p3_data10' =&gt; 85, 'p3_data11' =&gt; 0, 'p3_data12' =&gt; 0, 'lock_switch' =&gt; 1, 'timer_switch' =&gt; 0, 'p4_data1' =&gt; 0, 'p4_data3' =&gt; 128, 'p4_data2' =&gt; 0, 'p4_data5' =&gt; 170, 'boost_time' =&gt; 0, 'p4_data7' =&gt; 85, 'p4_data6' =&gt; 86, 'p4_data9' =&gt; 85, 'p4_data8' =&gt; 85, 'boost_switch' =&gt; 0, 'derog_time' =&gt; 0, 'data1' =&gt; 0, 'p2_data12' =&gt; 0, 'p2_data11' =&gt; 0, 'p2_data10' =&gt; 85, 'p7_data6' =&gt; 86, 'p7_data4' =&gt; 170, 'p7_data5' =&gt; 170, 'p7_data10' =&gt; 85, 'p7_data11' =&gt; 0, 'p7_data12' =&gt; 0, </text:p>
          </table:table-cell>
          <table:table-cell table:style-name="ce73" table:number-columns-repeated="16382"/>
        </table:table-row>
        <table:table-row table:style-name="ro4">
          <table:table-cell table:style-name="ce74" office:value-type="string" calcext:value-type="string">
            <text:p>Heatzy_Boiler</text:p>
          </table:table-cell>
          <table:table-cell table:style-name="ce76" office:value-type="string" calcext:value-type="string">
            <text:p>array ( 'did' =&gt; 'kbWS4yHv0ERiaUEYOITc8g', 'updated_at' =&gt; 1773475156, 'attr' =&gt; array ( 'com_t1' =&gt; 30, 'com_t2' =&gt; 50, 'cur_power' =&gt; 0, 'cur_mode' =&gt; 'stop', 'signal_power' =&gt; 7, 'lock_switch' =&gt; 0, 't1_temp' =&gt; 159, 'derog_mode' =&gt; 0, 'peak_hours' =&gt; 0, 'cft_temp' =&gt; 600, 'eco_temp' =&gt; 560, 'peak_signal' =&gt; 0, 'timer_switch' =&gt; 0, ),</text:p>
          </table:table-cell>
          <table:table-cell table:style-name="ce73" table:number-columns-repeated="16382"/>
        </table:table-row>
        <table:table-row table:style-name="ro4">
          <table:table-cell/>
          <table:table-cell table:style-name="ce75"/>
          <table:table-cell table:style-name="ce73" table:number-columns-repeated="16382"/>
        </table:table-row>
        <table:table-row table:style-name="ro4" table:number-rows-repeated="1048570">
          <table:table-cell table:number-columns-repeated="2"/>
          <table:table-cell table:style-name="ce73" table:number-columns-repeated="16382"/>
        </table:table-row>
        <table:table-row table:style-name="ro4">
          <table:table-cell table:number-columns-repeated="2"/>
          <table:table-cell table:style-name="ce73" table:number-columns-repeated="1638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17">00/00/0000</text:date>, <text:time style:data-style-name="N2" text:time-value="21:01:54.2786217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07T19:10:46.065233700</meta:creation-date>
    <dc:date>2026-03-17T21:15:44.343318400</dc:date>
    <meta:editing-duration>PT22H50M35S</meta:editing-duration>
    <meta:editing-cycles>29</meta:editing-cycles>
    <meta:generator>LibreOffice/26.2.1.2$Windows_X86_64 LibreOffice_project/620$Build-2</meta:generator>
    <meta:document-statistic meta:table-count="6" meta:cell-count="1690" meta:object-count="0"/>
  </office:meta>
</office:document-meta>
</file>