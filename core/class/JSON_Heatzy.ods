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5.946cm"/>
    </style:style>
    <style:style style:name="co4" style:family="table-column">
      <style:table-column-properties fo:break-before="auto" style:column-width="7.5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916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416cm"/>
    </style:style>
    <style:style style:name="co17" style:family="table-column">
      <style:table-column-properties fo:break-before="auto" style:column-width="2.833cm"/>
    </style:style>
    <style:style style:name="co18" style:family="table-column">
      <style:table-column-properties fo:break-before="auto" style:column-width="5.447cm"/>
    </style:style>
    <style:style style:name="co19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/>
    </style:style>
    <style:style style:name="ce5" style:family="table-cell" style:parent-style-name="Default">
      <style:text-properties style:font-name="Courier New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modules" table:style-name="ta1">
        <table:table-column table:style-name="co1" table:number-columns-repeated="28" table:default-cell-style-name="Default"/>
        <table:table-row table:style-name="ro1">
          <table:table-cell table:number-columns-repeated="26"/>
          <table:table-cell office:value-type="string" calcext:value-type="string">
            <text:p>"Modules":[</text:p>
          </table:table-cell>
          <table:table-cell/>
        </table:table-row>
        <table:table-row table:style-name="ro1">
          <table:table-cell table:number-columns-repeated="27"/>
          <table:table-cell office:value-type="string" calcext:value-type="string">
            <text:p>{"name":"xxx","id":"xx","cmds":[0,1,2]}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,</text:p>
          </table:table-cell>
          <table:table-cell office:value-type="string" calcext:value-type="string">
            <text:p>{"name":"xxx","id":"xx","cmds":[0,1,2]}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]</text:p>
          </table:table-cell>
          <table:table-cell/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4"/>
        <table:table-column table:style-name="co17" table:default-cell-style-name="ce12"/>
        <table:table-column table:style-name="co18" table:default-cell-style-name="ce12"/>
        <table:table-column table:style-name="co13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cmd_id</text:p>
          </table:table-cell>
          <table:table-cell table:style-name="ce1" office:value-type="string" calcext:value-type="string">
            <text:p>Logic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IsHistorized</text:p>
          </table:table-cell>
          <table:table-cell table:style-name="ce1" office:value-type="string" calcext:value-type="string">
            <text:p>IsVisible</text:p>
          </table:table-cell>
          <table:table-cell table:style-name="ce3"/>
          <table:table-cell table:style-name="ce11" office:value-type="string" calcext:value-type="string">
            <text:p>"cmds":[</text:p>
          </table:table-cell>
          <table:table-cell table:style-name="ce11"/>
          <table:table-cell table:style-name="ce14"/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 table:style-name="ce14"/>
          <table:table-cell table:style-name="ce17" table:formula="of:=&quot;&quot;&amp;IF([.T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 table:style-name="ce14"/>
          <table:table-cell table:style-name="ce17" table:formula="of:=IF([.S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 table:style-name="ce14"/>
          <table:table-cell table:style-name="ce17" table:formula="of:=IF([.S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true ,&quot;setValue&quot;:null                  ,&quot;Display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true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5])" office:value-type="float" office:value="0" calcext:value-type="float">
            <text:p>0</text:p>
          </table:table-cell>
          <table:table-cell table:style-name="ce14"/>
          <table:table-cell table:style-name="ce17" table:formula="of:=IF([.S4]=&quot;&quot;;&quot; &quot;;IF([.B5]&lt;&gt;&quot;&quot;;&quot;,&quot;;&quot;]&quot;))&#10;&amp;IF([.B5]&lt;&gt;&quot;&quot;;&quot;{&quot;&quot;cmd&quot;&quot;:&quot;&quot;&quot;&amp;[.B5]&amp;&quot;&quot;&quot;&quot;&amp;REPT(&quot; &quot;;20-LEN([.B5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quot;&quot;&amp;[.N5]&amp;&quot;&quot;&quot;&quot;&amp;REPT(&quot; &quot;;30-LEN([.N5]));&quot;null&quot;&amp;REPT(&quot; &quot;;30-4+2))&#10;&amp;&quot;,&quot;&quot;&quot;&amp;[.O$1]&amp;&quot;&quot;&quot;:&quot;&amp;[.O5]&#10;&amp;&quot;,&quot;&quot;&quot;&amp;[.P$1]&amp;&quot;&quot;&quot;:&quot;&amp;[.P5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 table:style-name="ce14"/>
          <table:table-cell table:style-name="ce17" table:formula="of:=IF([.S5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’parameters':['step':0.5]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7])" office:value-type="float" office:value="25" calcext:value-type="float">
            <text:p>25</text:p>
          </table:table-cell>
          <table:table-cell table:style-name="ce14"/>
          <table:table-cell table:style-name="ce17" table:formula="of:=IF([.S6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O$1]&amp;&quot;&quot;&quot;:&quot;&amp;[.O7]&#10;&amp;&quot;,&quot;&quot;&quot;&amp;[.P$1]&amp;&quot;&quot;&quot;:&quot;&amp;[.P7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&quot;:&quot;’parameters':['step':0.5]&quot;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":"’parameters':['step':0.5]" <text:s text:c="4"/>,"IsHistorized":0,"IsVisible":0}}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8])" office:value-type="float" office:value="0" calcext:value-type="float">
            <text:p>0</text:p>
          </table:table-cell>
          <table:table-cell table:style-name="ce14"/>
          <table:table-cell table:style-name="ce17" table:formula="of:=IF([.S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’parameters':['step':0.5]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9])" office:value-type="float" office:value="25" calcext:value-type="float">
            <text:p>25</text:p>
          </table:table-cell>
          <table:table-cell table:style-name="ce14"/>
          <table:table-cell table:style-name="ce17" table:formula="of:=IF([.S8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&quot;:&quot;’parameters':['step':0.5]&quot;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":"’parameters':['step':0.5]" <text:s text:c="4"/>,"IsHistorized":0,"IsVisible":0}}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0])" office:value-type="float" office:value="0" calcext:value-type="float">
            <text:p>0</text:p>
          </table:table-cell>
          <table:table-cell table:style-name="ce14"/>
          <table:table-cell table:style-name="ce17" table:formula="of:=IF([.S9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O$1]&amp;&quot;&quot;&quot;:&quot;&amp;[.O10]&#10;&amp;&quot;,&quot;&quot;&quot;&amp;[.P$1]&amp;&quot;&quot;&quot;:&quot;&amp;[.P10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1])" office:value-type="float" office:value="0" calcext:value-type="float">
            <text:p>0</text:p>
          </table:table-cell>
          <table:table-cell table:style-name="ce14"/>
          <table:table-cell table:style-name="ce17" table:formula="of:=IF([.S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2])" office:value-type="float" office:value="0" calcext:value-type="float">
            <text:p>0</text:p>
          </table:table-cell>
          <table:table-cell table:style-name="ce14"/>
          <table:table-cell table:style-name="ce17" table:formula="of:=IF([.S11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3])" office:value-type="float" office:value="0" calcext:value-type="float">
            <text:p>0</text:p>
          </table:table-cell>
          <table:table-cell table:style-name="ce14"/>
          <table:table-cell table:style-name="ce17" table:formula="of:=IF([.S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 table:style-name="ce14"/>
          <table:table-cell table:style-name="ce17" table:formula="of:=IF([.S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 table:style-name="ce14"/>
          <table:table-cell table:style-name="ce17" table:formula="of:=IF([.S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 table:style-name="ce14"/>
          <table:table-cell table:style-name="ce17" table:formula="of:=IF([.S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 table:style-name="ce14"/>
          <table:table-cell table:style-name="ce17" table:formula="of:=IF([.S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 table:style-name="ce14"/>
          <table:table-cell table:style-name="ce17" table:formula="of:=IF([.S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 table:style-name="ce14"/>
          <table:table-cell table:style-name="ce17" table:formula="of:=IF([.S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 table:style-name="ce14"/>
          <table:table-cell table:style-name="ce17" table:formula="of:=IF([.S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 table:style-name="ce14"/>
          <table:table-cell table:style-name="ce17" table:formula="of:=IF([.S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 table:style-name="ce14"/>
          <table:table-cell table:style-name="ce17" table:formula="of:=IF([.S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 table:style-name="ce14"/>
          <table:table-cell table:style-name="ce17" table:formula="of:=IF([.S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 table:style-name="ce14"/>
          <table:table-cell table:style-name="ce17" table:formula="of:=IF([.S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 table:style-name="ce14"/>
          <table:table-cell table:style-name="ce17" table:formula="of:=IF([.S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 table:style-name="ce14"/>
          <table:table-cell table:style-name="ce17" table:formula="of:=IF([.S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 table:style-name="ce14"/>
          <table:table-cell table:style-name="ce17" table:formula="of:=IF([.S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 table:style-name="ce14"/>
          <table:table-cell table:style-name="ce17" table:formula="of:=IF([.S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 table:style-name="ce14"/>
          <table:table-cell table:style-name="ce17" table:formula="of:=IF([.S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 table:style-name="ce14"/>
          <table:table-cell table:style-name="ce17" table:formula="of:=IF([.S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 table:style-name="ce14"/>
          <table:table-cell table:style-name="ce17" table:formula="of:=IF([.S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 table:style-name="ce14"/>
          <table:table-cell table:style-name="ce17" table:formula="of:=IF([.S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 table:style-name="ce14"/>
          <table:table-cell table:style-name="ce17" table:formula="of:=IF([.S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 table:style-name="ce14"/>
          <table:table-cell table:style-name="ce17" table:formula="of:=IF([.S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 table:style-name="ce14"/>
          <table:table-cell table:style-name="ce17" table:formula="of:=IF([.S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 table:style-name="ce14"/>
          <table:table-cell table:style-name="ce17" table:formula="of:=IF([.S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 table:style-name="ce14"/>
          <table:table-cell table:style-name="ce17" table:formula="of:=IF([.S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38])" office:value-type="float" office:value="0" calcext:value-type="float">
            <text:p>0</text:p>
          </table:table-cell>
          <table:table-cell table:style-name="ce14"/>
          <table:table-cell table:style-name="ce17" table:formula="of:=IF([.S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’parameters':['step':1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23" calcext:value-type="float">
            <text:p>23</text:p>
          </table:table-cell>
          <table:table-cell table:style-name="ce14"/>
          <table:table-cell table:style-name="ce17" table:formula="of:=IF([.S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&quot;:&quot;’parameters':['step':1]&quot;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":"’parameters':['step':1]" <text:s text:c="6"/>,"IsHistorized":0,"IsVisible":1}}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0])" office:value-type="float" office:value="0" calcext:value-type="float">
            <text:p>0</text:p>
          </table:table-cell>
          <table:table-cell table:style-name="ce14"/>
          <table:table-cell table:style-name="ce17" table:formula="of:=IF([.S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’parameters':['step':30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1])" office:value-type="float" office:value="24" calcext:value-type="float">
            <text:p>24</text:p>
          </table:table-cell>
          <table:table-cell table:style-name="ce14"/>
          <table:table-cell table:style-name="ce17" table:formula="of:=IF([.S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&quot;:&quot;’parameters':['step':30]&quot;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":"’parameters':['step':30]" <text:s text:c="5"/>,"IsHistorized":0,"IsVisible":1}}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2])" office:value-type="float" office:value="0" calcext:value-type="float">
            <text:p>0</text:p>
          </table:table-cell>
          <table:table-cell table:style-name="ce14"/>
          <table:table-cell table:style-name="ce17" table:formula="of:=IF([.S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3])" office:value-type="float" office:value="0" calcext:value-type="float">
            <text:p>0</text:p>
          </table:table-cell>
          <table:table-cell table:style-name="ce14"/>
          <table:table-cell table:style-name="ce17" table:formula="of:=IF([.S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4])" office:value-type="float" office:value="0" calcext:value-type="float">
            <text:p>0</text:p>
          </table:table-cell>
          <table:table-cell table:style-name="ce14"/>
          <table:table-cell table:style-name="ce17" table:formula="of:=IF([.S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5])" office:value-type="float" office:value="0" calcext:value-type="float">
            <text:p>0</text:p>
          </table:table-cell>
          <table:table-cell table:style-name="ce14"/>
          <table:table-cell table:style-name="ce17" table:formula="of:=IF([.S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6])" office:value-type="float" office:value="0" calcext:value-type="float">
            <text:p>0</text:p>
          </table:table-cell>
          <table:table-cell table:style-name="ce14"/>
          <table:table-cell table:style-name="ce17" table:formula="of:=IF([.S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 table:style-name="ce14"/>
          <table:table-cell table:style-name="ce17" table:formula="of:=IF([.S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 table:style-name="ce14"/>
          <table:table-cell table:style-name="ce17" table:formula="of:=IF([.S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 table:style-name="ce14"/>
          <table:table-cell table:style-name="ce17" table:formula="of:=IF([.S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style-name="ce14"/>
          <table:table-cell table:style-name="ce17" table:formula="of:=IF([.S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1,&quot;IsVisible&quot;:1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1,"IsVisible":1}}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/>
          <table:table-cell table:style-name="ce14"/>
          <table:table-cell table:style-name="ce17" table:formula="of:=IF([.S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2,&quot;IsVisible&quot;:2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2,"IsVisible":2}}</text:p>
          </table:table-cell>
          <table:table-cell table:style-name="ce20"/>
        </table:table-row>
        <table:table-row table:style-name="ro1">
          <table:table-cell table:number-columns-repeated="17"/>
          <table:table-cell table:style-name="ce14"/>
          <table:table-cell table:style-name="ce17" table:formula="of:=IF([.S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style-name="ce14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MAX([.Q1:.Q53])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2"/>
        </table:table-row>
        <table:table-row table:style-name="ro1" table:number-rows-repeated="27">
          <table:table-cell table:number-columns-repeated="17"/>
          <table:table-cell table:style-name="ce5" table:number-columns-repeated="2"/>
          <table:table-cell table:number-columns-repeated="2"/>
        </table:table-row>
        <table:table-row table:style-name="ro1" table:number-rows-repeated="104849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8:47:58.11463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2-15T18:56:11.042959000</dc:date>
    <meta:editing-duration>PT3H9M41S</meta:editing-duration>
    <meta:editing-cycles>8</meta:editing-cycles>
    <meta:generator>LibreOffice/26.2.0.3$Windows_X86_64 LibreOffice_project/620$Build-3</meta:generator>
    <meta:document-statistic meta:table-count="3" meta:cell-count="635" meta:object-count="0"/>
  </office:meta>
</office:document-meta>
</file>