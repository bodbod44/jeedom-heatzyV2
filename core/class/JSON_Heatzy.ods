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2.884cm"/>
    </style:style>
    <style:style style:name="co11" style:family="table-column">
      <style:table-column-properties fo:break-before="auto" style:column-width="2.916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3.685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37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857cm"/>
    </style:style>
    <style:style style:name="co18" style:family="table-column">
      <style:table-column-properties fo:break-before="auto" style:column-width="5.156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2.833cm"/>
    </style:style>
    <style:style style:name="co22" style:family="table-column">
      <style:table-column-properties fo:break-before="auto" style:column-width="5.447cm"/>
    </style:style>
    <style:style style:name="co23" style:family="table-column">
      <style:table-column-properties fo:break-before="auto" style:column-width="3.413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4.212cm"/>
    </style:style>
    <style:style style:name="co26" style:family="table-column">
      <style:table-column-properties fo:break-before="auto" style:column-width="2.531cm"/>
    </style:style>
    <style:style style:name="co27" style:family="table-column">
      <style:table-column-properties fo:break-before="auto" style:column-width="2.595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4.175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0.799cm"/>
    </style:style>
    <style:style style:name="co34" style:family="table-column">
      <style:table-column-properties fo:break-before="auto" style:column-width="12.21cm"/>
    </style:style>
    <style:style style:name="co35" style:family="table-column">
      <style:table-column-properties fo:break-before="auto" style:column-width="10.714cm"/>
    </style:style>
    <style:style style:name="co36" style:family="table-column">
      <style:table-column-properties fo:break-before="auto" style:column-width="57.566cm"/>
    </style:style>
    <style:style style:name="co37" style:family="table-column">
      <style:table-column-properties fo:break-before="auto" style:column-width="3.849cm"/>
    </style:style>
    <style:style style:name="co38" style:family="table-column">
      <style:table-column-properties fo:break-before="auto" style:column-width="23.172cm"/>
    </style:style>
    <style:style style:name="co39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557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8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27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b3cac7"/>
    </style:style>
    <style:style style:name="ce45" style:family="table-cell" style:parent-style-name="Default" style:data-style-name="N0">
      <style:table-cell-properties fo:background-color="#e8f2a1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74" style:family="table-cell" style:parent-style-name="Default">
      <style:table-cell-properties fo:background-color="#e8f2a1"/>
      <style:text-properties style:font-name="Courier New" fo:font-size="12pt"/>
    </style:style>
    <style:style style:name="ce75" style:family="table-cell" style:parent-style-name="Default">
      <style:text-properties fo:font-size="12pt"/>
    </style:style>
    <style:style style:name="ce71" style:family="table-cell" style:parent-style-name="Default">
      <style:text-properties fo:font-size="14pt" fo:font-weight="bold" style:font-weight-asian="bold" style:font-weight-complex="bold"/>
    </style:style>
    <style:style style:name="ce76" style:family="table-cell" style:parent-style-name="Default">
      <style:table-cell-properties fo:background-color="#ffff00"/>
      <style:text-properties fo:font-size="12pt"/>
    </style:style>
    <style:style style:name="ce77" style:family="table-cell" style:parent-style-name="Default">
      <style:text-properties style:font-name="Courier New" fo:font-size="12pt"/>
    </style:style>
    <style:style style:name="ce78" style:family="table-cell" style:parent-style-name="Default">
      <style:table-cell-properties fo:background-color="#ffff00"/>
      <style:text-properties style:font-name="Courier New" fo:font-size="12pt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6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md_id</text:p>
          </table:table-cell>
          <table:table-cell table:style-name="ce1" office:value-type="string" calcext:value-type="string">
            <text:p>Logic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1" office:value-type="string" calcext:value-type="string">
            <text:p>Display_param_ste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sHistorized</text:p>
          </table:table-cell>
          <table:table-cell table:style-name="ce1" office:value-type="string" calcext:value-type="string">
            <text:p>IsVisible</text:p>
          </table:table-cell>
          <table:table-cell table:style-name="ce3"/>
          <table:table-cell table:style-name="ce9" office:value-type="string" calcext:value-type="string">
            <text:p>{</text:p>
          </table:table-cell>
          <table:table-cell table:style-name="ce9"/>
          <table:table-cell table:style-name="ce30"/>
          <table:table-cell table:style-name="ce27" office:value-type="string" calcext:value-type="string">
            <text:p>.</text:p>
          </table:table-cell>
          <table:table-cell table:style-name="ce9" office:value-type="string" calcext:value-type="string">
            <text:p>"cmds":[</text:p>
          </table:table-cell>
          <table:table-cell table:style-name="ce9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"17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"17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"19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"19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5" table:default-cell-style-name="Default"/>
        <table:table-column table:style-name="co1" table:number-columns-repeated="5" table:default-cell-style-name="ce39"/>
        <table:table-column table:style-name="co26" table:default-cell-style-name="ce39"/>
        <table:table-column table:style-name="co27" table:default-cell-style-name="ce39"/>
        <table:table-column table:style-name="co1" table:number-columns-repeated="6" table:default-cell-style-name="ce39"/>
        <table:table-column table:style-name="co1" table:number-columns-repeated="21" table:default-cell-style-name="Default"/>
        <table:table-column table:style-name="co28" table:default-cell-style-name="Default"/>
        <table:table-column table:style-name="co1" table:number-columns-repeated="29" table:default-cell-style-name="Default"/>
        <table:table-column table:style-name="co1" table:number-columns-repeated="16319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27"/>
          <table:table-cell table:number-columns-repeated="2"/>
          <table:table-cell table:style-name="ce39" table:number-columns-repeated="16319"/>
        </table:table-row>
        <table:table-row table:style-name="ro3">
          <table:table-cell table:style-name="ce1" office:value-type="string" calcext:value-type="string">
            <text:p>product_name</text:p>
          </table:table-cell>
          <table:table-cell table:style-name="ce40" office:value-type="string" calcext:value-type="string">
            <text:p>Heatzy-xxxxx</text:p>
          </table:table-cell>
          <table:table-cell table:style-name="ce29" office:value-type="string" calcext:value-type="string">
            <text:p>Heatzy</text:p>
          </table:table-cell>
          <table:table-cell table:style-name="ce29" office:value-type="string" calcext:value-type="string">
            <text:p>Pilote2</text:p>
          </table:table-cell>
          <table:table-cell table:style-name="ce29" office:value-type="string" calcext:value-type="string">
            <text:p>Elec_Pro</text:p>
          </table:table-cell>
          <table:table-cell table:style-name="ce29" office:value-type="string" calcext:value-type="string">
            <text:p>Pilote_Soc</text:p>
          </table:table-cell>
          <table:table-cell table:style-name="ce29" office:value-type="string" calcext:value-type="string">
            <text:p>Elec_Pro_Soc</text:p>
          </table:table-cell>
          <table:table-cell table:style-name="ce29" office:value-type="string" calcext:value-type="string">
            <text:p>Pilote_Soc_C3</text:p>
          </table:table-cell>
          <table:table-cell table:style-name="ce29" office:value-type="string" calcext:value-type="string">
            <text:p>Elec_Pro_Ble</text:p>
          </table:table-cell>
          <table:table-cell table:style-name="ce29" office:value-type="string" calcext:value-type="string">
            <text:p>Pilote_Pro</text:p>
          </table:table-cell>
          <table:table-cell table:style-name="ce31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9" office:value-type="string" calcext:value-type="string">
            <text:p>onyx</text:p>
          </table:table-cell>
          <table:table-cell table:style-name="ce29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1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9"/>
          <table:table-cell table:style-name="Default" table:number-columns-repeated="16319"/>
        </table:table-row>
        <table:table-row table:style-name="ro4">
          <table:table-cell table:style-name="ce1" office:value-type="string" calcext:value-type="string">
            <text:p>product_key</text:p>
          </table:table-cell>
          <table:table-cell table:style-name="ce41" office:value-type="string" calcext:value-type="string">
            <text:p>xxxxxx</text:p>
          </table:table-cell>
          <table:table-cell table:style-name="ce55" office:value-type="string" calcext:value-type="string">
            <text:p>9420ae048da545c88fc6274d204dd25f</text:p>
          </table:table-cell>
          <table:table-cell table:style-name="ce55" office:value-type="string" calcext:value-type="string">
            <text:p>51d16c22a5f74280bc3cfe9ebcdc6402</text:p>
          </table:table-cell>
          <table:table-cell table:style-name="ce55" office:value-type="string" calcext:value-type="string">
            <text:p>4fc968a21e7243b390e9ede6f1c6465d</text:p>
          </table:table-cell>
          <table:table-cell table:style-name="ce55" office:value-type="string" calcext:value-type="string">
            <text:p>b9a67b6ce24b437d9794103fd317e627</text:p>
          </table:table-cell>
          <table:table-cell table:style-name="ce55" office:value-type="string" calcext:value-type="string">
            <text:p>b8c6657b66c34148b4dee64d615cefc7</text:p>
          </table:table-cell>
          <table:table-cell table:style-name="ce55" office:value-type="string" calcext:value-type="string">
            <text:p>46409c7f29d4411c85a3a46e5ee3703e</text:p>
          </table:table-cell>
          <table:table-cell table:style-name="ce55" office:value-type="string" calcext:value-type="string">
            <text:p>9dacde7ef459421eaf8dc4bea9385634</text:p>
          </table:table-cell>
          <table:table-cell table:style-name="ce55" office:value-type="string" calcext:value-type="string">
            <text:p>a77a929fcf0d4631bc4f669080376891</text:p>
          </table:table-cell>
          <table:table-cell table:style-name="ce55"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table:style-name="ce55" office:value-type="string" calcext:value-type="string">
            <text:p>bb10d064f8de409db633b750faa22a52</text:p>
          </table:table-cell>
          <table:table-cell table:style-name="ce55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22" table:number-columns-repeated="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5">
          <table:table-cell table:style-name="ce1" office:value-type="string" calcext:value-type="string">
            <text:p>Année</text:p>
          </table:table-cell>
          <table:table-cell table:style-name="ce40"/>
          <table:table-cell table:style-name="ce29" office:value-type="float" office:value="2016" calcext:value-type="float">
            <text:p>2016</text:p>
          </table:table-cell>
          <table:table-cell table:number-columns-repeated="2" table:style-name="ce29" office:value-type="float" office:value="2018" calcext:value-type="float">
            <text:p>2018</text:p>
          </table:table-cell>
          <table:table-cell table:number-columns-repeated="2" table:style-name="ce29" office:value-type="float" office:value="2019" calcext:value-type="float">
            <text:p>2019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float" office:value="2023" calcext:value-type="float">
            <text:p>2023</text:p>
          </table:table-cell>
          <table:table-cell table:style-name="ce29"/>
          <table:table-cell table:style-name="ce22" table:number-columns-repeated="2"/>
          <table:table-cell table:style-name="ce31"/>
          <table:table-cell table:style-name="ce21" table:number-columns-repeated="2"/>
          <table:table-cell table:style-name="ce22" table:number-columns-repeated="1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6">
          <table:table-cell table:style-name="ce1" office:value-type="string" calcext:value-type="string">
            <text:p>Génération</text:p>
          </table:table-cell>
          <table:table-cell table:style-name="ce40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22" table:number-columns-repeated="2"/>
          <table:table-cell table:style-name="ce31"/>
          <table:table-cell table:style-name="ce21" table:number-columns-repeated="2"/>
          <table:table-cell table:style-name="ce22" table:number-columns-repeated="1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style-name="ce42"/>
          <table:table-cell table:style-name="ce51" table:number-columns-repeated="24"/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6]&amp;&quot;&quot;&quot;,&quot;&quot;cmds&quot;&quot;:[&quot;&amp;&quot;&quot;&quot;&quot;&amp;COM.MICROSOFT.TEXTJOIN(&quot;&quot;&quot;,&quot;&quot;&quot;;1;COM.MICROSOFT.FILTER([.$A7:.$A65];[.B7:.B65]=&quot;x&quot;))&amp;&quot;&quot;&quot;&quot;&amp;&quot;]}&quot;" office:value-type="string" office:string-value="&#9;&quot;Heatzy-xxxxx&quot;:        {&quot;product_key&quot;:&quot;&quot;,&quot;cmds&quot;:[&quot;refresh&quot;]}" calcext:value-type="string">
            <text:p><text:tab/>"Heatzy-xxxxx": <text:s text:c="7"/>{"product_key":"","cmds":["refresh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6]&amp;&quot;&quot;&quot;,&quot;&quot;cmds&quot;&quot;:[&quot;&amp;&quot;&quot;&quot;&quot;&amp;COM.MICROSOFT.TEXTJOIN(&quot;&quot;&quot;,&quot;&quot;&quot;;1;COM.MICROSOFT.FILTER([.$A7:.$A65];[.C7:.C65]=&quot;x&quot;))&amp;&quot;&quot;&quot;&quot;&amp;&quot;]}&quot;" office:value-type="string" office:string-value="&#9;&quot;Heatzy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Heatzy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6]&amp;&quot;&quot;&quot;,&quot;&quot;cmds&quot;&quot;:[&quot;&amp;&quot;&quot;&quot;&quot;&amp;COM.MICROSOFT.TEXTJOIN(&quot;&quot;&quot;,&quot;&quot;&quot;;1;COM.MICROSOFT.FILTER([.$A7:.$A65];[.D7:.D65]=&quot;x&quot;))&amp;&quot;&quot;&quot;&quot;&amp;&quot;]}&quot;" office:value-type="string" office:string-value="&#9;&quot;Pilote2&quot;: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6]&amp;&quot;&quot;&quot;,&quot;&quot;cmds&quot;&quot;:[&quot;&amp;&quot;&quot;&quot;&quot;&amp;COM.MICROSOFT.TEXTJOIN(&quot;&quot;&quot;,&quot;&quot;&quot;;1;COM.MICROSOFT.FILTER([.$A7:.$A65];[.E7:.E65]=&quot;x&quot;))&amp;&quot;&quot;&quot;&quot;&amp;&quot;]}&quot;" office:value-type="string" office:string-value="&#9;&quot;Elec_Pro&quot;: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": <text:s text:c="11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6]&amp;&quot;&quot;&quot;,&quot;&quot;cmds&quot;&quot;:[&quot;&amp;&quot;&quot;&quot;&quot;&amp;COM.MICROSOFT.TEXTJOIN(&quot;&quot;&quot;,&quot;&quot;&quot;;1;COM.MICROSOFT.FILTER([.$A7:.$A65];[.F7:.F65]=&quot;x&quot;))&amp;&quot;&quot;&quot;&quot;&amp;&quot;]}&quot;" office:value-type="string" office:string-value="&#9;&quot;Pilote_Soc&quot;: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6]&amp;&quot;&quot;&quot;,&quot;&quot;cmds&quot;&quot;:[&quot;&amp;&quot;&quot;&quot;&quot;&amp;COM.MICROSOFT.TEXTJOIN(&quot;&quot;&quot;,&quot;&quot;&quot;;1;COM.MICROSOFT.FILTER([.$A7:.$A65];[.G7:.G65]=&quot;x&quot;))&amp;&quot;&quot;&quot;&quot;&amp;&quot;]}&quot;" office:value-type="string" office:string-value="&#9;&quot;Elec_Pro_Soc&quot;: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6]&amp;&quot;&quot;&quot;,&quot;&quot;cmds&quot;&quot;:[&quot;&amp;&quot;&quot;&quot;&quot;&amp;COM.MICROSOFT.TEXTJOIN(&quot;&quot;&quot;,&quot;&quot;&quot;;1;COM.MICROSOFT.FILTER([.$A7:.$A65];[.I7:.I65]=&quot;x&quot;))&amp;&quot;&quot;&quot;&quot;&amp;&quot;]}&quot;" office:value-type="string" office:string-value="&#9;&quot;Elec_Pro_Ble&quot;: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#REF!&amp;&quot;&quot;&quot;&quot;&amp;&quot;:&quot;&amp;REPT(&quot; &quot;;20-LEN(#REF!))&amp;&quot;{&quot;&quot;product_key&quot;&quot;:&quot;&quot;&quot;&amp;#REF!&amp;&quot;&quot;&quot;,&quot;&quot;cmds&quot;&quot;:[&quot;&amp;&quot;&quot;&quot;&quot;&amp;COM.MICROSOFT.TEXTJOIN(&quot;&quot;&quot;,&quot;&quot;&quot;;1;COM.MICROSOFT.FILTER([.$A7:.$A65];#REF!=&quot;x&quot;))&amp;&quot;&quot;&quot;&quot;&amp;&quot;]}&quot;" office:value-type="string" office:string-value="" calcext:value-type="error">
            <text:p>#RÉF !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6]&amp;&quot;&quot;&quot;,&quot;&quot;cmds&quot;&quot;:[&quot;&amp;&quot;&quot;&quot;&quot;&amp;COM.MICROSOFT.TEXTJOIN(&quot;&quot;&quot;,&quot;&quot;&quot;;1;COM.MICROSOFT.FILTER([.$A7:.$A65];[.J7:.J65]=&quot;x&quot;))&amp;&quot;&quot;&quot;&quot;&amp;&quot;]}&quot;" office:value-type="string" office:string-value="&#9;&quot;Pilote_Pro&quot;:          {&quot;product_key&quot;:&quot;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6]&amp;&quot;&quot;&quot;,&quot;&quot;cmds&quot;&quot;:[&quot;&amp;&quot;&quot;&quot;&quot;&amp;COM.MICROSOFT.TEXTJOIN(&quot;&quot;&quot;,&quot;&quot;&quot;;1;COM.MICROSOFT.FILTER([.$A7:.$A65];[.K7:.K65]=&quot;x&quot;))&amp;&quot;&quot;&quot;&quot;&amp;&quot;]}&quot;" office:value-type="string" office:string-value="&#9;&quot;Glow_Simple&quot;:         {&quot;product_key&quot;:&quot;&quot;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" calcext:value-type="string">
            <text:p><text:tab/>"Glow_Simple": <text:s text:c="8"/>{"product_key":"","cmds":["refresh","IsOnLine","eco_temp","eco_temp_consigneHL","cft_temp","cft_temp_consigneHL","Tendance","WindowOpened","EtatConsigne","mode","Confort","Eco","HorsGel","Off","etatprog","ProgOn","ProgOff","Lock_C_State","Lock_C_On","Lock_C_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8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6]&amp;&quot;&quot;&quot;,&quot;&quot;cmds&quot;&quot;:[&quot;&amp;&quot;&quot;&quot;&quot;&amp;COM.MICROSOFT.TEXTJOIN(&quot;&quot;&quot;,&quot;&quot;&quot;;1;COM.MICROSOFT.FILTER([.$A7:.$A65];[.L7:.L65]=&quot;x&quot;))&amp;&quot;&quot;&quot;&quot;&amp;&quot;]}&quot;" office:value-type="string" office:string-value="&#9;&quot;Glow&quot;:                {&quot;product_key&quot;:&quot;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number-columns-repeated="2" table:style-name="ce55" office:value-type="string" calcext:value-type="string">
            <text:p>x</text:p>
          </table:table-cell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13"/>
          <table:table-cell/>
          <table:table-cell table:formula="of:=IF(ISERROR(VLOOKUP([.A19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6]&amp;&quot;&quot;&quot;,&quot;&quot;cmds&quot;&quot;:[&quot;&amp;&quot;&quot;&quot;&quot;&amp;COM.MICROSOFT.TEXTJOIN(&quot;&quot;&quot;,&quot;&quot;&quot;;1;COM.MICROSOFT.FILTER([.$A7:.$A65];[.M7:.M65]=&quot;x&quot;))&amp;&quot;&quot;&quot;&quot;&amp;&quot;]}&quot;" office:value-type="string" office:string-value="&#9;&quot;Glow_Simple_ble&quot;:     {&quot;product_key&quot;:&quot;&quot;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","cmds":["refresh","IsOnLine","cur_temp","eco_temp","eco_temp_consigneHL","cft_temp","cft_temp_consigneHL","Tendance","WindowOpened","EtatConsigne","mode","Confort","Eco","HorsGel","Off","etatprog","ProgOn","ProgOff","Lock_C_State","Lock_C_On","Lock_C_Off","plugzy","plugzyon","plugzyoff","derog_mode","derog_off","derog_time_vacances","derog_vacances","derog_time_boost","derog_boost","derog_presence","detect_presence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number-columns-repeated="2" table:style-name="ce55" office:value-type="string" calcext:value-type="string">
            <text:p>x</text:p>
          </table:table-cell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13"/>
          <table:table-cell/>
          <table:table-cell table:formula="of:=IF(ISERROR(VLOOKUP([.A20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6]&amp;&quot;&quot;&quot;,&quot;&quot;cmds&quot;&quot;:[&quot;&amp;&quot;&quot;&quot;&quot;&amp;COM.MICROSOFT.TEXTJOIN(&quot;&quot;&quot;,&quot;&quot;&quot;;1;COM.MICROSOFT.FILTER([.$A7:.$A65];[.N7:.N65]=&quot;x&quot;))&amp;&quot;&quot;&quot;&quot;&amp;&quot;]}&quot;" office:value-type="string" office:string-value="&#9;&quot;onyx&quot;:                {&quot;product_key&quot;:&quot;&quot;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" calcext:value-type="string">
            <text:p><text:tab/>"onyx": <text:s text:c="15"/>{"product_key":"","cmds":["refresh","IsOnLine","eco_temp","eco_temp_consigneHL","cft_temp","cft_temp_consigneHL","Tendance","WindowOpened","EtatConsigne","mode","Confort","Eco","HorsGel","Off","etatprog","ProgOn","ProgOff","Lock_C_State","Lock_C_On","Lock_C_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6]&amp;&quot;&quot;&quot;,&quot;&quot;cmds&quot;&quot;:[&quot;&amp;&quot;&quot;&quot;&quot;&amp;COM.MICROSOFT.TEXTJOIN(&quot;&quot;&quot;,&quot;&quot;&quot;;1;COM.MICROSOFT.FILTER([.$A7:.$A65];[.O7:.O65]=&quot;x&quot;))&amp;&quot;&quot;&quot;&quot;&amp;&quot;]}&quot;" office:value-type="string" office:string-value="&#9;&quot;INEA&quot;:                {&quot;product_key&quot;:&quot;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","cmds":["refresh","IsOnLine","cur_temp","eco_temp","eco_temp_consigneHL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6]&amp;&quot;&quot;&quot;,&quot;&quot;cmds&quot;&quot;:[&quot;&amp;&quot;&quot;&quot;&quot;&amp;COM.MICROSOFT.TEXTJOIN(&quot;&quot;&quot;,&quot;&quot;&quot;;1;COM.MICROSOFT.FILTER([.$A7:.$A65];[.P7:.P65]=&quot;x&quot;))&amp;&quot;&quot;&quot;&quot;&amp;&quot;]}&quot;" office:value-type="string" office:string-value="&#9;&quot;BLOOM&quot;: 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6]&amp;&quot;&quot;&quot;,&quot;&quot;cmds&quot;&quot;:[&quot;&amp;&quot;&quot;&quot;&quot;&amp;COM.MICROSOFT.TEXTJOIN(&quot;&quot;&quot;,&quot;&quot;&quot;;1;COM.MICROSOFT.FILTER([.$A7:.$A65];[.Q7:.Q65]=&quot;x&quot;))&amp;&quot;&quot;&quot;&quot;&amp;&quot;]}&quot;" office:value-type="string" office:string-value="&#9;&quot;Shine&quot;:               {&quot;product_key&quot;:&quot;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9"/>
          <table:table-cell table:style-name="ce7" table:number-columns-repeated="16319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6]&amp;&quot;&quot;&quot;,&quot;&quot;cmds&quot;&quot;:[&quot;&amp;&quot;&quot;&quot;&quot;&amp;COM.MICROSOFT.TEXTJOIN(&quot;&quot;&quot;,&quot;&quot;&quot;;1;COM.MICROSOFT.FILTER([.$A7:.$A65];[.R7:.R65]=&quot;x&quot;))&amp;&quot;&quot;&quot;&quot;&amp;&quot;]}&quot;" office:value-type="string" office:string-value="&#9;&quot;Flam_Week2&quot;:          {&quot;product_key&quot;:&quot;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6]&amp;&quot;&quot;&quot;,&quot;&quot;cmds&quot;&quot;:[&quot;&amp;&quot;&quot;&quot;&quot;&amp;COM.MICROSOFT.TEXTJOIN(&quot;&quot;&quot;,&quot;&quot;&quot;;1;COM.MICROSOFT.FILTER([.$A7:.$A65];[.S7:.S65]=&quot;x&quot;))&amp;&quot;&quot;&quot;&quot;&amp;&quot;]}&quot;" office:value-type="string" office:string-value="&#9;&quot;Rocket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4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6]&amp;&quot;&quot;&quot;,&quot;&quot;cmds&quot;&quot;:[&quot;&amp;&quot;&quot;&quot;&quot;&amp;COM.MICROSOFT.TEXTJOIN(&quot;&quot;&quot;,&quot;&quot;&quot;;1;COM.MICROSOFT.FILTER([.$A7:.$A65];[.T7:.T65]=&quot;x&quot;))&amp;&quot;&quot;&quot;&quot;&amp;&quot;]}&quot;" office:value-type="string" office:string-value="&#9;&quot;Shine_Blu&quot;: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/>
          <table:table-cell table:style-name="ce46"/>
          <table:table-cell/>
          <table:table-cell table:style-name="ce55"/>
          <table:table-cell/>
          <table:table-cell table:style-name="ce46" table:number-columns-repeated="2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7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6]&amp;&quot;&quot;&quot;,&quot;&quot;cmds&quot;&quot;:[&quot;&amp;&quot;&quot;&quot;&quot;&amp;COM.MICROSOFT.TEXTJOIN(&quot;&quot;&quot;,&quot;&quot;&quot;;1;COM.MICROSOFT.FILTER([.$A7:.$A65];[.U7:.U65]=&quot;x&quot;))&amp;&quot;&quot;&quot;&quot;&amp;&quot;]}&quot;" office:value-type="string" office:string-value="&#9;&quot;Socket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/>
          <table:table-cell table:style-name="ce46"/>
          <table:table-cell/>
          <table:table-cell table:style-name="ce55"/>
          <table:table-cell/>
          <table:table-cell table:style-name="ce46" table:number-columns-repeated="2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8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6]&amp;&quot;&quot;&quot;,&quot;&quot;cmds&quot;&quot;:[&quot;&amp;&quot;&quot;&quot;&quot;&amp;COM.MICROSOFT.TEXTJOIN(&quot;&quot;&quot;,&quot;&quot;&quot;;1;COM.MICROSOFT.FILTER([.$A7:.$A65];[.V7:.V65]=&quot;x&quot;))&amp;&quot;&quot;&quot;&quot;&amp;&quot;]}&quot;" office:value-type="string" office:string-value="&#9;&quot;Vulcane&quot;: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style-name="ce46" office:value-type="string" calcext:value-type="string">
            <text:p>x</text:p>
          </table:table-cell>
          <table:table-cell table:number-columns-repeated="3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6]&amp;&quot;&quot;&quot;,&quot;&quot;cmds&quot;&quot;:[&quot;&amp;&quot;&quot;&quot;&quot;&amp;COM.MICROSOFT.TEXTJOIN(&quot;&quot;&quot;,&quot;&quot;&quot;;1;COM.MICROSOFT.FILTER([.$A7:.$A65];[.W7:.W65]=&quot;x&quot;))&amp;&quot;&quot;&quot;&quot;&amp;&quot;]}&quot;" office:value-type="string" office:string-value="&#9;&quot;Bridge&quot;:              {&quot;product_key&quot;:&quot;&quot;,&quot;cmds&quot;:[&quot;refresh&quot;,&quot;IsOnLine&quot;,&quot;etatprog&quot;,&quot;ProgOn&quot;,&quot;ProgOff&quot;]}" calcext:value-type="string">
            <text:p><text:tab/>"Bridge": <text:s text:c="13"/>{"product_key":"","cmds":["refresh","IsOnLine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style-name="ce46" office:value-type="string" calcext:value-type="string">
            <text:p>x</text:p>
          </table:table-cell>
          <table:table-cell table:number-columns-repeated="3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6]&amp;&quot;&quot;&quot;,&quot;&quot;cmds&quot;&quot;:[&quot;&amp;&quot;&quot;&quot;&quot;&amp;COM.MICROSOFT.TEXTJOIN(&quot;&quot;&quot;,&quot;&quot;&quot;;1;COM.MICROSOFT.FILTER([.$A7:.$A65];[.X7:.X65]=&quot;x&quot;))&amp;&quot;&quot;&quot;&quot;&amp;&quot;]}&quot;" office:value-type="string" office:string-value="&#9;&quot;Pilote_Duo&quot;: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style-name="ce46" office:value-type="string" calcext:value-type="string">
            <text:p>x</text:p>
          </table:table-cell>
          <table:table-cell table:number-columns-repeated="3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3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3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3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5" table:number-columns-repeated="2"/>
          <table:table-cell table:style-name="ce39" table:number-columns-repeated="13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 table:style-name="ce46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8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9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style-name="ce55" table:number-columns-repeated="4"/>
          <table:table-cell/>
          <table:table-cell table:style-name="ce55"/>
          <table:table-cell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3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4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5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6];[.AE:.AE];1;0));&quot;&quot;;&quot;x&quot;)">
            <text:p/>
          </table:table-cell>
          <table:table-cell table:style-name="ce7" table:number-columns-repeated="34"/>
          <table:table-cell table:number-columns-repeated="2"/>
          <table:table-cell table:style-name="Default" table:number-columns-repeated="16319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8"/>
          <table:table-cell table:style-name="Default" table:number-columns-repeated="16319"/>
        </table:table-row>
        <table:table-row table:style-name="ro1">
          <table:table-cell table:style-name="ce45" table:formula="of:=COM.MICROSOFT.CONCAT([.B68:.Y68])" office:value-type="string" office:string-value="&#13;     &#9;&quot;xxxxxx&quot;:                          {&quot;product_name&quot;:&quot;Heatzy-xxxxx&quot;        ,&quot;product_key&quot;:&quot;xxxxxx&quot;                          ,&quot;année&quot;:&quot;&quot;    ,&quot;génération&quot;:&quot;&quot;  ,&quot;cmds&quot;:[&quot;refresh&quot;]}&#13;    ,&#9;&quot;9420ae048da545c88fc6274d204dd25f&quot;:{&quot;product_name&quot;:&quot;Heatzy&quot;              ,&quot;product_key&quot;:&quot;9420ae048da545c88fc6274d204dd25f&quot;,&quot;année&quot;:&quot;2016&quot;,&quot;génération&quot;:&quot;1&quot; 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Elec_Pro&quot;            ,&quot;product_key&quot;:&quot;4fc968a21e7243b390e9ede6f1c6465d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9a67b6ce24b437d9794103fd317e627&quot;:{&quot;product_name&quot;:&quot;Pilote_Soc&quot;          ,&quot;product_key&quot;:&quot;b9a67b6ce24b437d9794103fd317e62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]}&#13;    ,&#9;&quot;46409c7f29d4411c85a3a46e5ee3703e&quot;:{&quot;product_name&quot;:&quot;Pilote_Soc_C3&quot;       ,&quot;product_key&quot;:&quot;46409c7f29d4411c85a3a46e5ee3703e&quot;,&quot;année&quot;:&quot;2022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9dacde7ef459421eaf8dc4bea9385634&quot;:{&quot;product_name&quot;:&quot;Elec_Pro_Ble&quot;        ,&quot;product_key&quot;:&quot;9dacde7ef459421eaf8dc4bea9385634&quot;,&quot;année&quot;:&quot;2023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a77a929fcf0d4631bc4f669080376891&quot;:{&quot;product_name&quot;:&quot;Pilote_Pro&quot;          ,&quot;product_key&quot;:&quot;a77a929fcf0d4631bc4f669080376891&quot;,&quot;année&quot;:&quot;&quot;    ,&quot;génération&quot;:&quot;&quot;  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année&quot;:&quot;&quot;    ,&quot;génération&quot;:&quot;&quot;  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&#13;    ,&#9;&quot;51c35c204f854cebbc780bf9785db409&quot;:{&quot;product_name&quot;:&quot;Glow&quot;                ,&quot;product_key&quot;:&quot;51c35c204f854cebbc780bf9785db409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année&quot;:&quot;&quot;    ,&quot;génération&quot;:&quot;&quot;  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année&quot;:&quot;&quot;    ,&quot;génération&quot;:&quot;&quot;  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&#13;    ,&#9;&quot;fc89066ee74c4149a9beb37d4ea93604&quot;:{&quot;product_name&quot;:&quot;INEA&quot;                ,&quot;product_key&quot;:&quot;fc89066ee74c4149a9beb37d4ea93604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année&quot;:&quot;&quot;    ,&quot;génération&quot;:&quot;&quot;  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année&quot;:&quot;&quot;    ,&quot;génération&quot;:&quot;&quot;  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année":"" <text:s text:c="3"/>,"génération":"" <text:s/>,"cmds":["refresh"]} <text:s text:c="3"/>,<text:tab/>"9420ae048da545c88fc6274d204dd25f":{"product_name":"Heatzy" <text:s text:c="13"/>,"product_key":"9420ae048da545c88fc6274d204dd25f","année":"2016","génération":"1" 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année":"2018","génération":"2" 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Elec_Pro" <text:s text:c="11"/>,"product_key":"4fc968a21e7243b390e9ede6f1c6465d","année":"2018","génération":"2" ,"cmds":["refresh","IsOnLine","EtatConsigne","mode","Confort","Eco","HorsGel","Off","etatprog","ProgOn","ProgOff","etatlock","LockOn","LockOff","derog_mode","derog_off","derog_time_vacances","derog_vacances","derog_time_boost","derog_boost"]} <text:s text:c="3"/>,<text:tab/>"b9a67b6ce24b437d9794103fd317e627":{"product_name":"Pilote_Soc" <text:s text:c="9"/>,"product_key":"b9a67b6ce24b437d9794103fd317e627","année":"2019","génération":"3" 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année":"2019","génération":"3" ,"cmds":["refresh","IsOnLine","EtatConsigne","mode","Confort","Eco","HorsGel","Off","etatprog","ProgOn","ProgOff"]} <text:s text:c="3"/>,<text:tab/>"46409c7f29d4411c85a3a46e5ee3703e":{"product_name":"Pilote_Soc_C3" <text:s text:c="6"/>,"product_key":"46409c7f29d4411c85a3a46e5ee3703e","année":"2022","génération":"4" ,"cmds":["refresh","IsOnLine","EtatConsigne","mode","Confort","Eco","HorsGel","Off","etatprog","ProgOn","ProgOff","etatlock","LockOn","LockOff","derog_mode","derog_off","derog_time_vacances","derog_vacances","derog_time_boost","derog_boost"]} <text:s text:c="3"/>,<text:tab/>"9dacde7ef459421eaf8dc4bea9385634":{"product_name":"Elec_Pro_Ble" <text:s text:c="7"/>,"product_key":"9dacde7ef459421eaf8dc4bea9385634","année":"2023","génération":"4" ,"cmds":["refresh","IsOnLine","EtatConsigne","mode","Confort","Eco","HorsGel","Off","etatprog","ProgOn","ProgOff","etatlock","LockOn","LockOff","derog_mode","derog_off","derog_time_vacances","derog_vacances","derog_time_boost","derog_boost"]} <text:s text:c="3"/>,<text:tab/>"a77a929fcf0d4631bc4f669080376891":{"product_name":"Pilote_Pro" <text:s text:c="9"/>,"product_key":"a77a929fcf0d4631bc4f669080376891","année":"" <text:s text:c="3"/>,"génération":"" <text:s/>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année":"" <text:s text:c="3"/>,"génération":"" <text:s/>,"cmds":["refresh","IsOnLine","eco_temp","eco_temp_consigneHL","cft_temp","cft_temp_consigneHL","Tendance","WindowOpened","EtatConsigne","mode","Confort","Eco","HorsGel","Off","etatprog","ProgOn","ProgOff","Lock_C_State","Lock_C_On","Lock_C_Off"]} <text:s text:c="3"/>,<text:tab/>"51c35c204f854cebbc780bf9785db409":{"product_name":"Glow" <text:s text:c="15"/>,"product_key":"51c35c204f854cebbc780bf9785db409","année":"" <text:s text:c="3"/>,"génération":"" <text:s/>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année":"" <text:s text:c="3"/>,"génération":"" <text:s/>,"cmds":["refresh","IsOnLine","cur_temp","eco_temp","eco_temp_consigneHL","cft_temp","cft_temp_consigneHL","Tendance","WindowOpened","EtatConsigne","mode","Confort","Eco","HorsGel","Off","etatprog","ProgOn","ProgOff","Lock_C_State","Lock_C_On","Lock_C_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année":"" <text:s text:c="3"/>,"génération":"" <text:s/>,"cmds":["refresh","IsOnLine","eco_temp","eco_temp_consigneHL","cft_temp","cft_temp_consigneHL","Tendance","WindowOpened","EtatConsigne","mode","Confort","Eco","HorsGel","Off","etatprog","ProgOn","ProgOff","Lock_C_State","Lock_C_On","Lock_C_Off"]} <text:s text:c="3"/>,<text:tab/>"fc89066ee74c4149a9beb37d4ea93604":{"product_name":"INEA" <text:s text:c="15"/>,"product_key":"fc89066ee74c4149a9beb37d4ea93604","année":"" <text:s text:c="3"/>,"génération":"" <text:s/>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année":"" <text:s text:c="3"/>,"génération":"" <text:s/>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année":"" <text:s text:c="3"/>,"génération":"" <text:s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année":"" <text:s text:c="3"/>,"génération":"" <text:s/>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année":"" <text:s text:c="3"/>,"génération":"" <text:s/>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année":"" <text:s text:c="3"/>,"génération":"" <text:s/>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année":"" <text:s text:c="3"/>,"génération":"" <text:s/>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année":"" <text:s text:c="3"/>,"génération":"" <text:s/>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année":"" <text:s text:c="3"/>,"génération":"" <text:s/>,"cmds":["refresh","IsOnLine","etatprog","ProgOn","ProgOff"]} <text:s text:c="3"/>,<text:tab/>"aa85e43fc4464e4d0000000000000000":{"product_name":"Pilote_Duo" <text:s text:c="9"/>,"product_key":"aa85e43fc4464e4d0000000000000000","année":"" <text:s text:c="3"/>,"génération":"" <text:s/>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année":"" <text:s text:c="3"/>,"génération":"" <text:s/>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product_key&quot;;&quot;,&quot;;&quot; &quot;)&amp;CHAR(9)&amp;&quot;&quot;&quot;&quot;&amp;[.B3]&amp;&quot;&quot;&quot;&quot;&amp;&quot;:&quot;&amp;REPT(&quot; &quot;;32-LEN([.B3]))&#10;&amp;&quot;{&quot;&quot;product_name&quot;&quot;:&quot;&quot;&quot;&amp;[.B2]&amp;&quot;&quot;&quot;&quot;&amp;REPT(&quot; &quot;;20-LEN([.B2]))&#10;&amp;&quot;,&quot;&quot;product_key&quot;&quot;:&quot;&quot;&quot;&amp;[.B3]&amp;&quot;&quot;&quot;&quot;&amp;REPT(&quot; &quot;;32-LEN([.B3]))&#10;&amp;&quot;,&quot;&quot;année&quot;&quot;:&quot;&quot;&quot;&amp;[.B4]&amp;&quot;&quot;&quot;&quot;&amp;REPT(&quot; &quot;;4-LEN([.B4]))&#10;&amp;&quot;,&quot;&quot;génération&quot;&quot;:&quot;&quot;&quot;&amp;[.B5]&amp;&quot;&quot;&quot;&quot;&amp;REPT(&quot; &quot;;2-LEN([.B5]))&#10;&#10;&amp;&quot;,&quot;&quot;cmds&quot;&quot;:[&quot;&amp;&quot;&quot;&quot;&quot;&amp;COM.MICROSOFT.TEXTJOIN(&quot;&quot;&quot;,&quot;&quot;&quot;;1;COM.MICROSOFT.FILTER([.$A7:.$A65];[.B7:.B65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année&quot;:&quot;&quot;    ,&quot;génération&quot;:&quot;&quot;  ,&quot;cmds&quot;:[&quot;refresh&quot;]}" calcext:value-type="string">
            <text:p> <text:s text:c="4"/><text:tab/>"xxxxxx": <text:s text:c="25"/>{"product_name":"Heatzy-xxxxx" <text:s text:c="7"/>,"product_key":"xxxxxx" <text:s text:c="25"/>,"année":"" <text:s text:c="3"/>,"génération":"" <text:s/>,"cmds":["refresh"]}</text:p>
          </table:table-cell>
          <table:table-cell table:style-name="ce28" table:formula="of:=CHAR(13)&amp;&quot;    &quot;&amp;IF([.B3]&lt;&gt;&quot;product_key&quot;;&quot;,&quot;;&quot; &quot;)&amp;CHAR(9)&amp;&quot;&quot;&quot;&quot;&amp;[.C3]&amp;&quot;&quot;&quot;&quot;&amp;&quot;:&quot;&amp;REPT(&quot; &quot;;32-LEN([.C3]))&#10;&amp;&quot;{&quot;&quot;product_name&quot;&quot;:&quot;&quot;&quot;&amp;[.C2]&amp;&quot;&quot;&quot;&quot;&amp;REPT(&quot; &quot;;20-LEN([.C2]))&#10;&amp;&quot;,&quot;&quot;product_key&quot;&quot;:&quot;&quot;&quot;&amp;[.C3]&amp;&quot;&quot;&quot;&quot;&amp;REPT(&quot; &quot;;32-LEN([.C3]))&#10;&amp;&quot;,&quot;&quot;année&quot;&quot;:&quot;&quot;&quot;&amp;[.C4]&amp;&quot;&quot;&quot;&quot;&amp;REPT(&quot; &quot;;4-LEN([.C4]))&#10;&amp;&quot;,&quot;&quot;génération&quot;&quot;:&quot;&quot;&quot;&amp;[.C5]&amp;&quot;&quot;&quot;&quot;&amp;REPT(&quot; &quot;;2-LEN([.C5]))&#10;&#10;&amp;&quot;,&quot;&quot;cmds&quot;&quot;:[&quot;&amp;&quot;&quot;&quot;&quot;&amp;COM.MICROSOFT.TEXTJOIN(&quot;&quot;&quot;,&quot;&quot;&quot;;1;COM.MICROSOFT.FILTER([.$A7:.$A65];[.C7:.C65]=&quot;x&quot;))&amp;&quot;&quot;&quot;&quot;&amp;&quot;]}&quot;" office:value-type="string" office:string-value="&#13;    ,&#9;&quot;9420ae048da545c88fc6274d204dd25f&quot;:{&quot;product_name&quot;:&quot;Heatzy&quot;              ,&quot;product_key&quot;:&quot;9420ae048da545c88fc6274d204dd25f&quot;,&quot;année&quot;:&quot;2016&quot;,&quot;génération&quot;:&quot;1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Heatzy" <text:s text:c="13"/>,"product_key":"9420ae048da545c88fc6274d204dd25f","année":"2016","génération":"1" 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product_key&quot;;&quot;,&quot;;&quot; &quot;)&amp;CHAR(9)&amp;&quot;&quot;&quot;&quot;&amp;[.D3]&amp;&quot;&quot;&quot;&quot;&amp;&quot;:&quot;&amp;REPT(&quot; &quot;;32-LEN([.D3]))&#10;&amp;&quot;{&quot;&quot;product_name&quot;&quot;:&quot;&quot;&quot;&amp;[.D2]&amp;&quot;&quot;&quot;&quot;&amp;REPT(&quot; &quot;;20-LEN([.D2]))&#10;&amp;&quot;,&quot;&quot;product_key&quot;&quot;:&quot;&quot;&quot;&amp;[.D3]&amp;&quot;&quot;&quot;&quot;&amp;REPT(&quot; &quot;;32-LEN([.D3]))&#10;&amp;&quot;,&quot;&quot;année&quot;&quot;:&quot;&quot;&quot;&amp;[.D4]&amp;&quot;&quot;&quot;&quot;&amp;REPT(&quot; &quot;;4-LEN([.D4]))&#10;&amp;&quot;,&quot;&quot;génération&quot;&quot;:&quot;&quot;&quot;&amp;[.D5]&amp;&quot;&quot;&quot;&quot;&amp;REPT(&quot; &quot;;2-LEN([.D5]))&#10;&#10;&amp;&quot;,&quot;&quot;cmds&quot;&quot;:[&quot;&amp;&quot;&quot;&quot;&quot;&amp;COM.MICROSOFT.TEXTJOIN(&quot;&quot;&quot;,&quot;&quot;&quot;;1;COM.MICROSOFT.FILTER([.$A7:.$A65];[.D7:.D65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année":"2018","génération":"2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product_key&quot;;&quot;,&quot;;&quot; &quot;)&amp;CHAR(9)&amp;&quot;&quot;&quot;&quot;&amp;[.E3]&amp;&quot;&quot;&quot;&quot;&amp;&quot;:&quot;&amp;REPT(&quot; &quot;;32-LEN([.E3]))&#10;&amp;&quot;{&quot;&quot;product_name&quot;&quot;:&quot;&quot;&quot;&amp;[.E2]&amp;&quot;&quot;&quot;&quot;&amp;REPT(&quot; &quot;;20-LEN([.E2]))&#10;&amp;&quot;,&quot;&quot;product_key&quot;&quot;:&quot;&quot;&quot;&amp;[.E3]&amp;&quot;&quot;&quot;&quot;&amp;REPT(&quot; &quot;;32-LEN([.E3]))&#10;&amp;&quot;,&quot;&quot;année&quot;&quot;:&quot;&quot;&quot;&amp;[.E4]&amp;&quot;&quot;&quot;&quot;&amp;REPT(&quot; &quot;;4-LEN([.E4]))&#10;&amp;&quot;,&quot;&quot;génération&quot;&quot;:&quot;&quot;&quot;&amp;[.E5]&amp;&quot;&quot;&quot;&quot;&amp;REPT(&quot; &quot;;2-LEN([.E5]))&#10;&#10;&amp;&quot;,&quot;&quot;cmds&quot;&quot;:[&quot;&amp;&quot;&quot;&quot;&quot;&amp;COM.MICROSOFT.TEXTJOIN(&quot;&quot;&quot;,&quot;&quot;&quot;;1;COM.MICROSOFT.FILTER([.$A7:.$A65];[.E7:.E65]=&quot;x&quot;))&amp;&quot;&quot;&quot;&quot;&amp;&quot;]}&quot;" office:value-type="string" office:string-value="&#13;    ,&#9;&quot;4fc968a21e7243b390e9ede6f1c6465d&quot;:{&quot;product_name&quot;:&quot;Elec_Pro&quot;            ,&quot;product_key&quot;:&quot;4fc968a21e7243b390e9ede6f1c6465d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4fc968a21e7243b390e9ede6f1c6465d":{"product_name":"Elec_Pro" <text:s text:c="11"/>,"product_key":"4fc968a21e7243b390e9ede6f1c6465d","année":"2018","génération":"2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E3]&lt;&gt;&quot;product_key&quot;;&quot;,&quot;;&quot; &quot;)&amp;CHAR(9)&amp;&quot;&quot;&quot;&quot;&amp;[.F3]&amp;&quot;&quot;&quot;&quot;&amp;&quot;:&quot;&amp;REPT(&quot; &quot;;32-LEN([.F3]))&#10;&amp;&quot;{&quot;&quot;product_name&quot;&quot;:&quot;&quot;&quot;&amp;[.F2]&amp;&quot;&quot;&quot;&quot;&amp;REPT(&quot; &quot;;20-LEN([.F2]))&#10;&amp;&quot;,&quot;&quot;product_key&quot;&quot;:&quot;&quot;&quot;&amp;[.F3]&amp;&quot;&quot;&quot;&quot;&amp;REPT(&quot; &quot;;32-LEN([.F3]))&#10;&amp;&quot;,&quot;&quot;année&quot;&quot;:&quot;&quot;&quot;&amp;[.F4]&amp;&quot;&quot;&quot;&quot;&amp;REPT(&quot; &quot;;4-LEN([.F4]))&#10;&amp;&quot;,&quot;&quot;génération&quot;&quot;:&quot;&quot;&quot;&amp;[.F5]&amp;&quot;&quot;&quot;&quot;&amp;REPT(&quot; &quot;;2-LEN([.F5]))&#10;&#10;&amp;&quot;,&quot;&quot;cmds&quot;&quot;:[&quot;&amp;&quot;&quot;&quot;&quot;&amp;COM.MICROSOFT.TEXTJOIN(&quot;&quot;&quot;,&quot;&quot;&quot;;1;COM.MICROSOFT.FILTER([.$A7:.$A65];[.F7:.F65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année":"2019","génération":"3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product_key&quot;;&quot;,&quot;;&quot; &quot;)&amp;CHAR(9)&amp;&quot;&quot;&quot;&quot;&amp;[.G3]&amp;&quot;&quot;&quot;&quot;&amp;&quot;:&quot;&amp;REPT(&quot; &quot;;32-LEN([.G3]))&#10;&amp;&quot;{&quot;&quot;product_name&quot;&quot;:&quot;&quot;&quot;&amp;[.G2]&amp;&quot;&quot;&quot;&quot;&amp;REPT(&quot; &quot;;20-LEN([.G2]))&#10;&amp;&quot;,&quot;&quot;product_key&quot;&quot;:&quot;&quot;&quot;&amp;[.G3]&amp;&quot;&quot;&quot;&quot;&amp;REPT(&quot; &quot;;32-LEN([.G3]))&#10;&amp;&quot;,&quot;&quot;année&quot;&quot;:&quot;&quot;&quot;&amp;[.G4]&amp;&quot;&quot;&quot;&quot;&amp;REPT(&quot; &quot;;4-LEN([.G4]))&#10;&amp;&quot;,&quot;&quot;génération&quot;&quot;:&quot;&quot;&quot;&amp;[.G5]&amp;&quot;&quot;&quot;&quot;&amp;REPT(&quot; &quot;;2-LEN([.G5]))&#10;&#10;&amp;&quot;,&quot;&quot;cmds&quot;&quot;:[&quot;&amp;&quot;&quot;&quot;&quot;&amp;COM.MICROSOFT.TEXTJOIN(&quot;&quot;&quot;,&quot;&quot;&quot;;1;COM.MICROSOFT.FILTER([.$A7:.$A65];[.G7:.G65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année":"2019","génération":"3" 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product_key&quot;;&quot;,&quot;;&quot; &quot;)&amp;CHAR(9)&amp;&quot;&quot;&quot;&quot;&amp;[.H3]&amp;&quot;&quot;&quot;&quot;&amp;&quot;:&quot;&amp;REPT(&quot; &quot;;32-LEN([.H3]))&#10;&amp;&quot;{&quot;&quot;product_name&quot;&quot;:&quot;&quot;&quot;&amp;[.H2]&amp;&quot;&quot;&quot;&quot;&amp;REPT(&quot; &quot;;20-LEN([.H2]))&#10;&amp;&quot;,&quot;&quot;product_key&quot;&quot;:&quot;&quot;&quot;&amp;[.H3]&amp;&quot;&quot;&quot;&quot;&amp;REPT(&quot; &quot;;32-LEN([.H3]))&#10;&amp;&quot;,&quot;&quot;année&quot;&quot;:&quot;&quot;&quot;&amp;[.H4]&amp;&quot;&quot;&quot;&quot;&amp;REPT(&quot; &quot;;4-LEN([.H4]))&#10;&amp;&quot;,&quot;&quot;génération&quot;&quot;:&quot;&quot;&quot;&amp;[.H5]&amp;&quot;&quot;&quot;&quot;&amp;REPT(&quot; &quot;;2-LEN([.H5]))&#10;&#10;&amp;&quot;,&quot;&quot;cmds&quot;&quot;:[&quot;&amp;&quot;&quot;&quot;&quot;&amp;COM.MICROSOFT.TEXTJOIN(&quot;&quot;&quot;,&quot;&quot;&quot;;1;COM.MICROSOFT.FILTER([.$A7:.$A65];[.H7:.H65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année&quot;:&quot;2022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46409c7f29d4411c85a3a46e5ee3703e":{"product_name":"Pilote_Soc_C3" <text:s text:c="6"/>,"product_key":"46409c7f29d4411c85a3a46e5ee3703e","année":"2022","génération":"4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product_key&quot;;&quot;,&quot;;&quot; &quot;)&amp;CHAR(9)&amp;&quot;&quot;&quot;&quot;&amp;[.I3]&amp;&quot;&quot;&quot;&quot;&amp;&quot;:&quot;&amp;REPT(&quot; &quot;;32-LEN([.I3]))&#10;&amp;&quot;{&quot;&quot;product_name&quot;&quot;:&quot;&quot;&quot;&amp;[.I2]&amp;&quot;&quot;&quot;&quot;&amp;REPT(&quot; &quot;;20-LEN([.I2]))&#10;&amp;&quot;,&quot;&quot;product_key&quot;&quot;:&quot;&quot;&quot;&amp;[.I3]&amp;&quot;&quot;&quot;&quot;&amp;REPT(&quot; &quot;;32-LEN([.I3]))&#10;&amp;&quot;,&quot;&quot;année&quot;&quot;:&quot;&quot;&quot;&amp;[.I4]&amp;&quot;&quot;&quot;&quot;&amp;REPT(&quot; &quot;;4-LEN([.I4]))&#10;&amp;&quot;,&quot;&quot;génération&quot;&quot;:&quot;&quot;&quot;&amp;[.I5]&amp;&quot;&quot;&quot;&quot;&amp;REPT(&quot; &quot;;2-LEN([.I5]))&#10;&#10;&amp;&quot;,&quot;&quot;cmds&quot;&quot;:[&quot;&amp;&quot;&quot;&quot;&quot;&amp;COM.MICROSOFT.TEXTJOIN(&quot;&quot;&quot;,&quot;&quot;&quot;;1;COM.MICROSOFT.FILTER([.$A7:.$A65];[.I7:.I65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année&quot;:&quot;2023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année":"2023","génération":"4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I3]&lt;&gt;&quot;product_key&quot;;&quot;,&quot;;&quot; &quot;)&amp;CHAR(9)&amp;&quot;&quot;&quot;&quot;&amp;[.J3]&amp;&quot;&quot;&quot;&quot;&amp;&quot;:&quot;&amp;REPT(&quot; &quot;;32-LEN([.J3]))&#10;&amp;&quot;{&quot;&quot;product_name&quot;&quot;:&quot;&quot;&quot;&amp;[.J2]&amp;&quot;&quot;&quot;&quot;&amp;REPT(&quot; &quot;;20-LEN([.J2]))&#10;&amp;&quot;,&quot;&quot;product_key&quot;&quot;:&quot;&quot;&quot;&amp;[.J3]&amp;&quot;&quot;&quot;&quot;&amp;REPT(&quot; &quot;;32-LEN([.J3]))&#10;&amp;&quot;,&quot;&quot;année&quot;&quot;:&quot;&quot;&quot;&amp;[.J4]&amp;&quot;&quot;&quot;&quot;&amp;REPT(&quot; &quot;;4-LEN([.J4]))&#10;&amp;&quot;,&quot;&quot;génération&quot;&quot;:&quot;&quot;&quot;&amp;[.J5]&amp;&quot;&quot;&quot;&quot;&amp;REPT(&quot; &quot;;2-LEN([.J5]))&#10;&#10;&amp;&quot;,&quot;&quot;cmds&quot;&quot;:[&quot;&amp;&quot;&quot;&quot;&quot;&amp;COM.MICROSOFT.TEXTJOIN(&quot;&quot;&quot;,&quot;&quot;&quot;;1;COM.MICROSOFT.FILTER([.$A7:.$A65];[.J7:.J65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année&quot;:&quot;&quot;    ,&quot;génération&quot;:&quot;&quot;  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année":"" <text:s text:c="3"/>,"génération":"" <text:s/>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product_key&quot;;&quot;,&quot;;&quot; &quot;)&amp;CHAR(9)&amp;&quot;&quot;&quot;&quot;&amp;[.K3]&amp;&quot;&quot;&quot;&quot;&amp;&quot;:&quot;&amp;REPT(&quot; &quot;;32-LEN([.K3]))&#10;&amp;&quot;{&quot;&quot;product_name&quot;&quot;:&quot;&quot;&quot;&amp;[.K2]&amp;&quot;&quot;&quot;&quot;&amp;REPT(&quot; &quot;;20-LEN([.K2]))&#10;&amp;&quot;,&quot;&quot;product_key&quot;&quot;:&quot;&quot;&quot;&amp;[.K3]&amp;&quot;&quot;&quot;&quot;&amp;REPT(&quot; &quot;;32-LEN([.K3]))&#10;&amp;&quot;,&quot;&quot;année&quot;&quot;:&quot;&quot;&quot;&amp;[.K4]&amp;&quot;&quot;&quot;&quot;&amp;REPT(&quot; &quot;;4-LEN([.K4]))&#10;&amp;&quot;,&quot;&quot;génération&quot;&quot;:&quot;&quot;&quot;&amp;[.K5]&amp;&quot;&quot;&quot;&quot;&amp;REPT(&quot; &quot;;2-LEN([.K5]))&#10;&#10;&amp;&quot;,&quot;&quot;cmds&quot;&quot;:[&quot;&amp;&quot;&quot;&quot;&quot;&amp;COM.MICROSOFT.TEXTJOIN(&quot;&quot;&quot;,&quot;&quot;&quot;;1;COM.MICROSOFT.FILTER([.$A7:.$A65];[.K7:.K65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année&quot;:&quot;&quot;    ,&quot;génération&quot;:&quot;&quot;  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" calcext:value-type="string">
            <text:p> <text:s text:c="3"/>,<text:tab/>"2fd622e45283470f9e27e8e6167d7533":{"product_name":"Glow_Simple" <text:s text:c="8"/>,"product_key":"2fd622e45283470f9e27e8e6167d7533","année":"" <text:s text:c="3"/>,"génération":"" <text:s/>,"cmds":["refresh","IsOnLine","eco_temp","eco_temp_consigneHL","cft_temp","cft_temp_consigneHL","Tendance","WindowOpened","EtatConsigne","mode","Confort","Eco","HorsGel","Off","etatprog","ProgOn","ProgOff","Lock_C_State","Lock_C_On","Lock_C_Off"]}</text:p>
          </table:table-cell>
          <table:table-cell table:style-name="ce28" table:formula="of:=CHAR(13)&amp;&quot;    &quot;&amp;IF([.K3]&lt;&gt;&quot;product_key&quot;;&quot;,&quot;;&quot; &quot;)&amp;CHAR(9)&amp;&quot;&quot;&quot;&quot;&amp;[.L3]&amp;&quot;&quot;&quot;&quot;&amp;&quot;:&quot;&amp;REPT(&quot; &quot;;32-LEN([.L3]))&#10;&amp;&quot;{&quot;&quot;product_name&quot;&quot;:&quot;&quot;&quot;&amp;[.L2]&amp;&quot;&quot;&quot;&quot;&amp;REPT(&quot; &quot;;20-LEN([.L2]))&#10;&amp;&quot;,&quot;&quot;product_key&quot;&quot;:&quot;&quot;&quot;&amp;[.L3]&amp;&quot;&quot;&quot;&quot;&amp;REPT(&quot; &quot;;32-LEN([.L3]))&#10;&amp;&quot;,&quot;&quot;année&quot;&quot;:&quot;&quot;&quot;&amp;[.L4]&amp;&quot;&quot;&quot;&quot;&amp;REPT(&quot; &quot;;4-LEN([.L4]))&#10;&amp;&quot;,&quot;&quot;génération&quot;&quot;:&quot;&quot;&quot;&amp;[.L5]&amp;&quot;&quot;&quot;&quot;&amp;REPT(&quot; &quot;;2-LEN([.L5]))&#10;&#10;&amp;&quot;,&quot;&quot;cmds&quot;&quot;:[&quot;&amp;&quot;&quot;&quot;&quot;&amp;COM.MICROSOFT.TEXTJOIN(&quot;&quot;&quot;,&quot;&quot;&quot;;1;COM.MICROSOFT.FILTER([.$A7:.$A65];[.L7:.L65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année":"" <text:s text:c="3"/>,"génération":"" <text:s/>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product_key&quot;;&quot;,&quot;;&quot; &quot;)&amp;CHAR(9)&amp;&quot;&quot;&quot;&quot;&amp;[.M3]&amp;&quot;&quot;&quot;&quot;&amp;&quot;:&quot;&amp;REPT(&quot; &quot;;32-LEN([.M3]))&#10;&amp;&quot;{&quot;&quot;product_name&quot;&quot;:&quot;&quot;&quot;&amp;[.M2]&amp;&quot;&quot;&quot;&quot;&amp;REPT(&quot; &quot;;20-LEN([.M2]))&#10;&amp;&quot;,&quot;&quot;product_key&quot;&quot;:&quot;&quot;&quot;&amp;[.M3]&amp;&quot;&quot;&quot;&quot;&amp;REPT(&quot; &quot;;32-LEN([.M3]))&#10;&amp;&quot;,&quot;&quot;année&quot;&quot;:&quot;&quot;&quot;&amp;[.M4]&amp;&quot;&quot;&quot;&quot;&amp;REPT(&quot; &quot;;4-LEN([.M4]))&#10;&amp;&quot;,&quot;&quot;génération&quot;&quot;:&quot;&quot;&quot;&amp;[.M5]&amp;&quot;&quot;&quot;&quot;&amp;REPT(&quot; &quot;;2-LEN([.M5]))&#10;&#10;&amp;&quot;,&quot;&quot;cmds&quot;&quot;:[&quot;&amp;&quot;&quot;&quot;&quot;&amp;COM.MICROSOFT.TEXTJOIN(&quot;&quot;&quot;,&quot;&quot;&quot;;1;COM.MICROSOFT.FILTER([.$A7:.$A65];[.M7:.M65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année&quot;:&quot;&quot;    ,&quot;génération&quot;:&quot;&quot;  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année":"" <text:s text:c="3"/>,"génération":"" <text:s/>,"cmds":["refresh","IsOnLine","cur_temp","eco_temp","eco_temp_consigneHL","cft_temp","cft_temp_consigneHL","Tendance","WindowOpened","EtatConsigne","mode","Confort","Eco","HorsGel","Off","etatprog","ProgOn","ProgOff","Lock_C_State","Lock_C_On","Lock_C_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product_key&quot;;&quot;,&quot;;&quot; &quot;)&amp;CHAR(9)&amp;&quot;&quot;&quot;&quot;&amp;[.N3]&amp;&quot;&quot;&quot;&quot;&amp;&quot;:&quot;&amp;REPT(&quot; &quot;;32-LEN([.N3]))&#10;&amp;&quot;{&quot;&quot;product_name&quot;&quot;:&quot;&quot;&quot;&amp;[.N2]&amp;&quot;&quot;&quot;&quot;&amp;REPT(&quot; &quot;;20-LEN([.N2]))&#10;&amp;&quot;,&quot;&quot;product_key&quot;&quot;:&quot;&quot;&quot;&amp;[.N3]&amp;&quot;&quot;&quot;&quot;&amp;REPT(&quot; &quot;;32-LEN([.N3]))&#10;&amp;&quot;,&quot;&quot;année&quot;&quot;:&quot;&quot;&quot;&amp;[.N4]&amp;&quot;&quot;&quot;&quot;&amp;REPT(&quot; &quot;;4-LEN([.N4]))&#10;&amp;&quot;,&quot;&quot;génération&quot;&quot;:&quot;&quot;&quot;&amp;[.N5]&amp;&quot;&quot;&quot;&quot;&amp;REPT(&quot; &quot;;2-LEN([.N5]))&#10;&#10;&amp;&quot;,&quot;&quot;cmds&quot;&quot;:[&quot;&amp;&quot;&quot;&quot;&quot;&amp;COM.MICROSOFT.TEXTJOIN(&quot;&quot;&quot;,&quot;&quot;&quot;;1;COM.MICROSOFT.FILTER([.$A7:.$A65];[.N7:.N65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année&quot;:&quot;&quot;    ,&quot;génération&quot;:&quot;&quot;  ,&quot;cmds&quot;:[&quot;refresh&quot;,&quot;IsOnLine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Lock_C_State&quot;,&quot;Lock_C_On&quot;,&quot;Lock_C_Off&quot;]}" calcext:value-type="string">
            <text:p> <text:s text:c="3"/>,<text:tab/>"bb10d064f8de409db633b750faa22a52":{"product_name":"onyx" <text:s text:c="15"/>,"product_key":"bb10d064f8de409db633b750faa22a52","année":"" <text:s text:c="3"/>,"génération":"" <text:s/>,"cmds":["refresh","IsOnLine","eco_temp","eco_temp_consigneHL","cft_temp","cft_temp_consigneHL","Tendance","WindowOpened","EtatConsigne","mode","Confort","Eco","HorsGel","Off","etatprog","ProgOn","ProgOff","Lock_C_State","Lock_C_On","Lock_C_Off"]}</text:p>
          </table:table-cell>
          <table:table-cell table:style-name="ce28" table:formula="of:=CHAR(13)&amp;&quot;    &quot;&amp;IF([.N3]&lt;&gt;&quot;product_key&quot;;&quot;,&quot;;&quot; &quot;)&amp;CHAR(9)&amp;&quot;&quot;&quot;&quot;&amp;[.O3]&amp;&quot;&quot;&quot;&quot;&amp;&quot;:&quot;&amp;REPT(&quot; &quot;;32-LEN([.O3]))&#10;&amp;&quot;{&quot;&quot;product_name&quot;&quot;:&quot;&quot;&quot;&amp;[.O2]&amp;&quot;&quot;&quot;&quot;&amp;REPT(&quot; &quot;;20-LEN([.O2]))&#10;&amp;&quot;,&quot;&quot;product_key&quot;&quot;:&quot;&quot;&quot;&amp;[.O3]&amp;&quot;&quot;&quot;&quot;&amp;REPT(&quot; &quot;;32-LEN([.O3]))&#10;&amp;&quot;,&quot;&quot;année&quot;&quot;:&quot;&quot;&quot;&amp;[.O4]&amp;&quot;&quot;&quot;&quot;&amp;REPT(&quot; &quot;;4-LEN([.O4]))&#10;&amp;&quot;,&quot;&quot;génération&quot;&quot;:&quot;&quot;&quot;&amp;[.O5]&amp;&quot;&quot;&quot;&quot;&amp;REPT(&quot; &quot;;2-LEN([.O5]))&#10;&#10;&amp;&quot;,&quot;&quot;cmds&quot;&quot;:[&quot;&amp;&quot;&quot;&quot;&quot;&amp;COM.MICROSOFT.TEXTJOIN(&quot;&quot;&quot;,&quot;&quot;&quot;;1;COM.MICROSOFT.FILTER([.$A7:.$A65];[.O7:.O65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année":"" <text:s text:c="3"/>,"génération":"" <text:s/>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product_key&quot;;&quot;,&quot;;&quot; &quot;)&amp;CHAR(9)&amp;&quot;&quot;&quot;&quot;&amp;[.P3]&amp;&quot;&quot;&quot;&quot;&amp;&quot;:&quot;&amp;REPT(&quot; &quot;;32-LEN([.P3]))&#10;&amp;&quot;{&quot;&quot;product_name&quot;&quot;:&quot;&quot;&quot;&amp;[.P2]&amp;&quot;&quot;&quot;&quot;&amp;REPT(&quot; &quot;;20-LEN([.P2]))&#10;&amp;&quot;,&quot;&quot;product_key&quot;&quot;:&quot;&quot;&quot;&amp;[.P3]&amp;&quot;&quot;&quot;&quot;&amp;REPT(&quot; &quot;;32-LEN([.P3]))&#10;&amp;&quot;,&quot;&quot;année&quot;&quot;:&quot;&quot;&quot;&amp;[.P4]&amp;&quot;&quot;&quot;&quot;&amp;REPT(&quot; &quot;;4-LEN([.P4]))&#10;&amp;&quot;,&quot;&quot;génération&quot;&quot;:&quot;&quot;&quot;&amp;[.P5]&amp;&quot;&quot;&quot;&quot;&amp;REPT(&quot; &quot;;2-LEN([.P5]))&#10;&#10;&amp;&quot;,&quot;&quot;cmds&quot;&quot;:[&quot;&amp;&quot;&quot;&quot;&quot;&amp;COM.MICROSOFT.TEXTJOIN(&quot;&quot;&quot;,&quot;&quot;&quot;;1;COM.MICROSOFT.FILTER([.$A7:.$A65];[.P7:.P65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product_key&quot;;&quot;,&quot;;&quot; &quot;)&amp;CHAR(9)&amp;&quot;&quot;&quot;&quot;&amp;[.Q3]&amp;&quot;&quot;&quot;&quot;&amp;&quot;:&quot;&amp;REPT(&quot; &quot;;32-LEN([.Q3]))&#10;&amp;&quot;{&quot;&quot;product_name&quot;&quot;:&quot;&quot;&quot;&amp;[.Q2]&amp;&quot;&quot;&quot;&quot;&amp;REPT(&quot; &quot;;20-LEN([.Q2]))&#10;&amp;&quot;,&quot;&quot;product_key&quot;&quot;:&quot;&quot;&quot;&amp;[.Q3]&amp;&quot;&quot;&quot;&quot;&amp;REPT(&quot; &quot;;32-LEN([.Q3]))&#10;&amp;&quot;,&quot;&quot;année&quot;&quot;:&quot;&quot;&quot;&amp;[.Q4]&amp;&quot;&quot;&quot;&quot;&amp;REPT(&quot; &quot;;4-LEN([.Q4]))&#10;&amp;&quot;,&quot;&quot;génération&quot;&quot;:&quot;&quot;&quot;&amp;[.Q5]&amp;&quot;&quot;&quot;&quot;&amp;REPT(&quot; &quot;;2-LEN([.Q5]))&#10;&#10;&amp;&quot;,&quot;&quot;cmds&quot;&quot;:[&quot;&amp;&quot;&quot;&quot;&quot;&amp;COM.MICROSOFT.TEXTJOIN(&quot;&quot;&quot;,&quot;&quot;&quot;;1;COM.MICROSOFT.FILTER([.$A7:.$A65];[.Q7:.Q65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année":"" <text:s text:c="3"/>,"génération":"" <text:s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product_key&quot;;&quot;,&quot;;&quot; &quot;)&amp;CHAR(9)&amp;&quot;&quot;&quot;&quot;&amp;[.R3]&amp;&quot;&quot;&quot;&quot;&amp;&quot;:&quot;&amp;REPT(&quot; &quot;;32-LEN([.R3]))&#10;&amp;&quot;{&quot;&quot;product_name&quot;&quot;:&quot;&quot;&quot;&amp;[.R2]&amp;&quot;&quot;&quot;&quot;&amp;REPT(&quot; &quot;;20-LEN([.R2]))&#10;&amp;&quot;,&quot;&quot;product_key&quot;&quot;:&quot;&quot;&quot;&amp;[.R3]&amp;&quot;&quot;&quot;&quot;&amp;REPT(&quot; &quot;;32-LEN([.R3]))&#10;&amp;&quot;,&quot;&quot;année&quot;&quot;:&quot;&quot;&quot;&amp;[.R4]&amp;&quot;&quot;&quot;&quot;&amp;REPT(&quot; &quot;;4-LEN([.R4]))&#10;&amp;&quot;,&quot;&quot;génération&quot;&quot;:&quot;&quot;&quot;&amp;[.R5]&amp;&quot;&quot;&quot;&quot;&amp;REPT(&quot; &quot;;2-LEN([.R5]))&#10;&#10;&amp;&quot;,&quot;&quot;cmds&quot;&quot;:[&quot;&amp;&quot;&quot;&quot;&quot;&amp;COM.MICROSOFT.TEXTJOIN(&quot;&quot;&quot;,&quot;&quot;&quot;;1;COM.MICROSOFT.FILTER([.$A7:.$A65];[.R7:.R65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année":"" <text:s text:c="3"/>,"génération":"" <text:s/>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product_key&quot;;&quot;,&quot;;&quot; &quot;)&amp;CHAR(9)&amp;&quot;&quot;&quot;&quot;&amp;[.S3]&amp;&quot;&quot;&quot;&quot;&amp;&quot;:&quot;&amp;REPT(&quot; &quot;;32-LEN([.S3]))&#10;&amp;&quot;{&quot;&quot;product_name&quot;&quot;:&quot;&quot;&quot;&amp;[.S2]&amp;&quot;&quot;&quot;&quot;&amp;REPT(&quot; &quot;;20-LEN([.S2]))&#10;&amp;&quot;,&quot;&quot;product_key&quot;&quot;:&quot;&quot;&quot;&amp;[.S3]&amp;&quot;&quot;&quot;&quot;&amp;REPT(&quot; &quot;;32-LEN([.S3]))&#10;&amp;&quot;,&quot;&quot;année&quot;&quot;:&quot;&quot;&quot;&amp;[.S4]&amp;&quot;&quot;&quot;&quot;&amp;REPT(&quot; &quot;;4-LEN([.S4]))&#10;&amp;&quot;,&quot;&quot;génération&quot;&quot;:&quot;&quot;&quot;&amp;[.S5]&amp;&quot;&quot;&quot;&quot;&amp;REPT(&quot; &quot;;2-LEN([.S5]))&#10;&#10;&amp;&quot;,&quot;&quot;cmds&quot;&quot;:[&quot;&amp;&quot;&quot;&quot;&quot;&amp;COM.MICROSOFT.TEXTJOIN(&quot;&quot;&quot;,&quot;&quot;&quot;;1;COM.MICROSOFT.FILTER([.$A7:.$A65];[.S7:.S65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product_key&quot;;&quot;,&quot;;&quot; &quot;)&amp;CHAR(9)&amp;&quot;&quot;&quot;&quot;&amp;[.T3]&amp;&quot;&quot;&quot;&quot;&amp;&quot;:&quot;&amp;REPT(&quot; &quot;;32-LEN([.T3]))&#10;&amp;&quot;{&quot;&quot;product_name&quot;&quot;:&quot;&quot;&quot;&amp;[.T2]&amp;&quot;&quot;&quot;&quot;&amp;REPT(&quot; &quot;;20-LEN([.T2]))&#10;&amp;&quot;,&quot;&quot;product_key&quot;&quot;:&quot;&quot;&quot;&amp;[.T3]&amp;&quot;&quot;&quot;&quot;&amp;REPT(&quot; &quot;;32-LEN([.T3]))&#10;&amp;&quot;,&quot;&quot;année&quot;&quot;:&quot;&quot;&quot;&amp;[.T4]&amp;&quot;&quot;&quot;&quot;&amp;REPT(&quot; &quot;;4-LEN([.T4]))&#10;&amp;&quot;,&quot;&quot;génération&quot;&quot;:&quot;&quot;&quot;&amp;[.T5]&amp;&quot;&quot;&quot;&quot;&amp;REPT(&quot; &quot;;2-LEN([.T5]))&#10;&#10;&amp;&quot;,&quot;&quot;cmds&quot;&quot;:[&quot;&amp;&quot;&quot;&quot;&quot;&amp;COM.MICROSOFT.TEXTJOIN(&quot;&quot;&quot;,&quot;&quot;&quot;;1;COM.MICROSOFT.FILTER([.$A7:.$A65];[.T7:.T65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product_key&quot;;&quot;,&quot;;&quot; &quot;)&amp;CHAR(9)&amp;&quot;&quot;&quot;&quot;&amp;[.U3]&amp;&quot;&quot;&quot;&quot;&amp;&quot;:&quot;&amp;REPT(&quot; &quot;;32-LEN([.U3]))&#10;&amp;&quot;{&quot;&quot;product_name&quot;&quot;:&quot;&quot;&quot;&amp;[.U2]&amp;&quot;&quot;&quot;&quot;&amp;REPT(&quot; &quot;;20-LEN([.U2]))&#10;&amp;&quot;,&quot;&quot;product_key&quot;&quot;:&quot;&quot;&quot;&amp;[.U3]&amp;&quot;&quot;&quot;&quot;&amp;REPT(&quot; &quot;;32-LEN([.U3]))&#10;&amp;&quot;,&quot;&quot;année&quot;&quot;:&quot;&quot;&quot;&amp;[.U4]&amp;&quot;&quot;&quot;&quot;&amp;REPT(&quot; &quot;;4-LEN([.U4]))&#10;&amp;&quot;,&quot;&quot;génération&quot;&quot;:&quot;&quot;&quot;&amp;[.U5]&amp;&quot;&quot;&quot;&quot;&amp;REPT(&quot; &quot;;2-LEN([.U5]))&#10;&#10;&amp;&quot;,&quot;&quot;cmds&quot;&quot;:[&quot;&amp;&quot;&quot;&quot;&quot;&amp;COM.MICROSOFT.TEXTJOIN(&quot;&quot;&quot;,&quot;&quot;&quot;;1;COM.MICROSOFT.FILTER([.$A7:.$A65];[.U7:.U65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product_key&quot;;&quot;,&quot;;&quot; &quot;)&amp;CHAR(9)&amp;&quot;&quot;&quot;&quot;&amp;[.V3]&amp;&quot;&quot;&quot;&quot;&amp;&quot;:&quot;&amp;REPT(&quot; &quot;;32-LEN([.V3]))&#10;&amp;&quot;{&quot;&quot;product_name&quot;&quot;:&quot;&quot;&quot;&amp;[.V2]&amp;&quot;&quot;&quot;&quot;&amp;REPT(&quot; &quot;;20-LEN([.V2]))&#10;&amp;&quot;,&quot;&quot;product_key&quot;&quot;:&quot;&quot;&quot;&amp;[.V3]&amp;&quot;&quot;&quot;&quot;&amp;REPT(&quot; &quot;;32-LEN([.V3]))&#10;&amp;&quot;,&quot;&quot;année&quot;&quot;:&quot;&quot;&quot;&amp;[.V4]&amp;&quot;&quot;&quot;&quot;&amp;REPT(&quot; &quot;;4-LEN([.V4]))&#10;&amp;&quot;,&quot;&quot;génération&quot;&quot;:&quot;&quot;&quot;&amp;[.V5]&amp;&quot;&quot;&quot;&quot;&amp;REPT(&quot; &quot;;2-LEN([.V5]))&#10;&#10;&amp;&quot;,&quot;&quot;cmds&quot;&quot;:[&quot;&amp;&quot;&quot;&quot;&quot;&amp;COM.MICROSOFT.TEXTJOIN(&quot;&quot;&quot;,&quot;&quot;&quot;;1;COM.MICROSOFT.FILTER([.$A7:.$A65];[.V7:.V65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product_key&quot;;&quot;,&quot;;&quot; &quot;)&amp;CHAR(9)&amp;&quot;&quot;&quot;&quot;&amp;[.W3]&amp;&quot;&quot;&quot;&quot;&amp;&quot;:&quot;&amp;REPT(&quot; &quot;;32-LEN([.W3]))&#10;&amp;&quot;{&quot;&quot;product_name&quot;&quot;:&quot;&quot;&quot;&amp;[.W2]&amp;&quot;&quot;&quot;&quot;&amp;REPT(&quot; &quot;;20-LEN([.W2]))&#10;&amp;&quot;,&quot;&quot;product_key&quot;&quot;:&quot;&quot;&quot;&amp;[.W3]&amp;&quot;&quot;&quot;&quot;&amp;REPT(&quot; &quot;;32-LEN([.W3]))&#10;&amp;&quot;,&quot;&quot;année&quot;&quot;:&quot;&quot;&quot;&amp;[.W4]&amp;&quot;&quot;&quot;&quot;&amp;REPT(&quot; &quot;;4-LEN([.W4]))&#10;&amp;&quot;,&quot;&quot;génération&quot;&quot;:&quot;&quot;&quot;&amp;[.W5]&amp;&quot;&quot;&quot;&quot;&amp;REPT(&quot; &quot;;2-LEN([.W5]))&#10;&#10;&amp;&quot;,&quot;&quot;cmds&quot;&quot;:[&quot;&amp;&quot;&quot;&quot;&quot;&amp;COM.MICROSOFT.TEXTJOIN(&quot;&quot;&quot;,&quot;&quot;&quot;;1;COM.MICROSOFT.FILTER([.$A7:.$A65];[.W7:.W65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année&quot;:&quot;&quot;    ,&quot;génération&quot;:&quot;&quot;  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année":"" <text:s text:c="3"/>,"génération":"" <text:s/>,"cmds":["refresh","IsOnLine","etatprog","ProgOn","ProgOff"]}</text:p>
          </table:table-cell>
          <table:table-cell table:style-name="ce28" table:formula="of:=CHAR(13)&amp;&quot;    &quot;&amp;IF([.W3]&lt;&gt;&quot;product_key&quot;;&quot;,&quot;;&quot; &quot;)&amp;CHAR(9)&amp;&quot;&quot;&quot;&quot;&amp;[.X3]&amp;&quot;&quot;&quot;&quot;&amp;&quot;:&quot;&amp;REPT(&quot; &quot;;32-LEN([.X3]))&#10;&amp;&quot;{&quot;&quot;product_name&quot;&quot;:&quot;&quot;&quot;&amp;[.X2]&amp;&quot;&quot;&quot;&quot;&amp;REPT(&quot; &quot;;20-LEN([.X2]))&#10;&amp;&quot;,&quot;&quot;product_key&quot;&quot;:&quot;&quot;&quot;&amp;[.X3]&amp;&quot;&quot;&quot;&quot;&amp;REPT(&quot; &quot;;32-LEN([.X3]))&#10;&amp;&quot;,&quot;&quot;année&quot;&quot;:&quot;&quot;&quot;&amp;[.X4]&amp;&quot;&quot;&quot;&quot;&amp;REPT(&quot; &quot;;4-LEN([.X4]))&#10;&amp;&quot;,&quot;&quot;génération&quot;&quot;:&quot;&quot;&quot;&amp;[.X5]&amp;&quot;&quot;&quot;&quot;&amp;REPT(&quot; &quot;;2-LEN([.X5]))&#10;&#10;&amp;&quot;,&quot;&quot;cmds&quot;&quot;:[&quot;&amp;&quot;&quot;&quot;&quot;&amp;COM.MICROSOFT.TEXTJOIN(&quot;&quot;&quot;,&quot;&quot;&quot;;1;COM.MICROSOFT.FILTER([.$A7:.$A65];[.X7:.X65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année":"" <text:s text:c="3"/>,"génération":"" <text:s/>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product_key&quot;;&quot;,&quot;;&quot; &quot;)&amp;CHAR(9)&amp;&quot;&quot;&quot;&quot;&amp;[.Y3]&amp;&quot;&quot;&quot;&quot;&amp;&quot;:&quot;&amp;REPT(&quot; &quot;;32-LEN([.Y3]))&#10;&amp;&quot;{&quot;&quot;product_name&quot;&quot;:&quot;&quot;&quot;&amp;[.Y2]&amp;&quot;&quot;&quot;&quot;&amp;REPT(&quot; &quot;;20-LEN([.Y2]))&#10;&amp;&quot;,&quot;&quot;product_key&quot;&quot;:&quot;&quot;&quot;&amp;[.Y3]&amp;&quot;&quot;&quot;&quot;&amp;REPT(&quot; &quot;;32-LEN([.Y3]))&#10;&amp;&quot;,&quot;&quot;année&quot;&quot;:&quot;&quot;&quot;&amp;[.Y4]&amp;&quot;&quot;&quot;&quot;&amp;REPT(&quot; &quot;;4-LEN([.Y4]))&#10;&amp;&quot;,&quot;&quot;génération&quot;&quot;:&quot;&quot;&quot;&amp;[.Y5]&amp;&quot;&quot;&quot;&quot;&amp;REPT(&quot; &quot;;2-LEN([.Y5]))&#10;&#10;&amp;&quot;,&quot;&quot;cmds&quot;&quot;:[&quot;&amp;&quot;&quot;&quot;&quot;&amp;COM.MICROSOFT.TEXTJOIN(&quot;&quot;&quot;,&quot;&quot;&quot;;1;COM.MICROSOFT.FILTER([.$A7:.$A65];[.Y7:.Y65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année&quot;:&quot;&quot;    ,&quot;génération&quot;:&quot;&quot;  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année":"" <text:s text:c="3"/>,"génération":"" <text:s/>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8"/>
          <table:table-cell table:style-name="Default" table:number-columns-repeated="16319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8"/>
          <table:table-cell table:style-name="Default" table:number-columns-repeated="16319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8"/>
          <table:table-cell table:style-name="Default" table:number-columns-repeated="16319"/>
        </table:table-row>
        <table:table-row table:style-name="ro1" table:number-rows-repeated="1048496">
          <table:table-cell table:number-columns-repeated="65"/>
          <table:table-cell table:style-name="Default" table:number-columns-repeated="16319"/>
        </table:table-row>
        <table:table-row table:style-name="ro1">
          <table:table-cell table:number-columns-repeated="65"/>
          <table:table-cell table:style-name="Default" table:number-columns-repeated="16319"/>
        </table:table-row>
      </table:table>
      <table:table table:name="Acknow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ce7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75"/>
        <table:table-column table:style-name="co36" table:default-cell-style-name="ce75"/>
        <table:table-column table:style-name="co1" table:number-columns-repeated="16382"/>
        <table:table-row table:style-name="ro7">
          <table:table-cell table:style-name="ce74" office:value-type="string" calcext:value-type="string">
            <text:p>{</text:p>
          </table:table-cell>
          <table:table-cell table:style-name="ce74"/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75" table:number-columns-repeated="16382"/>
        </table:table-row>
        <table:table-row table:style-name="ro7">
          <table:table-cell table:style-name="ce74" office:value-type="string" calcext:value-type="string">
            <text:p>}</text:p>
          </table:table-cell>
          <table:table-cell table:style-name="ce74"/>
          <table:table-cell table:style-name="ce75" table:number-columns-repeated="16382"/>
        </table:table-row>
        <table:table-row table:style-name="ro7" table:number-rows-repeated="1048569">
          <table:table-cell table:number-columns-repeated="2"/>
          <table:table-cell table:style-name="ce75" table:number-columns-repeated="16382"/>
        </table:table-row>
        <table:table-row table:style-name="ro7">
          <table:table-cell table:number-columns-repeated="2"/>
          <table:table-cell table:style-name="ce75" table:number-columns-repeated="16382"/>
        </table:table-row>
      </table:table>
      <table:table table:name="RetourAPI" table:style-name="ta1">
        <office:forms form:automatic-focus="false" form:apply-design-mode="false"/>
        <table:table-column table:style-name="co37" table:default-cell-style-name="ce75"/>
        <table:table-column table:style-name="co38" table:default-cell-style-name="ce75"/>
        <table:table-column table:style-name="co1" table:default-cell-style-name="ce75"/>
        <table:table-column table:style-name="co1" table:number-columns-repeated="16381"/>
        <table:table-row table:style-name="ro8">
          <table:table-cell table:style-name="ce71" office:value-type="string" calcext:value-type="string">
            <text:p>Modules</text:p>
          </table:table-cell>
          <table:table-cell table:style-name="ce71" office:value-type="string" calcext:value-type="string">
            <text:p>Attributs</text:p>
          </table:table-cell>
          <table:table-cell table:style-name="Default" table:number-columns-repeated="16382"/>
        </table:table-row>
        <table:table-row table:style-name="ro7">
          <table:table-cell office:value-type="string" calcext:value-type="string">
            <text:p>Glow_Simple_ble</text:p>
          </table:table-cell>
          <table:table-cell table:style-name="ce77" office:value-type="string" calcext:value-type="string">
            <text:p>{"attr":{"LOCK_C":0,"cft_tempH":1,"cft_tempL":44,"com_temp":5,"cur_mode":1,"cur_tempH":0,"cur_tempL":187,"derog_mode":0,"derog_time":0,"eco_tempH":0,"eco_tempL":100,"hour":20,"minute":51,"mode":"eco","on_off":0,"p1_data1":85,"p1_data10":0,"p1_data11":85,"p1_data12":85,"p1_data2":85,"p1_data3":85,"p1_data4":85,"p1_data5":85,"p1_data6":85,"p1_data7":85,"p1_data8":85,"p1_data9":0,"p2_data1":85,"p2_data10":0,"p2_data11":85,"p2_data12":85,"p2_data2":85,"p2_data3":85,"p2_data4":85,"p2_data5":85,"p2_data6":85,"p2_data7":85,"p2_data8":85,"p2_data9":0,"p3_data1":85,"p3_data10":0,"p3_data11":85,"p3_data12":85,"p3_data2":85,"p3_data3":85,"p3_data4":85,"p3_data5":85,"p3_data6":85,"p3_data7":85,"p3_data8":85,"p3_data9":0,"p4_data1":85,"p4_data10":0,"p4_data11":85,"p4_data12":85,"p4_data2":85,"p4_data3":85,"p4_data4":85,"p4_data5":85,"p4_data6":85,"p4_data7":85,"p4_data8":85,"p4_data9":0,"p5_data1":85,"p5_data10":0,"p5_data11":85,"p5_data12":85,"p5_data2":85,"p5_data3":85,"p5_data4":85,"p5_data5":85,"p5_data6":85,"p5_data7":85,"p5_data8":85,"p5_data9":0,"p6_data1":85,"p6_data10":0,"p6_data11":85,"p6_data12":85,"p6_data2":85,"p6_data3":85,"p6_data4":85,"p6_data5":85,"p6_data6":85,"p6_data7":21,"p6_data8":0,"p6_data9":0,"p7_data1":85,"p7_data10":0,"p7_data11":85,"p7_data12":85,"p7_data2":85,"p7_data3":85,"p7_data4":85,"p7_data5":85,"p7_data6":85,"p7_data7":21,"p7_data8":0,"p7_data9":0,"power_cnt":0,"power_dataH":0,"power_dataL":0,"timer_switch":0,"week":7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Pilote_Pro</text:p>
          </table:table-cell>
          <table:table-cell table:style-name="ce77" office:value-type="string" calcext:value-type="string">
            <text:p>{"attr":{"time_week":2,"eco_temp":175,"p4_data11":85,"p4_data10":85,"p4_data12":85,"mode":"cft","data2":0,"p5_data2":85,"p3_data9":85,"com_temp":70,"window_switch":0,"p5_data12":85,"p7_data7":85,"p5_data10":85,"p5_data11":85,"p7_data2":85,"p7_data3":85,"p7_data1":85,"p7_data8":85,"p7_data9":85,"p3_data2":85,"cur_temp":211,"p3_data3":85,"boost_time":0,"p5_data1":85,"p3_data8":85,"p5_data3":85,"p5_data4":85,"p5_data5":85,"p5_data6":85,"p5_data7":85,"p5_data8":85,"p5_data9":85,"p3_data1":85,"p3_data6":85,"p3_data7":85,"p3_data4":85,"p3_data5":85,"Heating_state":0,"time_min":0,"p6_data12":85,"p6_data11":85,"p6_data10":85,"cur_mode":"stop","derog_mode":0,"p1_data12":85,"p1_data10":85,"cur_signal":"stop","p2_data9":85,"p2_data8":85,"p2_data3":85,"p2_data2":85,"p2_data1":85,"p2_data7":85,"p2_data6":85,"p2_data5":85,"p2_data4":85,"p6_data7":85,"p6_data6":85,"p6_data5":85,"p6_data4":85,"p6_data3":85,"p6_data2":85,"p6_data1":85,"time_hour":37,"p6_data9":85,"p6_data8":85,"p1_data4":85,"p1_data5":85,"p1_data6":85,"p1_data7":85,"p1_data1":85,"p1_data2":85,"p1_data3":85,"p1_data8":85,"p1_data9":85,"p3_data10":85,"p3_data11":85,"p3_data12":85,"lock_switch":0,"timer_switch":0,"p4_data1":85,"p4_data3":85,"p4_data2":85,"p4_data5":85,"p4_data4":85,"p4_data7":85,"p4_data6":85,"p4_data9":85,"p4_data8":85,"temp_set_step":"off","boost_switch":0,"derog_time":0,"data1":0,"p2_data12":85,"p2_data11":85,"p2_data10":85,"p7_data6":85,"p7_data12":85,"p7_data4":85,"p7_data5":85,"cur_humi":55,"p7_data10":85,"p7_data11":85,"cft_temp":210,"p1_data11":85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Pilote_Soc</text:p>
          </table:table-cell>
          <table:table-cell table:style-name="ce77" office:value-type="string" calcext:value-type="string">
            <text:p>{"attr":{"time_week":1,"p4_data11":85,"p4_data10":85,"p4_data12":85,"mode":"stop","data2":0,"p5_data2":85,"p3_data9":85,"p5_data12":85,"p7_data7":85,"p5_data10":85,"p5_data11":85,"p7_data2":85,"p7_data3":85,"p7_data1":85,"p7_data8":85,"p7_data9":85,"p3_data2":85,"p3_data3":85,"p4_data4":85,"p5_data1":85,"p3_data8":85,"p5_data3":85,"p5_data4":85,"p5_data5":85,"p5_data6":85,"p5_data7":85,"p5_data8":85,"p5_data9":85,"p3_data1":85,"p3_data6":85,"p3_data7":85,"p3_data4":85,"p3_data5":85,"time_min":0,"p6_data12":85,"p6_data11":85,"p6_data10":85,"derog_mode":0,"p1_data12":0,"p1_data10":0,"p1_data11":0,"p2_data9":85,"p2_data8":85,"p2_data3":85,"p2_data2":85,"p2_data1":85,"p2_data7":85,"p2_data6":85,"p2_data5":85,"p2_data4":85,"p6_data7":85,"p6_data6":85,"p6_data5":85,"p6_data4":85,"p6_data3":85,"p6_data2":85,"p6_data1":85,"time_hour":38,"p6_data9":85,"p6_data8":85,"p1_data4":85,"p1_data5":0,"p1_data6":0,"p1_data7":80,"p1_data1":85,"p1_data2":85,"p1_data3":85,"p1_data8":85,"p1_data9":85,"p3_data10":85,"p3_data11":85,"p3_data12":85,"lock_switch":0,"timer_switch":0,"p4_data1":85,"p4_data3":85,"p4_data2":85,"p4_data5":85,"boost_time":0,"p4_data7":85,"p4_data6":85,"p4_data9":85,"p4_data8":85,"boost_switch":0,"derog_time":0,"data1":0,"p2_data12":85,"p2_data11":85,"p2_data10":85,"p7_data6":85,"p7_data4":85,"p7_data5":85,"p7_data10":85,"p7_data11":85,"p7_data12":85}}</text:p>
          </table:table-cell>
          <table:table-cell/>
          <table:table-cell table:style-name="ce75" table:number-columns-repeated="16381"/>
        </table:table-row>
        <table:table-row table:style-name="ro7">
          <table:table-cell table:style-name="ce76" office:value-type="string" calcext:value-type="string">
            <text:p>Heatzy_Boiler</text:p>
          </table:table-cell>
          <table:table-cell table:style-name="ce78" office:value-type="string" calcext:value-type="string">
            <text:p>{"attr":[]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Pilote2</text:p>
          </table:table-cell>
          <table:table-cell table:style-name="ce77" office:value-type="string" calcext:value-type="string">
            <text:p>{"attr":{"boost_switch":0,"boost_time":0,"data1":0,"data2":0,"derog_mode":0,"derog_time":0,"lock_switch":0,"mode":"stop","p1_data1":85,"p1_data10":0,"p1_data11":0,"p1_data12":0,"p1_data2":85,"p1_data3":85,"p1_data4":85,"p1_data5":0,"p1_data6":0,"p1_data7":80,"p1_data8":85,"p1_data9":85,"p2_data1":85,"p2_data10":0,"p2_data11":0,"p2_data12":85,"p2_data2":85,"p2_data3":85,"p2_data4":0,"p2_data5":80,"p2_data6":85,"p2_data7":85,"p2_data8":5,"p2_data9":0,"p3_data1":85,"p3_data10":0,"p3_data11":0,"p3_data12":85,"p3_data2":85,"p3_data3":85,"p3_data4":0,"p3_data5":80,"p3_data6":85,"p3_data7":85,"p3_data8":5,"p3_data9":0,"p4_data1":85,"p4_data10":0,"p4_data11":0,"p4_data12":84,"p4_data2":85,"p4_data3":5,"p4_data4":0,"p4_data5":0,"p4_data6":0,"p4_data7":0,"p4_data8":0,"p4_data9":0,"p5_data1":85,"p5_data10":0,"p5_data11":0,"p5_data12":84,"p5_data2":85,"p5_data3":21,"p5_data4":0,"p5_data5":80,"p5_data6":85,"p5_data7":85,"p5_data8":0,"p5_data9":0,"p6_data1":85,"p6_data10":0,"p6_data11":0,"p6_data12":84,"p6_data2":85,"p6_data3":85,"p6_data4":21,"p6_data5":0,"p6_data6":0,"p6_data7":0,"p6_data8":0,"p6_data9":0,"p7_data1":85,"p7_data10":0,"p7_data11":0,"p7_data12":84,"p7_data2":85,"p7_data3":85,"p7_data4":21,"p7_data5":0,"p7_data6":0,"p7_data7":0,"p7_data8":0,"p7_data9":0,"time_hour":40,"time_min":0,"time_week":6,"timer_switch":0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Pilote_Soc_C3</text:p>
          </table:table-cell>
          <table:table-cell table:style-name="ce77" office:value-type="string" calcext:value-type="string">
            <text:p>{"attr":{"time_week":7,"p4_data11":85,"p4_data10":85,"p4_data12":85,"mode":"stop","data2":0,"p5_data2":85,"p3_data9":85,"p5_data12":85,"p7_data7":85,"p5_data10":85,"p5_data11":85,"p7_data2":85,"p7_data3":85,"p7_data1":85,"p7_data8":85,"p7_data9":85,"p3_data2":85,"p3_data3":85,"p4_data4":85,"p5_data1":85,"p3_data8":85,"p5_data3":85,"p5_data4":85,"p5_data5":85,"p5_data6":85,"p5_data7":85,"p5_data8":85,"p5_data9":85,"p3_data1":85,"p3_data6":85,"p3_data7":85,"p3_data4":85,"p3_data5":85,"time_min":0,"p6_data12":85,"p6_data11":85,"p6_data10":85,"derog_mode":0,"p1_data12":85,"p1_data10":85,"p1_data11":85,"p2_data9":85,"p2_data8":85,"p2_data3":85,"p2_data2":85,"p2_data1":85,"p2_data7":85,"p2_data6":85,"p2_data5":85,"p2_data4":85,"p6_data7":85,"p6_data6":85,"p6_data5":85,"p6_data4":85,"p6_data3":85,"p6_data2":85,"p6_data1":85,"time_hour":18,"p6_data9":85,"p6_data8":85,"p1_data4":85,"p1_data5":85,"p1_data6":85,"p1_data7":85,"p1_data1":85,"p1_data2":85,"p1_data3":85,"p1_data8":85,"p1_data9":85,"p3_data10":85,"p3_data11":85,"p3_data12":85,"lock_switch":0,"timer_switch":0,"p4_data1":85,"p4_data3":85,"p4_data2":85,"p4_data5":85,"boost_time":0,"p4_data7":85,"p4_data6":85,"p4_data9":85,"p4_data8":85,"boost_switch":0,"derog_time":30,"data1":0,"p2_data12":85,"p2_data11":85,"p2_data10":85,"p7_data6":85,"p7_data4":85,"p7_data5":85,"p7_data10":85,"p7_data11":85,"p7_data12":85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Heatzy</text:p>
          </table:table-cell>
          <table:table-cell table:style-name="ce77" office:value-type="string" calcext:value-type="string">
            <text:p>{"attr":{"mode":"u505cu6b62"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Pilote2</text:p>
          </table:table-cell>
          <table:table-cell table:style-name="ce77" office:value-type="string" calcext:value-type="string">
            <text:p>{"attr":{"boost_switch":0,"boost_time":0,"data1":0,"data2":0,"derog_mode":0,"derog_time":0,"lock_switch":0,"mode":"stop","p1_data1":85,"p1_data10":84,"p1_data11":85,"p1_data12":85,"p1_data2":85,"p1_data3":85,"p1_data4":5,"p1_data5":80,"p1_data6":85,"p1_data7":85,"p1_data8":85,"p1_data9":5,"p2_data1":85,"p2_data10":84,"p2_data11":85,"p2_data12":85,"p2_data2":85,"p2_data3":85,"p2_data4":5,"p2_data5":80,"p2_data6":85,"p2_data7":85,"p2_data8":85,"p2_data9":1,"p3_data1":85,"p3_data10":80,"p3_data11":85,"p3_data12":85,"p3_data2":85,"p3_data3":85,"p3_data4":5,"p3_data5":80,"p3_data6":85,"p3_data7":85,"p3_data8":85,"p3_data9":5,"p4_data1":85,"p4_data10":84,"p4_data11":85,"p4_data12":85,"p4_data2":85,"p4_data3":85,"p4_data4":5,"p4_data5":80,"p4_data6":85,"p4_data7":85,"p4_data8":85,"p4_data9":5,"p5_data1":85,"p5_data10":80,"p5_data11":85,"p5_data12":85,"p5_data2":85,"p5_data3":85,"p5_data4":5,"p5_data5":80,"p5_data6":85,"p5_data7":85,"p5_data8":85,"p5_data9":21,"p6_data1":85,"p6_data10":64,"p6_data11":85,"p6_data12":85,"p6_data2":85,"p6_data3":85,"p6_data4":5,"p6_data5":80,"p6_data6":85,"p6_data7":85,"p6_data8":85,"p6_data9":21,"p7_data1":85,"p7_data10":84,"p7_data11":85,"p7_data12":85,"p7_data2":85,"p7_data3":85,"p7_data4":5,"p7_data5":80,"p7_data6":85,"p7_data7":85,"p7_data8":85,"p7_data9":5,"time_hour":18,"time_min":0,"time_week":7,"timer_switch":0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Elec_Pro</text:p>
          </table:table-cell>
          <table:table-cell table:style-name="ce77" office:value-type="string" calcext:value-type="string">
            <text:p>{"attr":{"boost_switch":0,"boost_time":0,"data1":0,"data2":0,"derog_mode":0,"derog_time":0,"lock_switch":0,"mode":"stop","p1_data1":170,"p1_data10":170,"p1_data11":170,"p1_data12":170,"p1_data2":170,"p1_data3":170,"p1_data4":170,"p1_data5":170,"p1_data6":170,"p1_data7":170,"p1_data8":170,"p1_data9":170,"p2_data1":85,"p2_data10":85,"p2_data11":85,"p2_data12":85,"p2_data2":85,"p2_data3":85,"p2_data4":85,"p2_data5":85,"p2_data6":85,"p2_data7":85,"p2_data8":85,"p2_data9":85,"p3_data1":85,"p3_data10":85,"p3_data11":85,"p3_data12":85,"p3_data2":85,"p3_data3":85,"p3_data4":85,"p3_data5":85,"p3_data6":85,"p3_data7":85,"p3_data8":85,"p3_data9":85,"p4_data1":85,"p4_data10":85,"p4_data11":85,"p4_data12":85,"p4_data2":85,"p4_data3":85,"p4_data4":85,"p4_data5":85,"p4_data6":85,"p4_data7":85,"p4_data8":85,"p4_data9":85,"p5_data1":170,"p5_data10":170,"p5_data11":170,"p5_data12":170,"p5_data2":170,"p5_data3":170,"p5_data4":170,"p5_data5":170,"p5_data6":170,"p5_data7":170,"p5_data8":170,"p5_data9":170,"p6_data1":85,"p6_data10":85,"p6_data11":85,"p6_data12":85,"p6_data2":85,"p6_data3":85,"p6_data4":85,"p6_data5":85,"p6_data6":85,"p6_data7":85,"p6_data8":85,"p6_data9":85,"p7_data1":85,"p7_data10":85,"p7_data11":85,"p7_data12":85,"p7_data2":85,"p7_data3":85,"p7_data4":85,"p7_data5":85,"p7_data6":85,"p7_data7":85,"p7_data8":85,"p7_data9":85,"time_hour":39,"time_min":0,"time_week":1,"timer_switch":0}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onyx</text:p>
          </table:table-cell>
          <table:table-cell table:style-name="ce77" office:value-type="string" calcext:value-type="string">
            <text:p>{"attr":{"LOCK_C":0,"p4_data11":85,"p4_data10":85,"p4_data12":85,"minute":57,"on_off":0,"mode":"eco","p5_data2":85,"power_dataH":0,"p3_data9":85,"power_dataL":182,"com_temp":6,"p5_data12":85,"p7_data7":85,"p5_data10":85,"p5_data11":85,"p7_data2":85,"p7_data3":85,"p7_data1":85,"p7_data8":85,"p7_data9":85,"cur_tempH":0,"p3_data2":85,"cur_tempL":206,"p3_data3":85,"p5_data1":85,"p3_data8":85,"p5_data3":85,"p5_data4":85,"p5_data5":85,"p5_data6":85,"p5_data7":85,"p5_data8":85,"p5_data9":85,"p3_data1":85,"p3_data6":85,"p3_data7":85,"p3_data4":85,"p3_data5":85,"eco_tempH":0,"eco_tempL":170,"p6_data12":85,"p6_data11":85,"p6_data10":85,"cur_mode":1,"derog_mode":0,"p1_data12":85,"p1_data10":85,"p1_data11":85,"p2_data9":85,"p2_data8":85,"p2_data3":85,"p2_data2":85,"p2_data1":85,"p2_data7":85,"p2_data6":85,"p2_data5":85,"p2_data4":85,"p6_data7":85,"p6_data6":85,"p6_data5":85,"p6_data4":85,"p6_data3":85,"p6_data2":85,"p6_data1":85,"p6_data9":85,"p6_data8":85,"p1_data4":85,"p1_data5":85,"p1_data6":85,"p1_data7":85,"p1_data1":85,"p1_data2":85,"p1_data3":85,"p1_data8":85,"p1_data9":85,"p3_data10":85,"p3_data11":85,"p3_data12":85,"cft_tempH":0,"cft_tempL":175,"hour":17,"timer_switch":0,"p4_data1":85,"p4_data3":85,"p4_data2":85,"p4_data5":85,"p4_data4":85,"p4_data7":85,"p4_data6":85,"p4_data9":85,"p4_data8":85,"power_cnt":0,"derog_time":30,"p2_data12":85,"p2_data11":85,"p2_data10":85,"week":2,"p7_data6":85,"p7_data4":85,"p7_data5":85,"p7_data10":85,"p7_data11":85,"p7_data12":85}}</text:p>
          </table:table-cell>
          <table:table-cell/>
          <table:table-cell table:style-name="ce75" table:number-columns-repeated="16381"/>
        </table:table-row>
        <table:table-row table:style-name="ro7">
          <table:table-cell table:style-name="ce76" office:value-type="string" calcext:value-type="string">
            <text:p>INEA</text:p>
          </table:table-cell>
          <table:table-cell table:style-name="ce78" office:value-type="string" calcext:value-type="string">
            <text:p>{"attr":[]}</text:p>
          </table:table-cell>
          <table:table-cell/>
          <table:table-cell table:style-name="ce75" table:number-columns-repeated="16381"/>
        </table:table-row>
        <table:table-row table:style-name="ro7">
          <table:table-cell office:value-type="string" calcext:value-type="string">
            <text:p>Glow_Simple</text:p>
          </table:table-cell>
          <table:table-cell table:style-name="ce77" office:value-type="string" calcext:value-type="string">
            <text:p>{"attr":{"LOCK_C":0,"cft_tempH":0,"cft_tempL":190,"com_temp":5,"cur_mode":3,"cur_tempH":0,"cur_tempL":182,"derog_mode":0,"derog_time":30,"eco_tempH":0,"eco_tempL":170,"hour":18,"minute":20,"mode":"stop","on_off":0,"p1_data1":85,"p1_data10":85,"p1_data11":85,"p1_data12":85,"p1_data2":85,"p1_data3":85,"p1_data4":85,"p1_data5":85,"p1_data6":85,"p1_data7":85,"p1_data8":85,"p1_data9":85,"p2_data1":85,"p2_data10":85,"p2_data11":85,"p2_data12":85,"p2_data2":85,"p2_data3":85,"p2_data4":85,"p2_data5":85,"p2_data6":85,"p2_data7":85,"p2_data8":85,"p2_data9":85,"p3_data1":85,"p3_data10":85,"p3_data11":85,"p3_data12":85,"p3_data2":85,"p3_data3":85,"p3_data4":85,"p3_data5":85,"p3_data6":85,"p3_data7":85,"p3_data8":85,"p3_data9":85,"p4_data1":85,"p4_data10":85,"p4_data11":85,"p4_data12":85,"p4_data2":85,"p4_data3":85,"p4_data4":85,"p4_data5":85,"p4_data6":85,"p4_data7":85,"p4_data8":85,"p4_data9":85,"p5_data1":85,"p5_data10":85,"p5_data11":85,"p5_data12":85,"p5_data2":85,"p5_data3":85,"p5_data4":85,"p5_data5":85,"p5_data6":85,"p5_data7":85,"p5_data8":85,"p5_data9":85,"p6_data1":85,"p6_data10":85,"p6_data11":85,"p6_data12":85,"p6_data2":85,"p6_data3":85,"p6_data4":85,"p6_data5":85,"p6_data6":85,"p6_data7":85,"p6_data8":85,"p6_data9":85,"p7_data1":85,"p7_data10":85,"p7_data11":85,"p7_data12":85,"p7_data2":85,"p7_data3":85,"p7_data4":85,"p7_data5":85,"p7_data6":85,"p7_data7":85,"p7_data8":85,"p7_data9":85,"power_cnt":0,"power_dataH":0,"power_dataL":0,"timer_switch":0,"week":2}} </text:p>
          </table:table-cell>
          <table:table-cell/>
          <table:table-cell table:style-name="ce75" table:number-columns-repeated="16381"/>
        </table:table-row>
        <table:table-row table:style-name="ro7" table:number-rows-repeated="3">
          <table:table-cell/>
          <table:table-cell table:style-name="ce77"/>
          <table:table-cell/>
          <table:table-cell table:style-name="ce75" table:number-columns-repeated="16381"/>
        </table:table-row>
        <table:table-row table:style-name="ro7" table:number-rows-repeated="3">
          <table:table-cell/>
          <table:table-cell table:style-name="ce77"/>
          <table:table-cell table:style-name="ce80"/>
          <table:table-cell table:style-name="ce75" table:number-columns-repeated="16381"/>
        </table:table-row>
        <table:table-row table:style-name="ro7" table:number-rows-repeated="15">
          <table:table-cell/>
          <table:table-cell table:style-name="ce77"/>
          <table:table-cell/>
          <table:table-cell table:style-name="ce75" table:number-columns-repeated="16381"/>
        </table:table-row>
        <table:table-row table:style-name="ro7" table:number-rows-repeated="1048541">
          <table:table-cell table:number-columns-repeated="3"/>
          <table:table-cell table:style-name="ce75" table:number-columns-repeated="16381"/>
        </table:table-row>
        <table:table-row table:style-name="ro7">
          <table:table-cell table:number-columns-repeated="3"/>
          <table:table-cell table:style-name="ce75" table:number-columns-repeated="16381"/>
        </table:table-row>
      </table:table>
      <table:table table:name="TODO" table:style-name="ta1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Pilote2</text:p>
          </table:table-cell>
          <table:table-cell office:value-type="string" calcext:value-type="string">
            <text:p>"boost_switch":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ifier tendane avec tempH-L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/>
        </table:table-row>
      </table:table>
      <table:named-expressions/>
      <table:database-ranges>
        <table:database-range table:name="__Anonymous_Sheet_DB__1" table:target-range-address="cmds.A1:cmds.Y142" table:display-filter-buttons="true"/>
        <table:database-range table:name="__Anonymous_Sheet_DB__5" table:target-range-address="RetourAPI.A1:RetourAPI.B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55:21.01389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5-12T20:09:41.803679200</dc:date>
    <meta:editing-duration>P1DT1H49M44S</meta:editing-duration>
    <meta:editing-cycles>51</meta:editing-cycles>
    <meta:generator>LibreOffice/26.2.1.2$Windows_X86_64 LibreOffice_project/620$Build-2</meta:generator>
    <meta:document-statistic meta:table-count="7" meta:cell-count="1853" meta:object-count="0"/>
  </office:meta>
</office:document-meta>
</file>